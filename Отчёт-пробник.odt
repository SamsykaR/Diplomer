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10000034CBD5B94F9.png" manifest:media-type="image/png"/>
  <manifest:file-entry manifest:full-path="Pictures/100000010000056F00000364E4B017A7.png" manifest:media-type="image/png"/>
  <manifest:file-entry manifest:full-path="Pictures/100000010000058300000386422E6BDA.png" manifest:media-type="image/png"/>
  <manifest:file-entry manifest:full-path="Pictures/10000000000001C000000187E8CED452.png" manifest:media-type="image/png"/>
  <manifest:file-entry manifest:full-path="Pictures/100000010000040100000320FD484C2E.png" manifest:media-type="image/png"/>
  <manifest:file-entry manifest:full-path="Pictures/1000000100000394000001E27947C64F.png" manifest:media-type="image/png"/>
  <manifest:file-entry manifest:full-path="Pictures/100000010000025C00000266A114C2BF.png" manifest:media-type="image/png"/>
  <manifest:file-entry manifest:full-path="Pictures/10000001000003FF0000031E87334468.png" manifest:media-type="image/png"/>
  <manifest:file-entry manifest:full-path="Pictures/100000010000029F0000031E70E9EA05.png" manifest:media-type="image/png"/>
  <manifest:file-entry manifest:full-path="Pictures/10000001000003FC0000031EFD3F3B7D.png" manifest:media-type="image/png"/>
  <manifest:file-entry manifest:full-path="Pictures/10000001000003FC0000031BA24A4AC1.png" manifest:media-type="image/png"/>
  <manifest:file-entry manifest:full-path="Pictures/10000001000003FC00000233816AA6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997cm"/>
    </style:style>
    <style:style style:name="Таблица1.B" style:family="table-column">
      <style:table-column-properties style:column-width="8.59cm"/>
    </style:style>
    <style:style style:name="Таблица1.C" style:family="table-column">
      <style:table-column-properties style:column-width="2.616cm"/>
    </style:style>
    <style:style style:name="Таблица1.D" style:family="table-column">
      <style:table-column-properties style:column-width="4.79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984cm" style:rel-column-width="46196*"/>
    </style:style>
    <style:style style:name="Таблица7.B" style:family="table-column">
      <style:table-column-properties style:column-width="2.304cm" style:rel-column-width="8880*"/>
    </style:style>
    <style:style style:name="Таблица7.C" style:family="table-column">
      <style:table-column-properties style:column-width="2.713cm" style:rel-column-width="1045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none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none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none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  <style:text-properties style:font-name="PT Astra Serif"/>
    </style:style>
    <style:style style:name="P2" style:family="paragraph" style:parent-style-name="Основной_20_текст_20_на_20_титульной">
      <style:text-properties style:font-name="PT Astra Serif"/>
    </style:style>
    <style:style style:name="P3" style:family="paragraph" style:parent-style-name="Text_20_body">
      <style:text-properties style:font-name="PT Astra Serif"/>
    </style:style>
    <style:style style:name="P4" style:family="paragraph" style:parent-style-name="Заголовок_20_на_20_титульной">
      <style:text-properties style:font-name="PT Astra Serif"/>
    </style:style>
    <style:style style:name="P5" style:family="paragraph" style:parent-style-name="Основной_20_текст_20_на_20_титульной">
      <style:text-properties style:font-name="PT Astra Serif" officeooo:rsid="0033b918" officeooo:paragraph-rsid="0033b918"/>
    </style:style>
    <style:style style:name="P6" style:family="paragraph" style:parent-style-name="Блок_20_научного_20_руководителя">
      <style:text-properties style:font-name="PT Astra Seri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PT Astra Serif" officeooo:rsid="001438f3"/>
    </style:style>
    <style:style style:name="P11" style:family="paragraph" style:parent-style-name="Heading_20_1">
      <style:text-properties style:font-name="PT Astra Serif"/>
    </style:style>
    <style:style style:name="P12" style:family="paragraph" style:parent-style-name="Text_20_body" style:list-style-name="L1">
      <style:text-properties style:font-name="PT Astra Serif"/>
    </style:style>
    <style:style style:name="P13" style:family="paragraph" style:parent-style-name="Heading_20_1">
      <style:paragraph-properties fo:break-before="page"/>
      <style:text-properties style:font-name="PT Astra Serif"/>
    </style:style>
    <style:style style:name="P14" style:family="paragraph" style:parent-style-name="Heading_20_2" style:master-page-name="Landscape">
      <style:paragraph-properties fo:margin-left="0cm" fo:text-indent="0cm" style:auto-text-indent="false" style:page-number="auto"/>
      <style:text-properties style:font-name="PT Astra Serif" officeooo:paragraph-rsid="0041e930"/>
    </style:style>
    <style:style style:name="P15" style:family="paragraph" style:parent-style-name="Heading_20_2" style:master-page-name="Standard">
      <style:paragraph-properties style:page-number="auto"/>
      <style:text-properties style:font-name="PT Astra Serif" officeooo:paragraph-rsid="0041e930"/>
    </style:style>
    <style:style style:name="P16" style:family="paragraph" style:parent-style-name="Text_20_body" style:master-page-name="Landscape">
      <style:paragraph-properties style:page-number="auto"/>
    </style:style>
    <style:style style:name="P17" style:family="paragraph" style:parent-style-name="Heading_20_3" style:master-page-name="Standard">
      <style:paragraph-properties style:page-number="auto"/>
    </style:style>
    <style:style style:name="P18" style:family="paragraph" style:parent-style-name="Text_20_body">
      <style:text-properties style:use-window-font-color="true" loext:opacity="0%" style:font-name="PT Astra Serif" officeooo:paragraph-rsid="00a1e78b"/>
    </style:style>
    <style:style style:name="P19" style:family="paragraph" style:parent-style-name="Text_20_body">
      <style:text-properties style:use-window-font-color="true" loext:opacity="0%" style:font-name="PT Astra Serif" officeooo:paragraph-rsid="00ac3342"/>
    </style:style>
    <style:style style:name="P20" style:family="paragraph" style:parent-style-name="Text_20_body">
      <style:text-properties style:use-window-font-color="true" loext:opacity="0%" style:font-name="PT Astra Serif" officeooo:paragraph-rsid="00c07da5"/>
    </style:style>
    <style:style style:name="P21" style:family="paragraph" style:parent-style-name="Text_20_body">
      <style:text-properties style:use-window-font-color="true" loext:opacity="0%" style:font-name="PT Astra Serif" officeooo:paragraph-rsid="00dc71f2"/>
    </style:style>
    <style:style style:name="P22" style:family="paragraph" style:parent-style-name="Text_20_body">
      <style:text-properties style:use-window-font-color="true" loext:opacity="0%" style:font-name="PT Astra Serif" officeooo:paragraph-rsid="00e12e35"/>
    </style:style>
    <style:style style:name="P23" style:family="paragraph" style:parent-style-name="Text_20_body">
      <style:text-properties style:use-window-font-color="true" loext:opacity="0%" style:font-name="PT Astra Serif" officeooo:paragraph-rsid="00deba1a"/>
    </style:style>
    <style:style style:name="P24" style:family="paragraph" style:parent-style-name="Text_20_body">
      <style:paragraph-properties fo:margin-left="0cm" fo:text-indent="0cm" style:auto-text-indent="false"/>
      <style:text-properties style:font-name="PT Astra Serif" officeooo:paragraph-rsid="0082b733"/>
    </style:style>
    <style:style style:name="P25" style:family="paragraph" style:parent-style-name="Text_20_body">
      <style:text-properties style:font-name="PT Astra Serif" officeooo:paragraph-rsid="004655cf"/>
    </style:style>
    <style:style style:name="P26" style:family="paragraph" style:parent-style-name="Text_20_body" style:list-style-name="L2">
      <style:text-properties style:font-name="PT Astra Serif" officeooo:rsid="02ef8be9" officeooo:paragraph-rsid="0048e57b"/>
    </style:style>
    <style:style style:name="P27" style:family="paragraph" style:parent-style-name="Text_20_body" style:list-style-name="L2">
      <style:text-properties style:font-name="PT Astra Serif" officeooo:rsid="02f02dfa" officeooo:paragraph-rsid="0048e57b"/>
    </style:style>
    <style:style style:name="P28" style:family="paragraph" style:parent-style-name="Text_20_body" style:list-style-name="L2">
      <style:text-properties style:font-name="PT Astra Serif" officeooo:rsid="02f37159" officeooo:paragraph-rsid="0048e57b"/>
    </style:style>
    <style:style style:name="P29" style:family="paragraph" style:parent-style-name="Text_20_body" style:list-style-name="L2">
      <style:text-properties style:font-name="PT Astra Serif" officeooo:rsid="02f677de" officeooo:paragraph-rsid="0048e57b"/>
    </style:style>
    <style:style style:name="P30" style:family="paragraph" style:parent-style-name="Text_20_body">
      <style:text-properties officeooo:paragraph-rsid="004655cf"/>
    </style:style>
    <style:style style:name="P31" style:family="paragraph" style:parent-style-name="Text_20_body">
      <style:text-properties style:use-window-font-color="true" loext:opacity="0%" officeooo:paragraph-rsid="008d552c"/>
    </style:style>
    <style:style style:name="P32" style:family="paragraph" style:parent-style-name="Text_20_body">
      <style:text-properties style:font-name="PT Astra Serif" officeooo:paragraph-rsid="00e7aa0c"/>
    </style:style>
    <style:style style:name="P33" style:family="paragraph" style:parent-style-name="Text_20_body">
      <style:text-properties style:font-name="PT Astra Serif" officeooo:paragraph-rsid="01399879"/>
    </style:style>
    <style:style style:name="P34" style:family="paragraph" style:parent-style-name="Text_20_body" style:list-style-name="L3">
      <style:text-properties style:font-name="PT Astra Serif" officeooo:paragraph-rsid="004cdf0f"/>
    </style:style>
    <style:style style:name="P35" style:family="paragraph" style:parent-style-name="Text_20_body">
      <style:text-properties style:font-name="PT Astra Serif" officeooo:paragraph-rsid="00e80780"/>
    </style:style>
    <style:style style:name="P36" style:family="paragraph" style:parent-style-name="Text_20_body" style:list-style-name="L4"/>
    <style:style style:name="P37" style:family="paragraph" style:parent-style-name="Text_20_body">
      <style:text-properties style:font-name="PT Astra Serif" fo:language="en" fo:country="US" officeooo:rsid="00bc2486" officeooo:paragraph-rsid="0105b3e1"/>
    </style:style>
    <style:style style:name="P38" style:family="paragraph" style:parent-style-name="Text_20_body">
      <style:text-properties style:font-name="PT Astra Serif" fo:language="en" fo:country="US" officeooo:rsid="00bc2486" officeooo:paragraph-rsid="00bda2ac"/>
    </style:style>
    <style:style style:name="P39" style:family="paragraph" style:parent-style-name="Text_20_body">
      <style:text-properties style:font-name="PT Astra Serif" officeooo:paragraph-rsid="0102ac1a"/>
    </style:style>
    <style:style style:name="P40" style:family="paragraph" style:parent-style-name="Text_20_body">
      <style:text-properties style:font-name="PT Astra Serif" officeooo:paragraph-rsid="0139d14f"/>
    </style:style>
    <style:style style:name="P41" style:family="paragraph" style:parent-style-name="Text_20_body">
      <style:text-properties style:font-name="PT Astra Serif" officeooo:paragraph-rsid="004cdf0f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ca7f4e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loext:opacity="0%" style:font-name="PT Astra Serif" fo:language="en" fo:country="US" officeooo:rsid="00c88672" officeooo:paragraph-rsid="00f304dc"/>
    </style:style>
    <style:style style:name="P44" style:family="paragraph" style:parent-style-name="Text_20_body">
      <style:text-properties style:use-window-font-color="true" loext:opacity="0%" style:font-name="PT Astra Serif" fo:language="en" fo:country="US" officeooo:rsid="00c88672" officeooo:paragraph-rsid="00c88672"/>
    </style:style>
    <style:style style:name="P45" style:family="paragraph" style:parent-style-name="Text_20_body">
      <style:text-properties style:use-window-font-color="true" loext:opacity="0%" style:font-name="PT Astra Serif" fo:language="en" fo:country="US" officeooo:rsid="00c88672" officeooo:paragraph-rsid="00c9f418"/>
    </style:style>
    <style:style style:name="P46" style:family="paragraph" style:parent-style-name="Text_20_body">
      <style:text-properties style:use-window-font-color="true" loext:opacity="0%" style:font-name="PT Astra Serif" fo:language="en" fo:country="US" officeooo:rsid="00c88672" officeooo:paragraph-rsid="00d0db28"/>
    </style:style>
    <style:style style:name="P47" style:family="paragraph" style:parent-style-name="Text_20_body">
      <style:text-properties style:use-window-font-color="true" loext:opacity="0%" style:font-name="PT Astra Serif" fo:language="en" fo:country="US" officeooo:rsid="00c88672" officeooo:paragraph-rsid="00f7cc41"/>
    </style:style>
    <style:style style:name="P48" style:family="paragraph" style:parent-style-name="Text_20_body">
      <style:text-properties officeooo:paragraph-rsid="00d20af1"/>
    </style:style>
    <style:style style:name="P49" style:family="paragraph" style:parent-style-name="Heading_20_2">
      <style:text-properties style:font-name="PT Astra Serif"/>
    </style:style>
    <style:style style:name="P50" style:family="paragraph" style:parent-style-name="Heading_20_3">
      <style:text-properties style:font-name="PT Astra Serif" officeooo:paragraph-rsid="004e06f7"/>
    </style:style>
    <style:style style:name="P51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style:font-name="PT Astra Serif" officeooo:paragraph-rsid="004e06f7"/>
    </style:style>
    <style:style style:name="P52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53" style:family="paragraph" style:parent-style-name="Table_20_Contents">
      <style:paragraph-properties fo:text-align="center" style:justify-single-word="false"/>
      <style:text-properties style:font-name="PT Astra Serif" officeooo:paragraph-rsid="004e06f7"/>
    </style:style>
    <style:style style:name="P54" style:family="paragraph" style:parent-style-name="Table_20_Contents">
      <style:paragraph-properties fo:text-align="end" style:justify-single-word="false"/>
      <style:text-properties style:font-name="PT Astra Serif" officeooo:paragraph-rsid="004e06f7"/>
    </style:style>
    <style:style style:name="P55" style:family="paragraph" style:parent-style-name="Standard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56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04e06f7"/>
    </style:style>
    <style:style style:name="P57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04e06f7"/>
    </style:style>
    <style:style style:name="P58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officeooo:paragraph-rsid="004e06f7"/>
    </style:style>
    <style:style style:name="P59" style:family="paragraph" style:parent-style-name="Text_20_body">
      <style:paragraph-properties fo:margin-left="0cm" fo:text-indent="0cm" style:auto-text-indent="false"/>
      <style:text-properties style:font-name="PT Astra Serif" officeooo:paragraph-rsid="004e06f7"/>
    </style:style>
    <style:style style:name="P60" style:family="paragraph" style:parent-style-name="Text_20_body">
      <style:paragraph-properties fo:margin-left="0cm" fo:text-indent="0cm" style:auto-text-indent="false"/>
      <style:text-properties officeooo:paragraph-rsid="004e06f7"/>
    </style:style>
    <style:style style:name="P61" style:family="paragraph" style:parent-style-name="Text_20_body">
      <style:text-properties officeooo:paragraph-rsid="004e06f7"/>
    </style:style>
    <style:style style:name="P62" style:family="paragraph" style:parent-style-name="Table">
      <style:paragraph-properties fo:keep-with-next="always"/>
      <style:text-properties fo:font-weight="normal" officeooo:paragraph-rsid="004e06f7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PT Astra Serif" fo:font-size="12pt" officeooo:rsid="01e28a4f" officeooo:paragraph-rsid="004e06f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1e28a4f" officeooo:paragraph-rsid="004e06f7" style:font-size-asian="12pt" style:font-size-complex="12pt"/>
    </style:style>
    <style:style style:name="P65" style:family="paragraph" style:parent-style-name="Table_20_Contents" style:list-style-name="L5">
      <style:paragraph-properties fo:text-align="start" style:justify-single-word="false"/>
      <style:text-properties style:font-name="PT Astra Serif" fo:font-size="12pt" officeooo:paragraph-rsid="004e06f7" style:font-size-asian="12pt" style:font-size-complex="12pt"/>
    </style:style>
    <style:style style:name="P66" style:family="paragraph" style:parent-style-name="Text_20_body">
      <style:text-properties style:font-name="PT Astra Serif" officeooo:paragraph-rsid="004e06f7"/>
    </style:style>
    <style:style style:name="P67" style:family="paragraph" style:parent-style-name="Table_20_Contents">
      <style:paragraph-properties fo:text-align="center" style:justify-single-word="false"/>
      <style:text-properties style:font-name="PT Astra Serif" fo:font-size="12pt" officeooo:rsid="01e3c667" officeooo:paragraph-rsid="004e06f7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PT Astra Serif" fo:font-size="12pt" officeooo:rsid="01f777d0" officeooo:paragraph-rsid="004e06f7" style:font-size-asian="12pt" style:font-size-complex="12pt"/>
    </style:style>
    <style:style style:name="P69" style:family="paragraph" style:parent-style-name="Text_20_body">
      <style:text-properties style:font-name="PT Astra Serif" fo:font-size="14pt" fo:letter-spacing="-0.004cm" officeooo:rsid="030e1e5d" officeooo:paragraph-rsid="004e06f7" style:font-size-asian="14pt"/>
    </style:style>
    <style:style style:name="P70" style:family="paragraph" style:parent-style-name="Table_20_Contents">
      <style:paragraph-properties fo:text-align="center" style:justify-single-word="false"/>
      <style:text-properties style:font-name="PT Astra Serif" fo:font-size="12pt" officeooo:rsid="01e3957c" officeooo:paragraph-rsid="004e06f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PT Astra Serif" fo:font-size="12pt" fo:font-weight="bold" officeooo:rsid="01e28a4f" officeooo:paragraph-rsid="004e06f7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PT Astra Serif" fo:font-size="12pt" fo:font-weight="bold" officeooo:paragraph-rsid="004e06f7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PT Astra Serif" fo:font-size="12pt" fo:font-weight="bold" officeooo:rsid="01f777d0" officeooo:paragraph-rsid="004e06f7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style:font-name="PT Astra Serif" officeooo:rsid="01e6c657" officeooo:paragraph-rsid="004e06f7"/>
    </style:style>
    <style:style style:name="P75" style:family="paragraph" style:parent-style-name="Text_20_body">
      <style:text-properties style:font-name="PT Astra Serif" officeooo:rsid="01ea6119" officeooo:paragraph-rsid="004e06f7"/>
    </style:style>
    <style:style style:name="P76" style:family="paragraph" style:parent-style-name="Standard">
      <style:text-properties style:font-name="PT Astra Serif" officeooo:rsid="01ecebce" officeooo:paragraph-rsid="004e06f7"/>
    </style:style>
    <style:style style:name="P77" style:family="paragraph" style:parent-style-name="Text_20_body">
      <style:paragraph-properties fo:text-align="justify" style:justify-single-word="false"/>
      <style:text-properties style:font-name="PT Astra Serif" officeooo:rsid="01ecebce" officeooo:paragraph-rsid="004e06f7"/>
    </style:style>
    <style:style style:name="P78" style:family="paragraph" style:parent-style-name="Text_20_body">
      <style:paragraph-properties fo:text-align="justify" style:justify-single-word="false"/>
      <style:text-properties style:font-name="PT Astra Serif" officeooo:rsid="01ed5eca" officeooo:paragraph-rsid="004e06f7"/>
    </style:style>
    <style:style style:name="P79" style:family="paragraph" style:parent-style-name="Text_20_body">
      <style:paragraph-properties fo:text-align="start" style:justify-single-word="false"/>
      <style:text-properties style:font-name="PT Astra Serif" officeooo:rsid="01ecebce" officeooo:paragraph-rsid="004e06f7"/>
    </style:style>
    <style:style style:name="P80" style:family="paragraph" style:parent-style-name="Text_20_body">
      <style:paragraph-properties fo:text-align="start" style:justify-single-word="false"/>
      <style:text-properties style:font-name="PT Astra Serif" officeooo:rsid="01ee3056" officeooo:paragraph-rsid="004e06f7"/>
    </style:style>
    <style:style style:name="P81" style:family="paragraph" style:parent-style-name="Text_20_body">
      <style:paragraph-properties fo:margin-left="0cm" fo:text-indent="0cm" style:auto-text-indent="false"/>
      <style:text-properties officeooo:rsid="01ee3056" officeooo:paragraph-rsid="004e06f7"/>
    </style:style>
    <style:style style:name="P82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officeooo:rsid="020920a6" officeooo:paragraph-rsid="004e06f7"/>
    </style:style>
    <style:style style:name="P83" style:family="paragraph" style:parent-style-name="Text_20_body">
      <style:paragraph-properties fo:text-align="start" style:justify-single-word="false"/>
      <style:text-properties style:font-name="PT Astra Serif" fo:language="ru" fo:country="RU" officeooo:rsid="020a2eaf" officeooo:paragraph-rsid="004e06f7"/>
    </style:style>
    <style:style style:name="P84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a2eaf" officeooo:paragraph-rsid="004e06f7"/>
    </style:style>
    <style:style style:name="P85" style:family="paragraph" style:parent-style-name="Text_20_body">
      <style:paragraph-properties fo:text-align="start" style:justify-single-word="false"/>
      <style:text-properties style:font-name="PT Astra Serif" fo:language="ru" fo:country="RU" officeooo:rsid="020c061c" officeooo:paragraph-rsid="004e06f7"/>
    </style:style>
    <style:style style:name="P86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c061c" officeooo:paragraph-rsid="004e06f7"/>
    </style:style>
    <style:style style:name="P87" style:family="paragraph" style:parent-style-name="Standard">
      <style:text-properties style:font-name="PT Astra Serif" officeooo:paragraph-rsid="004e06f7"/>
    </style:style>
    <style:style style:name="P88" style:family="paragraph" style:parent-style-name="Text_20_body">
      <style:text-properties style:font-name="PT Astra Serif" officeooo:rsid="008f1409" officeooo:paragraph-rsid="004e06f7"/>
    </style:style>
    <style:style style:name="P89" style:family="paragraph" style:parent-style-name="Table">
      <style:paragraph-properties fo:keep-with-next="always"/>
      <style:text-properties style:font-name="PT Astra Serif" officeooo:paragraph-rsid="004e06f7"/>
    </style:style>
    <style:style style:name="P90" style:family="paragraph" style:parent-style-name="Text_20_body">
      <style:paragraph-properties fo:margin-left="0cm" fo:text-indent="0cm" style:auto-text-indent="false"/>
      <style:text-properties style:font-name="PT Astra Serif" officeooo:rsid="02ff5d15" officeooo:paragraph-rsid="004e06f7"/>
    </style:style>
    <style:style style:name="P91" style:family="paragraph" style:parent-style-name="Heading_20_2">
      <style:text-properties style:font-name="PT Astra Serif" officeooo:rsid="0033b918" officeooo:paragraph-rsid="00533dae"/>
    </style:style>
    <style:style style:name="P92" style:family="paragraph" style:parent-style-name="Text_20_body">
      <style:text-properties style:font-name="PT Astra Serif" officeooo:paragraph-rsid="00533dae"/>
    </style:style>
    <style:style style:name="P93" style:family="paragraph" style:parent-style-name="Heading_20_3">
      <style:text-properties style:use-window-font-color="true" loext:opacity="0%"/>
    </style:style>
    <style:style style:name="P94" style:family="paragraph" style:parent-style-name="Text_20_body" style:list-style-name="L6">
      <style:text-properties style:font-name="PT Astra Serif" officeooo:paragraph-rsid="00533dae"/>
    </style:style>
    <style:style style:name="P95" style:family="paragraph" style:parent-style-name="Text_20_body">
      <style:text-properties style:use-window-font-color="true" loext:opacity="0%" style:font-name="PT Astra Serif" officeooo:paragraph-rsid="011c7e73"/>
    </style:style>
    <style:style style:name="P96" style:family="paragraph" style:parent-style-name="Text_20_body" style:list-style-name="L7">
      <style:text-properties style:use-window-font-color="true" loext:opacity="0%" style:font-name="PT Astra Serif" fo:language="ru" fo:country="RU" officeooo:rsid="011b3a7a" officeooo:paragraph-rsid="011c7e73"/>
    </style:style>
    <style:style style:name="P97" style:family="paragraph" style:parent-style-name="Text_20_body" style:list-style-name="L7">
      <style:text-properties style:font-name="PT Astra Serif" officeooo:paragraph-rsid="011dd740"/>
    </style:style>
    <style:style style:name="P98" style:family="paragraph" style:parent-style-name="Text_20_body">
      <style:text-properties style:font-name="PT Astra Serif" officeooo:paragraph-rsid="011fac26"/>
    </style:style>
    <style:style style:name="P99" style:family="paragraph" style:parent-style-name="Heading_20_3">
      <style:text-properties style:use-window-font-color="true" loext:opacity="0%" officeooo:paragraph-rsid="015c84f7"/>
    </style:style>
    <style:style style:name="P100" style:family="paragraph" style:parent-style-name="Text_20_body">
      <style:paragraph-properties fo:text-align="justify" style:justify-single-word="false"/>
      <style:text-properties style:font-name="PT Astra Serif" officeooo:paragraph-rsid="016d2340"/>
    </style:style>
    <style:style style:name="P101" style:family="paragraph" style:parent-style-name="Text_20_body">
      <style:paragraph-properties fo:text-align="justify" style:justify-single-word="false"/>
      <style:text-properties style:font-name="PT Astra Serif" officeooo:paragraph-rsid="016deff6"/>
    </style:style>
    <style:style style:name="P102" style:family="paragraph" style:parent-style-name="Heading_20_3">
      <style:text-properties style:use-window-font-color="true" loext:opacity="0%" officeooo:paragraph-rsid="015d19f1"/>
    </style:style>
    <style:style style:name="P103" style:family="paragraph" style:parent-style-name="Text_20_body">
      <style:text-properties style:font-name="PT Astra Serif" officeooo:paragraph-rsid="016deff6"/>
    </style:style>
    <style:style style:name="P104" style:family="paragraph" style:parent-style-name="Text_20_body">
      <style:text-properties style:use-window-font-color="true" loext:opacity="0%" officeooo:rsid="015d19f1" officeooo:paragraph-rsid="015d19f1"/>
    </style:style>
    <style:style style:name="P105" style:family="paragraph" style:parent-style-name="Heading_20_3">
      <style:text-properties style:use-window-font-color="true" loext:opacity="0%" officeooo:paragraph-rsid="015de6c0"/>
    </style:style>
    <style:style style:name="P106" style:family="paragraph" style:parent-style-name="Text_20_body">
      <style:text-properties style:use-window-font-color="true" loext:opacity="0%" fo:language="ru" fo:country="RU" officeooo:rsid="016fb638" officeooo:paragraph-rsid="01702361"/>
    </style:style>
    <style:style style:name="P107" style:family="paragraph" style:parent-style-name="Text_20_body" style:list-style-name="L8"/>
    <style:style style:name="P108" style:family="paragraph" style:parent-style-name="Heading_20_3">
      <style:text-properties style:use-window-font-color="true" loext:opacity="0%" officeooo:paragraph-rsid="015f41eb"/>
    </style:style>
    <style:style style:name="P109" style:family="paragraph" style:parent-style-name="Text_20_body">
      <style:text-properties style:use-window-font-color="true" loext:opacity="0%" officeooo:rsid="01738282" officeooo:paragraph-rsid="01738282"/>
    </style:style>
    <style:style style:name="P110" style:family="paragraph" style:parent-style-name="Text_20_body">
      <style:text-properties style:use-window-font-color="true" loext:opacity="0%" officeooo:rsid="015f41eb" officeooo:paragraph-rsid="015f41eb"/>
    </style:style>
    <style:style style:name="P111" style:family="paragraph" style:parent-style-name="Text_20_body">
      <style:text-properties style:font-name="PT Astra Serif" officeooo:rsid="019b7e00" officeooo:paragraph-rsid="019b7e00"/>
    </style:style>
    <style:style style:name="P112" style:family="paragraph" style:parent-style-name="Heading_20_3">
      <style:text-properties officeooo:rsid="013e5aa0" officeooo:paragraph-rsid="01a1f0bc"/>
    </style:style>
    <style:style style:name="P113" style:family="paragraph" style:parent-style-name="Text_20_body">
      <style:text-properties officeooo:paragraph-rsid="01a1f0bc"/>
    </style:style>
    <style:style style:name="P114" style:family="paragraph" style:parent-style-name="Text_20_body" style:list-style-name="L9">
      <style:text-properties officeooo:paragraph-rsid="01a1f0bc"/>
    </style:style>
    <style:style style:name="P115" style:family="paragraph" style:parent-style-name="Text_20_body" style:list-style-name="L10">
      <style:text-properties officeooo:paragraph-rsid="01a1f0bc"/>
    </style:style>
    <style:style style:name="P116" style:family="paragraph" style:parent-style-name="Text_20_body" style:master-page-name="Landscape">
      <style:paragraph-properties style:page-number="auto"/>
      <style:text-properties style:font-name="PT Astra Serif" officeooo:rsid="019b7e00" officeooo:paragraph-rsid="019b7e00"/>
    </style:style>
    <style:style style:name="P117" style:family="paragraph" style:parent-style-name="Text_20_body">
      <style:text-properties style:font-name="PT Astra Serif" officeooo:rsid="015f611b"/>
    </style:style>
    <style:style style:name="P118" style:family="paragraph" style:parent-style-name="Heading_20_3" style:list-style-name="">
      <style:paragraph-properties fo:line-height="150%"/>
      <style:text-properties officeooo:rsid="013e5aa0" officeooo:paragraph-rsid="013e5aa0"/>
    </style:style>
    <style:style style:name="P119" style:family="paragraph" style:parent-style-name="Heading_20_3" style:master-page-name="Standard">
      <style:paragraph-properties style:page-number="auto"/>
      <style:text-properties officeooo:paragraph-rsid="013ee7ce"/>
    </style:style>
    <style:style style:name="P120" style:family="paragraph" style:parent-style-name="Text_20_body">
      <style:text-properties officeooo:paragraph-rsid="01c30157"/>
    </style:style>
    <style:style style:name="P121" style:family="paragraph" style:parent-style-name="Text_20_body" style:list-style-name="L11">
      <style:text-properties officeooo:paragraph-rsid="013ee7ce"/>
    </style:style>
    <style:style style:name="P122" style:family="paragraph" style:parent-style-name="Text_20_body">
      <style:text-properties officeooo:paragraph-rsid="013ee7ce"/>
    </style:style>
    <style:style style:name="P123" style:family="paragraph" style:parent-style-name="Heading_20_3">
      <style:text-properties officeooo:rsid="013e5aa0" officeooo:paragraph-rsid="013ee7ce"/>
    </style:style>
    <style:style style:name="P124" style:family="paragraph" style:parent-style-name="Text_20_body">
      <style:text-properties officeooo:paragraph-rsid="01c97e32"/>
    </style:style>
    <style:style style:name="P125" style:family="paragraph" style:parent-style-name="Heading_20_3">
      <style:text-properties officeooo:paragraph-rsid="013ee7ce"/>
    </style:style>
    <style:style style:name="P126" style:family="paragraph" style:parent-style-name="Text_20_body" style:list-style-name="L12">
      <style:text-properties officeooo:paragraph-rsid="013ee7ce"/>
    </style:style>
    <style:style style:name="P127" style:family="paragraph" style:parent-style-name="Heading_20_3">
      <style:text-properties officeooo:rsid="013e5aa0" officeooo:paragraph-rsid="01453ec4"/>
    </style:style>
    <style:style style:name="P128" style:family="paragraph" style:parent-style-name="Text_20_body">
      <style:text-properties officeooo:paragraph-rsid="01453ec4"/>
    </style:style>
    <style:style style:name="P129" style:family="paragraph" style:parent-style-name="Text_20_body" style:list-style-name="L13">
      <style:text-properties officeooo:paragraph-rsid="01453ec4"/>
    </style:style>
    <style:style style:name="P130" style:family="paragraph" style:parent-style-name="Text_20_body">
      <style:paragraph-properties fo:text-align="justify" style:justify-single-word="false"/>
      <style:text-properties officeooo:rsid="01776f95" officeooo:paragraph-rsid="01776f95"/>
    </style:style>
    <style:style style:name="P131" style:family="paragraph" style:parent-style-name="Text_20_body">
      <style:paragraph-properties fo:margin-left="0cm" fo:text-align="start" style:justify-single-word="false" fo:text-indent="0cm" style:auto-text-indent="false"/>
      <style:text-properties fo:language="ru" fo:country="RU" officeooo:rsid="017944e5" officeooo:paragraph-rsid="01776f95"/>
    </style:style>
    <style:style style:name="P132" style:family="paragraph" style:parent-style-name="Text_20_body">
      <style:paragraph-properties fo:margin-left="0cm" fo:text-align="justify" style:justify-single-word="false" fo:text-indent="0cm" style:auto-text-indent="false"/>
      <style:text-properties fo:language="ru" fo:country="RU" officeooo:rsid="017aa67a" officeooo:paragraph-rsid="017aa67a"/>
    </style:style>
    <style:style style:name="P133" style:family="paragraph" style:parent-style-name="Heading_20_3">
      <style:text-properties officeooo:paragraph-rsid="01453ec4"/>
    </style:style>
    <style:style style:name="P134" style:family="paragraph" style:parent-style-name="Text_20_body">
      <style:text-properties style:font-name="PT Astra Serif" officeooo:rsid="002b7efc" officeooo:paragraph-rsid="01453ec4"/>
    </style:style>
    <style:style style:name="P135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PT Astra Serif" officeooo:paragraph-rsid="00292d7c"/>
    </style:style>
    <style:style style:name="P136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style:font-name="PT Astra Serif" officeooo:paragraph-rsid="00292d7c"/>
    </style:style>
    <style:style style:name="P137" style:family="paragraph" style:parent-style-name="Text_20_body" style:list-style-name="Нумерация_20_источников">
      <loext:graphic-properties draw:fill="none"/>
      <style:paragraph-properties fo:margin-lef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 officeooo:paragraph-rsid="00292d7c"/>
    </style:style>
    <style:style style:name="P138" style:family="paragraph" style:parent-style-name="Heading_20_1">
      <style:paragraph-properties fo:break-before="page"/>
      <style:text-properties style:font-name="PT Astra Serif" officeooo:paragraph-rsid="00360b9e"/>
    </style:style>
    <style:style style:name="P139" style:family="paragraph" style:parent-style-name="Heading_20_1">
      <style:text-properties style:font-name="PT Astra Serif" officeooo:paragraph-rsid="00360b9e"/>
    </style:style>
    <style:style style:name="P140" style:family="paragraph" style:parent-style-name="Листинг">
      <style:paragraph-properties fo:keep-with-next="always"/>
      <style:text-properties style:font-name="PT Astra Serif"/>
    </style:style>
    <style:style style:name="P141" style:family="paragraph" style:parent-style-name="Оформление_20_кода" style:list-style-name="Нумерация_20_строк_20_кода">
      <style:text-properties style:font-name="PT Astra Serif"/>
    </style:style>
    <style:style style:name="P142" style:family="paragraph" style:parent-style-name="Листинг">
      <style:paragraph-properties fo:keep-with-next="always"/>
      <style:text-properties style:font-name="PT Astra Serif" officeooo:paragraph-rsid="0151a8b6"/>
    </style:style>
    <style:style style:name="P143" style:family="paragraph" style:parent-style-name="Оформление_20_кода" style:list-style-name="Нумерация_20_строк_20_кода">
      <style:text-properties style:font-name="PT Astra Serif" officeooo:paragraph-rsid="014e3806"/>
    </style:style>
    <style:style style:name="P144" style:family="paragraph" style:parent-style-name="Text_20_body">
      <style:text-properties style:font-name="PT Astra Serif" officeooo:paragraph-rsid="014e3806"/>
    </style:style>
    <style:style style:name="P145" style:family="paragraph" style:parent-style-name="Листинг">
      <style:paragraph-properties fo:keep-with-next="always"/>
      <style:text-properties style:font-name="PT Astra Serif" officeooo:paragraph-rsid="014e3806"/>
    </style:style>
    <style:style style:name="P146" style:family="paragraph" style:parent-style-name="Листинг">
      <style:paragraph-properties fo:keep-with-next="always"/>
      <style:text-properties style:font-name="PT Astra Serif" officeooo:paragraph-rsid="015310a9"/>
    </style:style>
    <style:style style:name="P147" style:family="paragraph" style:parent-style-name="Оформление_20_кода" style:list-style-name="Нумерация_20_строк_20_кода">
      <style:text-properties style:font-name="PT Astra Serif" officeooo:paragraph-rsid="014fd4d8"/>
    </style:style>
    <style:style style:name="P148" style:family="paragraph" style:parent-style-name="Text_20_body">
      <style:text-properties style:font-name="PT Astra Serif" officeooo:paragraph-rsid="014fd4d8"/>
    </style:style>
    <style:style style:name="P149" style:family="paragraph" style:parent-style-name="Листинг">
      <style:paragraph-properties fo:keep-with-next="always"/>
      <style:text-properties style:font-name="PT Astra Serif" officeooo:paragraph-rsid="014fd4d8"/>
    </style:style>
    <style:style style:name="P150" style:family="paragraph" style:parent-style-name="Листинг">
      <style:paragraph-properties fo:keep-with-next="always"/>
      <style:text-properties style:font-name="PT Astra Serif" officeooo:paragraph-rsid="015678a8"/>
    </style:style>
    <style:style style:name="P151" style:family="paragraph" style:parent-style-name="Листинг">
      <style:paragraph-properties fo:keep-with-next="always"/>
      <style:text-properties style:font-name="PT Astra Serif" officeooo:paragraph-rsid="0158202d"/>
    </style:style>
    <style:style style:name="P152" style:family="paragraph" style:parent-style-name="Листинг">
      <style:paragraph-properties fo:keep-with-next="always"/>
      <style:text-properties style:font-name="PT Astra Serif" officeooo:paragraph-rsid="01597fc8"/>
    </style:style>
    <style:style style:name="P153" style:family="paragraph" style:parent-style-name="Листинг">
      <style:paragraph-properties fo:keep-with-next="always"/>
      <style:text-properties style:font-name="PT Astra Serif" officeooo:paragraph-rsid="015a516a"/>
    </style:style>
    <style:style style:name="P154" style:family="paragraph" style:parent-style-name="Листинг">
      <style:paragraph-properties fo:keep-with-next="always"/>
      <style:text-properties style:font-name="PT Astra Serif" officeooo:paragraph-rsid="015b0fe3"/>
    </style:style>
    <style:style style:name="P155" style:family="paragraph" style:parent-style-name="Листинг">
      <style:paragraph-properties fo:keep-with-next="always"/>
      <style:text-properties style:font-name="PT Astra Serif" officeooo:paragraph-rsid="015bacbf"/>
    </style:style>
    <style:style style:name="P156" style:family="paragraph" style:parent-style-name="Листинг">
      <style:paragraph-properties fo:keep-with-next="always"/>
      <style:text-properties style:font-name="PT Astra Serif" officeooo:paragraph-rsid="015c3232"/>
    </style:style>
    <style:style style:name="P157" style:family="paragraph" style:parent-style-name="Heading_20_1">
      <style:text-properties style:font-name="PT Astra Serif" officeooo:rsid="0033b918" officeooo:paragraph-rsid="00360b9e"/>
    </style:style>
    <style:style style:name="P158" style:family="paragraph" style:parent-style-name="Text_20_body">
      <style:text-properties style:font-name="PT Astra Serif" officeooo:paragraph-rsid="00360b9e"/>
    </style:style>
    <style:style style:name="P159" style:family="paragraph" style:parent-style-name="Text_20_body">
      <style:paragraph-properties fo:margin-left="0cm" fo:text-indent="0cm" style:auto-text-indent="false"/>
      <style:text-properties style:font-name="PT Astra Serif" officeooo:rsid="002a122f" officeooo:paragraph-rsid="01a7adad"/>
    </style:style>
    <style:style style:name="P160" style:family="paragraph" style:parent-style-name="Text_20_body" style:list-style-name="L14">
      <style:paragraph-properties fo:margin-left="0cm" fo:text-indent="0cm" style:auto-text-indent="false"/>
      <style:text-properties style:font-name="PT Astra Serif" officeooo:rsid="002a122f" officeooo:paragraph-rsid="01a7adad"/>
    </style:style>
    <style:style style:name="P161" style:family="paragraph" style:parent-style-name="Text_20_body">
      <style:text-properties style:font-name="PT Astra Serif" officeooo:rsid="002a122f" officeooo:paragraph-rsid="01a7adad"/>
    </style:style>
    <style:style style:name="P162" style:family="paragraph" style:parent-style-name="Text_20_body" style:list-style-name="L15">
      <style:text-properties style:font-name="PT Astra Serif" officeooo:rsid="002a122f" officeooo:paragraph-rsid="01a7adad"/>
    </style:style>
    <style:style style:name="P163" style:family="paragraph" style:parent-style-name="Text_20_body" style:list-style-name="L16">
      <style:text-properties style:font-name="PT Astra Serif" officeooo:rsid="002a122f" officeooo:paragraph-rsid="01a7adad"/>
    </style:style>
    <style:style style:name="P164" style:family="paragraph" style:parent-style-name="Text_20_body" style:list-style-name="L17">
      <style:text-properties style:font-name="PT Astra Serif" officeooo:rsid="002a122f" officeooo:paragraph-rsid="01a7adad"/>
    </style:style>
    <style:style style:name="P165" style:family="paragraph" style:parent-style-name="Text_20_body" style:list-style-name="L18">
      <style:text-properties style:font-name="PT Astra Serif" officeooo:rsid="002a122f" officeooo:paragraph-rsid="01a7adad"/>
    </style:style>
    <style:style style:name="P166" style:family="paragraph" style:parent-style-name="Text_20_body">
      <style:text-properties style:font-name="PT Astra Serif" officeooo:rsid="002a122f" officeooo:paragraph-rsid="01aff5af"/>
    </style:style>
    <style:style style:name="P167" style:family="paragraph" style:parent-style-name="Text_20_body" style:list-style-name="L19">
      <style:text-properties style:font-name="PT Astra Serif" officeooo:rsid="002a122f" officeooo:paragraph-rsid="01a7adad"/>
    </style:style>
    <style:style style:name="P168" style:family="paragraph" style:parent-style-name="Text_20_body" style:list-style-name="L20">
      <style:text-properties style:font-name="PT Astra Serif" officeooo:rsid="002a122f" officeooo:paragraph-rsid="01b58b8f"/>
    </style:style>
    <style:style style:name="P169" style:family="paragraph" style:parent-style-name="Text_20_body" style:list-style-name="L20">
      <style:text-properties style:font-name="PT Astra Serif" officeooo:rsid="002a122f" officeooo:paragraph-rsid="01a7adad"/>
    </style:style>
    <style:style style:name="P170" style:family="paragraph" style:parent-style-name="Text_20_body" style:list-style-name="L21">
      <style:text-properties style:font-name="PT Astra Serif" officeooo:rsid="002a122f" officeooo:paragraph-rsid="01a7adad"/>
    </style:style>
    <style:style style:name="P171" style:family="paragraph" style:parent-style-name="Text_20_body" style:list-style-name="L22">
      <style:text-properties style:font-name="PT Astra Serif" officeooo:rsid="002a122f" officeooo:paragraph-rsid="01a7adad"/>
    </style:style>
    <style:style style:name="P172" style:family="paragraph" style:parent-style-name="Text_20_body" style:list-style-name="L23">
      <style:text-properties style:font-name="PT Astra Serif" officeooo:rsid="002a122f" officeooo:paragraph-rsid="01a7adad"/>
    </style:style>
    <style:style style:name="P173" style:family="paragraph" style:parent-style-name="Text_20_body" style:list-style-name="L24">
      <style:text-properties style:font-name="PT Astra Serif" officeooo:rsid="002a122f" officeooo:paragraph-rsid="01a7adad"/>
    </style:style>
    <style:style style:name="P174" style:family="paragraph" style:parent-style-name="Text_20_body" style:list-style-name="L25">
      <style:text-properties style:font-name="PT Astra Serif" officeooo:rsid="002a122f" officeooo:paragraph-rsid="01a7adad"/>
    </style:style>
    <style:style style:name="P175" style:family="paragraph" style:parent-style-name="Text_20_body" style:list-style-name="L26">
      <style:text-properties style:font-name="PT Astra Serif" officeooo:rsid="002a122f" officeooo:paragraph-rsid="01a7adad"/>
    </style:style>
    <style:style style:name="T1" style:family="text">
      <style:text-properties officeooo:rsid="00391c0b"/>
    </style:style>
    <style:style style:name="T2" style:family="text">
      <style:text-properties fo:language="en" fo:country="US" officeooo:rsid="007a4a5b"/>
    </style:style>
    <style:style style:name="T3" style:family="text">
      <style:text-properties officeooo:rsid="007b93bc"/>
    </style:style>
    <style:style style:name="T4" style:family="text">
      <style:text-properties officeooo:rsid="008c0203"/>
    </style:style>
    <style:style style:name="T5" style:family="text">
      <style:text-properties officeooo:rsid="007a4a5b"/>
    </style:style>
    <style:style style:name="T6" style:family="text">
      <style:text-properties fo:language="en" fo:country="US" officeooo:rsid="007da002"/>
    </style:style>
    <style:style style:name="T7" style:family="text">
      <style:text-properties fo:language="ru" fo:country="RU" officeooo:rsid="007da002"/>
    </style:style>
    <style:style style:name="T8" style:family="text">
      <style:text-properties officeooo:rsid="00919965"/>
    </style:style>
    <style:style style:name="T9" style:family="text">
      <style:text-properties officeooo:rsid="00464171"/>
    </style:style>
    <style:style style:name="T10" style:family="text">
      <style:text-properties officeooo:rsid="006dfe78"/>
    </style:style>
    <style:style style:name="T11" style:family="text">
      <style:text-properties fo:language="en" fo:country="US" officeooo:rsid="008024b6"/>
    </style:style>
    <style:style style:name="T12" style:family="text">
      <style:text-properties officeooo:rsid="0092f268"/>
    </style:style>
    <style:style style:name="T13" style:family="text">
      <style:text-properties officeooo:rsid="00904fd3"/>
    </style:style>
    <style:style style:name="T14" style:family="text">
      <style:text-properties officeooo:rsid="02432bbe"/>
    </style:style>
    <style:style style:name="T15" style:family="text">
      <style:text-properties officeooo:rsid="00497d0e"/>
    </style:style>
    <style:style style:name="T16" style:family="text">
      <style:text-properties fo:language="en" fo:country="US" officeooo:rsid="0074e775"/>
    </style:style>
    <style:style style:name="T17" style:family="text">
      <style:text-properties fo:language="en" fo:country="US" officeooo:rsid="0075ec7d"/>
    </style:style>
    <style:style style:name="T18" style:family="text">
      <style:text-properties fo:language="ru" fo:country="RU" officeooo:rsid="00a1e78b"/>
    </style:style>
    <style:style style:name="T19" style:family="text">
      <style:text-properties fo:language="ru" fo:country="RU" officeooo:rsid="00d697a6"/>
    </style:style>
    <style:style style:name="T20" style:family="text">
      <style:text-properties fo:language="ru" fo:country="RU" officeooo:rsid="00d8215c"/>
    </style:style>
    <style:style style:name="T21" style:family="text">
      <style:text-properties fo:language="ru" fo:country="RU" officeooo:rsid="0111fd9e"/>
    </style:style>
    <style:style style:name="T22" style:family="text">
      <style:text-properties fo:language="en" fo:country="US" officeooo:rsid="00b10e7c"/>
    </style:style>
    <style:style style:name="T23" style:family="text">
      <style:text-properties fo:language="en" fo:country="US" officeooo:rsid="00a6500f"/>
    </style:style>
    <style:style style:name="T24" style:family="text">
      <style:text-properties fo:language="ru" fo:country="RU" officeooo:rsid="00aa5872"/>
    </style:style>
    <style:style style:name="T25" style:family="text">
      <style:text-properties fo:language="ru" fo:country="RU" officeooo:rsid="010af94c"/>
    </style:style>
    <style:style style:name="T26" style:family="text">
      <style:text-properties fo:language="ru" fo:country="RU" officeooo:rsid="00d96732"/>
    </style:style>
    <style:style style:name="T27" style:family="text">
      <style:text-properties fo:language="en" fo:country="US" officeooo:rsid="0082b733"/>
    </style:style>
    <style:style style:name="T28" style:family="text">
      <style:text-properties fo:language="ru" fo:country="RU" officeooo:rsid="0082b733"/>
    </style:style>
    <style:style style:name="T29" style:family="text">
      <style:text-properties officeooo:rsid="0075ec7d"/>
    </style:style>
    <style:style style:name="T30" style:family="text">
      <style:text-properties officeooo:rsid="00c07da5"/>
    </style:style>
    <style:style style:name="T31" style:family="text">
      <style:text-properties officeooo:rsid="00a4cd5e"/>
    </style:style>
    <style:style style:name="T32" style:family="text">
      <style:text-properties officeooo:rsid="00d2e536"/>
    </style:style>
    <style:style style:name="T33" style:family="text">
      <style:text-properties officeooo:rsid="00dc71f2"/>
    </style:style>
    <style:style style:name="T34" style:family="text">
      <style:text-properties officeooo:rsid="00dcae51"/>
    </style:style>
    <style:style style:name="T35" style:family="text">
      <style:text-properties fo:language="ru" fo:country="RU" officeooo:rsid="00dada56"/>
    </style:style>
    <style:style style:name="T36" style:family="text">
      <style:text-properties fo:language="ru" fo:country="RU" officeooo:rsid="00a4cd5e"/>
    </style:style>
    <style:style style:name="T37" style:family="text">
      <style:text-properties fo:language="ru" fo:country="RU" officeooo:rsid="0109110b"/>
    </style:style>
    <style:style style:name="T38" style:family="text">
      <style:text-properties fo:language="ru" fo:country="RU" officeooo:rsid="01348bc8"/>
    </style:style>
    <style:style style:name="T39" style:family="text">
      <style:text-properties officeooo:rsid="00fae55f"/>
    </style:style>
    <style:style style:name="T40" style:family="text">
      <style:text-properties officeooo:rsid="00a5914e"/>
    </style:style>
    <style:style style:name="T41" style:family="text">
      <style:text-properties officeooo:rsid="0108a721"/>
    </style:style>
    <style:style style:name="T42" style:family="text">
      <style:text-properties fo:language="ru" fo:country="RU" officeooo:rsid="00fae55f"/>
    </style:style>
    <style:style style:name="T43" style:family="text">
      <style:text-properties fo:language="ru" fo:country="RU" officeooo:rsid="0108a721"/>
    </style:style>
    <style:style style:name="T44" style:family="text">
      <style:text-properties officeooo:rsid="00de0626"/>
    </style:style>
    <style:style style:name="T45" style:family="text">
      <style:text-properties officeooo:rsid="00df9d49"/>
    </style:style>
    <style:style style:name="T46" style:family="text">
      <style:text-properties officeooo:rsid="0053bcae"/>
    </style:style>
    <style:style style:name="T47" style:family="text">
      <style:text-properties officeooo:rsid="0244dbe6"/>
    </style:style>
    <style:style style:name="T48" style:family="text">
      <style:text-properties fo:language="en" fo:country="US" officeooo:rsid="00e61454"/>
    </style:style>
    <style:style style:name="T49" style:family="text">
      <style:text-properties officeooo:rsid="012fa61c"/>
    </style:style>
    <style:style style:name="T50" style:family="text">
      <style:text-properties officeooo:rsid="01309325"/>
    </style:style>
    <style:style style:name="T51" style:family="text">
      <style:text-properties officeooo:rsid="02ef8be9"/>
    </style:style>
    <style:style style:name="T52" style:family="text">
      <style:text-properties officeooo:rsid="02f4e288"/>
    </style:style>
    <style:style style:name="T53" style:family="text">
      <style:text-properties officeooo:rsid="02f37159"/>
    </style:style>
    <style:style style:name="T54" style:family="text">
      <style:text-properties fo:language="en" fo:country="US" officeooo:rsid="00e768d4"/>
    </style:style>
    <style:style style:name="T55" style:family="text">
      <style:text-properties fo:language="en" fo:country="US" officeooo:rsid="00b3b522"/>
    </style:style>
    <style:style style:name="T56" style:family="text">
      <style:text-properties fo:language="ru" fo:country="RU" officeooo:rsid="00b3b522"/>
    </style:style>
    <style:style style:name="T57" style:family="text">
      <style:text-properties fo:language="ru" fo:country="RU" officeooo:rsid="010fd7d5"/>
    </style:style>
    <style:style style:name="T58" style:family="text">
      <style:text-properties fo:language="ru" fo:country="RU" officeooo:rsid="00b8a6f5"/>
    </style:style>
    <style:style style:name="T59" style:family="text">
      <style:text-properties style:use-window-font-color="true" loext:opacity="0%" fo:language="ru" fo:country="RU" officeooo:rsid="00aea037"/>
    </style:style>
    <style:style style:name="T60" style:family="text">
      <style:text-properties officeooo:rsid="00b3b522"/>
    </style:style>
    <style:style style:name="T61" style:family="text">
      <style:text-properties officeooo:rsid="01399879"/>
    </style:style>
    <style:style style:name="T62" style:family="text">
      <style:text-properties officeooo:rsid="02cae8e1"/>
    </style:style>
    <style:style style:name="T63" style:family="text">
      <style:text-properties fo:language="en" fo:country="US" officeooo:rsid="00e80780"/>
    </style:style>
    <style:style style:name="T64" style:family="text">
      <style:text-properties fo:language="ru" fo:country="RU" officeooo:rsid="00e9e399"/>
    </style:style>
    <style:style style:name="T65" style:family="text">
      <style:text-properties officeooo:rsid="00fbad12"/>
    </style:style>
    <style:style style:name="T66" style:family="text">
      <style:text-properties officeooo:rsid="0101d02c"/>
    </style:style>
    <style:style style:name="T67" style:family="text">
      <style:text-properties officeooo:rsid="005d8870"/>
    </style:style>
    <style:style style:name="T68" style:family="text">
      <style:text-properties officeooo:rsid="005eb102"/>
    </style:style>
    <style:style style:name="T69" style:family="text">
      <style:text-properties officeooo:rsid="0246b1bb"/>
    </style:style>
    <style:style style:name="T70" style:family="text">
      <style:text-properties officeooo:rsid="00604796"/>
    </style:style>
    <style:style style:name="T71" style:family="text">
      <style:text-properties officeooo:rsid="024d4fa3"/>
    </style:style>
    <style:style style:name="T72" style:family="text">
      <style:text-properties officeooo:rsid="024fb74d"/>
    </style:style>
    <style:style style:name="T73" style:family="text">
      <style:text-properties fo:language="ru" fo:country="RU" officeooo:rsid="0105b3e1"/>
    </style:style>
    <style:style style:name="T74" style:family="text">
      <style:text-properties fo:language="ru" fo:country="RU" officeooo:rsid="00be5c3d"/>
    </style:style>
    <style:style style:name="T75" style:family="text">
      <style:text-properties fo:language="ru" fo:country="RU" officeooo:rsid="01288b1e"/>
    </style:style>
    <style:style style:name="T76" style:family="text">
      <style:text-properties fo:language="ru" fo:country="RU" officeooo:rsid="00ffccdd"/>
    </style:style>
    <style:style style:name="T77" style:family="text">
      <style:text-properties fo:language="ru" fo:country="RU" officeooo:rsid="00bee246"/>
    </style:style>
    <style:style style:name="T78" style:family="text">
      <style:text-properties fo:language="ru" fo:country="RU" officeooo:rsid="00bfe342"/>
    </style:style>
    <style:style style:name="T79" style:family="text">
      <style:text-properties fo:language="ru" fo:country="RU" officeooo:rsid="00c31cd5"/>
    </style:style>
    <style:style style:name="T80" style:family="text">
      <style:text-properties fo:language="ru" fo:country="RU" officeooo:rsid="00c3b569"/>
    </style:style>
    <style:style style:name="T81" style:family="text">
      <style:text-properties fo:language="ru" fo:country="RU" officeooo:rsid="00fda5ff"/>
    </style:style>
    <style:style style:name="T82" style:family="text">
      <style:text-properties fo:language="ru" fo:country="RU" officeooo:rsid="00c1fdc7"/>
    </style:style>
    <style:style style:name="T83" style:family="text">
      <style:text-properties fo:language="ru" fo:country="RU"/>
    </style:style>
    <style:style style:name="T84" style:family="text">
      <style:text-properties fo:language="ru" fo:country="RU" officeooo:rsid="00c22d55"/>
    </style:style>
    <style:style style:name="T85" style:family="text">
      <style:text-properties fo:language="ru" fo:country="RU" officeooo:rsid="00e0948a"/>
    </style:style>
    <style:style style:name="T86" style:family="text">
      <style:text-properties fo:language="en" fo:country="US" officeooo:rsid="00bc2486"/>
    </style:style>
    <style:style style:name="T87" style:family="text">
      <style:text-properties fo:language="ru" fo:country="RU" officeooo:rsid="00c41def"/>
    </style:style>
    <style:style style:name="T88" style:family="text">
      <style:text-properties fo:language="ru" fo:country="RU" officeooo:rsid="0101d02c"/>
    </style:style>
    <style:style style:name="T89" style:family="text">
      <style:text-properties fo:language="en" fo:country="US" officeooo:rsid="0102ac1a"/>
    </style:style>
    <style:style style:name="T90" style:family="text">
      <style:text-properties fo:language="ru" fo:country="RU" officeooo:rsid="0100d151"/>
    </style:style>
    <style:style style:name="T91" style:family="text">
      <style:text-properties fo:language="ru" fo:country="RU" officeooo:rsid="0139d14f"/>
    </style:style>
    <style:style style:name="T92" style:family="text">
      <style:text-properties fo:language="en" fo:country="US" officeooo:rsid="0139d14f"/>
    </style:style>
    <style:style style:name="T93" style:family="text">
      <style:text-properties officeooo:rsid="0068377b"/>
    </style:style>
    <style:style style:name="T94" style:family="text">
      <style:text-properties officeooo:rsid="006a322a"/>
    </style:style>
    <style:style style:name="T95" style:family="text">
      <style:text-properties fo:language="en" fo:country="US" officeooo:rsid="008a0b59"/>
    </style:style>
    <style:style style:name="T96" style:family="text">
      <style:text-properties fo:language="ru" fo:country="RU" officeooo:rsid="008a0b59"/>
    </style:style>
    <style:style style:name="T97" style:family="text">
      <style:text-properties officeooo:rsid="012511f9"/>
    </style:style>
    <style:style style:name="T98" style:family="text">
      <style:text-properties officeooo:rsid="00c7ab4a"/>
    </style:style>
    <style:style style:name="T99" style:family="text">
      <style:text-properties officeooo:rsid="0062add9"/>
    </style:style>
    <style:style style:name="T100" style:family="text">
      <style:text-properties officeooo:rsid="025118fc"/>
    </style:style>
    <style:style style:name="T101" style:family="text">
      <style:text-properties officeooo:rsid="00630d04"/>
    </style:style>
    <style:style style:name="T102" style:family="text">
      <style:text-properties fo:language="ru" fo:country="RU" officeooo:rsid="00ca7f4e"/>
    </style:style>
    <style:style style:name="T103" style:family="text">
      <style:text-properties fo:language="ru" fo:country="RU" officeooo:rsid="00f2e8fb"/>
    </style:style>
    <style:style style:name="T104" style:family="text">
      <style:text-properties fo:language="ru" fo:country="RU" officeooo:rsid="012baae1"/>
    </style:style>
    <style:style style:name="T105" style:family="text">
      <style:text-properties fo:language="ru" fo:country="RU" officeooo:rsid="00cbffff"/>
    </style:style>
    <style:style style:name="T106" style:family="text">
      <style:text-properties fo:language="ru" fo:country="RU" officeooo:rsid="00ccd59f"/>
    </style:style>
    <style:style style:name="T107" style:family="text">
      <style:text-properties fo:language="ru" fo:country="RU" officeooo:rsid="00ebcaa9"/>
    </style:style>
    <style:style style:name="T108" style:family="text">
      <style:text-properties fo:language="ru" fo:country="RU" officeooo:rsid="00f304dc"/>
    </style:style>
    <style:style style:name="T109" style:family="text">
      <style:text-properties fo:language="ru" fo:country="RU" officeooo:rsid="012bdba5"/>
    </style:style>
    <style:style style:name="T110" style:family="text">
      <style:text-properties fo:language="ru" fo:country="RU" officeooo:rsid="00edb031"/>
    </style:style>
    <style:style style:name="T111" style:family="text">
      <style:text-properties fo:language="ru" fo:country="RU" officeooo:rsid="00c90aa8"/>
    </style:style>
    <style:style style:name="T112" style:family="text">
      <style:text-properties fo:language="ru" fo:country="RU" officeooo:rsid="00f11f0e"/>
    </style:style>
    <style:style style:name="T113" style:family="text">
      <style:text-properties fo:language="ru" fo:country="RU" officeooo:rsid="00c9f418"/>
    </style:style>
    <style:style style:name="T114" style:family="text">
      <style:text-properties fo:language="ru" fo:country="RU" officeooo:rsid="00eea60d"/>
    </style:style>
    <style:style style:name="T115" style:family="text">
      <style:text-properties fo:language="ru" fo:country="RU" officeooo:rsid="00d0e1d2"/>
    </style:style>
    <style:style style:name="T116" style:family="text">
      <style:text-properties officeooo:rsid="013a7a1e"/>
    </style:style>
    <style:style style:name="T117" style:family="text">
      <style:text-properties fo:language="ru" fo:country="RU" officeooo:rsid="00f7cc41"/>
    </style:style>
    <style:style style:name="T118" style:family="text">
      <style:text-properties fo:language="ru" fo:country="RU" officeooo:rsid="00f81e04"/>
    </style:style>
    <style:style style:name="T119" style:family="text">
      <style:text-properties style:use-window-font-color="true" loext:opacity="0%" style:font-name="PT Astra Serif" fo:language="en" fo:country="US" officeooo:rsid="00c88672"/>
    </style:style>
    <style:style style:name="T120" style:family="text">
      <style:text-properties style:use-window-font-color="true" loext:opacity="0%" style:font-name="PT Astra Serif" fo:language="ru" fo:country="RU" officeooo:rsid="013bdee8"/>
    </style:style>
    <style:style style:name="T121" style:family="text">
      <style:text-properties style:use-window-font-color="true" loext:opacity="0%" style:font-name="PT Astra Serif" fo:language="ru" fo:country="RU" officeooo:rsid="00d20af1"/>
    </style:style>
    <style:style style:name="T122" style:family="text">
      <style:text-properties officeooo:rsid="0033b918"/>
    </style:style>
    <style:style style:name="T123" style:family="text">
      <style:text-properties officeooo:rsid="007df13b"/>
    </style:style>
    <style:style style:name="T124" style:family="text">
      <style:text-properties officeooo:rsid="01dfb4a2"/>
    </style:style>
    <style:style style:name="T125" style:family="text">
      <style:text-properties fo:letter-spacing="-0.004cm"/>
    </style:style>
    <style:style style:name="T126" style:family="text">
      <style:text-properties fo:language="en" fo:country="US" officeooo:rsid="00719975"/>
    </style:style>
    <style:style style:name="T127" style:family="text">
      <style:text-properties style:font-name="PT Astra Serif" fo:letter-spacing="-0.004cm" officeooo:rsid="01dfc8de"/>
    </style:style>
    <style:style style:name="T128" style:family="text">
      <style:text-properties fo:font-variant="normal" fo:text-transform="none" style:use-window-font-color="true" loext:opacity="0%" style:font-name="PT Astra Serif" fo:letter-spacing="normal"/>
    </style:style>
    <style:style style:name="T129" style:family="text">
      <style:text-properties style:font-name="PT Astra Serif"/>
    </style:style>
    <style:style style:name="T130" style:family="text">
      <style:text-properties fo:font-variant="normal" fo:text-transform="none" style:use-window-font-color="true" loext:opacity="0%" style:font-name="PT Astra Serif" fo:font-weight="normal" style:font-weight-asian="normal" style:font-weight-complex="normal"/>
    </style:style>
    <style:style style:name="T131" style:family="text">
      <style:text-properties fo:font-variant="normal" fo:text-transform="none" style:use-window-font-color="true" loext:opacity="0%" style:text-position="sub 58%" style:font-name="PT Astra Serif" fo:font-weight="normal" style:font-weight-asian="normal" style:font-weight-complex="normal"/>
    </style:style>
    <style:style style:name="T132" style:family="text">
      <style:text-properties fo:font-variant="normal" fo:text-transform="none" style:use-window-font-color="true" loext:opacity="0%" style:text-position="super 58%" style:font-name="PT Astra Serif" fo:font-weight="normal" style:font-weight-asian="normal" style:font-weight-complex="normal"/>
    </style:style>
    <style:style style:name="T133" style:family="text">
      <style:text-properties fo:font-variant="normal" fo:text-transform="none" style:use-window-font-color="true" loext:opacity="0%" style:text-position="0% 100%" style:font-name="PT Astra Serif" fo:font-weight="normal" style:font-weight-asian="normal" style:font-weight-complex="normal"/>
    </style:style>
    <style:style style:name="T134" style:family="text">
      <style:text-properties fo:font-variant="normal" fo:text-transform="none" style:use-window-font-color="true" loext:opacity="0%" style:text-position="0% 100%" style:font-name="PT Astra Serif" fo:letter-spacing="normal"/>
    </style:style>
    <style:style style:name="T135" style:family="text">
      <style:text-properties fo:font-variant="normal" fo:text-transform="none" style:use-window-font-color="true" loext:opacity="0%" style:text-position="0% 100%" style:font-name="PT Astra Serif" fo:font-weight="normal" officeooo:rsid="01e0f486" style:font-weight-asian="normal" style:font-weight-complex="normal"/>
    </style:style>
    <style:style style:name="T136" style:family="text">
      <style:text-properties fo:font-variant="normal" fo:text-transform="none" style:use-window-font-color="true" loext:opacity="0%" style:text-position="0% 100%" style:font-name="PT Astra Serif" fo:letter-spacing="normal" officeooo:rsid="01e0f486"/>
    </style:style>
    <style:style style:name="T137" style:family="text">
      <style:text-properties fo:font-variant="normal" fo:text-transform="none" style:use-window-font-color="true" loext:opacity="0%" style:text-position="0% 100%" style:font-name="PT Astra Serif" fo:letter-spacing="normal" fo:font-weight="normal" officeooo:rsid="01e0f486" style:font-weight-asian="normal" style:font-weight-complex="normal"/>
    </style:style>
    <style:style style:name="T138" style:family="text">
      <style:text-properties fo:font-variant="normal" fo:text-transform="none" style:use-window-font-color="true" loext:opacity="0%" style:text-position="0% 100%" style:font-name="PT Astra Serif" fo:letter-spacing="-0.004cm" fo:font-weight="normal" officeooo:rsid="01dfc8de" style:font-weight-asian="normal" style:font-weight-complex="normal"/>
    </style:style>
    <style:style style:name="T13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a42fa" style:font-weight-asian="normal" style:font-weight-complex="normal"/>
    </style:style>
    <style:style style:name="T140" style:family="text">
      <style:text-properties officeooo:rsid="00789abd"/>
    </style:style>
    <style:style style:name="T141" style:family="text">
      <style:text-properties officeooo:rsid="01f9d0e1"/>
    </style:style>
    <style:style style:name="T142" style:family="text">
      <style:text-properties officeooo:rsid="0316cf8e"/>
    </style:style>
    <style:style style:name="T143" style:family="text">
      <style:text-properties officeooo:rsid="031c71a4"/>
    </style:style>
    <style:style style:name="T144" style:family="text">
      <style:text-properties officeooo:rsid="032198f1"/>
    </style:style>
    <style:style style:name="T145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21408" style:font-weight-asian="normal" style:font-weight-complex="normal"/>
    </style:style>
    <style:style style:name="T146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4024f" style:font-weight-asian="normal" style:font-weight-complex="normal"/>
    </style:style>
    <style:style style:name="T14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79137" style:font-weight-asian="normal" style:font-weight-complex="normal"/>
    </style:style>
    <style:style style:name="T14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b658a" style:font-weight-asian="normal" style:font-weight-complex="normal"/>
    </style:style>
    <style:style style:name="T14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9a9dd" style:font-weight-asian="normal" style:font-weight-complex="normal"/>
    </style:style>
    <style:style style:name="T150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ecb74" style:font-weight-asian="normal" style:font-weight-complex="normal"/>
    </style:style>
    <style:style style:name="T151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f20f2" style:font-weight-asian="normal" style:font-weight-complex="normal"/>
    </style:style>
    <style:style style:name="T152" style:family="text">
      <style:text-properties fo:font-variant="normal" fo:text-transform="none" style:use-window-font-color="true" loext:opacity="0%" style:text-position="0% 100%" style:font-name="PT Astra Serif" fo:font-size="14pt" fo:letter-spacing="normal" fo:language="ru" fo:country="RU" fo:font-weight="normal" officeooo:rsid="03183bcf" style:font-size-asian="14pt" style:font-weight-asian="normal" style:font-weight-complex="normal"/>
    </style:style>
    <style:style style:name="T153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a7602" style:font-weight-asian="normal" style:font-weight-complex="normal"/>
    </style:style>
    <style:style style:name="T154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c71a4" style:font-weight-asian="normal" style:font-weight-complex="normal"/>
    </style:style>
    <style:style style:name="T155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eba94" style:font-weight-asian="normal" style:font-weight-complex="normal"/>
    </style:style>
    <style:style style:name="T156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64420" style:font-weight-asian="normal" style:font-weight-complex="normal"/>
    </style:style>
    <style:style style:name="T157" style:family="text">
      <style:text-properties fo:font-variant="normal" fo:text-transform="none" style:use-window-font-color="true" loext:opacity="0%" style:font-name="PT Astra Serif" fo:letter-spacing="normal" officeooo:rsid="01dfc8de"/>
    </style:style>
    <style:style style:name="T158" style:family="text">
      <style:text-properties fo:font-size="14pt" style:font-size-asian="14pt"/>
    </style:style>
    <style:style style:name="T159" style:family="text">
      <style:text-properties fo:font-size="14pt" fo:letter-spacing="-0.012cm" style:font-size-asian="14pt"/>
    </style:style>
    <style:style style:name="T160" style:family="text">
      <style:text-properties fo:font-size="14pt" fo:letter-spacing="-0.016cm" style:font-size-asian="14pt"/>
    </style:style>
    <style:style style:name="T161" style:family="text">
      <style:text-properties fo:font-size="14pt" fo:letter-spacing="-0.014cm" style:font-size-asian="14pt"/>
    </style:style>
    <style:style style:name="T162" style:family="text">
      <style:text-properties fo:font-size="14pt" fo:letter-spacing="-0.014cm" officeooo:rsid="030c6de9" style:font-size-asian="14pt"/>
    </style:style>
    <style:style style:name="T163" style:family="text">
      <style:text-properties fo:font-size="14pt" fo:letter-spacing="-0.004cm" style:font-size-asian="14pt"/>
    </style:style>
    <style:style style:name="T164" style:family="text">
      <style:text-properties style:text-position="0% 100%" officeooo:rsid="01ea42e7"/>
    </style:style>
    <style:style style:name="T165" style:family="text">
      <style:text-properties officeooo:rsid="01ea6119"/>
    </style:style>
    <style:style style:name="T166" style:family="text">
      <style:text-properties officeooo:rsid="007f467b"/>
    </style:style>
    <style:style style:name="T167" style:family="text">
      <style:text-properties officeooo:rsid="0082e206"/>
    </style:style>
    <style:style style:name="T168" style:family="text">
      <style:text-properties officeooo:rsid="01ee5f0b"/>
    </style:style>
    <style:style style:name="T169" style:family="text">
      <style:text-properties style:text-position="sub 58%"/>
    </style:style>
    <style:style style:name="T170" style:family="text">
      <style:text-properties officeooo:rsid="01ed5eca"/>
    </style:style>
    <style:style style:name="T171" style:family="text">
      <style:text-properties style:text-position="0% 100%"/>
    </style:style>
    <style:style style:name="T172" style:family="text">
      <style:text-properties style:text-position="0% 100%" officeooo:rsid="01ee5f0b"/>
    </style:style>
    <style:style style:name="T173" style:family="text">
      <style:text-properties style:text-position="sub 58%" officeooo:rsid="01ecebce"/>
    </style:style>
    <style:style style:name="T174" style:family="text">
      <style:text-properties style:text-position="0% 100%" officeooo:rsid="01ecebce"/>
    </style:style>
    <style:style style:name="T175" style:family="text">
      <style:text-properties style:text-position="0% 100%" officeooo:rsid="01ed5eca"/>
    </style:style>
    <style:style style:name="T176" style:family="text">
      <style:text-properties style:text-position="0% 100%" officeooo:rsid="00557991"/>
    </style:style>
    <style:style style:name="T177" style:family="text">
      <style:text-properties officeooo:rsid="01f2f670"/>
    </style:style>
    <style:style style:name="T178" style:family="text">
      <style:text-properties officeooo:rsid="008407e0"/>
    </style:style>
    <style:style style:name="T179" style:family="text">
      <style:text-properties officeooo:rsid="032e8980"/>
    </style:style>
    <style:style style:name="T180" style:family="text">
      <style:text-properties officeooo:rsid="01fc38ba"/>
    </style:style>
    <style:style style:name="T181" style:family="text">
      <style:text-properties officeooo:rsid="01ff4ae4"/>
    </style:style>
    <style:style style:name="T182" style:family="text">
      <style:text-properties officeooo:rsid="02043720"/>
    </style:style>
    <style:style style:name="T183" style:family="text">
      <style:text-properties officeooo:rsid="02065111"/>
    </style:style>
    <style:style style:name="T184" style:family="text">
      <style:text-properties officeooo:rsid="01ff4e74"/>
    </style:style>
    <style:style style:name="T185" style:family="text">
      <style:text-properties officeooo:rsid="0201b593"/>
    </style:style>
    <style:style style:name="T186" style:family="text">
      <style:text-properties style:text-position="0% 100%" officeooo:rsid="0202bda4"/>
    </style:style>
    <style:style style:name="T187" style:family="text">
      <style:text-properties style:text-position="0% 100%" fo:font-size="14pt" fo:letter-spacing="-0.004cm" officeooo:rsid="0202bda4" style:font-size-asian="14pt"/>
    </style:style>
    <style:style style:name="T188" style:family="text">
      <style:text-properties officeooo:rsid="0084ac64"/>
    </style:style>
    <style:style style:name="T189" style:family="text">
      <style:text-properties officeooo:rsid="0085e897"/>
    </style:style>
    <style:style style:name="T190" style:family="text">
      <style:text-properties style:text-position="sub 58%" style:font-name="PT Astra Serif"/>
    </style:style>
    <style:style style:name="T191" style:family="text">
      <style:text-properties fo:font-variant="normal" fo:text-transform="none" style:use-window-font-color="true" loext:opacity="0%" style:font-name="PT Astra Serif" fo:font-size="12pt" fo:letter-spacing="normal" officeooo:rsid="01dfc8de" style:font-size-asian="12pt" style:font-size-complex="12pt"/>
    </style:style>
    <style:style style:name="T192" style:family="text">
      <style:text-properties fo:font-variant="normal" fo:text-transform="none" style:use-window-font-color="true" loext:opacity="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style:use-window-font-color="true" loext:opacity="0%" style:text-position="sub 58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style:use-window-font-color="true" loext:opacity="0%" style:text-position="0% 10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style:use-window-font-color="true" loext:opacity="0%" style:text-position="0% 100%" style:font-name="PT Astra Serif" fo:font-size="12pt" fo:letter-spacing="normal" officeooo:rsid="01dfc8de" style:font-size-asian="12pt" style:font-size-complex="12pt"/>
    </style:style>
    <style:style style:name="T196" style:family="text">
      <style:text-properties officeooo:rsid="020d70ed"/>
    </style:style>
    <style:style style:name="T197" style:family="text">
      <style:text-properties fo:language="ru" fo:country="RU" officeooo:rsid="020a2eaf"/>
    </style:style>
    <style:style style:name="T198" style:family="text">
      <style:text-properties fo:language="ru" fo:country="RU" officeooo:rsid="020d70ed"/>
    </style:style>
    <style:style style:name="T199" style:family="text">
      <style:text-properties fo:language="ru" fo:country="RU" officeooo:rsid="020c061c"/>
    </style:style>
    <style:style style:name="T200" style:family="text">
      <style:text-properties fo:language="ru" fo:country="RU" officeooo:rsid="020e76f4"/>
    </style:style>
    <style:style style:name="T201" style:family="text">
      <style:text-properties fo:font-size="14pt" fo:letter-spacing="-0.021cm" style:font-size-asian="14pt"/>
    </style:style>
    <style:style style:name="T202" style:family="text">
      <style:text-properties fo:font-size="14pt" fo:letter-spacing="-0.018cm" style:font-size-asian="14pt"/>
    </style:style>
    <style:style style:name="T203" style:family="text">
      <style:text-properties fo:font-size="14pt" fo:letter-spacing="-0.03cm" style:font-size-asian="14pt"/>
    </style:style>
    <style:style style:name="T204" style:family="text">
      <style:text-properties fo:font-size="14pt" fo:letter-spacing="-0.023cm" style:font-size-asian="14pt"/>
    </style:style>
    <style:style style:name="T205" style:family="text">
      <style:text-properties fo:font-size="14pt" fo:letter-spacing="-0.026cm" style:font-size-asian="14pt"/>
    </style:style>
    <style:style style:name="T206" style:family="text">
      <style:text-properties fo:font-size="14pt" fo:letter-spacing="-0.028cm" style:font-size-asian="14pt"/>
    </style:style>
    <style:style style:name="T207" style:family="text">
      <style:text-properties fo:font-size="14pt" fo:letter-spacing="-0.007cm" style:font-size-asian="14pt"/>
    </style:style>
    <style:style style:name="T208" style:family="text">
      <style:text-properties fo:font-size="14pt" fo:letter-spacing="-0.011cm" style:font-size-asian="14pt"/>
    </style:style>
    <style:style style:name="T209" style:family="text">
      <style:text-properties fo:font-size="14pt" fo:letter-spacing="-0.005cm" style:font-size-asian="14pt"/>
    </style:style>
    <style:style style:name="T210" style:family="text">
      <style:text-properties fo:font-size="14pt" fo:letter-spacing="0.002cm" style:font-size-asian="14pt"/>
    </style:style>
    <style:style style:name="T211" style:family="text">
      <style:text-properties fo:font-size="14pt" fo:letter-spacing="-0.019cm" style:font-size-asian="14pt"/>
    </style:style>
    <style:style style:name="T212" style:family="text">
      <style:text-properties fo:font-size="14pt" fo:letter-spacing="-0.007cm" officeooo:rsid="020def9a" style:font-size-asian="14pt"/>
    </style:style>
    <style:style style:name="T213" style:family="text">
      <style:text-properties officeooo:rsid="008dbcf2"/>
    </style:style>
    <style:style style:name="T214" style:family="text">
      <style:text-properties fo:language="ru" fo:country="RU" officeooo:rsid="011b1c09"/>
    </style:style>
    <style:style style:name="T215" style:family="text">
      <style:text-properties fo:language="ru" fo:country="RU" officeooo:rsid="020764ef"/>
    </style:style>
    <style:style style:name="T216" style:family="text">
      <style:text-properties fo:language="ru" fo:country="RU" officeooo:rsid="011b3a7a"/>
    </style:style>
    <style:style style:name="T217" style:family="text">
      <style:text-properties style:use-window-font-color="true" loext:opacity="0%" fo:language="ru" fo:country="RU" officeooo:rsid="011dd740"/>
    </style:style>
    <style:style style:name="T218" style:family="text">
      <style:text-properties officeooo:rsid="015c84f7"/>
    </style:style>
    <style:style style:name="T219" style:family="text">
      <style:text-properties fo:language="ru" fo:country="RU" officeooo:rsid="020cf027"/>
    </style:style>
    <style:style style:name="T220" style:family="text">
      <style:text-properties officeooo:rsid="015d19f1"/>
    </style:style>
    <style:style style:name="T221" style:family="text">
      <style:text-properties officeooo:rsid="021f1ebe"/>
    </style:style>
    <style:style style:name="T222" style:family="text">
      <style:text-properties officeooo:rsid="015de6c0"/>
    </style:style>
    <style:style style:name="T223" style:family="text">
      <style:text-properties officeooo:rsid="015f41eb"/>
    </style:style>
    <style:style style:name="T224" style:family="text">
      <style:text-properties officeooo:rsid="0175002b"/>
    </style:style>
    <style:style style:name="T225" style:family="text">
      <style:text-properties fo:language="en" fo:country="US" officeooo:rsid="0175002b"/>
    </style:style>
    <style:style style:name="T226" style:family="text">
      <style:text-properties fo:language="ru" fo:country="RU" officeooo:rsid="0175002b"/>
    </style:style>
    <style:style style:name="T227" style:family="text">
      <style:text-properties fo:language="ru" fo:country="RU" officeooo:rsid="017dae1f"/>
    </style:style>
    <style:style style:name="T228" style:family="text">
      <style:text-properties fo:language="ru" fo:country="RU" officeooo:rsid="017f7050"/>
    </style:style>
    <style:style style:name="T229" style:family="text">
      <style:text-properties fo:language="ru" fo:country="RU" officeooo:rsid="0195496e"/>
    </style:style>
    <style:style style:name="T230" style:family="text">
      <style:text-properties officeooo:rsid="015f611b"/>
    </style:style>
    <style:style style:name="T231" style:family="text">
      <style:text-properties officeooo:rsid="019c0667"/>
    </style:style>
    <style:style style:name="T232" style:family="text">
      <style:text-properties officeooo:rsid="0183435c"/>
    </style:style>
    <style:style style:name="T233" style:family="text">
      <style:text-properties officeooo:rsid="018540d8"/>
    </style:style>
    <style:style style:name="T234" style:family="text">
      <style:text-properties officeooo:rsid="013e5aa0"/>
    </style:style>
    <style:style style:name="T235" style:family="text">
      <style:text-properties officeooo:rsid="013ee7ce"/>
    </style:style>
    <style:style style:name="T236" style:family="text">
      <style:text-properties officeooo:rsid="013fce50"/>
    </style:style>
    <style:style style:name="T237" style:family="text">
      <style:text-properties officeooo:rsid="01c80c4f"/>
    </style:style>
    <style:style style:name="T238" style:family="text">
      <style:text-properties officeooo:rsid="014158f7"/>
    </style:style>
    <style:style style:name="T239" style:family="text">
      <style:text-properties officeooo:rsid="01c97e32"/>
    </style:style>
    <style:style style:name="T240" style:family="text">
      <style:text-properties officeooo:rsid="018ddb6c"/>
    </style:style>
    <style:style style:name="T241" style:family="text">
      <style:text-properties officeooo:rsid="0142c8c1"/>
    </style:style>
    <style:style style:name="T242" style:family="text">
      <style:text-properties officeooo:rsid="01457a44"/>
    </style:style>
    <style:style style:name="T243" style:family="text">
      <style:text-properties fo:language="en" fo:country="US"/>
    </style:style>
    <style:style style:name="T244" style:family="text">
      <style:text-properties fo:language="ru" fo:country="RU" officeooo:rsid="017944e5"/>
    </style:style>
    <style:style style:name="T245" style:family="text">
      <style:text-properties fo:language="en" fo:country="US" officeooo:rsid="017944e5"/>
    </style:style>
    <style:style style:name="T246" style:family="text">
      <style:text-properties fo:language="ru" fo:country="RU" officeooo:rsid="017aa67a"/>
    </style:style>
    <style:style style:name="T247" style:family="text">
      <style:text-properties officeooo:rsid="017944e5"/>
    </style:style>
    <style:style style:name="T248" style:family="text">
      <style:text-properties officeooo:rsid="001ca832"/>
    </style:style>
    <style:style style:name="T249" style:family="text">
      <style:text-properties fo:language="en" fo:country="US" officeooo:rsid="0151a8b6"/>
    </style:style>
    <style:style style:name="T250" style:family="text">
      <style:text-properties fo:language="en" fo:country="US" officeooo:rsid="015310a9"/>
    </style:style>
    <style:style style:name="T251" style:family="text">
      <style:text-properties fo:language="en" fo:country="US" officeooo:rsid="01547fbb"/>
    </style:style>
    <style:style style:name="T252" style:family="text">
      <style:text-properties fo:language="en" fo:country="US" officeooo:rsid="01556844"/>
    </style:style>
    <style:style style:name="T253" style:family="text">
      <style:text-properties fo:language="en" fo:country="US" officeooo:rsid="015678a8"/>
    </style:style>
    <style:style style:name="T254" style:family="text">
      <style:text-properties fo:language="en" fo:country="US" officeooo:rsid="0158202d"/>
    </style:style>
    <style:style style:name="T255" style:family="text">
      <style:text-properties fo:language="en" fo:country="US" officeooo:rsid="01597fc8"/>
    </style:style>
    <style:style style:name="T256" style:family="text">
      <style:text-properties fo:language="en" fo:country="US" officeooo:rsid="015a516a"/>
    </style:style>
    <style:style style:name="T257" style:family="text">
      <style:text-properties fo:language="en" fo:country="US" officeooo:rsid="015b0fe3"/>
    </style:style>
    <style:style style:name="T258" style:family="text">
      <style:text-properties fo:language="en" fo:country="US" officeooo:rsid="015bacbf"/>
    </style:style>
    <style:style style:name="T259" style:family="text">
      <style:text-properties fo:language="en" fo:country="US" officeooo:rsid="015c3232"/>
    </style:style>
    <style:style style:name="T260" style:family="text">
      <style:text-properties officeooo:rsid="01b58b8f"/>
    </style:style>
    <style:style style:name="T261" style:family="text">
      <style:text-properties officeooo:rsid="01be37c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P2">Краснодарского края</text:p>
      <text:p text:style-name="P2">ГБПОУ КК ЕПК</text:p>
      <text:p text:style-name="P3"/>
      <text:p text:style-name="P3"/>
      <text:p text:style-name="P2">Отделение педагогики</text:p>
      <text:p text:style-name="P2">Специальность 09.02.07 Информационные системы и программирование</text:p>
      <text:p text:style-name="P3"/>
      <text:p text:style-name="P3"/>
      <text:p text:style-name="P3"/>
      <text:p text:style-name="P2">Студент И-42 группы</text:p>
      <text:p text:style-name="P2"><text:tab/>САМСЫКА РОДИОН МИХАЙЛОВИЧ</text:p>
      <text:p text:style-name="P3"/>
      <text:p text:style-name="P4">РАЗРАБОТКА ПРОГРАММЫ ДЛЯ АВТОМАТИЗАЦИИ ОФОРМЛЕНИЯ ЗАКАЗОВ В РЕСТОРАНЕ</text:p>
      <text:p text:style-name="P5"/>
      <text:p text:style-name="P5">Дипломная работа <text:span text:style-name="T1">(Дипломный проект)</text:span></text:p>
      <text:p text:style-name="P3"/>
      <text:p text:style-name="P3"/>
      <text:p text:style-name="P3"/>
      <text:p text:style-name="P3"/>
      <text:p text:style-name="P6">Научный руководитель:</text:p>
      <text:p text:style-name="P6">Фомин Андрей Томасович</text:p>
      <text:p text:style-name="P3"/>
      <text:p text:style-name="P3"/>
      <text:p text:style-name="P3"/>
      <text:p text:style-name="P3"/>
      <text:p text:style-name="P3"/>
      <text:p text:style-name="P2"/>
      <text:p text:style-name="P2">г. Ейск, 202<text:span text:style-name="T1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7"><text:a xlink:type="simple" xlink:href="#__RefHeading___Toc8884_1636301399" office:name="ВВЕДЕНИЕ" text:style-name="Index_20_Link" text:visited-style-name="Index_20_Link">ВВЕДЕНИЕ<text:tab/>3</text:a></text:p>
          <text:p text:style-name="P7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4</text:a></text:p>
          <text:p text:style-name="P8"><text:a xlink:type="simple" xlink:href="#__RefHeading___Toc8888_1636301399" office:name="1 Модель предметной области" text:style-name="Index_20_Link" text:visited-style-name="Index_20_Link">1 Модель предметной области<text:tab/>4</text:a></text:p>
          <text:p text:style-name="P8"><text:a xlink:type="simple" xlink:href="#__RefHeading___Toc3714_962412752" office:name="2 Предварительное определение требований" text:style-name="Index_20_Link" text:visited-style-name="Index_20_Link">2 Предварительное определение требований<text:tab/>8</text:a></text:p>
          <text:p text:style-name="P9"><text:a xlink:type="simple" xlink:href="#__RefHeading___Toc3716_962412752" office:name="2.1 Общее описание" text:style-name="Index_20_Link" text:visited-style-name="Index_20_Link">2.1 Общее описание<text:tab/>8</text:a></text:p>
          <text:p text:style-name="P9"><text:a xlink:type="simple" xlink:href="#__RefHeading___Toc11346_567402320" office:name="2.2 Функциональные требования" text:style-name="Index_20_Link" text:visited-style-name="Index_20_Link">2.2 Функциональные требования<text:tab/>10</text:a></text:p>
          <text:p text:style-name="P9"><text:a xlink:type="simple" xlink:href="#__RefHeading___Toc11348_567402320" office:name="2.3 Требования к данным" text:style-name="Index_20_Link" text:visited-style-name="Index_20_Link">2.3 Требования к данным<text:tab/>10</text:a></text:p>
          <text:p text:style-name="P9"><text:a xlink:type="simple" xlink:href="#__RefHeading___Toc11356_567402320" office:name="2.4 Требования к внешним интерфейсам" text:style-name="Index_20_Link" text:visited-style-name="Index_20_Link">2.4 Требования к внешним интерфейсам<text:tab/>12</text:a></text:p>
          <text:p text:style-name="P9"><text:a xlink:type="simple" xlink:href="#__RefHeading___Toc11364_567402320" office:name="2.5 Атрибуты качества" text:style-name="Index_20_Link" text:visited-style-name="Index_20_Link">2.5 Атрибуты качества<text:tab/>13</text:a></text:p>
          <text:p text:style-name="P8"><text:a xlink:type="simple" xlink:href="#__RefHeading___Toc8892_1636301399" office:name="3 Показатели экономической эффективности" text:style-name="Index_20_Link" text:visited-style-name="Index_20_Link">3 Показатели экономической эффективности<text:tab/>14</text:a></text:p>
          <text:p text:style-name="P9"><text:a xlink:type="simple" xlink:href="#__RefHeading___Toc2024_2593696514" office:name="3.1 Расчет себестоимости программного продукта" text:style-name="Index_20_Link" text:visited-style-name="Index_20_Link">3.1 Расчет себестоимости программного продукта<text:tab/>14</text:a></text:p>
          <text:p text:style-name="P9"><text:a xlink:type="simple" xlink:href="#__RefHeading___Toc2026_2593696514" office:name="1.3.2 Расчет экономического эффекта программного продукта" text:style-name="Index_20_Link" text:visited-style-name="Index_20_Link">1.3.2 Расчет экономического эффекта программного продукта<text:tab/>15</text:a></text:p>
          <text:p text:style-name="P7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18</text:a></text:p>
          <text:p text:style-name="P8"><text:a xlink:type="simple" xlink:href="#__RefHeading___Toc19695_1636301399%20%D0%9A%D0%BE%D0%BF%D0%B8%D1%8F%201" office:name="1 Технологии программирования" text:style-name="Index_20_Link" text:visited-style-name="Index_20_Link">1 Технологии программирования<text:tab/>18</text:a></text:p>
          <text:p text:style-name="P9"><text:a xlink:type="simple" xlink:href="#__RefHeading___Toc6583_2272482351" office:name="1.1 Методы разработки" text:style-name="Index_20_Link" text:visited-style-name="Index_20_Link">1.1 Методы разработки<text:tab/>18</text:a></text:p>
          <text:p text:style-name="P8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19</text:a></text:p>
          <text:p text:style-name="P8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19</text:a></text:p>
          <text:p text:style-name="P8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20</text:a></text:p>
          <text:p text:style-name="P9"><text:a xlink:type="simple" xlink:href="#__RefHeading___Toc11261_1636301399" office:name="2.4.1 Первый пункт" text:style-name="Index_20_Link" text:visited-style-name="Index_20_Link">2.4.1 Первый пункт<text:tab/>20</text:a></text:p>
          <text:p text:style-name="P9"><text:a xlink:type="simple" xlink:href="#__RefHeading___Toc11263_1636301399" office:name="2.4.2 Это второй пункт" text:style-name="Index_20_Link" text:visited-style-name="Index_20_Link">2.4.2 Это второй пункт<text:tab/>20</text:a></text:p>
          <text:p text:style-name="P7"><text:a xlink:type="simple" xlink:href="#__RefHeading___Toc8902_1636301399" office:name="ЗАКЛЮЧЕНИЕ" text:style-name="Index_20_Link" text:visited-style-name="Index_20_Link">ЗАКЛЮЧЕНИЕ<text:tab/>22</text:a></text:p>
          <text:p text:style-name="P7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23</text:a></text:p>
          <text:p text:style-name="P7"><text:a xlink:type="simple" xlink:href="#__RefHeading___Toc8906_1636301399" office:name="ПРИЛОЖЕНИЕ А" text:style-name="Index_20_Link" text:visited-style-name="Index_20_Link">ПРИЛОЖЕНИЕ А<text:tab/>24</text:a></text:p>
          <text:p text:style-name="P7"><text:a xlink:type="simple" xlink:href="#__RefHeading___Toc8908_1636301399%20%D0%9A%D0%BE%D0%BF%D0%B8%D1%8F%201" office:name="ПРИЛОЖЕНИЕ Б" text:style-name="Index_20_Link" text:visited-style-name="Index_20_Link">ПРИЛОЖЕНИЕ Б<text:tab/>26</text:a></text:p>
          <text:p text:style-name="P7"><text:a xlink:type="simple" xlink:href="#__RefHeading___Toc8908_1636301399" office:name="ПРИЛОЖЕНИЕ В" text:style-name="Index_20_Link" text:visited-style-name="Index_20_Link">ПРИЛОЖЕНИЕ В<text:tab/>27</text:a></text:p>
        </text:index-body>
      </text:table-of-content>
      <text:p text:style-name="P10"/>
      <text:h text:style-name="P11" text:outline-level="1"><text:bookmark-start text:name="__RefHeading___Toc8884_1636301399"/><text:soft-page-break/>ВВЕДЕНИЕ<text:bookmark-end text:name="__RefHeading___Toc8884_1636301399"/></text:h>
      <text:p text:style-name="P3">Тема моего проекта «Разработка программы для автоматизации оформления заказов в ресторане».</text:p>
      <text:p text:style-name="P3">Предмет – автоматизация информационных процессов предметной области «Ресторан».</text:p>
      <text:p text:style-name="P3">Цель работы – разработка автоматизированной системы для оформления заказов в предметной области «Ресторан».</text:p>
      <text:p text:style-name="P3">Объект – предметная область «Ресторан».</text:p>
      <text:p text:style-name="P3">Для достижения поставленной цели курсового проекта необходимо решить следующие задачи:</text:p>
      <text:list text:style-name="L1">
        <text:list-item>
          <text:p text:style-name="P12">проанализировать предметную область и обосновать актуальность проекта. </text:p>
        </text:list-item>
        <text:list-item>
          <text:p text:style-name="P12">выбрать язык программирования и среду разработки;</text:p>
        </text:list-item>
        <text:list-item>
          <text:p text:style-name="P12">спроектировать структуру и модули программного обеспечения;</text:p>
        </text:list-item>
        <text:list-item>
          <text:p text:style-name="P12">разработать программное обеспечение.</text:p>
        </text:list-item>
      </text:list>
      <text:p text:style-name="P3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о проектирование системы. Вторая глава посвящена описанию процесса разработки программных модулей.</text:p>
      <text:p text:style-name="P3"/>
      <text:h text:style-name="P13" text:outline-level="1"><text:bookmark-start text:name="__RefHeading___Toc8886_1636301399"/>ГЛАВА 1 ПРОЕКТИРОВАНИЕ ПРИЛОЖЕНИЯ<text:bookmark-end text:name="__RefHeading___Toc8886_1636301399"/></text:h>
      <text:h text:style-name="Heading_20_2" text:outline-level="2"><text:bookmark-start text:name="__RefHeading___Toc8888_1636301399"/>1 Модель предметной области<text:bookmark-end text:name="__RefHeading___Toc8888_1636301399"/></text:h>
      <text:p text:style-name="P3">Ресторан — это предприятие общественного питания <text:span text:style-name="T2">[</text:span><text:bookmark-ref text:reference-format="number-no-superior" text:ref-name="__RefNumPara__4995_2159724457">2</text:bookmark-ref>, <text:span text:style-name="T3">с.</text:span><text:span text:style-name="T4"> </text:span><text:span text:style-name="T5">3</text:span><text:span text:style-name="T2">]</text:span>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 <text:span text:style-name="T6">[</text:span><text:span text:style-name="T6"><text:bookmark-ref text:reference-format="number-no-superior" text:ref-name="__RefNumPara__4997_2159724457">1</text:bookmark-ref></text:span><text:span text:style-name="T6">, </text:span><text:span text:style-name="T7">с. 1</text:span><text:span text:style-name="T6">]</text:span>. </text:p>
      <text:p text:style-name="P3"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P3">Предварительное моделирование предметной области позволяет выявить основные бизнес-процессы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Иногда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для поставщиков. Отсутствие единой автоматизированной системы для управления этими процессами приводит к <text:soft-page-break/>риску человеческих ошибок, замедлению обслуживания и сложностям в оперативном управлении ресурсами.</text:p>
      <text:p text:style-name="P3"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на бумажный бланк заказа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На рисунк<text:span text:style-name="T8">е 1 изображена схема <text:s/>работы с заказом на текущий момент.</text:span></text:p>
      <text:p text:style-name="P3">Процесс управления складом в ресторане представляет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<text:soft-page-break/>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</text:p>
      <text:p text:style-name="P3"/>
      <text:p text:style-name="P3"/>
      <text:p text:style-name="P3"/>
      <text:h text:style-name="P14" text:outline-level="2" text:is-list-header="true"><text:bookmark-start text:name="__RefHeading___Toc8890_1636301399"/><draw:frame draw:style-name="fr1" draw:name="Врезка1" text:anchor-type="char" svg:width="25.7cm" draw:z-index="5"><draw:text-box fo:min-height="16.036cm"><text:p text:style-name="Drawing"><draw:frame draw:style-name="fr2" draw:name="Изображение1" text:anchor-type="paragraph" svg:width="25.7cm" style:rel-width="100%" svg:height="16.036cm" style:rel-height="scale" draw:z-index="6"><draw:image xlink:href="Pictures/100000010000056F00000364E4B017A7.png" xlink:type="simple" xlink:show="embed" xlink:actuate="onLoad" draw:mime-type="image/png"/></draw:frame>Рисунок <text:sequence text:ref-name="refDrawing0" text:name="Drawing" text:formula="ooow:Drawing+1" style:num-format="1">1</text:sequence><text:s/>— Схема работы с заказом на данный момент</text:p></draw:text-box></draw:frame><text:bookmark-end text:name="__RefHeading___Toc8890_1636301399"/></text:h>
      <text:h text:style-name="P15" text:outline-level="2"><text:bookmark-start text:name="__RefHeading___Toc3714_962412752"/>2 Предварительное определение требований<text:bookmark-end text:name="__RefHeading___Toc3714_962412752"/></text:h>
      <text:h text:style-name="Heading_20_3" text:outline-level="3"><text:bookmark-start text:name="__RefHeading___Toc3716_962412752"/><text:span text:style-name="T9">2.1</text:span> Общее описание <text:bookmark-end text:name="__RefHeading___Toc3716_962412752"/></text:h>
      <text:p text:style-name="P3"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 <text:span text:style-name="T10">и</text:span> формирование финансовых отчётов <text:span text:style-name="T11">[</text:span><text:span text:style-name="T11"><text:bookmark-ref text:reference-format="number-no-superior" text:ref-name="__RefNumPara__5090_2159724457">5</text:bookmark-ref></text:span><text:span text:style-name="T11">]</text:span>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p text:style-name="Text_20_body"><text:bookmark-start text:name="__RefHeading___Toc3718_962412752"/>2.1.1 Общий взгляд на продукт<text:bookmark-end text:name="__RefHeading___Toc3718_962412752"/></text:p>
      <text:p text:style-name="P3"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<text:span text:style-name="T12">На рисунке 2 изображена схема работы с заказом после внедрения программного продукта.</text:span></text:p>
      <text:p text:style-name="Text_20_body"><text:bookmark-start text:name="__RefHeading___Toc3720_962412752"/>2.1.2 Классы и характеристики пользователей<text:bookmark-end text:name="__RefHeading___Toc3720_962412752"/></text:p>
      <text:p text:style-name="P3">Приложением пользуются официанты, администрация, кладовщики. Официанты оформляют заказы; кладовщики обновляют информацию о продукте на складе; администрация проверяет приложение на соответствие данных, работоспособность.</text:p>
      <text:p text:style-name="Text_20_body"><text:bookmark-start text:name="__RefHeading___Toc3722_962412752"/>2.1.3 Ограничение дизайна и реализации<text:bookmark-end text:name="__RefHeading___Toc3722_962412752"/></text:p>
      <text:p text:style-name="P3"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p text:style-name="Text_20_body"><text:bookmark-start text:name="__RefHeading___Toc3724_962412752"/>2.1.4 Предположения и зависимости<text:bookmark-end text:name="__RefHeading___Toc3724_962412752"/></text:p>
      <text:p text:style-name="P3">Для функционирования системы требуется корректно работающая локальная сеть. Установка дополнительных программ или приложений не требуется. </text:p>
      <text:p text:style-name="P16"><draw:frame draw:style-name="fr3" draw:name="Врезка3" text:anchor-type="paragraph" svg:width="25.7cm" style:rel-width="100%" svg:height="17.006cm" style:rel-height="scale-min" draw:z-index="7"><draw:text-box><text:p text:style-name="Drawing"><draw:frame draw:style-name="fr2" draw:name="Изображение3" text:anchor-type="paragraph" svg:width="25.7cm" style:rel-width="100%" svg:height="16.438cm" style:rel-height="scale" draw:z-index="8"><draw:image xlink:href="Pictures/100000010000058300000386422E6BDA.png" xlink:type="simple" xlink:show="embed" xlink:actuate="onLoad" draw:mime-type="image/png"/></draw:frame>Рисунок <text:sequence text:ref-name="refDrawing1" text:name="Drawing" text:formula="ooow:Drawing+1" style:num-format="1">2</text:sequence><text:s/>— Схема работы с заказом <text:span text:style-name="T13">при внедрении программного продукта</text:span></text:p></draw:text-box></draw:frame></text:p>
      <text:h text:style-name="P17" text:outline-level="3"><text:bookmark-start text:name="__RefHeading___Toc11346_567402320"/><text:span text:style-name="T14">2.</text:span><text:span text:style-name="T15">2</text:span><text:span text:style-name="T14"> </text:span>Функциональные требования <text:bookmark-end text:name="__RefHeading___Toc11346_567402320"/></text:h>
      <text:p text:style-name="P18"><text:span text:style-name="T16">FUNC-</text:span><text:span text:style-name="T17">00</text:span><text:span text:style-name="T16">1. </text:span><text:span text:style-name="T18">Синхронизация: </text:span><text:span text:style-name="T19">при запуске приложения загружаются актуальные данные. </text:span><text:span text:style-name="T20">В</text:span><text:span text:style-name="T18">се изменения должны синхронизироваться с имеющимися данными при нажатии кнопки </text:span><text:span text:style-name="T21">обновления данных</text:span><text:span text:style-name="T18">.</text:span></text:p>
      <text:p text:style-name="P19"><text:span text:style-name="T16">FUNC-</text:span><text:span text:style-name="T17">00</text:span><text:span text:style-name="T22">2</text:span><text:span text:style-name="T23">. </text:span><text:span text:style-name="T24">Оформление заказов: создание нового заказа </text:span><text:span text:style-name="T25">в базе данных</text:span><text:span text:style-name="T24"> с привязкой официанта </text:span><text:span text:style-name="T26">(берётся из логина)</text:span><text:span text:style-name="T24"> и столика </text:span><text:span text:style-name="T26">(вводится вручную)</text:span><text:span text:style-name="T24"> к нему. </text:span><text:span text:style-name="T27">[</text:span><text:span text:style-name="T27"><text:bookmark-ref text:reference-format="number-no-superior" text:ref-name="__RefNumPara__5190_2159724457">4</text:bookmark-ref></text:span><text:span text:style-name="T27">, </text:span><text:span text:style-name="T28">с. 108</text:span><text:span text:style-name="T27">]</text:span></text:p>
      <text:p text:style-name="P20">FUNC-<text:span text:style-name="T29">00</text:span><text:span text:style-name="T30">3</text:span><text:span text:style-name="T31">. </text:span><text:span text:style-name="T30">Фильтрация меню на окне оформления заказа </text:span><text:span text:style-name="T32">по категории и доступности</text:span><text:span text:style-name="T30">.</text:span></text:p>
      <text:p text:style-name="P21">FUNC-<text:span text:style-name="T29">00</text:span><text:span text:style-name="T33">4</text:span><text:span text:style-name="T31">. </text:span><text:span text:style-name="T34">Добавление блюда в заказ: официант нажимает на блюдо в списке, вводит количество и нажимает «Добавить». Блюдо появляется в текущем заказе.</text:span></text:p>
      <text:p text:style-name="P22"><text:span text:style-name="T16">FUNC-</text:span><text:span text:style-name="T17">00</text:span><text:span text:style-name="T35">5</text:span><text:span text:style-name="T16">. </text:span><text:span text:style-name="T36">Автоматическое списание: при </text:span><text:span text:style-name="T37">добавлении блюда в заказ</text:span><text:span text:style-name="T36"> происходит списание продуктов на складе. </text:span><text:span text:style-name="T38">Если удалить блюдо из заказа, то продукты вернутся.</text:span></text:p>
      <text:p text:style-name="P22">FUNC-<text:span text:style-name="T29">00</text:span><text:span text:style-name="T39">6</text:span><text:span text:style-name="T31">. </text:span><text:span text:style-name="T40">Предупреждение о малом остатке: предупреждение о малом количестве продуктов для блюда перед его добавлением в заказ. </text:span><text:span text:style-name="T41">При этом добавить блюдо можно.</text:span><text:span text:style-name="T40"> </text:span></text:p>
      <text:p text:style-name="P22"><text:span text:style-name="T16">FUNC-</text:span><text:span text:style-name="T17">00</text:span><text:span text:style-name="T42">7</text:span><text:span text:style-name="T16">. </text:span><text:span text:style-name="T43">Проверка перед добавлением: е</text:span><text:span text:style-name="T44">сли продуктов не хватает, то добавить в заказ блюдо нельзя.</text:span><text:span text:style-name="T40"> </text:span><text:span text:style-name="T27">[</text:span><text:span text:style-name="T27"><text:bookmark-ref text:reference-format="number-no-superior" text:ref-name="__RefNumPara__5190_2159724457">4</text:bookmark-ref></text:span><text:span text:style-name="T27">, </text:span><text:span text:style-name="T28">с. 108</text:span><text:span text:style-name="T27">]</text:span></text:p>
      <text:p text:style-name="P23">FUNC-<text:span text:style-name="T29">00</text:span><text:span text:style-name="T39">8</text:span><text:span text:style-name="T31">. </text:span><text:span text:style-name="T45">Изменение количества на складе: возможность кладовщику изменять количество продукта на складе, как добавлением/отниманием, так и установлением.</text:span></text:p>
      <text:p text:style-name="P24"/>
      <text:h text:style-name="Heading_20_3" text:outline-level="3"><text:bookmark-start text:name="__RefHeading___Toc11348_567402320"/><text:span text:style-name="T46">2</text:span><text:span text:style-name="T14">.</text:span><text:span text:style-name="T47">3</text:span><text:span text:style-name="T14"> Требования к данным</text:span><text:bookmark-end text:name="__RefHeading___Toc11348_567402320"/></text:h>
      <text:p text:style-name="Text_20_body"><text:bookmark-start text:name="__RefHeading___Toc3726_962412752"/>2.3.1 Логическая модель данных<text:bookmark-end text:name="__RefHeading___Toc3726_962412752"/></text:p>
      <text:p text:style-name="P25"><text:span text:style-name="T48">DATA-001. </text:span>Основные сущности которые отразятся в базе данных:</text:p>
      <text:list text:style-name="L2">
        <text:list-item>
          <text:p text:style-name="P26"><text:span text:style-name="T49">Пользователь</text:span> — <text:span text:style-name="T49">пользователи приложения, </text:span><text:span text:style-name="T50">оформляет заказ или редактирует склад</text:span>;</text:p>
        </text:list-item>
        <text:list-item>
          <text:p text:style-name="P26"><text:soft-page-break/>Заказ — то, что записывается в базу данных. Хранит информацию о заказанных блюдах;</text:p>
        </text:list-item>
        <text:list-item>
          <text:p text:style-name="P26">Заказанное блюдо — блюдо которое запишется в заказ, его количество и просьба от клиента;</text:p>
        </text:list-item>
        <text:list-item>
          <text:p text:style-name="P27">Блюдо — экземпляр блюда который указан в меню, ссылается на состав<text:span text:style-name="T51">;</text:span></text:p>
        </text:list-item>
        <text:list-item>
          <text:p text:style-name="P28">Продукт в составе — <text:span text:style-name="T52">продукт который входит в состав блюда;</text:span></text:p>
        </text:list-item>
        <text:list-item>
          <text:p text:style-name="P29">Продукт <text:span text:style-name="T53"><text:s/>— </text:span>продукт для приготовления блюда.</text:p>
        </text:list-item>
      </text:list>
      <text:p text:style-name="P25">На рисунке 3 представлена логическая модель данных, описывающая основные сущности в выбранном бизнес процессе. </text:p>
      <text:p text:style-name="P25"/>
      <text:p text:style-name="P30"><draw:frame draw:style-name="fr3" draw:name="Врезка2" text:anchor-type="paragraph" svg:width="17cm" style:rel-width="100%" svg:height="11.363cm" style:rel-height="scale-min" draw:z-index="0"><draw:text-box><text:p text:style-name="Drawing"><draw:frame draw:style-name="fr2" draw:name="Изображение2" text:anchor-type="paragraph" svg:width="13.94cm" style:rel-width="82%" svg:height="10.767cm" style:rel-height="scale" draw:z-index="1"><draw:image xlink:href="Pictures/10000000000001C000000187E8CED452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данных</text:p></draw:text-box></draw:frame></text:p>
      <text:p text:style-name="P31">2.3.2 Отчёты</text:p>
      <text:p text:style-name="P32"><text:span text:style-name="T54">DATA</text:span><text:span text:style-name="T55">-</text:span><text:span text:style-name="T56">00</text:span><text:span text:style-name="T57">2</text:span><text:span text:style-name="T56">. </text:span><text:span text:style-name="T58">Отчёт о выручке: формирование отчёта о средней выручке с учётом блюд, столиков, официанта и даты.</text:span></text:p>
      <text:p text:style-name="P32"><text:soft-page-break/><text:span text:style-name="T54">DATA</text:span><text:span text:style-name="T55">-</text:span><text:span text:style-name="T56">00</text:span><text:span text:style-name="T57">3</text:span><text:span text:style-name="T56">. </text:span><text:span text:style-name="T59">Список о малом остатке: формирование списка продуктов, которых осталось меньше указанного значения.</text:span></text:p>
      <text:p text:style-name="P33"><text:span text:style-name="T54">DATA</text:span><text:span text:style-name="T55">-</text:span><text:span text:style-name="T60">00</text:span><text:span text:style-name="T61">4</text:span><text:span text:style-name="T60">. </text:span><text:span text:style-name="T61">Популярность блюд</text:span>: формирование списка <text:span text:style-name="T61">блюд по тому, как часто их заказывают</text:span>.</text:p>
      <text:p text:style-name="Text_20_body"><text:bookmark-start text:name="__RefHeading___Toc3730_962412752"/>2.3.3 Получение, целостность, хранение и утилизация данных<text:bookmark-end text:name="__RefHeading___Toc3730_962412752"/></text:p>
      <text:p text:style-name="P3">Данные поступают из следующих источников:</text:p>
      <text:list text:style-name="L3">
        <text:list-item>
          <text:p text:style-name="P34">Планшеты официантов: данные о заказах в реальном времени.</text:p>
        </text:list-item>
        <text:list-item>
          <text:p text:style-name="P34">Планшеты <text:span text:style-name="T62">кладовщиков</text:span>: данные об остатках и операциях с ингредиентами.</text:p>
        </text:list-item>
      </text:list>
      <text:p text:style-name="P35"><text:span text:style-name="T54">DATA-</text:span><text:span text:style-name="T63">005. </text:span>Все данные хранятся централизованно <text:span text:style-name="T64">в базе данных на устройстве-сервере</text:span>, <text:span text:style-name="T65">обеспечивая единый источник информации для синхрониз</text:span><text:span text:style-name="T66">а</text:span><text:span text:style-name="T65">ции</text:span>. </text:p>
      <text:h text:style-name="Heading_20_3" text:outline-level="3"><text:bookmark-start text:name="__RefHeading___Toc11356_567402320"/><text:span text:style-name="T67">2.</text:span><text:span text:style-name="T68">4</text:span><text:span text:style-name="T69"> </text:span>Требования к внешним интерфейсам<text:bookmark-end text:name="__RefHeading___Toc11356_567402320"/></text:h>
      <text:p text:style-name="Text_20_body"><text:bookmark-start text:name="__RefHeading___Toc11358_567402320"/><text:span text:style-name="T70">2.4</text:span><text:span text:style-name="T71">.1</text:span> Пользовательские интерфе<text:span text:style-name="T72">й</text:span>сы<text:bookmark-end text:name="__RefHeading___Toc11358_567402320"/></text:p>
      <text:p text:style-name="Text_20_body">Основные требования:</text:p>
      <text:list text:style-name="L4">
        <text:list-item>
          <text:p text:style-name="P36">Отсутствие отвлекающих элементов.</text:p>
        </text:list-item>
        <text:list-item>
          <text:p text:style-name="P36">Использование крупного шрифта и четкой цветовой гаммы.</text:p>
        </text:list-item>
        <text:list-item>
          <text:p text:style-name="P36">Минимизация текста для быстрого восприятия информации.</text:p>
        </text:list-item>
      </text:list>
      <text:p text:style-name="P37">UI-001. <text:span text:style-name="T73">Меню: можно открыть </text:span><text:span text:style-name="T74">меню </text:span><text:span text:style-name="T73">навигации,</text:span><text:span text:style-name="T74"> содержащее кнопки для перехода на каждую из форм, <text:s/></text:span><text:span text:style-name="T73">внизу располагается кнопка для смены учётной записи</text:span><text:span text:style-name="T74">. </text:span><text:span text:style-name="T75">Сверху ФИО пользователя.</text:span><text:span text:style-name="T74"> </text:span><text:span text:style-name="T76">Кнопки выводятся в соответствии с ролью текущего пользователя.</text:span></text:p>
      <text:p text:style-name="P38">UI-00<text:span text:style-name="T77">2</text:span>. <text:span text:style-name="T77">Оформление заказа: разделение на области меню, ввод данных и кнопки, информация о </text:span><text:span text:style-name="T78">текущем </text:span><text:span text:style-name="T77">заказе. </text:span><text:span text:style-name="T79">Выпадающие списки для выбора фильтра. </text:span><text:span text:style-name="T80">Поле для ввода количества </text:span><text:span text:style-name="T81">и номера столика</text:span><text:span text:style-name="T80">, дополнительных требований, кнопки «Добавить к заказу», «Удалить из заказа» и «Оформить заказ».</text:span></text:p>
      <text:p text:style-name="P38"><text:soft-page-break/>UI-00<text:span text:style-name="T82">3</text:span>.<text:span text:style-name="T83"> </text:span><text:span text:style-name="T82">Работа со складом: вывод всех продуктов с возможностью редактировать остатки. </text:span><text:span text:style-name="T84">Поле для ввода числа и кнопки «Добавить», «Убавить» </text:span><text:span text:style-name="T85">и «Установить»</text:span><text:span text:style-name="T84">.</text:span><text:span text:style-name="T83"> </text:span></text:p>
      <text:p text:style-name="P39"><text:span text:style-name="T86">UI-00</text:span><text:span text:style-name="T87">4</text:span><text:span text:style-name="T86">. </text:span><text:span text:style-name="T87">Отчёты: выбор отчёта из списка </text:span><text:span text:style-name="T88">(</text:span><text:span text:style-name="T54">DATA</text:span><text:span text:style-name="T55">-</text:span><text:span text:style-name="T56">00</text:span><text:span text:style-name="T89">3, </text:span><text:span text:style-name="T54">DATA</text:span><text:span text:style-name="T55">-</text:span><text:span text:style-name="T88">004)</text:span><text:span text:style-name="T87">, поля для ввода фильтров для каждого из отчётов, </text:span><text:span text:style-name="T90">область с выводом данных выбранного отчёта</text:span><text:span text:style-name="T87">.</text:span></text:p>
      <text:p text:style-name="P40"><text:span text:style-name="T86">UI-00</text:span><text:span text:style-name="T91">5</text:span><text:span text:style-name="T86">. </text:span><text:span text:style-name="T92">Н</text:span><text:span text:style-name="T91">астройки</text:span><text:span text:style-name="T87">: </text:span><text:span text:style-name="T91">окно настроек базы данных, для сервера; сетевые настройки для соединения с сервером; прочие настройки для дополнительных функций.</text:span></text:p>
      <text:p text:style-name="Text_20_body"><text:bookmark-start text:name="__RefHeading___Toc11360_567402320"/><text:span text:style-name="T70">2.4</text:span><text:span text:style-name="T71">.2</text:span> Интерфейсы ПО<text:bookmark-end text:name="__RefHeading___Toc11360_567402320"/></text:p>
      <text:p text:style-name="P41">Система работает на базе операционной системы Android версии не ниже 9. Для взаимодействия с базой данных используется <text:span text:style-name="T93">СУБД PostgreSQL </text:span><text:s/>с использованием языка SQL, <text:span text:style-name="T94">так как он обеспечивает корректную работу в системе «Клиент-Сервер» </text:span><text:span text:style-name="T95">[</text:span><text:span text:style-name="T95"><text:bookmark-ref text:reference-format="number-no-superior" text:ref-name="__RefNumPara__5637_2159724457">7</text:bookmark-ref></text:span><text:span text:style-name="T95">, </text:span><text:span text:style-name="T96">с. 34</text:span><text:span text:style-name="T95">]</text:span>. </text:p>
      <text:p text:style-name="Text_20_body"><text:bookmark-start text:name="__RefHeading___Toc11362_567402320"/><text:span text:style-name="T70">2.4</text:span><text:span text:style-name="T71">.3</text:span> Интерфейсы оборудования<text:bookmark-end text:name="__RefHeading___Toc11362_567402320"/></text:p>
      <text:p text:style-name="P41">Планшеты связываются между собой по <text:span text:style-name="T97">локальной</text:span> сети, обеспечивая обмен данными <text:span text:style-name="T98">при обновлении</text:span>. </text:p>
      <text:h text:style-name="Heading_20_3" text:outline-level="3"><text:bookmark-start text:name="__RefHeading___Toc11364_567402320"/><text:span text:style-name="T99">2.5</text:span><text:span text:style-name="T100"> </text:span>Атрибуты качества<text:bookmark-end text:name="__RefHeading___Toc11364_567402320"/></text:h>
      <text:p text:style-name="Text_20_body"><text:bookmark-start text:name="__RefHeading___Toc11366_567402320"/><text:span text:style-name="T101">2.5</text:span><text:span text:style-name="T71">.1</text:span> Удобство использования<text:bookmark-end text:name="__RefHeading___Toc11366_567402320"/></text:p>
      <text:p text:style-name="P42">NF-001. <text:span text:style-name="T102">Для добавления блюда в заказ требуется не более 3 нажатий </text:span><text:span text:style-name="T103">(выбрать блюдо — ввести количество </text:span><text:span text:style-name="T104">—</text:span><text:span text:style-name="T103"> «Добавить»)</text:span><text:span text:style-name="T102">.</text:span></text:p>
      <text:p text:style-name="P43">NF-00<text:span text:style-name="T105">2</text:span>. <text:span text:style-name="T106">Для изменения остатка на складе требуется не </text:span><text:span text:style-name="T107">б</text:span><text:span text:style-name="T106">олее 3 нажатий </text:span><text:span text:style-name="T103">(выбрать </text:span><text:span text:style-name="T108">продукт</text:span><text:span text:style-name="T103"> — ввести количество </text:span><text:span text:style-name="T109">—</text:span><text:span text:style-name="T103"> «Добавить»/«</text:span><text:span text:style-name="T108">Убавить</text:span><text:span text:style-name="T103">»/«</text:span><text:span text:style-name="T108">Установить»</text:span><text:span text:style-name="T103">)</text:span><text:span text:style-name="T106">.</text:span></text:p>
      <text:p text:style-name="Text_20_body"><text:bookmark-start text:name="__RefHeading___Toc11368_567402320"/><text:span text:style-name="T101">2.5</text:span><text:span text:style-name="T71">.2</text:span> Производительность<text:bookmark-end text:name="__RefHeading___Toc11368_567402320"/></text:p>
      <text:p text:style-name="P44">PERF-00<text:span text:style-name="T110">1</text:span>. <text:span text:style-name="T111">Обновление данных </text:span><text:span text:style-name="T112">занимает</text:span><text:span text:style-name="T111"> не более 3 секунд.</text:span></text:p>
      <text:p text:style-name="P45">PERF-00<text:span text:style-name="T110">2</text:span>. <text:span text:style-name="T113">Отзывчивый интерфейс с задержкой выполнения операций не более 1 секунды.</text:span></text:p>
      <text:p text:style-name="Text_20_body"><text:bookmark-start text:name="__RefHeading___Toc11370_567402320"/><text:span text:style-name="T101">2.5</text:span><text:span text:style-name="T71">.3</text:span> Безопасность<text:bookmark-end text:name="__RefHeading___Toc11370_567402320"/></text:p>
      <text:p text:style-name="P46"><text:soft-page-break/>SEC-00<text:span text:style-name="T114">1</text:span>. <text:span text:style-name="T115">Авторизация происходит по уникальному логину и паролю.</text:span></text:p>
      <text:p text:style-name="P47">SEC-00<text:span text:style-name="T116">2</text:span><text:span text:style-name="T117">. Разные роли видят разные пункты меню. Официант не перейдёт на склад, а кладовщик не перейдёт на окно оф</text:span><text:span text:style-name="T118">о</text:span><text:span text:style-name="T117">рмления заказа.</text:span></text:p>
      <text:p text:style-name="Text_20_body"><text:bookmark-start text:name="__RefHeading___Toc11372_567402320"/><text:span text:style-name="T101">2.5</text:span><text:span text:style-name="T71">.4</text:span> Техника безопасности<text:bookmark-end text:name="__RefHeading___Toc11372_567402320"/></text:p>
      <text:p text:style-name="P48"><text:span text:style-name="T119">SEC-00</text:span><text:span text:style-name="T120">3</text:span><text:span text:style-name="T119">. </text:span><text:span text:style-name="T121">Хранение данных в надёжных местах и не передавать иным лицам.</text:span></text:p>
      <text:h text:style-name="P49" text:outline-level="2"><text:bookmark-start text:name="__RefHeading___Toc8892_1636301399"/>3 <text:span text:style-name="T122">Показатели экономической эффективности</text:span><text:bookmark-end text:name="__RefHeading___Toc8892_1636301399"/></text:h>
      <text:h text:style-name="P50" text:outline-level="3"><text:bookmark-start text:name="__RefHeading___Toc2024_2593696514"/><text:span text:style-name="T123">3.</text:span>1 Расчет себестоимости программного продукта<text:bookmark-end text:name="__RefHeading___Toc2024_2593696514"/></text:h>
      <text:p text:style-name="P51"><text:span text:style-name="T124">О</text:span>сновной задачей технико-экономического обоснования является определение технического и экономического эффекта от его <text:span text:style-name="T125">использования.</text:span></text:p>
      <text:p text:style-name="P52"><text:tab/>Выполним расчет себестоимости программного продукта по формуле <text:span text:style-name="T126">1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53"><draw:frame draw:style-name="fr4" draw:name="Объект1" text:anchor-type="as-char" svg:y="-0.439cm" svg:width="4.958cm" svg:height="0.59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5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5"/>
      <text:p text:style-name="P56"><text:span text:style-name="T127"><text:tab/>где Мвс — затраты на вспомогательные материалы, </text:span><text:span text:style-name="Strong_20_Emphasis"><text:span text:style-name="T128">₽</text:span></text:span><text:span text:style-name="T127">.</text:span></text:p>
      <text:p text:style-name="P57"><text:span text:style-name="T129">Э — затраты на электроэнергию и технологические цели, </text:span><text:span text:style-name="Strong_20_Emphasis"><text:span text:style-name="T128">₽</text:span></text:span></text:p>
      <text:p text:style-name="P57"><text:span text:style-name="Strong_20_Emphasis"><text:span text:style-name="T130">З</text:span></text:span><text:span text:style-name="Strong_20_Emphasis"><text:span text:style-name="T131">зп</text:span></text:span><text:span text:style-name="Strong_20_Emphasis"><text:span text:style-name="T132">о</text:span></text:span><text:span text:style-name="Strong_20_Emphasis"><text:span text:style-name="T133"> — основная зарплата работника, </text:span></text:span><text:span text:style-name="Strong_20_Emphasis"><text:span text:style-name="T134">₽</text:span></text:span></text:p>
      <text:p text:style-name="P57"><text:span text:style-name="Strong_20_Emphasis"><text:span text:style-name="T133">З</text:span></text:span><text:span text:style-name="Strong_20_Emphasis"><text:span text:style-name="T131">зп</text:span></text:span><text:span text:style-name="Strong_20_Emphasis"><text:span text:style-name="T132">д</text:span></text:span><text:span text:style-name="Strong_20_Emphasis"><text:span text:style-name="T133"> — </text:span></text:span><text:span text:style-name="Strong_20_Emphasis"><text:span text:style-name="T135">дополнительная зарплата разработчика,</text:span></text:span><text:span text:style-name="Strong_20_Emphasis"><text:span text:style-name="T133"> </text:span></text:span><text:span text:style-name="Strong_20_Emphasis"><text:span text:style-name="T136">₽</text:span></text:span></text:p>
      <text:p text:style-name="P57"><text:span text:style-name="Strong_20_Emphasis"><text:span text:style-name="T133">З</text:span></text:span><text:span text:style-name="Strong_20_Emphasis"><text:span text:style-name="T131">сн —</text:span></text:span><text:span text:style-name="Strong_20_Emphasis"><text:span text:style-name="T133"> </text:span></text:span><text:span text:style-name="Strong_20_Emphasis"><text:span text:style-name="T135">отчисления на соц. нужды,</text:span></text:span><text:span text:style-name="Strong_20_Emphasis"><text:span text:style-name="T133"> </text:span></text:span><text:span text:style-name="Strong_20_Emphasis"><text:span text:style-name="T136">₽</text:span></text:span></text:p>
      <text:p text:style-name="P56"><text:span text:style-name="Strong_20_Emphasis"><text:span text:style-name="T137">Н — накладные расходы,</text:span></text:span><text:span text:style-name="Strong_20_Emphasis"><text:span text:style-name="T138"> </text:span></text:span><text:span text:style-name="Strong_20_Emphasis"><text:span text:style-name="T136">₽</text:span></text:span></text:p>
      <text:p text:style-name="P58"><text:span text:style-name="Strong_20_Emphasis"><text:span text:style-name="T139"><text:tab/>Можно произвести расчёты для каждой переменной.</text:span></text:span></text:p>
      <text:p text:style-name="P59"><text:tab/>Вспомогательные материалы:</text:p>
      <text:p text:style-name="P59">Из таблицы 1 видно, что вспомогательные материалы <text:span text:style-name="T140">в сумме</text:span> стоят <text:span text:style-name="T141">300 р.</text:span></text:p>
      <text:p text:style-name="P59"><text:tab/>Затраты на электроэнергию:</text:p>
      <text:p text:style-name="P59">180 дней по 8 часов.</text:p>
      <text:p text:style-name="P59">Э = 0.5 * 7.5 * 1 440 * <text:span text:style-name="T142">0.6</text:span></text:p>
      <text:p text:style-name="P59">Э = 3 240</text:p>
      <text:p text:style-name="P59"><text:tab/>Общая зарплата:</text:p>
      <text:p text:style-name="P59">270 000 р.</text:p>
      <text:p text:style-name="P59"><text:soft-page-break/><text:tab/>Дополнительная зарплата:</text:p>
      <text:p text:style-name="P59"><text:span text:style-name="T143">27 000 </text:span><text:span text:style-name="T144">р.</text:span></text:p>
      <text:p text:style-name="P59"><text:tab/>Отчисления на социальные нужды:</text:p>
      <text:p text:style-name="P59">(270000 + 27000) * 0.3 = 89 100 р.</text:p>
      <text:p text:style-name="P59"><text:tab/>Накладные расходы:</text:p>
      <text:p text:style-name="P60"><text:span text:style-name="Strong_20_Emphasis"><text:span text:style-name="T145">(270000 + 27000) * 0.</text:span></text:span><text:span text:style-name="Strong_20_Emphasis"><text:span text:style-name="T146">1</text:span></text:span><text:span text:style-name="Strong_20_Emphasis"><text:span text:style-name="T145"> = 29 700 р.</text:span></text:span></text:p>
      <text:p text:style-name="P60"><text:span text:style-name="Strong_20_Emphasis"><text:span text:style-name="T145"><text:tab/></text:span></text:span><text:span text:style-name="Strong_20_Emphasis"><text:span text:style-name="T147">Таким образом: </text:span></text:span><text:span text:style-name="Strong_20_Emphasis"><text:span text:style-name="T148">C</text:span></text:span><text:span text:style-name="Strong_20_Emphasis"><text:span text:style-name="T149"> = </text:span></text:span><text:span text:style-name="Strong_20_Emphasis"><text:span text:style-name="T150">300 </text:span></text:span><text:span text:style-name="Strong_20_Emphasis"><text:span text:style-name="T151">+ </text:span></text:span><text:span text:style-name="Strong_20_Emphasis"><text:span text:style-name="T152">3 240</text:span></text:span><text:span text:style-name="Strong_20_Emphasis"><text:span text:style-name="T153"> </text:span></text:span><text:span text:style-name="Strong_20_Emphasis"><text:span text:style-name="T154">+ 270000 </text:span></text:span><text:span text:style-name="Strong_20_Emphasis"><text:span text:style-name="T155">+ </text:span></text:span><text:span text:style-name="Strong_20_Emphasis"><text:span text:style-name="T154">27000 </text:span></text:span><text:span text:style-name="Strong_20_Emphasis"><text:span text:style-name="T145">+ <text:s/>89 100 </text:span></text:span><text:span text:style-name="Strong_20_Emphasis"><text:span text:style-name="T156">+ <text:s/></text:span></text:span><text:span text:style-name="Strong_20_Emphasis"><text:span text:style-name="T145">29 700</text:span></text:span></text:p>
      <text:p text:style-name="P60"><text:span text:style-name="Strong_20_Emphasis"><text:span text:style-name="T145">С = 419 340 р.</text:span></text:span></text:p>
      <text:p text:style-name="P61"><text:span text:style-name="Strong_20_Emphasis"><text:span text:style-name="T129"/></text:span></text:p>
      <text:p text:style-name="P62"><text:span text:style-name="T129">Таблица </text:span><text:span text:style-name="T129"><text:sequence text:ref-name="refTable0" text:name="Table" text:formula="ooow:Table+1" style:num-format="1">1</text:sequence></text:span><text:span text:style-name="T129"><text:s/></text:span><text:span text:style-name="Strong_20_Emphasis"><text:span text:style-name="T138">—</text:span></text:span><text:span text:style-name="T129"> Затраты на вспомогательные материал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3"/>
          </table:table-cell>
          <table:table-cell table:style-name="Таблица1.A1" office:value-type="string">
            <text:p text:style-name="P63">Наименование затрат</text:p>
          </table:table-cell>
          <table:table-cell table:style-name="Таблица1.A1" office:value-type="string">
            <text:p text:style-name="P63">Кол-во, шт.</text:p>
          </table:table-cell>
          <table:table-cell table:style-name="Таблица1.D1" office:value-type="string">
            <text:p text:style-name="P64"><text:span text:style-name="T129">Сумма</text:span><text:span text:style-name="T127">, </text:span><text:span text:style-name="Strong_20_Emphasis"><text:span text:style-name="T157">₽</text:span></text:span><text:span text:style-name="T129">.</text:span></text:p>
          </table:table-cell>
        </table:table-row>
        <table:table-row>
          <table:table-cell table:style-name="Таблица1.A2" office:value-type="string">
            <text:list text:style-name="L5">
              <text:list-header>
                <text:p text:style-name="P65"/>
              </text:list-header>
            </text:list>
          </table:table-cell>
          <table:table-cell table:style-name="Таблица1.A2" office:value-type="string">
            <text:p text:style-name="P66"><text:span text:style-name="T158">Память</text:span><text:span text:style-name="T159"> </text:span><text:span text:style-name="T158">USB</text:span><text:span text:style-name="T160"> </text:span><text:span text:style-name="T158">FLASH</text:span><text:span text:style-name="T161"> </text:span><text:span text:style-name="T158">DRIVE</text:span><text:span text:style-name="T161"> </text:span><text:span text:style-name="T162">2G</text:span><text:span text:style-name="T163">b</text:span></text:p>
          </table:table-cell>
          <table:table-cell table:style-name="Таблица1.A2" office:value-type="string">
            <text:p text:style-name="P67">1</text:p>
          </table:table-cell>
          <table:table-cell table:style-name="Таблица1.D2" office:value-type="string">
            <text:p text:style-name="P68">200</text:p>
          </table:table-cell>
        </table:table-row>
        <table:table-row>
          <table:table-cell table:style-name="Таблица1.A2" office:value-type="string">
            <text:list text:continue-numbering="true" text:style-name="L5">
              <text:list-header>
                <text:p text:style-name="P65"/>
              </text:list-header>
            </text:list>
          </table:table-cell>
          <table:table-cell table:style-name="Таблица1.A2" office:value-type="string">
            <text:p text:style-name="P69">Переходник USB-A USB-C</text:p>
          </table:table-cell>
          <table:table-cell table:style-name="Таблица1.A2" office:value-type="string">
            <text:p text:style-name="P70">1</text:p>
          </table:table-cell>
          <table:table-cell table:style-name="Таблица1.D2" office:value-type="string">
            <text:p text:style-name="P68">100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71">Итого</text:p>
          </table:table-cell>
          <table:table-cell table:style-name="Таблица1.A2" office:value-type="string">
            <text:p text:style-name="P72"/>
          </table:table-cell>
          <table:table-cell table:style-name="Таблица1.D4" office:value-type="float" office:value="300">
            <text:p text:style-name="P73">300</text:p>
          </table:table-cell>
        </table:table-row>
      </table:table>
      <text:p text:style-name="P74"><text:span text:style-name="T164"/></text:p>
      <text:h text:style-name="P50" text:outline-level="3"><text:bookmark-start text:name="__RefHeading___Toc2026_2593696514"/><text:span text:style-name="T165">1.</text:span><text:span text:style-name="T166">3.</text:span><text:span text:style-name="T165">2 </text:span>Расчет экономического эффекта программного продукта<text:bookmark-end text:name="__RefHeading___Toc2026_2593696514"/></text:h>
      <text:p text:style-name="P75">Экономический эффект от внедрения ПО рассчитывается по формуле <text:span text:style-name="T167">2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53"><draw:frame draw:style-name="fr4" draw:name="Объект3" text:anchor-type="as-char" svg:y="-0.388cm" svg:width="7.05cm" svg:height="0.54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6"/>
      <text:p text:style-name="P77">где</text:p>
      <text:p text:style-name="P77">N — количество обрабатываемых документов <text:span text:style-name="T168">(взять N = 6000)</text:span>;</text:p>
      <text:p text:style-name="P77">t<text:span text:style-name="T169">1</text:span>, t<text:span text:style-name="T169">2</text:span> — трудоемкость обработки документов до и после внедрения <text:span text:style-name="T170">программы:</text:span></text:p>
      <text:p text:style-name="P77">t<text:span text:style-name="T169">1</text:span><text:span text:style-name="T171"> </text:span><text:span text:style-name="T172">= 15, </text:span><text:span text:style-name="T171"><text:s/>t</text:span><text:span text:style-name="T169">2</text:span><text:span text:style-name="T171"> </text:span><text:span text:style-name="T172">= 7</text:span></text:p>
      <text:p text:style-name="P78">С<text:span text:style-name="T173">чтс </text:span><text:span text:style-name="T174">— </text:span><text:span text:style-name="T171">часовая тарифная тавка пользователя, р./час;</text:span></text:p>
      <text:p text:style-name="P78">К<text:span text:style-name="T169">доп</text:span> — коэффициент отчислений на дополнительную заработную плату, К<text:span text:style-name="T169">доп</text:span> = 0,1;</text:p>
      <text:p text:style-name="P79">К<text:span text:style-name="T169">сн</text:span><text:span text:style-name="T171"> — </text:span><text:span text:style-name="T175">коэффициент отчислений на соц. нужды, <text:s/></text:span><text:span text:style-name="T171">К</text:span><text:span text:style-name="T169">сн </text:span><text:span text:style-name="T175">= 0,3;</text:span></text:p>
      <text:p text:style-name="P79"><text:soft-page-break/>Е<text:span text:style-name="T169">н</text:span><text:span text:style-name="T171"> — </text:span><text:span text:style-name="T175">нормативный коэффициент </text:span><text:span text:style-name="T176">о</text:span><text:span text:style-name="T175">купаемости капитальных вложений, <text:s/></text:span><text:span text:style-name="T171">Е</text:span><text:span text:style-name="T169">н </text:span><text:span text:style-name="T175">= 0,39;</text:span></text:p>
      <text:p text:style-name="P80">К — доп. капиталовложения, связанные с разработкой программного продукта <text:span text:style-name="T177">(здесь полная себестоимость рассчитанная выше)</text:span>.</text:p>
      <text:p text:style-name="P80">Используя ранее рассчитанные значения и подставляя в формулу выше, <text:span text:style-name="T178">можно выяснить что: </text:span><text:span text:style-name="T179">Э = </text:span><text:span text:style-name="T180">6000</text:span><text:span text:style-name="T179"> * (</text:span><text:span text:style-name="T181">15</text:span><text:span text:style-name="T179"> - </text:span><text:span text:style-name="T181">7</text:span><text:span text:style-name="T179">) * </text:span><text:span text:style-name="T182">16</text:span><text:span text:style-name="T183">5</text:span><text:span text:style-name="T179"> * </text:span><text:span text:style-name="T184">0.1</text:span><text:span text:style-name="T179"> * </text:span><text:span text:style-name="T175">0.3</text:span><text:span text:style-name="T179"> - </text:span><text:span text:style-name="T185">0.39</text:span><text:span text:style-name="T179"> *</text:span><text:span text:style-name="T175"> </text:span><text:span text:style-name="T186">4</text:span><text:span text:style-name="T187">19 340</text:span></text:p>
      <text:p text:style-name="P80">Срок окупаемости программного продукта, <text:span text:style-name="T188">ра</text:span><text:span text:style-name="T189">сс</text:span><text:span text:style-name="T188">читанный по формуле 3</text:span>:</text:p>
      <text:p text:style-name="P81"><text:span text:style-name="T129">где C</text:span><text:span text:style-name="T190">пр</text:span><text:span text:style-name="T129"> — себестоимость программного продукта, </text:span><text:span text:style-name="Strong_20_Emphasis"><text:span text:style-name="T191">₽</text:span></text:span></text:p>
      <text:p text:style-name="P81"><text:span text:style-name="Strong_20_Emphasis"><text:span text:style-name="T192">С</text:span></text:span><text:span text:style-name="Strong_20_Emphasis"><text:span text:style-name="T193">1</text:span></text:span><text:span text:style-name="Strong_20_Emphasis"><text:span text:style-name="T194"> — стоимостные затраты при использовании ручного труда, </text:span></text:span><text:span text:style-name="Strong_20_Emphasis"><text:span text:style-name="T195">₽</text:span></text:span></text:p>
      <text:p text:style-name="P81"><text:span text:style-name="Strong_20_Emphasis"><text:span text:style-name="T194">С</text:span></text:span><text:span text:style-name="Strong_20_Emphasis"><text:span text:style-name="T193">2 —</text:span></text:span><text:span text:style-name="Strong_20_Emphasis"><text:span text:style-name="T194"> стоимостные затраты при использовании программы, </text:span></text:span><text:span text:style-name="Strong_20_Emphasis"><text:span text:style-name="T195">₽</text:span></text:span></text:p>
      <text:p text:style-name="P82">419340/<text:span text:style-name="T196">(</text:span><text:span text:style-name="T197">281 957,4 -</text:span><text:span text:style-name="T198"> </text:span><text:span text:style-name="T199">44 357,4</text:span><text:span text:style-name="T198">) = </text:span><text:span text:style-name="T200">1.8 лет</text:span></text:p>
      <text:p text:style-name="P83">Ручной труд:</text:p>
      <text:p text:style-name="P84">281 957,4</text:p>
      <text:p text:style-name="P85">Использование программы:</text:p>
      <text:p text:style-name="P86">44 357,4</text:p>
      <text:p text:style-name="P86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3"><draw:frame draw:style-name="fr4" draw:name="Объект2" text:anchor-type="as-char" svg:y="-0.684cm" svg:width="2.231cm" svg:height="1.1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5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87"/>
      <text:p text:style-name="P88">В таблице 2 выведены результаты произведённых вычислений.</text:p>
      <text:p text:style-name="P89">Таблица <text:sequence text:ref-name="refTable1" text:name="Table" text:formula="ooow:Table+1" style:num-format="1">2</text:sequence><text:s/>— Итоговые значения показателей экономической эффектив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66">Наименование показателя</text:p>
          </table:table-cell>
          <table:table-cell table:style-name="Таблица7.A1" office:value-type="string">
            <text:p text:style-name="P90">Ед. Изм.</text:p>
          </table:table-cell>
          <table:table-cell table:style-name="Таблица7.C1" office:value-type="string">
            <text:p text:style-name="P59">Затраты, р.</text:p>
          </table:table-cell>
        </table:table-row>
        <table:table-row>
          <table:table-cell table:style-name="Таблица7.A2" office:value-type="string">
            <text:p text:style-name="P59"><text:span text:style-name="T158">1.</text:span><text:span text:style-name="T201"> </text:span><text:span text:style-name="T158">Основная</text:span><text:span text:style-name="T202"> </text:span><text:span text:style-name="T158">заработная</text:span><text:span text:style-name="T160"> </text:span><text:span text:style-name="T158">плата</text:span><text:span text:style-name="T160"> </text:span><text:span text:style-name="T163">разработчика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270 000</text:p>
          </table:table-cell>
        </table:table-row>
        <table:table-row>
          <table:table-cell table:style-name="Таблица7.A2" office:value-type="string">
            <text:p text:style-name="P59"><text:span text:style-name="T158">2.</text:span><text:span text:style-name="T203"> </text:span><text:span text:style-name="T158">Дополнительная</text:span><text:span text:style-name="T204"> </text:span><text:span text:style-name="T158">заработная</text:span><text:span text:style-name="T205"> </text:span><text:span text:style-name="T158">плата</text:span><text:span text:style-name="T206"> </text:span><text:span text:style-name="T163">разработчика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27 000</text:p>
          </table:table-cell>
        </table:table-row>
        <table:table-row>
          <table:table-cell table:style-name="Таблица7.A2" office:value-type="string">
            <text:p text:style-name="P59"><text:span text:style-name="T207">3.</text:span><text:span text:style-name="T161"> </text:span><text:span text:style-name="T207">Отчисления</text:span><text:span text:style-name="T159"> </text:span><text:span text:style-name="T207">на</text:span><text:span text:style-name="T159"> </text:span><text:span text:style-name="T207">социальные</text:span><text:span text:style-name="T208"> </text:span><text:span text:style-name="T207">нужды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89 100</text:p>
          </table:table-cell>
        </table:table-row>
        <table:table-row>
          <table:table-cell table:style-name="Таблица7.A2" office:value-type="string">
            <text:p text:style-name="P59"><text:span text:style-name="T158">4.</text:span><text:span text:style-name="T160"> </text:span><text:span text:style-name="T158">Накладные</text:span><text:span text:style-name="T161"> </text:span><text:span text:style-name="T163">расходы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29 700</text:p>
          </table:table-cell>
        </table:table-row>
        <table:table-row>
          <table:table-cell table:style-name="Таблица7.A2" office:value-type="string">
            <text:p text:style-name="P59"><text:span text:style-name="T158">5.</text:span><text:span text:style-name="T208"> </text:span><text:span text:style-name="T158">Затраты</text:span><text:span text:style-name="T207"> </text:span><text:span text:style-name="T158">на</text:span><text:span text:style-name="T208"> </text:span><text:span text:style-name="T163">электроэнергию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3 240</text:p>
          </table:table-cell>
        </table:table-row>
        <table:table-row>
          <table:table-cell table:style-name="Таблица7.A2" office:value-type="string">
            <text:p text:style-name="P59"><text:span text:style-name="T163">6.</text:span><text:span text:style-name="T209"> </text:span><text:span text:style-name="T163">Вспомогательные</text:span><text:span text:style-name="T210"> </text:span><text:span text:style-name="T163">материалы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300</text:p>
          </table:table-cell>
        </table:table-row>
        <text:soft-page-break/>
        <table:table-row>
          <table:table-cell table:style-name="Таблица7.A2" office:value-type="string">
            <text:p text:style-name="P59"><text:span text:style-name="T158">7.</text:span><text:span text:style-name="T205"> </text:span><text:span text:style-name="T158">Полная</text:span><text:span text:style-name="T201"> </text:span><text:span text:style-name="T158">себестоимость</text:span><text:span text:style-name="T204"> </text:span><text:span text:style-name="T158">программного</text:span><text:span text:style-name="T204"> </text:span><text:span text:style-name="T163">продукта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419 340</text:p>
          </table:table-cell>
        </table:table-row>
        <table:table-row>
          <table:table-cell table:style-name="Таблица7.A2" office:value-type="string">
            <text:p text:style-name="P59"><text:span text:style-name="T158">8.</text:span><text:span text:style-name="T201"> </text:span><text:span text:style-name="T158">Экономический</text:span><text:span text:style-name="T211"> </text:span><text:span text:style-name="T163">эффект</text:span></text:p>
          </table:table-cell>
          <table:table-cell table:style-name="Таблица7.A2" office:value-type="string">
            <text:p text:style-name="P59">р.</text:p>
          </table:table-cell>
          <table:table-cell table:style-name="Таблица7.C2" office:value-type="string">
            <text:p text:style-name="P59">74 057,4</text:p>
          </table:table-cell>
        </table:table-row>
        <table:table-row>
          <table:table-cell table:style-name="Таблица7.A2" office:value-type="string">
            <text:p text:style-name="P59"><text:span text:style-name="T158">9.</text:span><text:span text:style-name="T201"> </text:span><text:span text:style-name="T158">Срок</text:span><text:span text:style-name="T201"> </text:span><text:span text:style-name="T158">окупаемости</text:span><text:span text:style-name="T202"> </text:span><text:span text:style-name="T158">программного</text:span><text:span text:style-name="T202"> </text:span><text:span text:style-name="T163">продукта</text:span></text:p>
          </table:table-cell>
          <table:table-cell table:style-name="Таблица7.A2" office:value-type="string">
            <text:p text:style-name="P59">лет</text:p>
          </table:table-cell>
          <table:table-cell table:style-name="Таблица7.C2" office:value-type="string">
            <text:p text:style-name="P59"><text:span text:style-name="T207">1,</text:span><text:span text:style-name="T212">8</text:span></text:p>
          </table:table-cell>
        </table:table-row>
      </table:table>
      <text:p text:style-name="P76"/>
      <text:h text:style-name="P13" text:outline-level="1"><text:bookmark-start text:name="__RefHeading___Toc8894_1636301399"/>ГЛАВА 2 РЕАЛИЗАЦИЯ ПРОГРАММНЫХ МОДУЛЕЙ<text:bookmark-end text:name="__RefHeading___Toc8894_1636301399"/></text:h>
      <text:h text:style-name="P91" text:outline-level="2"><text:bookmark-start text:name="__RefHeading___Toc19695_1636301399 Копия 1"/>1 Технологии программирования<text:bookmark-end text:name="__RefHeading___Toc19695_1636301399 Копия 1"/></text:h>
      <text:p text:style-name="P92">Для разработки программного продукта были тщательно отобраны технологии и методы программирования, соответствующие поставленным целям. Ниже приведены используемые технологии и инструменты, их характеристики и обоснование выбора.</text:p>
      <text:h text:style-name="P93" text:outline-level="3"><text:bookmark-start text:name="__RefHeading___Toc6583_2272482351"/><text:span text:style-name="T213">1.1 </text:span>Методы разработки<text:bookmark-end text:name="__RefHeading___Toc6583_2272482351"/></text:h>
      <text:p text:style-name="P92">При выборе методов разработки необходимо учитывать следующие критерии: </text:p>
      <text:list text:style-name="L6">
        <text:list-item>
          <text:p text:style-name="P94">Четкое определение требований на начальном этапе;</text:p>
        </text:list-item>
        <text:list-item>
          <text:p text:style-name="P94">Структурированное планирование работ;</text:p>
        </text:list-item>
        <text:list-item>
          <text:p text:style-name="P94">Последовательное выполнение этапов проекта.</text:p>
        </text:list-item>
      </text:list>
      <text:p text:style-name="P95">С учетом данных критериев предпочтение отдается<text:span text:style-name="T83"> </text:span><text:span text:style-name="T214">водопадной методологии.</text:span><text:span text:style-name="T215"> </text:span><text:span text:style-name="T216">Она предполагает чёткое и последовательное разделение этапов разработки:</text:span></text:p>
      <text:list text:style-name="L7">
        <text:list-item>
          <text:p text:style-name="P96">Определение требований <text:s/></text:p>
        </text:list-item>
        <text:list-item>
          <text:p text:style-name="P96">Проектирование </text:p>
        </text:list-item>
        <text:list-item>
          <text:p text:style-name="P96">Кодирование </text:p>
        </text:list-item>
        <text:list-item>
          <text:p text:style-name="P96">Тестирование </text:p>
        </text:list-item>
        <text:list-item>
          <text:p text:style-name="P96">Эксплуатация</text:p>
          <text:p text:style-name="P97"><text:span text:style-name="T217">В связи с этим данная методология является наиболее подходящей.</text:span></text:p>
        </text:list-item>
      </text:list>
      <text:p text:style-name="P98"/>
      <text:h text:style-name="P99" text:outline-level="3"><text:bookmark-start text:name="__RefHeading___Toc6583_2272482351 Копия 1"/><text:span text:style-name="T213">1.</text:span><text:span text:style-name="T218">2</text:span><text:span text:style-name="T213"> </text:span><text:span text:style-name="T218">Языки программирования</text:span><text:bookmark-end text:name="__RefHeading___Toc6583_2272482351 Копия 1"/></text:h>
      <text:p text:style-name="P100"><text:span text:style-name="T219">Для разработки был выбран язык программирования C++. Это обусловлено его высокой производительностью и возможностью кроссплатформенной разработки. C++ используется в среде Qt Creator для создания как десктопных, так и мобильных приложений.</text:span></text:p>
      <text:p text:style-name="P101"><text:soft-page-break/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</text:p>
      <text:p text:style-name="P101"/>
      <text:h text:style-name="P102" text:outline-level="3"><text:bookmark-start text:name="__RefHeading___Toc6583_2272482351 Копия 2"/><text:span text:style-name="T213">1.</text:span><text:span text:style-name="T220">3</text:span><text:span text:style-name="T213"> </text:span><text:span text:style-name="T220">Инструменты и среды разработки</text:span><text:bookmark-end text:name="__RefHeading___Toc6583_2272482351 Копия 2"/></text:h>
      <text:p text:style-name="P103">Инструментом для разработки выбрана интегрированная среда Qt Creator, обеспечивающая создание кроссплатформенных приложений. Система сборки CMake используется для конфигурации и сборки проекта.</text:p>
      <text:p text:style-name="P103"><text:bookmark-start text:name="__RefHeading___Toc19695_1636301399"/><text:span text:style-name="T122"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/text:span><text:span text:style-name="T221">ой</text:span><text:span text:style-name="T122"> программ</text:span><text:span text:style-name="T221">ы</text:span><text:span text:style-name="T122">.</text:span><text:bookmark-end text:name="__RefHeading___Toc19695_1636301399"/></text:p>
      <text:p text:style-name="P104"/>
      <text:h text:style-name="P105" text:outline-level="3"><text:bookmark-start text:name="__RefHeading___Toc6583_2272482351 Копия 3"/><text:span text:style-name="T213">1.</text:span><text:span text:style-name="T222">4</text:span><text:span text:style-name="T213"> </text:span><text:span text:style-name="T222">Архитектурные подходы</text:span><text:bookmark-end text:name="__RefHeading___Toc6583_2272482351 Копия 3"/></text:h>
      <text:p text:style-name="P106">В связи с сетевой природой приложения, при разработке используется клиент-серверная архитектура. Это позволяет одному устройству функционировать в роли сервера, а другим – в роли клиентов.</text:p>
      <text:p text:style-name="P106"/>
      <text:h text:style-name="Heading_20_3" text:outline-level="3"><text:span text:style-name="T213">1.</text:span><text:span text:style-name="T223">5</text:span><text:span text:style-name="T213"> </text:span><text:span text:style-name="T223">Библиотеки и фреймворки</text:span></text:h>
      <text:p text:style-name="Text_20_body">В проекте используются следующие библиотеки и фреймворки:</text:p>
      <text:list text:style-name="L8">
        <text:list-item>
          <text:p text:style-name="P107">Qt 6 – основной фреймворк, предоставляющий классы для работы с графическим интерфейсом (Qt Quick), сетевыми сокетами (QTcpSocket, QTcpServer), базами данных (QSqlDatabase), а также метаобъектную систему (сигналы/слоты, Q_PROPERTY, Q_INVOKABLE).</text:p>
        </text:list-item>
        <text:list-item>
          <text:p text:style-name="P107">Qt SQL – модуль для доступа к базам данных.</text:p>
        </text:list-item>
        <text:list-item>
          <text:p text:style-name="P107">Qt Network – модуль для реализации TCP-клиент-серверного взаимодействия.</text:p>
        </text:list-item>
      </text:list>
      <text:p text:style-name="Text_20_body"/>
      <text:h text:style-name="P108" text:outline-level="3"><text:bookmark-start text:name="__RefHeading___Toc6583_2272482351 Копия 5"/><text:soft-page-break/><text:span text:style-name="T213">1.</text:span><text:span text:style-name="T223">6</text:span><text:span text:style-name="T213"> </text:span><text:span text:style-name="T223">Тестирование и отладка</text:span><text:bookmark-end text:name="__RefHeading___Toc6583_2272482351 Копия 5"/></text:h>
      <text:p text:style-name="P109">Для тестирования <text:span text:style-name="T224">работоспособности приложения используется класс </text:span><text:span text:style-name="T225">Logs. </text:span><text:span text:style-name="T226">Его методы записывают сообщения в лог-файл с разным уровнем </text:span><text:span text:style-name="T227">важности</text:span><text:span text:style-name="T226">, а так же </text:span><text:span text:style-name="T228">дублиру</text:span><text:span text:style-name="T229">ю</text:span><text:span text:style-name="T228">т</text:span><text:span text:style-name="T226"> эти сообщения в терминал.</text:span></text:p>
      <text:p text:style-name="P110"/>
      <text:h text:style-name="P49" text:outline-level="2"><text:bookmark-start text:name="__RefHeading___Toc8896_1636301399"/><text:span text:style-name="T122">2</text:span> Описание <text:span text:style-name="T230">программного кода продукта</text:span><text:bookmark-end text:name="__RefHeading___Toc8896_1636301399"/></text:h>
      <text:p text:style-name="P111">Приложение разделено на различные классы, созданные для конкретных задач. Общую диаграмму классов можно увидеть на рисунке <text:span text:style-name="T231">4</text:span></text:p>
      <text:h text:style-name="P112" text:outline-level="3"/>
      <text:h text:style-name="P112" text:outline-level="3">2.1 Общая архитектура</text:h>
      <text:p text:style-name="P113"><text:span text:style-name="T232">Программа построена</text:span> по клиент-серверной архитектуре. В зависимости от настроек приложение может работать в одном из двух режимов:</text:p>
      <text:list text:style-name="L9">
        <text:list-item>
          <text:p text:style-name="P114">Серверный режим – приложение напрямую взаимодействует с СУБД PostgreSQL, принимает TCP-подключения от клиентов и обрабатывает их запросы.</text:p>
        </text:list-item>
        <text:list-item>
          <text:p text:style-name="P114">Клиентский режим – приложение подключается к удалённому серверу через TCP-сокет и отправляет JSON-запросы, получая ответы.</text:p>
        </text:list-item>
      </text:list>
      <text:p text:style-name="P113">Взаимодействие с базой данных <text:span text:style-name="T233">реализовано</text:span> в классе DBWorker (сервер) или TcpClient (клиент). Это позволяет QML-интерфейсу не зависеть от режима работы – все методы вызываются одинаково. Основные модули:</text:p>
      <text:list text:style-name="L10">
        <text:list-item>
          <text:p text:style-name="P115">DBWorker – работа с PostgreSQL (только в серверном режиме).</text:p>
        </text:list-item>
        <text:list-item>
          <text:p text:style-name="P115">TcpServer + ClientConnection – TCP-сервер, принимающий запросы и использующий DBWorker.</text:p>
        </text:list-item>
        <text:list-item>
          <text:p text:style-name="P115">TcpClient – TCP-клиент, реализующий тот же API, что и DBWorker, но через сеть.</text:p>
        </text:list-item>
        <text:list-item>
          <text:p text:style-name="P115">Logs – логирование.</text:p>
        </text:list-item>
        <text:list-item>
          <text:p text:style-name="P115">Settings – хранение и загрузка настроек с помощью QSettings.</text:p>
        </text:list-item>
        <text:list-item>
          <text:p text:style-name="P115">QML-файлы – пользовательский интерфейс.</text:p>
        </text:list-item>
      </text:list>
      <text:p text:style-name="P116"/>
      <text:p text:style-name="P111"><draw:frame draw:style-name="fr1" draw:name="Врезка4" text:anchor-type="char" svg:width="24.236cm" draw:z-index="9"><draw:text-box fo:min-height="12.753cm"><text:p text:style-name="Drawing"><draw:frame draw:style-name="fr5" draw:name="Изображение4" text:anchor-type="paragraph" svg:width="24.236cm" style:rel-width="100%" svg:height="12.753cm" style:rel-height="scale" draw:z-index="10"><draw:image xlink:href="Pictures/1000000100000394000001E27947C64F.png" xlink:type="simple" xlink:show="embed" xlink:actuate="onLoad" draw:mime-type="image/png"/></draw:frame>Рисунок <text:sequence text:ref-name="refDrawing3" text:name="Drawing" text:formula="ooow:Drawing+1" style:num-format="1">4</text:sequence><text:s/>— Общая диаграмма классов</text:p></draw:text-box></draw:frame></text:p>
      <text:p text:style-name="P117"/>
      <text:h text:style-name="P118" text:outline-level="3"/>
      <text:h text:style-name="P119" text:outline-level="3"><text:span text:style-name="T234">2.</text:span><text:span text:style-name="T235">2</text:span><text:span text:style-name="T234"> </text:span><text:span text:style-name="T236">Модуль работы с базой данных</text:span></text:h>
      <text:p text:style-name="P120">Класс DBWorker предназначен для выполнения всех операций с базой данных PostgreSQL. Он открывает соединение в конструкторе (параметры подключения жёстко заданы, но могут быть изменены через вызов reconnect). <text:span text:style-name="T237">Диаграмма классов работы с базой данных отображена на рисунке 5.</text:span></text:p>
      <text:p text:style-name="P120"><draw:frame draw:style-name="fr1" draw:name="Врезка11" text:anchor-type="char" svg:width="17cm" draw:z-index="23"><draw:text-box fo:min-height="15.208cm"><text:p text:style-name="Drawing"><draw:frame draw:style-name="fr5" draw:name="Изображение11" text:anchor-type="paragraph" svg:width="17cm" style:rel-width="100%" svg:height="15.208cm" style:rel-height="scale" draw:z-index="24"><draw:image xlink:href="Pictures/100000010000025C00000266A114C2BF.png" xlink:type="simple" xlink:show="embed" xlink:actuate="onLoad" draw:mime-type="image/png"/></draw:frame>Рисунок <text:sequence text:ref-name="refDrawing10" text:name="Drawing" text:formula="ooow:Drawing+1" style:num-format="1">5</text:sequence><text:s/>— Диаграмма классов модуля работы с базой данных</text:p></draw:text-box></draw:frame></text:p>
      <text:p text:style-name="P120">Основные методы:</text:p>
      <text:list text:style-name="L11">
        <text:list-item>
          <text:p text:style-name="P121">checkUser(login, password) – авторизация пользователя. Из таблицы Users извлекаются соль и хэш пароля (SHA3-256), сравниваются с введёнными.</text:p>
        </text:list-item>
        <text:list-item>
          <text:p text:style-name="P121"><text:soft-page-break/>getFoods() – возвращает список блюд с их доступностью (рассчитывается на основе остатков продуктов), а также состав в виде строки.</text:p>
        </text:list-item>
        <text:list-item>
          <text:p text:style-name="P121">getProducts() – возвращает список продуктов с текущим количеством и минимальным порогом.</text:p>
        </text:list-item>
        <text:list-item>
          <text:p text:style-name="P121">updateProductQuantity() / addProductQuantity() – изменение остатков.</text:p>
        </text:list-item>
        <text:list-item>
          <text:p text:style-name="P121">checkAndConsume(foodId, quantity) – в транзакции проверяет наличие ингредиентов и списывает их для указанного количества блюда. При нехватке транзакция откатывается.</text:p>
        </text:list-item>
        <text:list-item>
          <text:p text:style-name="P121">returnIngredients() – возвращает ингредиенты при удалении блюда.</text:p>
        </text:list-item>
        <text:list-item>
          <text:p text:style-name="P121">createOrder(), addOrderItem() – создание заказа в БД.</text:p>
        </text:list-item>
      </text:list>
      <text:p text:style-name="P122">Все публичные методы обрабатывают исключения (классы DatabaseEx, ValidateEx), логируют ошибки и испускают сигнал errorOccurred для уведомления QML.</text:p>
      <text:p text:style-name="P122"/>
      <text:h text:style-name="P123" text:outline-level="3">2.<text:span text:style-name="T235">3</text:span> <text:span text:style-name="T238">Модуль сетевого клиента</text:span></text:h>
      <text:p text:style-name="P124">Класс TcpClient реализует тот же интерфейс, что и DBWorker, но вместо прямых запросов к БД отправляет команды на сервер. Соединение устанавливается методом connectToServer(). Поток данных построен на JSON-формате: каждая команда – объект с полями command, requestId, data. Ответы приходят асинхронно; для синхронного ожидания используется waitForResponse с таймаутом и локальным циклом обработки событий. При потере соединения генерируется сигнал errorOccurred. <text:span text:style-name="T239">Диаграмма классов для сетевой работы отображена на рисунке 6.</text:span></text:p>
      <text:p text:style-name="P122"/>
      <text:h text:style-name="P123" text:outline-level="3">2.<text:span text:style-name="T235">4</text:span> <text:span text:style-name="T238">Модуль сетевого сервера</text:span></text:h>
      <text:p text:style-name="P122">TcpServer запускает серверный сокет и при подключении клиента создаёт объект ClientConnection, который получает сокет и обрабатывает входящие сообщения. В ClientConnection::onReadyRead() считываются строки, заканчивающиеся символом новой строки, парсится JSON, и в зависимости от <text:soft-page-break/>команды вызывается соответствующий метод DBWorker. Результат отправляется обратно в виде {"response": true/false, "requestId": N, "data": ...}. <text:span text:style-name="T239">Диаграмма классов для сетевой работы отображена на рисунке 6.</text:span></text:p>
      <text:p text:style-name="P122"/>
      <text:p text:style-name="P122"><draw:frame draw:style-name="fr1" draw:name="Врезка12" text:anchor-type="char" svg:width="17cm" draw:z-index="25"><draw:text-box fo:min-height="17.912cm"><text:p text:style-name="Drawing"><draw:frame draw:style-name="fr5" draw:name="Изображение12" text:anchor-type="paragraph" svg:width="17cm" style:rel-width="100%" svg:height="17.912cm" style:rel-height="scale" draw:z-index="26"><draw:image xlink:href="Pictures/10000001000003210000034CBD5B94F9.png" xlink:type="simple" xlink:show="embed" xlink:actuate="onLoad" draw:mime-type="image/png"/></draw:frame>Рисунок <text:sequence text:ref-name="refDrawing11" text:name="Drawing" text:formula="ooow:Drawing+1" style:num-format="1">6</text:sequence><text:s/>— Диаграмма классов работающих с сетью</text:p></draw:text-box></draw:frame></text:p>
      <text:p text:style-name="P122"/>
      <text:h text:style-name="P123" text:outline-level="3"><text:soft-page-break/>2.<text:span text:style-name="T235">5</text:span> <text:span text:style-name="T238">Модуль логирования</text:span></text:h>
      <text:p text:style-name="P122">Класс Logs позволяет записывать сообщения в файл и дублировать их в консоль. Поддерживаются уровни: info(), warning(), error(). Методы доступны из QML, поэтому можно логировать события непосредственно из интерфейса.</text:p>
      <text:p text:style-name="P122"/>
      <text:h text:style-name="P123" text:outline-level="3">2.<text:span text:style-name="T235">6</text:span> <text:span text:style-name="T238">Модуль настроек</text:span></text:h>
      <text:p text:style-name="P122">Класс Settings использует <text:span text:style-name="T240">макрос</text:span> Q_PROPERTY для привязки свойств к QML. Все параметры (хост, порт БД, адрес сервера, режим, путь к логам) сохраняются в системном реестре или конфигурационном файле через QSettings. Методы load() и save() вызываются при запуске и при закрытии диалога настроек.</text:p>
      <text:p text:style-name="P122"/>
      <text:h text:style-name="P125" text:outline-level="3"><text:span text:style-name="T234">2.</text:span><text:span text:style-name="T235">7</text:span><text:span text:style-name="T234"> </text:span><text:span text:style-name="T241">Пользовательский интерфейс</text:span></text:h>
      <text:p text:style-name="P122">В проекте пять QML-файлов:</text:p>
      <text:list text:style-name="L12">
        <text:list-item>
          <text:p text:style-name="P126">LoginPage.qml – экран входа. Содержит поля «Логин», «Пароль», кнопки «Войти» и «Настройки». После успешной авторизации испускает сигнал loginSuccess.</text:p>
        </text:list-item>
        <text:list-item>
          <text:p text:style-name="P126">Main.qml – главное окно с выдвижным меню (Drawer), панелью инструментов (кнопка меню, синхронизация) и StackView для переключения страниц. В зависимости от роли текущего пользователя меню показывает разные пункты.</text:p>
        </text:list-item>
        <text:list-item>
          <text:p text:style-name="P126">OrderPage.qml – страница оформления заказа. Содержит фильтры (категория, только доступные), список блюд, область текущего заказа (корзина), поля номера столика и количества, кнопки «Добавить», «Удалить», «Оформить заказ». При добавлении вызывается dbWorker.checkAndConsume, при успехе блюдо попадает в корзину. Для предупреждения о малых остатках используется getLowStockWarning и диалог.</text:p>
        </text:list-item>
        <text:list-item>
          <text:p text:style-name="P126"><text:soft-page-break/>StockPage.qml – страница управления складом. Список продуктов с подсветкой «ниже порога», поле для ввода количества, кнопки «Добавить», «Убавить», «Установить». Изменения синхронизируются с сервером через методы addProductQuantity и updateProductQuantity.</text:p>
        </text:list-item>
        <text:list-item>
          <text:p text:style-name="P126">ReportsPage.qml – страница отчётов. Выбор типа отчёта, динамические фильтры (даты, блюдо, столик, официант), кнопка «Сформировать», область вывода результата. Данные получаются методами getReportRevenue, getRevenueByDay, getFoodPopularity, getReportLowStock.</text:p>
        </text:list-item>
      </text:list>
      <text:p text:style-name="P122"/>
      <text:h text:style-name="P49" text:outline-level="2"><text:bookmark-start text:name="__RefHeading___Toc8898_1636301399"/><text:span text:style-name="T122">3</text:span> Интеграция программных модулей<text:bookmark-end text:name="__RefHeading___Toc8898_1636301399"/></text:h>
      <text:h text:style-name="P127" text:outline-level="3"><text:span text:style-name="T242">3</text:span>.1 Подключаемые внешние модули</text:h>
      <text:p text:style-name="P128">Проект использует следующие внешние компоненты:</text:p>
      <text:list text:style-name="L13">
        <text:list-item>
          <text:p text:style-name="P129">Qt6::Quick – для компиляции QML-файлов и запуска графического интерфейса.</text:p>
        </text:list-item>
        <text:list-item>
          <text:p text:style-name="P129">Qt6::Sql – для доступа к PostgreSQL.</text:p>
        </text:list-item>
        <text:list-item>
          <text:p text:style-name="P129">Qt6::Network – для работы с сокетами.</text:p>
        </text:list-item>
        <text:list-item>
          <text:p text:style-name="P129">PostgreSQL client library (libpq) – поставляется вместе с PostgreSQL, требуется для работы драйвера QPSQL.</text:p>
        </text:list-item>
      </text:list>
      <text:p text:style-name="P128"/>
      <text:h text:style-name="P127" text:outline-level="3"><text:span text:style-name="T242">3</text:span>.<text:span text:style-name="T235">2</text:span> Интеграция C++ и QML</text:h>
      <text:p text:style-name="P130">Для использования методов и полей классов в <text:span text:style-name="T243">QML </text:span><text:span text:style-name="T83">файлах, используются Q_PROPERTY, при объявлении полей в заголовочных файлах, и Q_INVOKABLE, при объявлении методов и сигналов. </text:span><text:span text:style-name="T244">Эти макросы позволяют использовать объекты класса, если он зарегистрирован для использования в </text:span><text:span text:style-name="T245">QML. </text:span><text:span text:style-name="T244">Для его регистрации, в </text:span><text:span text:style-name="T245">main </text:span><text:span text:style-name="T244">файле прописывается </text:span><text:span text:style-name="T246">подобный</text:span><text:span text:style-name="T244"> код: DBWorker *worker = new DBWorker(loger, &amp;app);</text:span></text:p>
      <text:p text:style-name="P131">engine.rootContext()-&gt;setContextProperty("dbWorker", worker);</text:p>
      <text:p text:style-name="P132"><text:soft-page-break/>Таким образом, класс для работы с базой данных регистрируется в программе под именем «<text:span text:style-name="T247">dbWorker</text:span>», в <text:span text:style-name="T243">QML </text:span>файлах его можно использовать именно под таким именем.</text:p>
      <text:p text:style-name="P128"/>
      <text:h text:style-name="P133" text:outline-level="3"><text:span text:style-name="T242">3</text:span><text:span text:style-name="T234">.</text:span><text:span text:style-name="T235">3</text:span><text:span text:style-name="T234"> Клиент-серверное взаимодействие</text:span></text:h>
      <text:p text:style-name="P128">Клиент-серверное взаимодействие построено на TCP-сокетах. Протокол прикладного уровня – JSON. Каждое сообщение завершается символом перевода строки (\n), что упрощает разделение пакетов.</text:p>
      <text:p text:style-name="P128">Запрос клиента:</text:p>
      <text:p text:style-name="P128">{"command": "getFoods", "requestId": 1}</text:p>
      <text:p text:style-name="P128">Ответ сервера:</text:p>
      <text:p text:style-name="P128">{"response": true, "requestId": 1, "data": {"foods": [...]}}</text:p>
      <text:p text:style-name="P128">TcpClient отправляет запрос, сохраняет requestId и ждёт соответствующего ответа (max 60 секунд). Если ответ не получен – выбрасывается исключение NetworkEx и генерируется сигнал errorOccurred. Сервер (класс TcpServer) при подключении нового клиента создаёт объект ClientConnection, который асинхронно обрабатывает команды, используя переданный ему экземпляр DBWorker. Так достигается параллельность: несколько клиентов обслуживаются одновременно.</text:p>
      <text:p text:style-name="P134"/>
      <text:h text:style-name="P13" text:outline-level="1"><text:bookmark-start text:name="__RefHeading___Toc8902_1636301399"/>ЗАКЛЮЧЕНИЕ<text:bookmark-end text:name="__RefHeading___Toc8902_1636301399"/></text:h>
      <text:p text:style-name="P3"/>
      <text:h text:style-name="P13" text:outline-level="1"><text:bookmark-start text:name="__RefHeading___Toc8904_1636301399"/>СПИСОК ИСПОЛЬЗОВАННЫХ ИСТОЧНИКОВ<text:bookmark-end text:name="__RefHeading___Toc8904_1636301399"/></text:h>
      <text:p text:style-name="P3"/>
      <text:list text:style-name="Нумерация_20_источников">
        <text:list-item>
          <text:p text:style-name="P135"><text:bookmark-start text:name="__RefNumPara__4997_2159724457"/>ГОСТ 30389-2013. Услуги общественного питания. Предприятия общественного питания. Классификация и общие требования. — М.: Стандартинформ, 2014. — 16 с.<text:bookmark-end text:name="__RefNumPara__4997_2159724457"/></text:p>
        </text:list-item>
        <text:list-item>
          <text:p text:style-name="P135"><text:bookmark-start text:name="__RefNumPara__4995_2159724457"/>ГОСТ 31985-2013. Услуги общественного питания. Термины и определения. — М.: Стандартинформ, 2014. — 12 с.<text:bookmark-end text:name="__RefNumPara__4995_2159724457"/></text:p>
        </text:list-item>
        <text:list-item>
          <text:p text:style-name="P136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135"><text:bookmark-start text:name="__RefNumPara__5190_2159724457"/>Инженерия программного обеспечения, 6-е издание. : Пер. с англ. — М. : Издательский дом "Вильяме", 2002 — 624 с. : ил. — Парал. тит. англ.<text:bookmark-end text:name="__RefNumPara__5190_2159724457"/></text:p>
        </text:list-item>
        <text:list-item>
          <text:p text:style-name="P135"><text:bookmark-start text:name="__RefNumPara__5090_2159724457"/>Лебедев Е. Технологии помогают избежать штрафов: об осознанной автоматизации ресторана. — М.: Tochka.com, 2024. — URL: https://allo.tochka.com/restaurant-automatization<text:bookmark-end text:name="__RefNumPara__5090_2159724457"/></text:p>
        </text:list-item>
        <text:list-item>
          <text:p text:style-name="P135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135"><text:bookmark-start text:name="__RefNumPara__5637_2159724457"/>Стоунз Р., Мэтью Н. PostgreSQL. Основы. – Пер. с англ. – СПб: Символ Плюс, 2002 – 640 с., ил. ISBN 5 93286 043 X<text:bookmark-end text:name="__RefNumPara__5637_2159724457"/></text:p>
        </text:list-item>
        <text:list-item>
          <text:p text:style-name="P135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  <text:p text:style-name="P137"/>
        </text:list-item>
      </text:list>
      <text:h text:style-name="P138" text:outline-level="1"><text:bookmark-start text:name="__RefHeading___Toc8906_1636301399"/>П<text:span text:style-name="T248">РИЛОЖЕНИЕ</text:span> А<text:bookmark-end text:name="__RefHeading___Toc8906_1636301399"/></text:h>
      <text:h text:style-name="P139" text:outline-level="1"/>
      <text:h text:style-name="P139" text:outline-level="1"><text:bookmark-start text:name="__RefHeading___Toc1720_2115060514"/>Листинги программного кода<text:bookmark-end text:name="__RefHeading___Toc1720_2115060514"/></text:h>
      <text:p text:style-name="P140">Листинг <text:sequence text:ref-name="refЛистинг1" text:name="Листинг" text:formula="ooow:Листинг+1" style:num-format="1">1</text:sequence><text:s/>— Файл <text:span text:style-name="T249">dbworker</text:span>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style-name="Нумерация_20_строк_20_кода">
              <text:list-item text:start-value="1">
                <text:p text:style-name="P141">#include "dbworker.h"</text:p>
              </text:list-item>
              <text:list-item>
                <text:p text:style-name="P141">#include &lt;QCryptographicHash&gt;</text:p>
              </text:list-item>
              <text:list-item>
                <text:p text:style-name="P141">#include &lt;QRandomGenerator&gt;</text:p>
              </text:list-item>
              <text:list-item>
                <text:p text:style-name="P141">#include &lt;QSqlRecord&gt;</text:p>
              </text:list-item>
              <text:list-item>
                <text:p text:style-name="P141">#include &lt;qdatetime.h&gt;</text:p>
              </text:list-item>
              <text:list-item>
                <text:p text:style-name="P141">#include &lt;QNetworkInterface&gt;</text:p>
              </text:list-item>
              <text:list-item>
                <text:p text:style-name="P141">#include &lt;QAbstractSocket&gt;</text:p>
              </text:list-item>
              <text:list-item>
                <text:p text:style-name="P141"/>
              </text:list-item>
              <text:list-item>
                <text:p text:style-name="P141">DBWorker::DBWorker(Logs *logger, QObject *parent) : QObject(parent), loger(logger)</text:p>
              </text:list-item>
              <text:list-item>
                <text:p text:style-name="P141">{</text:p>
              </text:list-item>
              <text:list-item>
                <text:p text:style-name="P141"><text:s text:c="4"/>db = QSqlDatabase::addDatabase("QPSQL");</text:p>
              </text:list-item>
              <text:list-item>
                <text:p text:style-name="P141"><text:s text:c="4"/>db.setHostName("127.0.0.1");</text:p>
              </text:list-item>
              <text:list-item>
                <text:p text:style-name="P141"><text:s text:c="4"/>db.setPort(5432);</text:p>
              </text:list-item>
              <text:list-item>
                <text:p text:style-name="P141"><text:s text:c="4"/>db.setDatabaseName("RestN");</text:p>
              </text:list-item>
              <text:list-item>
                <text:p text:style-name="P141"><text:s text:c="4"/>db.setUserName("R");</text:p>
              </text:list-item>
              <text:list-item>
                <text:p text:style-name="P141"><text:s text:c="4"/>db.setPassword("");</text:p>
              </text:list-item>
              <text:list-item>
                <text:p text:style-name="P141"><text:s text:c="4"/>db.setConnectOptions("client_encoding=UTF8");</text:p>
              </text:list-item>
              <text:list-item>
                <text:p text:style-name="P141"/>
              </text:list-item>
              <text:list-item>
                <text:p text:style-name="P141"><text:s text:c="4"/>if (!db.open()) {</text:p>
              </text:list-item>
              <text:list-item>
                <text:p text:style-name="P141"><text:s text:c="8"/>QString err = db.lastError().text();</text:p>
              </text:list-item>
              <text:list-item>
                <text:p text:style-name="P141"><text:s text:c="8"/>loger-&gt;warning("Ошибка подключения к БД: " + err);</text:p>
              </text:list-item>
              <text:list-item>
                <text:p text:style-name="P141"><text:s text:c="8"/>emit errorOccurred("Не удалось подключиться к базе данных: " + err);</text:p>
              </text:list-item>
              <text:list-item>
                <text:p text:style-name="P141"><text:s text:c="4"/>} else {</text:p>
              </text:list-item>
              <text:list-item>
                <text:p text:style-name="P141"><text:s text:c="8"/>loger-&gt;info("База данных подключена успешно!");</text:p>
              </text:list-item>
              <text:list-item>
                <text:p text:style-name="P141"><text:s text:c="4"/>}</text:p>
              </text:list-item>
              <text:list-item>
                <text:p text:style-name="P141"/>
              </text:list-item>
              <text:list-item>
                <text:p text:style-name="P141"><text:s text:c="4"/>userId = -1;</text:p>
              </text:list-item>
              <text:list-item>
                <text:p text:style-name="P141"><text:s text:c="4"/>userName = "Гость";</text:p>
              </text:list-item>
              <text:list-item>
                <text:p text:style-name="P141"><text:s text:c="4"/>userRole = "Гость";</text:p>
              </text:list-item>
              <text:list-item>
                <text:p text:style-name="P141"><text:soft-page-break/>}</text:p>
              </text:list-item>
              <text:list-item>
                <text:p text:style-name="P141"/>
              </text:list-item>
              <text:list-item>
                <text:p text:style-name="P141">DBWorker::~DBWorker()</text:p>
              </text:list-item>
              <text:list-item>
                <text:p text:style-name="P141">{</text:p>
              </text:list-item>
              <text:list-item>
                <text:p text:style-name="P141"><text:s text:c="4"/>if (db.isOpen())</text:p>
              </text:list-item>
              <text:list-item>
                <text:p text:style-name="P141"><text:s text:c="8"/>db.close();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checkUser(const QString &amp;login, const QString &amp;password)</text:p>
              </text:list-item>
              <text:list-item>
                <text:p text:style-name="P141">{</text:p>
              </text:list-item>
              <text:list-item>
                <text:p text:style-name="P141"><text:s text:c="4"/>loger-&gt;info("Проверка пользователя: "+login);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SELECT UserId, FullName, Role, Salt, PasswordHash FROM Users WHERE Login = :login");</text:p>
              </text:list-item>
              <text:list-item>
                <text:p text:style-name="P141"><text:s text:c="8"/>query.bindValue(":login", login);</text:p>
              </text:list-item>
              <text:list-item>
                <text:p text:style-name="P141"/>
              </text:list-item>
              <text:list-item>
                <text:p text:style-name="P141"><text:s text:c="8"/>if (!query.exec()) {</text:p>
              </text:list-item>
              <text:list-item>
                <text:p text:style-name="P141"><text:s text:c="12"/>throw DatabaseEx("Ошибка запроса checkUser: " + query.lastError().text());</text:p>
              </text:list-item>
              <text:list-item>
                <text:p text:style-name="P141"><text:s text:c="8"/>}</text:p>
              </text:list-item>
              <text:list-item>
                <text:p text:style-name="P141"/>
              </text:list-item>
              <text:list-item>
                <text:p text:style-name="P141"><text:s text:c="8"/>if (query.next()) {</text:p>
              </text:list-item>
              <text:list-item>
                <text:p text:style-name="P141"><text:s text:c="12"/>QString salt = query.value("Salt").toString();</text:p>
              </text:list-item>
              <text:list-item>
                <text:p text:style-name="P141"><text:s text:c="12"/>QByteArray storedHash = query.value("PasswordHash").toByteArray();</text:p>
              </text:list-item>
              <text:list-item>
                <text:p text:style-name="P141"/>
              </text:list-item>
              <text:list-item>
                <text:p text:style-name="P141"><text:s text:c="12"/>QString salted = password + salt;</text:p>
              </text:list-item>
              <text:list-item>
                <text:p text:style-name="P141"><text:s text:c="12"/>QByteArray computedHash = QCryptographicHash::hash(salted.toUtf8(), QCryptographicHash::Sha3_256);</text:p>
              </text:list-item>
              <text:list-item>
                <text:p text:style-name="P141"/>
              </text:list-item>
              <text:list-item>
                <text:p text:style-name="P141"><text:s text:c="12"/>if (computedHash == storedHash) {</text:p>
              </text:list-item>
              <text:list-item>
                <text:p text:style-name="P141"><text:s text:c="16"/>userId = query.value("UserId").toInt();</text:p>
              </text:list-item>
              <text:list-item>
                <text:p text:style-name="P141"><text:s text:c="16"/>userName = query.value("FullName").toString();</text:p>
              </text:list-item>
              <text:list-item>
                <text:p text:style-name="P141"><text:s text:c="16"/>userRole = query.value("Role").toString();</text:p>
              </text:list-item>
              <text:list-item>
                <text:p text:style-name="P141"><text:soft-page-break/><text:s text:c="16"/>loger-&gt;info("Пользователь найден: " + userName);</text:p>
              </text:list-item>
              <text:list-item>
                <text:p text:style-name="P141"><text:s text:c="16"/>return true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loger-&gt;warning("Ошибка авторизации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checkUser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checkUser: неизвестная ошибка - ") + e.what());</text:p>
              </text:list-item>
              <text:list-item>
                <text:p text:style-name="P141"><text:s text:c="8"/>emit errorOccurred("Внутренняя ошибка при авторизации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Foods()</text:p>
              </text:list-item>
              <text:list-item>
                <text:p text:style-name="P141">{</text:p>
              </text:list-item>
              <text:list-item>
                <text:p text:style-name="P141"><text:s text:c="4"/>loger-&gt;info("Получение списка блюд");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</text:p>
              </text:list-item>
              <text:list-item>
                <text:p text:style-name="P141"><text:s text:c="12"/>"SELECT f.FoodId, f.FullName, f.Description, f.Price, f.Category, f.Available, "</text:p>
              </text:list-item>
              <text:list-item>
                <text:p text:style-name="P141"><text:s text:c="12"/>" <text:s text:c="2"/>CASE "</text:p>
              </text:list-item>
              <text:list-item>
                <text:p text:style-name="P141"><text:s text:c="12"/>" <text:s text:c="6"/>WHEN f.Available = false THEN false "</text:p>
              </text:list-item>
              <text:list-item>
                <text:p text:style-name="P141"><text:s text:c="12"/>" <text:s text:c="6"/>ELSE (SELECT bool_and(p.Quantity &gt;= fc.Quantity) "</text:p>
              </text:list-item>
              <text:list-item>
                <text:p text:style-name="P141"><text:s text:c="12"/>" <text:s text:c="12"/>FROM FoodComposition fc "</text:p>
              </text:list-item>
              <text:list-item>
                <text:p text:style-name="P141"><text:s text:c="12"/>" <text:s text:c="12"/>JOIN Product p ON fc.ProductId = p.ProductId "</text:p>
              </text:list-item>
              <text:list-item>
                <text:p text:style-name="P141"><text:s text:c="12"/>" <text:s text:c="12"/>WHERE fc.FoodId = f.FoodId) "</text:p>
              </text:list-item>
              <text:list-item>
                <text:p text:style-name="P141"><text:s text:c="12"/>" <text:s text:c="2"/>END AS available_by_stock "</text:p>
              </text:list-item>
              <text:list-item>
                <text:p text:style-name="P141"><text:s text:c="12"/>"FROM Food f "</text:p>
              </text:list-item>
              <text:list-item>
                <text:p text:style-name="P141"><text:soft-page-break/><text:s text:c="12"/>"ORDER BY f.FullName"</text:p>
              </text:list-item>
              <text:list-item>
                <text:p text:style-name="P141"><text:s text:c="12"/>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Foods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item;</text:p>
              </text:list-item>
              <text:list-item>
                <text:p text:style-name="P141"><text:s text:c="12"/>item["foodId"] = query.value("FoodId").toInt();</text:p>
              </text:list-item>
              <text:list-item>
                <text:p text:style-name="P141"><text:s text:c="12"/>item["name"] = query.value("FullName").toString();</text:p>
              </text:list-item>
              <text:list-item>
                <text:p text:style-name="P141"><text:s text:c="12"/>item["description"] = query.value("Description").toString();</text:p>
              </text:list-item>
              <text:list-item>
                <text:p text:style-name="P141"><text:s text:c="12"/>item["price"] = query.value("Price").toDouble();</text:p>
              </text:list-item>
              <text:list-item>
                <text:p text:style-name="P141"><text:s text:c="12"/>item["category"] = query.value("Category").toString();</text:p>
              </text:list-item>
              <text:list-item>
                <text:p text:style-name="P141"><text:s text:c="12"/>item["available"] = query.value("available_by_stock").toBool();</text:p>
              </text:list-item>
              <text:list-item>
                <text:p text:style-name="P141"/>
              </text:list-item>
              <text:list-item>
                <text:p text:style-name="P141"><text:s text:c="12"/>QSqlQuery compQuery;</text:p>
              </text:list-item>
              <text:list-item>
                <text:p text:style-name="P141"><text:s text:c="12"/>compQuery.prepare("SELECT p.FullName, fc.Quantity FROM FoodComposition fc "</text:p>
              </text:list-item>
              <text:list-item>
                <text:p text:style-name="P141"><text:s text:c="30"/>"JOIN Product p ON fc.ProductId = p.ProductId "</text:p>
              </text:list-item>
              <text:list-item>
                <text:p text:style-name="P141"><text:s text:c="30"/>"WHERE fc.FoodId = :foodId");</text:p>
              </text:list-item>
              <text:list-item>
                <text:p text:style-name="P141"><text:s text:c="12"/>compQuery.bindValue(":foodId", query.value("FoodId").toInt());</text:p>
              </text:list-item>
              <text:list-item>
                <text:p text:style-name="P141"><text:s text:c="12"/>QStringList composition;</text:p>
              </text:list-item>
              <text:list-item>
                <text:p text:style-name="P141"><text:s text:c="12"/>if (compQuery.exec()) {</text:p>
              </text:list-item>
              <text:list-item>
                <text:p text:style-name="P141"><text:s text:c="16"/>while (compQuery.next()) {</text:p>
              </text:list-item>
              <text:list-item>
                <text:p text:style-name="P141"><text:s text:c="20"/>composition &lt;&lt; QString("%1 (%2)").arg(compQuery.value(0).toString())</text:p>
              </text:list-item>
              <text:list-item>
                <text:p text:style-name="P141"><text:s text:c="20"/>.arg(compQuery.value(1).toString());</text:p>
              </text:list-item>
              <text:list-item>
                <text:p text:style-name="P141"><text:s text:c="16"/>}</text:p>
              </text:list-item>
              <text:list-item>
                <text:p text:style-name="P141"><text:s text:c="12"/>}</text:p>
              </text:list-item>
              <text:list-item>
                <text:p text:style-name="P141"><text:s text:c="12"/>item["composition"] = composition.join(", "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Foods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Foods: неизвестная ошибка - ") + e.what());</text:p>
              </text:list-item>
              <text:list-item>
                <text:p text:style-name="P141"><text:soft-page-break/><text:s text:c="8"/>emit errorOccurred("Внутренняя ошибка при загрузке меню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Products()</text:p>
              </text:list-item>
              <text:list-item>
                <text:p text:style-name="P141">{</text:p>
              </text:list-item>
              <text:list-item>
                <text:p text:style-name="P141"><text:s text:c="4"/>loger-&gt;info("Получение списка продуктов");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SELECT ProductId, FullName, Unit, Quantity, MinThreshold FROM Product ORDER BY FullName"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получения продуктов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item;</text:p>
              </text:list-item>
              <text:list-item>
                <text:p text:style-name="P141"><text:s text:c="12"/>item["productId"] = query.value("ProductId").toInt();</text:p>
              </text:list-item>
              <text:list-item>
                <text:p text:style-name="P141"><text:s text:c="12"/>item["name"] = query.value("FullName").toString();</text:p>
              </text:list-item>
              <text:list-item>
                <text:p text:style-name="P141"><text:s text:c="12"/>item["unit"] = query.value("Unit").toString();</text:p>
              </text:list-item>
              <text:list-item>
                <text:p text:style-name="P141"><text:s text:c="12"/>item["quantity"] = query.value("Quantity").toInt();</text:p>
              </text:list-item>
              <text:list-item>
                <text:p text:style-name="P141"><text:s text:c="12"/>item["minThreshold"] = query.value("MinThreshold").toInt(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Products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Products: неизвестная ошибка - ") + e.what());</text:p>
              </text:list-item>
              <text:list-item>
                <text:p text:style-name="P141"><text:s text:c="8"/>emit errorOccurred("Внутренняя ошибка при загрузке склада");</text:p>
              </text:list-item>
              <text:list-item>
                <text:p text:style-name="P141"><text:soft-page-break/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updateProductQuantity(int productId, int newQuantity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UPDATE Product SET Quantity = :q WHERE ProductId = :id");</text:p>
              </text:list-item>
              <text:list-item>
                <text:p text:style-name="P141"><text:s text:c="8"/>query.bindValue(":id", productId);</text:p>
              </text:list-item>
              <text:list-item>
                <text:p text:style-name="P141"><text:s text:c="8"/>query.bindValue(":q", newQuantity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обновления количества продуктов: " + query.lastError().text());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updateProductQuantit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updateProductQuantity: неизвестная ошибка - ") + e.what());</text:p>
              </text:list-item>
              <text:list-item>
                <text:p text:style-name="P141"><text:s text:c="8"/>emit errorOccurred("Внутренняя ошибка при обновлении остатка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addProductQuantity(int productId, int delta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oft-page-break/><text:s text:c="8"/>query.prepare("UPDATE Product SET Quantity = Quantity + :delta WHERE ProductId = :id");</text:p>
              </text:list-item>
              <text:list-item>
                <text:p text:style-name="P141"><text:s text:c="8"/>query.bindValue(":id", productId);</text:p>
              </text:list-item>
              <text:list-item>
                <text:p text:style-name="P141"><text:s text:c="8"/>query.bindValue(":delta", delta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addProductQuantity: " + query.lastError().text());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addProductQuantit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addProductQuantity: неизвестная ошибка - ") + e.what());</text:p>
              </text:list-item>
              <text:list-item>
                <text:p text:style-name="P141"><text:s text:c="8"/>emit errorOccurred("Внутренняя ошибка при изменении остатка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int DBWorker::createOrder(int tableNumber, int userId, const QString &amp;specialRequests, double totalCost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INSERT INTO Orders (UserId, TableNumber, SpecialRequests, TotalCost) "</text:p>
              </text:list-item>
              <text:list-item>
                <text:p text:style-name="P141"><text:s text:c="22"/>"VALUES (:uid, :table, :req, :total) RETURNING OrderId");</text:p>
              </text:list-item>
              <text:list-item>
                <text:p text:style-name="P141"><text:s text:c="8"/>query.bindValue(":uid", userId);</text:p>
              </text:list-item>
              <text:list-item>
                <text:p text:style-name="P141"><text:s text:c="8"/>query.bindValue(":table", tableNumber);</text:p>
              </text:list-item>
              <text:list-item>
                <text:p text:style-name="P141"><text:s text:c="8"/>query.bindValue(":req", specialRequests);</text:p>
              </text:list-item>
              <text:list-item>
                <text:p text:style-name="P141"><text:s text:c="8"/>query.bindValue(":total", totalCost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createOrder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if (query.next())</text:p>
              </text:list-item>
              <text:list-item>
                <text:p text:style-name="P141"><text:s text:c="12"/>return query.value(0).toInt();</text:p>
              </text:list-item>
              <text:list-item>
                <text:p text:style-name="P141"><text:s text:c="8"/>else</text:p>
              </text:list-item>
              <text:list-item>
                <text:p text:style-name="P141"><text:soft-page-break/><text:s text:c="12"/>throw DatabaseEx("Не удалось получить OrderId после вставки")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createOrder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-1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createOrder: неизвестная ошибка - ") + e.what());</text:p>
              </text:list-item>
              <text:list-item>
                <text:p text:style-name="P141"><text:s text:c="8"/>emit errorOccurred("Внутренняя ошибка при создании заказа");</text:p>
              </text:list-item>
              <text:list-item>
                <text:p text:style-name="P141"><text:s text:c="8"/>return -1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addOrderItem(int orderId, int foodId, int quantity, double price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INSERT INTO OrderFood (OrderId, FoodId, Quantity, Price) "</text:p>
              </text:list-item>
              <text:list-item>
                <text:p text:style-name="P141"><text:s text:c="22"/>"VALUES (:oid, :fid, :qty, :price)");</text:p>
              </text:list-item>
              <text:list-item>
                <text:p text:style-name="P141"><text:s text:c="8"/>query.bindValue(":oid", orderId);</text:p>
              </text:list-item>
              <text:list-item>
                <text:p text:style-name="P141"><text:s text:c="8"/>query.bindValue(":fid", foodId);</text:p>
              </text:list-item>
              <text:list-item>
                <text:p text:style-name="P141"><text:s text:c="8"/>query.bindValue(":qty", quantity);</text:p>
              </text:list-item>
              <text:list-item>
                <text:p text:style-name="P141"><text:s text:c="8"/>query.bindValue(":price", price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addOrderItem: " + query.lastError().text());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addOrderItem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addOrderItem: неизвестная ошибка - ") + e.what());</text:p>
              </text:list-item>
              <text:list-item>
                <text:p text:style-name="P141"><text:s text:c="8"/>emit errorOccurred("Внутренняя ошибка при добавлении позиции заказа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oft-page-break/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ReportLowStock(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SELECT FullName, Quantity, MinThreshold FROM Product WHERE Quantity &lt; MinThreshold"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ReportLowStock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item;</text:p>
              </text:list-item>
              <text:list-item>
                <text:p text:style-name="P141"><text:s text:c="12"/>item["name"] = query.value(0).toString();</text:p>
              </text:list-item>
              <text:list-item>
                <text:p text:style-name="P141"><text:s text:c="12"/>item["quantity"] = query.value(1).toInt();</text:p>
              </text:list-item>
              <text:list-item>
                <text:p text:style-name="P141"><text:s text:c="12"/>item["minThreshold"] = query.value(2).toInt(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ReportLowStock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ReportLowStock: неизвестная ошибка - ") + e.what());</text:p>
              </text:list-item>
              <text:list-item>
                <text:p text:style-name="P141"><text:s text:c="8"/>emit errorOccurred("Внутренняя ошибка при формировании отчёта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FoodPopularity(const QString &amp;from, const QString &amp;to)</text:p>
              </text:list-item>
              <text:list-item>
                <text:p text:style-name="P141"><text:soft-page-break/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Date fromDate = QDate::fromString(from, "yyyy-MM-dd");</text:p>
              </text:list-item>
              <text:list-item>
                <text:p text:style-name="P141"><text:s text:c="8"/>QDate toDate = QDate::fromString(to, "yyyy-MM-dd");</text:p>
              </text:list-item>
              <text:list-item>
                <text:p text:style-name="P141"><text:s text:c="8"/>if (!fromDate.isValid() || !toDate.isValid())</text:p>
              </text:list-item>
              <text:list-item>
                <text:p text:style-name="P141"><text:s text:c="12"/>throw ValidateEx("Неверный формат даты. Используйте ГГГГ-ММ-ДД");</text:p>
              </text:list-item>
              <text:list-item>
                <text:p text:style-name="P141"/>
              </text:list-item>
              <text:list-item>
                <text:p text:style-name="P141"><text:s text:c="8"/>if (db.isOpen()) db.rollback();</text:p>
              </text:list-item>
              <text:list-item>
                <text:p text:style-name="P141"/>
              </text:list-item>
              <text:list-item>
                <text:p text:style-name="P141"><text:s text:c="8"/>QString sql = QString(</text:p>
              </text:list-item>
              <text:list-item>
                <text:p text:style-name="P141"><text:s text:c="26"/>"SELECT f.FullName, COALESCE(SUM(of.Quantity), 0) as total "</text:p>
              </text:list-item>
              <text:list-item>
                <text:p text:style-name="P141"><text:s text:c="26"/>"FROM OrderFood of "</text:p>
              </text:list-item>
              <text:list-item>
                <text:p text:style-name="P141"><text:s text:c="26"/>"JOIN Orders o ON of.OrderId = o.OrderId "</text:p>
              </text:list-item>
              <text:list-item>
                <text:p text:style-name="P141"><text:s text:c="26"/>"JOIN Food f ON of.FoodId = f.FoodId "</text:p>
              </text:list-item>
              <text:list-item>
                <text:p text:style-name="P141"><text:s text:c="26"/>"WHERE o.OrderDate &gt;= '%1' AND o.OrderDate &lt;= '%2' "</text:p>
              </text:list-item>
              <text:list-item>
                <text:p text:style-name="P141"><text:s text:c="26"/>"GROUP BY f.FullName "</text:p>
              </text:list-item>
              <text:list-item>
                <text:p text:style-name="P141"><text:s text:c="26"/>"ORDER BY total DESC"</text:p>
              </text:list-item>
              <text:list-item>
                <text:p text:style-name="P141"><text:s text:c="26"/>).arg(fromDate.toString("yyyy-MM-dd")).arg(toDate.toString("yyyy-MM-dd"))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if (!query.exec(sql))</text:p>
              </text:list-item>
              <text:list-item>
                <text:p text:style-name="P141"><text:s text:c="12"/>throw DatabaseEx("Ошибка getFoodPopularity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item;</text:p>
              </text:list-item>
              <text:list-item>
                <text:p text:style-name="P141"><text:s text:c="12"/>item["foodName"] = query.value(0).toString();</text:p>
              </text:list-item>
              <text:list-item>
                <text:p text:style-name="P141"><text:s text:c="12"/>item["count"] = query.value(1).toInt(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FoodPopularit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oft-page-break/><text:s text:c="8"/>return QVariantList();</text:p>
              </text:list-item>
              <text:list-item>
                <text:p text:style-name="P141"><text:s text:c="4"/>} catch (const ValidateEx &amp;e) {</text:p>
              </text:list-item>
              <text:list-item>
                <text:p text:style-name="P141"><text:s text:c="8"/>loger-&gt;warning(QString("getFoodPopularit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FoodPopularity: неизвестная ошибка - ") + e.what());</text:p>
              </text:list-item>
              <text:list-item>
                <text:p text:style-name="P141"><text:s text:c="8"/>emit errorOccurred("Внутренняя ошибка при формировании отчёта популярности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checkAndConsume(int foodId, int quantity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compQuery;</text:p>
              </text:list-item>
              <text:list-item>
                <text:p text:style-name="P141"><text:s text:c="8"/>compQuery.prepare("SELECT ProductId, Quantity FROM FoodComposition WHERE FoodId = :foodId");</text:p>
              </text:list-item>
              <text:list-item>
                <text:p text:style-name="P141"><text:s text:c="8"/>compQuery.bindValue(":foodId", foodId);</text:p>
              </text:list-item>
              <text:list-item>
                <text:p text:style-name="P141"><text:s text:c="8"/>if (!compQuery.exec())</text:p>
              </text:list-item>
              <text:list-item>
                <text:p text:style-name="P141"><text:s text:c="12"/>throw DatabaseEx("Ошибка получения состава блюда: " + compQuery.lastError().text());</text:p>
              </text:list-item>
              <text:list-item>
                <text:p text:style-name="P141"/>
              </text:list-item>
              <text:list-item>
                <text:p text:style-name="P141"><text:s text:c="8"/>QList&lt;QPair&lt;int, double&gt;&gt; composition;</text:p>
              </text:list-item>
              <text:list-item>
                <text:p text:style-name="P141"><text:s text:c="8"/>while (compQuery.next()) {</text:p>
              </text:list-item>
              <text:list-item>
                <text:p text:style-name="P141"><text:s text:c="12"/>int productId = compQuery.value(0).toInt();</text:p>
              </text:list-item>
              <text:list-item>
                <text:p text:style-name="P141"><text:s text:c="12"/>double need = compQuery.value(1).toDouble() * quantity;</text:p>
              </text:list-item>
              <text:list-item>
                <text:p text:style-name="P141"><text:s text:c="12"/>composition.append(qMakePair(productId, need)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composition.isEmpty())</text:p>
              </text:list-item>
              <text:list-item>
                <text:p text:style-name="P141"><text:s text:c="12"/>throw ValidateEx("Блюдо не имеет состава");</text:p>
              </text:list-item>
              <text:list-item>
                <text:p text:style-name="P141"/>
              </text:list-item>
              <text:list-item>
                <text:p text:style-name="P141"><text:s text:c="8"/>for (const auto &amp;pair : composition) {</text:p>
              </text:list-item>
              <text:list-item>
                <text:p text:style-name="P141"><text:s text:c="12"/>int productId = pair.first;</text:p>
              </text:list-item>
              <text:list-item>
                <text:p text:style-name="P141"><text:s text:c="12"/>double need = pair.second;</text:p>
              </text:list-item>
              <text:list-item>
                <text:p text:style-name="P141"><text:soft-page-break/></text:p>
              </text:list-item>
              <text:list-item>
                <text:p text:style-name="P141"><text:s text:c="12"/>QSqlQuery qtyQuery;</text:p>
              </text:list-item>
              <text:list-item>
                <text:p text:style-name="P141"><text:s text:c="12"/>qtyQuery.prepare("SELECT Quantity FROM Product WHERE ProductId = :pid");</text:p>
              </text:list-item>
              <text:list-item>
                <text:p text:style-name="P141"><text:s text:c="12"/>qtyQuery.bindValue(":pid", productId);</text:p>
              </text:list-item>
              <text:list-item>
                <text:p text:style-name="P141"><text:s text:c="12"/>if (!qtyQuery.exec() || !qtyQuery.next())</text:p>
              </text:list-item>
              <text:list-item>
                <text:p text:style-name="P141"><text:s text:c="16"/>throw DatabaseEx(QString("Ошибка получения остатка продукта %1").arg(productId));</text:p>
              </text:list-item>
              <text:list-item>
                <text:p text:style-name="P141"/>
              </text:list-item>
              <text:list-item>
                <text:p text:style-name="P141"><text:s text:c="12"/>double current = qtyQuery.value(0).toDouble();</text:p>
              </text:list-item>
              <text:list-item>
                <text:p text:style-name="P141"><text:s text:c="12"/>if (current &lt; need - 0.0001) {</text:p>
              </text:list-item>
              <text:list-item>
                <text:p text:style-name="P141"><text:s text:c="16"/>throw ValidateEx(QString("Не хватает продукта id=%1, нужно %2, есть %3")</text:p>
              </text:list-item>
              <text:list-item>
                <text:p text:style-name="P141"><text:s text:c="37"/>.arg(productId).arg(need).arg(current)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/>
              </text:list-item>
              <text:list-item>
                <text:p text:style-name="P141"><text:s text:c="8"/>QSqlDatabase db = QSqlDatabase::database();</text:p>
              </text:list-item>
              <text:list-item>
                <text:p text:style-name="P141"><text:s text:c="8"/>if (db.isOpen() &amp;&amp; db.isValid())</text:p>
              </text:list-item>
              <text:list-item>
                <text:p text:style-name="P141"><text:s text:c="12"/>db.rollback();</text:p>
              </text:list-item>
              <text:list-item>
                <text:p text:style-name="P141"/>
              </text:list-item>
              <text:list-item>
                <text:p text:style-name="P141"><text:s text:c="8"/>if (!db.transaction())</text:p>
              </text:list-item>
              <text:list-item>
                <text:p text:style-name="P141"><text:s text:c="12"/>throw DatabaseEx("Не удалось начать транзакцию");</text:p>
              </text:list-item>
              <text:list-item>
                <text:p text:style-name="P141"/>
              </text:list-item>
              <text:list-item>
                <text:p text:style-name="P141"><text:s text:c="8"/>bool ok = true;</text:p>
              </text:list-item>
              <text:list-item>
                <text:p text:style-name="P141"><text:s text:c="8"/>for (const auto &amp;pair : composition) {</text:p>
              </text:list-item>
              <text:list-item>
                <text:p text:style-name="P141"><text:s text:c="12"/>int productId = pair.first;</text:p>
              </text:list-item>
              <text:list-item>
                <text:p text:style-name="P141"><text:s text:c="12"/>double need = pair.second;</text:p>
              </text:list-item>
              <text:list-item>
                <text:p text:style-name="P141"><text:s text:c="12"/>QSqlQuery updateQuery;</text:p>
              </text:list-item>
              <text:list-item>
                <text:p text:style-name="P141"><text:s text:c="12"/>updateQuery.prepare("UPDATE Product SET Quantity = Quantity - :need WHERE ProductId = :pid AND Quantity &gt;= :need");</text:p>
              </text:list-item>
              <text:list-item>
                <text:p text:style-name="P141"><text:s text:c="12"/>updateQuery.bindValue(":need", need);</text:p>
              </text:list-item>
              <text:list-item>
                <text:p text:style-name="P141"><text:s text:c="12"/>updateQuery.bindValue(":pid", productId);</text:p>
              </text:list-item>
              <text:list-item>
                <text:p text:style-name="P141"><text:s text:c="12"/>if (!updateQuery.exec()) {</text:p>
              </text:list-item>
              <text:list-item>
                <text:p text:style-name="P141"><text:s text:c="16"/>db.rollback();</text:p>
              </text:list-item>
              <text:list-item>
                <text:p text:style-name="P141"><text:s text:c="16"/>throw DatabaseEx(QString("Ошибка UPDATE при списании: %1").arg(updateQuery.lastError().text())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12"/>if (updateQuery.numRowsAffected() == 0) {</text:p>
              </text:list-item>
              <text:list-item>
                <text:p text:style-name="P141"><text:s text:c="16"/>db.rollback();</text:p>
              </text:list-item>
              <text:list-item>
                <text:p text:style-name="P141"><text:soft-page-break/><text:s text:c="16"/>throw ValidateEx(QString("Недостаточно товара для списания (параллельное изменение?) productId=%1").arg(productId)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!db.commit()) {</text:p>
              </text:list-item>
              <text:list-item>
                <text:p text:style-name="P141"><text:s text:c="12"/>db.rollback();</text:p>
              </text:list-item>
              <text:list-item>
                <text:p text:style-name="P141"><text:s text:c="12"/>throw DatabaseEx("Ошибка коммита транзакции"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checkAndConsume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ValidateEx &amp;e) {</text:p>
              </text:list-item>
              <text:list-item>
                <text:p text:style-name="P141"><text:s text:c="8"/>loger-&gt;warning(QString("checkAndConsume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checkAndConsume: неизвестная ошибка - ") + e.what());</text:p>
              </text:list-item>
              <text:list-item>
                <text:p text:style-name="P141"><text:s text:c="8"/>emit errorOccurred("Внутренняя ошибка при добавлении блюда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returnIngredients(int foodId, int quantity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compQuery;</text:p>
              </text:list-item>
              <text:list-item>
                <text:p text:style-name="P141"><text:s text:c="8"/>compQuery.prepare("SELECT ProductId, Quantity FROM FoodComposition WHERE FoodId = :foodId");</text:p>
              </text:list-item>
              <text:list-item>
                <text:p text:style-name="P141"><text:s text:c="8"/>compQuery.bindValue(":foodId", foodId);</text:p>
              </text:list-item>
              <text:list-item>
                <text:p text:style-name="P141"><text:s text:c="8"/>if (!compQuery.exec())</text:p>
              </text:list-item>
              <text:list-item>
                <text:p text:style-name="P141"><text:s text:c="12"/>throw DatabaseEx("Ошибка получения состава для возврата: " + compQuery.lastError().text());</text:p>
              </text:list-item>
              <text:list-item>
                <text:p text:style-name="P141"><text:soft-page-break/></text:p>
              </text:list-item>
              <text:list-item>
                <text:p text:style-name="P141"><text:s text:c="8"/>QList&lt;QPair&lt;int, double&gt;&gt; composition;</text:p>
              </text:list-item>
              <text:list-item>
                <text:p text:style-name="P141"><text:s text:c="8"/>while (compQuery.next()) {</text:p>
              </text:list-item>
              <text:list-item>
                <text:p text:style-name="P141"><text:s text:c="12"/>int productId = compQuery.value(0).toInt();</text:p>
              </text:list-item>
              <text:list-item>
                <text:p text:style-name="P141"><text:s text:c="12"/>double amount = compQuery.value(1).toDouble() * quantity;</text:p>
              </text:list-item>
              <text:list-item>
                <text:p text:style-name="P141"><text:s text:c="12"/>composition.append(qMakePair(productId, amount)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composition.isEmpty())</text:p>
              </text:list-item>
              <text:list-item>
                <text:p text:style-name="P141"><text:s text:c="12"/>throw ValidateEx("Блюдо не имеет состава, возврат невозможен");</text:p>
              </text:list-item>
              <text:list-item>
                <text:p text:style-name="P141"/>
              </text:list-item>
              <text:list-item>
                <text:p text:style-name="P141"><text:s text:c="8"/>QSqlDatabase db = QSqlDatabase::database();</text:p>
              </text:list-item>
              <text:list-item>
                <text:p text:style-name="P141"><text:s text:c="8"/>if (db.isOpen() &amp;&amp; db.isValid())</text:p>
              </text:list-item>
              <text:list-item>
                <text:p text:style-name="P141"><text:s text:c="12"/>db.rollback();</text:p>
              </text:list-item>
              <text:list-item>
                <text:p text:style-name="P141"/>
              </text:list-item>
              <text:list-item>
                <text:p text:style-name="P141"><text:s text:c="8"/>if (!db.transaction())</text:p>
              </text:list-item>
              <text:list-item>
                <text:p text:style-name="P141"><text:s text:c="12"/>throw DatabaseEx("Не удалось начать транзакцию для возврата");</text:p>
              </text:list-item>
              <text:list-item>
                <text:p text:style-name="P141"/>
              </text:list-item>
              <text:list-item>
                <text:p text:style-name="P141"><text:s text:c="8"/>for (const auto &amp;pair : composition) {</text:p>
              </text:list-item>
              <text:list-item>
                <text:p text:style-name="P141"><text:s text:c="12"/>int productId = pair.first;</text:p>
              </text:list-item>
              <text:list-item>
                <text:p text:style-name="P141"><text:s text:c="12"/>double amount = pair.second;</text:p>
              </text:list-item>
              <text:list-item>
                <text:p text:style-name="P141"><text:s text:c="12"/>QSqlQuery updateQuery;</text:p>
              </text:list-item>
              <text:list-item>
                <text:p text:style-name="P141"><text:s text:c="12"/>updateQuery.prepare("UPDATE Product SET Quantity = Quantity + :amount WHERE ProductId = :pid");</text:p>
              </text:list-item>
              <text:list-item>
                <text:p text:style-name="P141"><text:s text:c="12"/>updateQuery.bindValue(":amount", amount);</text:p>
              </text:list-item>
              <text:list-item>
                <text:p text:style-name="P141"><text:s text:c="12"/>updateQuery.bindValue(":pid", productId);</text:p>
              </text:list-item>
              <text:list-item>
                <text:p text:style-name="P141"><text:s text:c="12"/>if (!updateQuery.exec()) {</text:p>
              </text:list-item>
              <text:list-item>
                <text:p text:style-name="P141"><text:s text:c="16"/>db.rollback();</text:p>
              </text:list-item>
              <text:list-item>
                <text:p text:style-name="P141"><text:s text:c="16"/>throw DatabaseEx(QString("Ошибка UPDATE при возврате: %1").arg(updateQuery.lastError().text())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!db.commit()) {</text:p>
              </text:list-item>
              <text:list-item>
                <text:p text:style-name="P141"><text:s text:c="12"/>db.rollback();</text:p>
              </text:list-item>
              <text:list-item>
                <text:p text:style-name="P141"><text:s text:c="12"/>throw DatabaseEx("Ошибка коммита при возврате"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oft-page-break/><text:s text:c="8"/>loger-&gt;error(QString("returnIngredients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ValidateEx &amp;e) {</text:p>
              </text:list-item>
              <text:list-item>
                <text:p text:style-name="P141"><text:s text:c="8"/>loger-&gt;warning(QString("returnIngredients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returnIngredients: неизвестная ошибка - ") + e.what());</text:p>
              </text:list-item>
              <text:list-item>
                <text:p text:style-name="P141"><text:s text:c="8"/>emit errorOccurred("Внутренняя ошибка при возврате продуктов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refreshAllFoodsAvailability(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SqlQuery foodsQuery;</text:p>
              </text:list-item>
              <text:list-item>
                <text:p text:style-name="P141"><text:s text:c="8"/>foodsQuery.prepare("SELECT FoodId FROM Food");</text:p>
              </text:list-item>
              <text:list-item>
                <text:p text:style-name="P141"><text:s text:c="8"/>if (!foodsQuery.exec())</text:p>
              </text:list-item>
              <text:list-item>
                <text:p text:style-name="P141"><text:s text:c="12"/>throw DatabaseEx("Ошибка получения списка блюд: " + foodsQuery.lastError().text());</text:p>
              </text:list-item>
              <text:list-item>
                <text:p text:style-name="P141"/>
              </text:list-item>
              <text:list-item>
                <text:p text:style-name="P141"><text:s text:c="8"/>QSqlDatabase::database().transaction();</text:p>
              </text:list-item>
              <text:list-item>
                <text:p text:style-name="P141"><text:s text:c="8"/>bool allOk = true;</text:p>
              </text:list-item>
              <text:list-item>
                <text:p text:style-name="P141"><text:s text:c="8"/>while (foodsQuery.next()) {</text:p>
              </text:list-item>
              <text:list-item>
                <text:p text:style-name="P141"><text:s text:c="12"/>int foodId = foodsQuery.value(0).toInt();</text:p>
              </text:list-item>
              <text:list-item>
                <text:p text:style-name="P141"/>
              </text:list-item>
              <text:list-item>
                <text:p text:style-name="P141"><text:s text:c="12"/>QSqlQuery compQuery;</text:p>
              </text:list-item>
              <text:list-item>
                <text:p text:style-name="P141"><text:s text:c="12"/>compQuery.prepare("SELECT ProductId, Quantity FROM FoodComposition WHERE FoodId = :foodId");</text:p>
              </text:list-item>
              <text:list-item>
                <text:p text:style-name="P141"><text:s text:c="12"/>compQuery.bindValue(":foodId", foodId);</text:p>
              </text:list-item>
              <text:list-item>
                <text:p text:style-name="P141"><text:s text:c="12"/>if (!compQuery.exec())</text:p>
              </text:list-item>
              <text:list-item>
                <text:p text:style-name="P141"><text:s text:c="16"/>throw DatabaseEx("Ошибка состава блюда: " + compQuery.lastError().text());</text:p>
              </text:list-item>
              <text:list-item>
                <text:p text:style-name="P141"/>
              </text:list-item>
              <text:list-item>
                <text:p text:style-name="P141"><text:soft-page-break/><text:s text:c="12"/>bool available = true;</text:p>
              </text:list-item>
              <text:list-item>
                <text:p text:style-name="P141"><text:s text:c="12"/>while (compQuery.next()) {</text:p>
              </text:list-item>
              <text:list-item>
                <text:p text:style-name="P141"><text:s text:c="16"/>int productId = compQuery.value(0).toInt();</text:p>
              </text:list-item>
              <text:list-item>
                <text:p text:style-name="P141"><text:s text:c="16"/>double needed = compQuery.value(1).toDouble();</text:p>
              </text:list-item>
              <text:list-item>
                <text:p text:style-name="P141"/>
              </text:list-item>
              <text:list-item>
                <text:p text:style-name="P141"><text:s text:c="16"/>QSqlQuery stockQuery;</text:p>
              </text:list-item>
              <text:list-item>
                <text:p text:style-name="P141"><text:s text:c="16"/>stockQuery.prepare("SELECT Quantity FROM Product WHERE ProductId = :pid");</text:p>
              </text:list-item>
              <text:list-item>
                <text:p text:style-name="P141"><text:s text:c="16"/>stockQuery.bindValue(":pid", productId);</text:p>
              </text:list-item>
              <text:list-item>
                <text:p text:style-name="P141"><text:s text:c="16"/>if (!stockQuery.exec() || !stockQuery.next())</text:p>
              </text:list-item>
              <text:list-item>
                <text:p text:style-name="P141"><text:s text:c="20"/>throw DatabaseEx("Ошибка остатка продукта: " + stockQuery.lastError().text());</text:p>
              </text:list-item>
              <text:list-item>
                <text:p text:style-name="P141"/>
              </text:list-item>
              <text:list-item>
                <text:p text:style-name="P141"><text:s text:c="16"/>double current = stockQuery.value(0).toDouble();</text:p>
              </text:list-item>
              <text:list-item>
                <text:p text:style-name="P141"><text:s text:c="16"/>if (current &lt; needed - 0.0001) {</text:p>
              </text:list-item>
              <text:list-item>
                <text:p text:style-name="P141"><text:s text:c="20"/>available = false;</text:p>
              </text:list-item>
              <text:list-item>
                <text:p text:style-name="P141"><text:s text:c="20"/>break;</text:p>
              </text:list-item>
              <text:list-item>
                <text:p text:style-name="P141"><text:s text:c="16"/>}</text:p>
              </text:list-item>
              <text:list-item>
                <text:p text:style-name="P141"><text:s text:c="12"/>}</text:p>
              </text:list-item>
              <text:list-item>
                <text:p text:style-name="P141"/>
              </text:list-item>
              <text:list-item>
                <text:p text:style-name="P141"><text:s text:c="12"/>QSqlQuery updateQuery;</text:p>
              </text:list-item>
              <text:list-item>
                <text:p text:style-name="P141"><text:s text:c="12"/>updateQuery.prepare("UPDATE Food SET Available = :avail WHERE FoodId = :foodId");</text:p>
              </text:list-item>
              <text:list-item>
                <text:p text:style-name="P141"><text:s text:c="12"/>updateQuery.bindValue(":avail", available);</text:p>
              </text:list-item>
              <text:list-item>
                <text:p text:style-name="P141"><text:s text:c="12"/>updateQuery.bindValue(":foodId", foodId);</text:p>
              </text:list-item>
              <text:list-item>
                <text:p text:style-name="P141"><text:s text:c="12"/>if (!updateQuery.exec())</text:p>
              </text:list-item>
              <text:list-item>
                <text:p text:style-name="P141"><text:s text:c="16"/>throw DatabaseEx("Ошибка обновления доступности блюда: " + updateQuery.lastError().text());</text:p>
              </text:list-item>
              <text:list-item>
                <text:p text:style-name="P141"><text:s text:c="8"/>}</text:p>
              </text:list-item>
              <text:list-item>
                <text:p text:style-name="P141"/>
              </text:list-item>
              <text:list-item>
                <text:p text:style-name="P141"><text:s text:c="8"/>if (allOk) {</text:p>
              </text:list-item>
              <text:list-item>
                <text:p text:style-name="P141"><text:s text:c="12"/>QSqlDatabase::database().commit();</text:p>
              </text:list-item>
              <text:list-item>
                <text:p text:style-name="P141"><text:s text:c="12"/>emit foodAvailabilityChanged();</text:p>
              </text:list-item>
              <text:list-item>
                <text:p text:style-name="P141"><text:s text:c="12"/>return true;</text:p>
              </text:list-item>
              <text:list-item>
                <text:p text:style-name="P141"><text:s text:c="8"/>} else {</text:p>
              </text:list-item>
              <text:list-item>
                <text:p text:style-name="P141"><text:s text:c="12"/>QSqlDatabase::database().rollback();</text:p>
              </text:list-item>
              <text:list-item>
                <text:p text:style-name="P141"><text:s text:c="12"/>return false;</text:p>
              </text:list-item>
              <text:list-item>
                <text:p text:style-name="P141"><text:s text:c="8"/>}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refreshAllFoodsAvailability: ") + e.what());</text:p>
              </text:list-item>
              <text:list-item>
                <text:p text:style-name="P141"><text:soft-page-break/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refreshAllFoodsAvailability: неизвестная ошибка - ") + e.what());</text:p>
              </text:list-item>
              <text:list-item>
                <text:p text:style-name="P141"><text:s text:c="8"/>emit errorOccurred("Внутренняя ошибка при обновлении доступности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LowStockWarning(int foodId, int quantity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compQuery;</text:p>
              </text:list-item>
              <text:list-item>
                <text:p text:style-name="P141"><text:s text:c="8"/>compQuery.prepare("SELECT ProductId, Quantity FROM FoodComposition WHERE FoodId = :foodId");</text:p>
              </text:list-item>
              <text:list-item>
                <text:p text:style-name="P141"><text:s text:c="8"/>compQuery.bindValue(":foodId", foodId);</text:p>
              </text:list-item>
              <text:list-item>
                <text:p text:style-name="P141"><text:s text:c="8"/>if (!compQuery.exec())</text:p>
              </text:list-item>
              <text:list-item>
                <text:p text:style-name="P141"><text:s text:c="12"/>throw DatabaseEx("Ошибка получения состава для предупреждения: " + comp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compQuery.next()) {</text:p>
              </text:list-item>
              <text:list-item>
                <text:p text:style-name="P141"><text:s text:c="12"/>int productId = compQuery.value(0).toInt();</text:p>
              </text:list-item>
              <text:list-item>
                <text:p text:style-name="P141"><text:s text:c="12"/>double need = compQuery.value(1).toDouble() * quantity;</text:p>
              </text:list-item>
              <text:list-item>
                <text:p text:style-name="P141"/>
              </text:list-item>
              <text:list-item>
                <text:p text:style-name="P141"><text:s text:c="12"/>QSqlQuery prodQuery;</text:p>
              </text:list-item>
              <text:list-item>
                <text:p text:style-name="P141"><text:s text:c="12"/>prodQuery.prepare("SELECT FullName, Quantity, MinThreshold FROM Product WHERE ProductId = :pid");</text:p>
              </text:list-item>
              <text:list-item>
                <text:p text:style-name="P141"><text:s text:c="12"/>prodQuery.bindValue(":pid", productId);</text:p>
              </text:list-item>
              <text:list-item>
                <text:p text:style-name="P141"><text:s text:c="12"/>if (!prodQuery.exec() || !prodQuery.next())</text:p>
              </text:list-item>
              <text:list-item>
                <text:p text:style-name="P141"><text:s text:c="16"/>continue;</text:p>
              </text:list-item>
              <text:list-item>
                <text:p text:style-name="P141"/>
              </text:list-item>
              <text:list-item>
                <text:p text:style-name="P141"><text:s text:c="12"/>QString name = prodQuery.value(0).toString();</text:p>
              </text:list-item>
              <text:list-item>
                <text:p text:style-name="P141"><text:s text:c="12"/>double current = prodQuery.value(1).toDouble();</text:p>
              </text:list-item>
              <text:list-item>
                <text:p text:style-name="P141"><text:soft-page-break/><text:s text:c="12"/>double minThr = prodQuery.value(2).toDouble();</text:p>
              </text:list-item>
              <text:list-item>
                <text:p text:style-name="P141"><text:s text:c="12"/>double newQty = current - need;</text:p>
              </text:list-item>
              <text:list-item>
                <text:p text:style-name="P141"/>
              </text:list-item>
              <text:list-item>
                <text:p text:style-name="P141"><text:s text:c="12"/>if (newQty &lt; minThr) {</text:p>
              </text:list-item>
              <text:list-item>
                <text:p text:style-name="P141"><text:s text:c="16"/>QVariantMap warning;</text:p>
              </text:list-item>
              <text:list-item>
                <text:p text:style-name="P141"><text:s text:c="16"/>warning["productName"] = name;</text:p>
              </text:list-item>
              <text:list-item>
                <text:p text:style-name="P141"><text:s text:c="16"/>warning["currentQuantity"] = current;</text:p>
              </text:list-item>
              <text:list-item>
                <text:p text:style-name="P141"><text:s text:c="16"/>warning["newQuantity"] = newQty;</text:p>
              </text:list-item>
              <text:list-item>
                <text:p text:style-name="P141"><text:s text:c="16"/>warning["minThreshold"] = minThr;</text:p>
              </text:list-item>
              <text:list-item>
                <text:p text:style-name="P141"><text:s text:c="16"/>result.append(warning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LowStockWarning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LowStockWarning: неизвестная ошибка - ") + e.what());</text:p>
              </text:list-item>
              <text:list-item>
                <text:p text:style-name="P141"><text:s text:c="8"/>emit errorOccurred("Внутренняя ошибка при проверке остатков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DishesList(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SELECT FoodId, FullName FROM Food ORDER BY FullName"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DishesList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oft-page-break/><text:s text:c="12"/>QVariantMap item;</text:p>
              </text:list-item>
              <text:list-item>
                <text:p text:style-name="P141"><text:s text:c="12"/>item["id"] = query.value(0).toInt();</text:p>
              </text:list-item>
              <text:list-item>
                <text:p text:style-name="P141"><text:s text:c="12"/>item["name"] = query.value(1).toString(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DishesList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DishesList: неизвестная ошибка - ") + e.what());</text:p>
              </text:list-item>
              <text:list-item>
                <text:p text:style-name="P141"><text:s text:c="8"/>emit errorOccurred("Внутренняя ошибка при загрузке списка блюд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WaitersList(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"SELECT UserId, FullName FROM Users WHERE Role = 'waiter' ORDER BY FullName");</text:p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WaitersList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item;</text:p>
              </text:list-item>
              <text:list-item>
                <text:p text:style-name="P141"><text:s text:c="12"/>item["id"] = query.value(0).toInt();</text:p>
              </text:list-item>
              <text:list-item>
                <text:p text:style-name="P141"><text:s text:c="12"/>item["name"] = query.value(1).toString();</text:p>
              </text:list-item>
              <text:list-item>
                <text:p text:style-name="P141"><text:s text:c="12"/>result.append(item);</text:p>
              </text:list-item>
              <text:list-item>
                <text:p text:style-name="P141"><text:s text:c="8"/>}</text:p>
              </text:list-item>
              <text:list-item>
                <text:p text:style-name="P141"><text:soft-page-break/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WaitersList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WaitersList: неизвестная ошибка - ") + e.what());</text:p>
              </text:list-item>
              <text:list-item>
                <text:p text:style-name="P141"><text:s text:c="8"/>emit errorOccurred("Внутренняя ошибка при загрузке списка официантов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Map DBWorker::getReportRevenue(const QString &amp;from, const QString &amp;to,</text:p>
              </text:list-item>
              <text:list-item>
                <text:p text:style-name="P141"><text:s text:c="39"/>int dishId, int tableNumber, int waiterId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Map result;</text:p>
              </text:list-item>
              <text:list-item>
                <text:p text:style-name="P141"><text:s text:c="8"/>QDate fromDate = QDate::fromString(from, "yyyy-MM-dd");</text:p>
              </text:list-item>
              <text:list-item>
                <text:p text:style-name="P141"><text:s text:c="8"/>QDate toDate = QDate::fromString(to, "yyyy-MM-dd");</text:p>
              </text:list-item>
              <text:list-item>
                <text:p text:style-name="P141"><text:s text:c="8"/>if (!fromDate.isValid() || !toDate.isValid()) {</text:p>
              </text:list-item>
              <text:list-item>
                <text:p text:style-name="P141"><text:s text:c="12"/>result["error"] = "Неверный формат даты. Используйте ГГГГ-ММ-ДД";</text:p>
              </text:list-item>
              <text:list-item>
                <text:p text:style-name="P141"><text:s text:c="12"/>return result;</text:p>
              </text:list-item>
              <text:list-item>
                <text:p text:style-name="P141"><text:s text:c="8"/>}</text:p>
              </text:list-item>
              <text:list-item>
                <text:p text:style-name="P141"/>
              </text:list-item>
              <text:list-item>
                <text:p text:style-name="P141"><text:s text:c="8"/>if (db.isOpen()) db.rollback();</text:p>
              </text:list-item>
              <text:list-item>
                <text:p text:style-name="P141"/>
              </text:list-item>
              <text:list-item>
                <text:p text:style-name="P141"><text:s text:c="8"/>QString sql = "SELECT COALESCE(SUM(o.TotalCost), 0) FROM Orders o ";</text:p>
              </text:list-item>
              <text:list-item>
                <text:p text:style-name="P141"><text:s text:c="8"/>QString where = "WHERE o.OrderDate &gt;= :from AND o.OrderDate &lt;= :to";</text:p>
              </text:list-item>
              <text:list-item>
                <text:p text:style-name="P141"/>
              </text:list-item>
              <text:list-item>
                <text:p text:style-name="P141"><text:s text:c="8"/>if (dishId &gt; 0) {</text:p>
              </text:list-item>
              <text:list-item>
                <text:p text:style-name="P141"><text:s text:c="12"/>sql += "JOIN OrderFood of ON o.OrderId = of.OrderId ";</text:p>
              </text:list-item>
              <text:list-item>
                <text:p text:style-name="P141"><text:s text:c="12"/>where += " AND of.FoodId = :dishId";</text:p>
              </text:list-item>
              <text:list-item>
                <text:p text:style-name="P141"><text:s text:c="8"/>}</text:p>
              </text:list-item>
              <text:list-item>
                <text:p text:style-name="P141"><text:soft-page-break/><text:s text:c="8"/>if (tableNumber &gt; 0) {</text:p>
              </text:list-item>
              <text:list-item>
                <text:p text:style-name="P141"><text:s text:c="12"/>where += " AND o.TableNumber = :table"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waiterId &gt; 0) {</text:p>
              </text:list-item>
              <text:list-item>
                <text:p text:style-name="P141"><text:s text:c="12"/>where += " AND o.UserId = :waiter"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sql += where;</text:p>
              </text:list-item>
              <text:list-item>
                <text:p text:style-name="P141"/>
              </text:list-item>
              <text:list-item>
                <text:p text:style-name="P141"><text:s text:c="8"/>QSqlQuery query;</text:p>
              </text:list-item>
              <text:list-item>
                <text:p text:style-name="P141"><text:s text:c="8"/>query.prepare(sql);</text:p>
              </text:list-item>
              <text:list-item>
                <text:p text:style-name="P141"><text:s text:c="8"/>query.bindValue(":from", fromDate);</text:p>
              </text:list-item>
              <text:list-item>
                <text:p text:style-name="P141"><text:s text:c="8"/>query.bindValue(":to", toDate);</text:p>
              </text:list-item>
              <text:list-item>
                <text:p text:style-name="P141"><text:s text:c="8"/>if (dishId &gt; 0) query.bindValue(":dishId", dishId);</text:p>
              </text:list-item>
              <text:list-item>
                <text:p text:style-name="P141"><text:s text:c="8"/>if (tableNumber &gt; 0) query.bindValue(":table", tableNumber);</text:p>
              </text:list-item>
              <text:list-item>
                <text:p text:style-name="P141"><text:s text:c="8"/>if (waiterId &gt; 0) query.bindValue(":waiter", waiterId);</text:p>
              </text:list-item>
              <text:list-item>
                <text:p text:style-name="P141"/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ReportRevenue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if (query.next()) {</text:p>
              </text:list-item>
              <text:list-item>
                <text:p text:style-name="P141"><text:s text:c="12"/>result["totalRevenue"] = query.value(0).toDouble();</text:p>
              </text:list-item>
              <text:list-item>
                <text:p text:style-name="P141"><text:s text:c="8"/>} else {</text:p>
              </text:list-item>
              <text:list-item>
                <text:p text:style-name="P141"><text:s text:c="12"/>result["totalRevenue"] = 0.0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ReportRevenue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QVariantMap err;</text:p>
              </text:list-item>
              <text:list-item>
                <text:p text:style-name="P141"><text:s text:c="8"/>err["error"] = e.what();</text:p>
              </text:list-item>
              <text:list-item>
                <text:p text:style-name="P141"><text:s text:c="8"/>return err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ReportRevenue: неизвестная ошибка - ") + e.what());</text:p>
              </text:list-item>
              <text:list-item>
                <text:p text:style-name="P141"><text:s text:c="8"/>emit errorOccurred("Внутренняя ошибка при формировании отчёта");</text:p>
              </text:list-item>
              <text:list-item>
                <text:p text:style-name="P141"><text:s text:c="8"/>QVariantMap err;</text:p>
              </text:list-item>
              <text:list-item>
                <text:p text:style-name="P141"><text:s text:c="8"/>err["error"] = "Внутренняя ошибка";</text:p>
              </text:list-item>
              <text:list-item>
                <text:p text:style-name="P141"><text:soft-page-break/><text:s text:c="8"/>return err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VariantList DBWorker::getRevenueByDay(const QString &amp;from, const QString &amp;to,</text:p>
              </text:list-item>
              <text:list-item>
                <text:p text:style-name="P141"><text:s text:c="39"/>int dishId, int tableNumber, int waiterId)</text:p>
              </text:list-item>
              <text:list-item>
                <text:p text:style-name="P141">{</text:p>
              </text:list-item>
              <text:list-item>
                <text:p text:style-name="P141"><text:s text:c="4"/>try {</text:p>
              </text:list-item>
              <text:list-item>
                <text:p text:style-name="P141"><text:s text:c="8"/>if (!db.isOpen())</text:p>
              </text:list-item>
              <text:list-item>
                <text:p text:style-name="P141"><text:s text:c="12"/>throw DatabaseEx("База данных не открыта");</text:p>
              </text:list-item>
              <text:list-item>
                <text:p text:style-name="P141"/>
              </text:list-item>
              <text:list-item>
                <text:p text:style-name="P141"><text:s text:c="8"/>QVariantList result;</text:p>
              </text:list-item>
              <text:list-item>
                <text:p text:style-name="P141"><text:s text:c="8"/>QDate fromDate = QDate::fromString(from, "yyyy-MM-dd");</text:p>
              </text:list-item>
              <text:list-item>
                <text:p text:style-name="P141"><text:s text:c="8"/>QDate toDate = QDate::fromString(to, "yyyy-MM-dd");</text:p>
              </text:list-item>
              <text:list-item>
                <text:p text:style-name="P141"><text:s text:c="8"/>if (!fromDate.isValid() || !toDate.isValid())</text:p>
              </text:list-item>
              <text:list-item>
                <text:p text:style-name="P141"><text:s text:c="12"/>throw ValidateEx("Неверный формат даты");</text:p>
              </text:list-item>
              <text:list-item>
                <text:p text:style-name="P141"/>
              </text:list-item>
              <text:list-item>
                <text:p text:style-name="P141"><text:s text:c="8"/>if (db.isOpen()) db.rollback();</text:p>
              </text:list-item>
              <text:list-item>
                <text:p text:style-name="P141"/>
              </text:list-item>
              <text:list-item>
                <text:p text:style-name="P141"><text:s text:c="8"/>QString sql = "SELECT DATE(o.OrderDate) as day, COALESCE(SUM(o.TotalCost), 0) as total "</text:p>
              </text:list-item>
              <text:list-item>
                <text:p text:style-name="P141"><text:s text:c="22"/>"FROM Orders o ";</text:p>
              </text:list-item>
              <text:list-item>
                <text:p text:style-name="P141"><text:s text:c="8"/>QString where = "WHERE o.OrderDate &gt;= :from AND o.OrderDate &lt;= :to";</text:p>
              </text:list-item>
              <text:list-item>
                <text:p text:style-name="P141"/>
              </text:list-item>
              <text:list-item>
                <text:p text:style-name="P141"><text:s text:c="8"/>if (dishId &gt; 0) {</text:p>
              </text:list-item>
              <text:list-item>
                <text:p text:style-name="P141"><text:s text:c="12"/>sql += "JOIN OrderFood of ON o.OrderId = of.OrderId ";</text:p>
              </text:list-item>
              <text:list-item>
                <text:p text:style-name="P141"><text:s text:c="12"/>where += " AND of.FoodId = :dishId"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tableNumber &gt; 0) {</text:p>
              </text:list-item>
              <text:list-item>
                <text:p text:style-name="P141"><text:s text:c="12"/>where += " AND o.TableNumber = :table"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if (waiterId &gt; 0) {</text:p>
              </text:list-item>
              <text:list-item>
                <text:p text:style-name="P141"><text:s text:c="12"/>where += " AND o.UserId = :waiter"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sql += where + " GROUP BY DATE(o.OrderDate) ORDER BY day";</text:p>
              </text:list-item>
              <text:list-item>
                <text:p text:style-name="P141"/>
              </text:list-item>
              <text:list-item>
                <text:p text:style-name="P141"><text:soft-page-break/><text:s text:c="8"/>QSqlQuery query;</text:p>
              </text:list-item>
              <text:list-item>
                <text:p text:style-name="P141"><text:s text:c="8"/>query.prepare(sql);</text:p>
              </text:list-item>
              <text:list-item>
                <text:p text:style-name="P141"><text:s text:c="8"/>query.bindValue(":from", fromDate);</text:p>
              </text:list-item>
              <text:list-item>
                <text:p text:style-name="P141"><text:s text:c="8"/>query.bindValue(":to", toDate);</text:p>
              </text:list-item>
              <text:list-item>
                <text:p text:style-name="P141"><text:s text:c="8"/>if (dishId &gt; 0) query.bindValue(":dishId", dishId);</text:p>
              </text:list-item>
              <text:list-item>
                <text:p text:style-name="P141"><text:s text:c="8"/>if (tableNumber &gt; 0) query.bindValue(":table", tableNumber);</text:p>
              </text:list-item>
              <text:list-item>
                <text:p text:style-name="P141"><text:s text:c="8"/>if (waiterId &gt; 0) query.bindValue(":waiter", waiterId);</text:p>
              </text:list-item>
              <text:list-item>
                <text:p text:style-name="P141"/>
              </text:list-item>
              <text:list-item>
                <text:p text:style-name="P141"><text:s text:c="8"/>if (!query.exec())</text:p>
              </text:list-item>
              <text:list-item>
                <text:p text:style-name="P141"><text:s text:c="12"/>throw DatabaseEx("Ошибка getRevenueByDay: " + query.lastError().text());</text:p>
              </text:list-item>
              <text:list-item>
                <text:p text:style-name="P141"/>
              </text:list-item>
              <text:list-item>
                <text:p text:style-name="P141"><text:s text:c="8"/>while (query.next()) {</text:p>
              </text:list-item>
              <text:list-item>
                <text:p text:style-name="P141"><text:s text:c="12"/>QVariantMap dayReport;</text:p>
              </text:list-item>
              <text:list-item>
                <text:p text:style-name="P141"><text:s text:c="12"/>dayReport["date"] = query.value(0).toDate().toString("yyyy-MM-dd");</text:p>
              </text:list-item>
              <text:list-item>
                <text:p text:style-name="P141"><text:s text:c="12"/>dayReport["total"] = query.value(1).toDouble();</text:p>
              </text:list-item>
              <text:list-item>
                <text:p text:style-name="P141"><text:s text:c="12"/>result.append(dayReport);</text:p>
              </text:list-item>
              <text:list-item>
                <text:p text:style-name="P141"><text:s text:c="8"/>}</text:p>
              </text:list-item>
              <text:list-item>
                <text:p text:style-name="P141"><text:s text:c="8"/>return result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getRevenueByDa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ValidateEx &amp;e) {</text:p>
              </text:list-item>
              <text:list-item>
                <text:p text:style-name="P141"><text:s text:c="8"/>loger-&gt;warning(QString("getRevenueByDay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getRevenueByDay: неизвестная ошибка - ") + e.what());</text:p>
              </text:list-item>
              <text:list-item>
                <text:p text:style-name="P141"><text:s text:c="8"/>emit errorOccurred("Внутренняя ошибка при формировании отчёта по дням");</text:p>
              </text:list-item>
              <text:list-item>
                <text:p text:style-name="P141"><text:s text:c="8"/>return QVariantList()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bool DBWorker::reconnect(const QString &amp;host, int port, const QString &amp;dbName, const QString &amp;user, const QString &amp;password)</text:p>
              </text:list-item>
              <text:list-item>
                <text:p text:style-name="P141">{</text:p>
              </text:list-item>
              <text:list-item>
                <text:p text:style-name="P141"><text:soft-page-break/><text:s text:c="4"/>try {</text:p>
              </text:list-item>
              <text:list-item>
                <text:p text:style-name="P141"><text:s text:c="8"/>if (db.isOpen()) db.close();</text:p>
              </text:list-item>
              <text:list-item>
                <text:p text:style-name="P141"><text:s text:c="8"/>db.setHostName(host);</text:p>
              </text:list-item>
              <text:list-item>
                <text:p text:style-name="P141"><text:s text:c="8"/>db.setPort(port);</text:p>
              </text:list-item>
              <text:list-item>
                <text:p text:style-name="P141"><text:s text:c="8"/>db.setDatabaseName(dbName);</text:p>
              </text:list-item>
              <text:list-item>
                <text:p text:style-name="P141"><text:s text:c="8"/>db.setUserName(user);</text:p>
              </text:list-item>
              <text:list-item>
                <text:p text:style-name="P141"><text:s text:c="8"/>db.setPassword(password);</text:p>
              </text:list-item>
              <text:list-item>
                <text:p text:style-name="P141"><text:s text:c="8"/>if (!db.open())</text:p>
              </text:list-item>
              <text:list-item>
                <text:p text:style-name="P141"><text:s text:c="12"/>throw DatabaseEx("Ошибка подключения к БД: " + db.lastError().text());</text:p>
              </text:list-item>
              <text:list-item>
                <text:p text:style-name="P141"><text:s text:c="8"/>return true;</text:p>
              </text:list-item>
              <text:list-item>
                <text:p text:style-name="P141"><text:s text:c="4"/>} catch (const DatabaseEx &amp;e) {</text:p>
              </text:list-item>
              <text:list-item>
                <text:p text:style-name="P141"><text:s text:c="8"/>loger-&gt;error(QString("reconnect: ") + e.what());</text:p>
              </text:list-item>
              <text:list-item>
                <text:p text:style-name="P141"><text:s text:c="8"/>emit errorOccurred(e.what()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 catch (const std::exception &amp;e) {</text:p>
              </text:list-item>
              <text:list-item>
                <text:p text:style-name="P141"><text:s text:c="8"/>loger-&gt;error(QString("reconnect: неизвестная ошибка - ") + e.what());</text:p>
              </text:list-item>
              <text:list-item>
                <text:p text:style-name="P141"><text:s text:c="8"/>emit errorOccurred("Не удалось переподключиться к базе данных");</text:p>
              </text:list-item>
              <text:list-item>
                <text:p text:style-name="P141"><text:s text:c="8"/>return false;</text:p>
              </text:list-item>
              <text:list-item>
                <text:p text:style-name="P141"><text:s text:c="4"/>}</text:p>
              </text:list-item>
              <text:list-item>
                <text:p text:style-name="P141">}</text:p>
              </text:list-item>
              <text:list-item>
                <text:p text:style-name="P141"/>
              </text:list-item>
              <text:list-item>
                <text:p text:style-name="P141">QStringList DBWorker::getLocalIps()</text:p>
              </text:list-item>
              <text:list-item>
                <text:p text:style-name="P141">{</text:p>
              </text:list-item>
              <text:list-item>
                <text:p text:style-name="P141"><text:s text:c="4"/>QStringList result;</text:p>
              </text:list-item>
              <text:list-item>
                <text:p text:style-name="P141"><text:s text:c="4"/>const QList&lt;QNetworkInterface&gt; interfaces = QNetworkInterface::allInterfaces();</text:p>
              </text:list-item>
              <text:list-item>
                <text:p text:style-name="P141"><text:s text:c="4"/>for (const QNetworkInterface &amp;iface : interfaces) {</text:p>
              </text:list-item>
              <text:list-item>
                <text:p text:style-name="P141"><text:s text:c="8"/>if (!(iface.flags() &amp; QNetworkInterface::IsUp) || (iface.flags() &amp; QNetworkInterface::IsLoopBack))</text:p>
              </text:list-item>
              <text:list-item>
                <text:p text:style-name="P141"><text:s text:c="12"/>continue;</text:p>
              </text:list-item>
              <text:list-item>
                <text:p text:style-name="P141"><text:s text:c="8"/>for (const QNetworkAddressEntry &amp;entry : iface.addressEntries()) {</text:p>
              </text:list-item>
              <text:list-item>
                <text:p text:style-name="P141"><text:s text:c="12"/>if (entry.ip().protocol() == QAbstractSocket::IPv4Protocol) {</text:p>
              </text:list-item>
              <text:list-item>
                <text:p text:style-name="P141"><text:s text:c="16"/>result &lt;&lt; entry.ip().toString();</text:p>
              </text:list-item>
              <text:list-item>
                <text:p text:style-name="P141"><text:s text:c="12"/>}</text:p>
              </text:list-item>
              <text:list-item>
                <text:p text:style-name="P141"><text:s text:c="8"/>}</text:p>
              </text:list-item>
              <text:list-item>
                <text:p text:style-name="P141"><text:s text:c="4"/>}</text:p>
              </text:list-item>
              <text:list-item>
                <text:p text:style-name="P141"><text:s text:c="4"/>return result;</text:p>
              </text:list-item>
              <text:list-item>
                <text:p text:style-name="P141"><text:soft-page-break/>}</text:p>
              </text:list-item>
              <text:list-item>
                <text:p text:style-name="P141"/>
              </text:list-item>
              <text:list-item>
                <text:p text:style-name="P141">bool DBWorker::pingServer(const QString &amp;host, int port)</text:p>
              </text:list-item>
              <text:list-item>
                <text:p text:style-name="P141">{</text:p>
              </text:list-item>
              <text:list-item>
                <text:p text:style-name="P141"><text:s text:c="4"/>Q_UNUSED(host);</text:p>
              </text:list-item>
              <text:list-item>
                <text:p text:style-name="P141"><text:s text:c="4"/>Q_UNUSED(port);</text:p>
              </text:list-item>
              <text:list-item>
                <text:p text:style-name="P141"><text:s text:c="4"/>return true;</text:p>
              </text:list-item>
              <text:list-item>
                <text:p text:style-name="P141">}</text:p>
              </text:list-item>
            </text:list>
          </table:table-cell>
        </table:table-row>
      </table:table>
      <text:p text:style-name="P3"/>
      <text:p text:style-name="P142">Листинг <text:sequence text:ref-name="refЛистинг0" text:name="Листинг" text:formula="ooow:Листинг+1" style:num-format="1">2</text:sequence><text:s/>— Файл <text:span text:style-name="T249">dbworker</text:span>.<text:span text:style-name="T249">h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continue-numbering="true" text:style-name="Нумерация_20_строк_20_кода">
              <text:list-item text:start-value="1">
                <text:p text:style-name="P143">#ifndef DBWORKER_H</text:p>
              </text:list-item>
              <text:list-item>
                <text:p text:style-name="P143">#define DBWORKER_H</text:p>
              </text:list-item>
              <text:list-item>
                <text:p text:style-name="P143"/>
              </text:list-item>
              <text:list-item>
                <text:p text:style-name="P143">#include &lt;QObject&gt;</text:p>
              </text:list-item>
              <text:list-item>
                <text:p text:style-name="P143">#include &lt;QSqlDatabase&gt;</text:p>
              </text:list-item>
              <text:list-item>
                <text:p text:style-name="P143">#include &lt;QSqlQuery&gt;</text:p>
              </text:list-item>
              <text:list-item>
                <text:p text:style-name="P143">#include &lt;QSqlError&gt;</text:p>
              </text:list-item>
              <text:list-item>
                <text:p text:style-name="P143">#include &lt;QVariant&gt;</text:p>
              </text:list-item>
              <text:list-item>
                <text:p text:style-name="P143">#include &lt;QVariantList&gt;</text:p>
              </text:list-item>
              <text:list-item>
                <text:p text:style-name="P143">#include &lt;QVariantMap&gt;</text:p>
              </text:list-item>
              <text:list-item>
                <text:p text:style-name="P143">#include "logs.h"</text:p>
              </text:list-item>
              <text:list-item>
                <text:p text:style-name="P143">#include "exceptions.h"</text:p>
              </text:list-item>
              <text:list-item>
                <text:p text:style-name="P143"/>
              </text:list-item>
              <text:list-item>
                <text:p text:style-name="P143">class DBWorker : public QObject</text:p>
              </text:list-item>
              <text:list-item>
                <text:p text:style-name="P143">{</text:p>
              </text:list-item>
              <text:list-item>
                <text:p text:style-name="P143"><text:s text:c="4"/>Q_OBJECT</text:p>
              </text:list-item>
              <text:list-item>
                <text:p text:style-name="P143">public:</text:p>
              </text:list-item>
              <text:list-item>
                <text:p text:style-name="P143"><text:s text:c="4"/>DBWorker(Logs *logger, QObject *parent = nullptr);</text:p>
              </text:list-item>
              <text:list-item>
                <text:p text:style-name="P143"><text:s text:c="4"/>~DBWorker();</text:p>
              </text:list-item>
              <text:list-item>
                <text:p text:style-name="P143"/>
              </text:list-item>
              <text:list-item>
                <text:p text:style-name="P143"><text:s text:c="4"/>Q_INVOKABLE bool checkUser(const QString &amp;login, const QString &amp;password);</text:p>
              </text:list-item>
              <text:list-item>
                <text:p text:style-name="P143"><text:s text:c="4"/>Q_INVOKABLE QString getUserName() const { return userName; }</text:p>
              </text:list-item>
              <text:list-item>
                <text:p text:style-name="P143"><text:s text:c="4"/>Q_INVOKABLE QString getUserRole() const { return userRole; }</text:p>
              </text:list-item>
              <text:list-item>
                <text:p text:style-name="P143"><text:s text:c="4"/>Q_INVOKABLE int getUserId() const { return userId; }</text:p>
              </text:list-item>
              <text:list-item>
                <text:p text:style-name="P143"><text:s text:c="4"/>Q_INVOKABLE bool checkAndConsume(int foodId, int quantity);</text:p>
              </text:list-item>
              <text:list-item>
                <text:p text:style-name="P143"><text:soft-page-break/><text:s text:c="4"/>Q_INVOKABLE bool returnIngredients(int foodId, int quantity);</text:p>
              </text:list-item>
              <text:list-item>
                <text:p text:style-name="P143"><text:s text:c="4"/>Q_INVOKABLE bool refreshAllFoodsAvailability();</text:p>
              </text:list-item>
              <text:list-item>
                <text:p text:style-name="P143"><text:s text:c="4"/>Q_INVOKABLE bool reconnect(const QString &amp;host, int port, const QString &amp;dbName, const QString &amp;user, const QString &amp;password);</text:p>
              </text:list-item>
              <text:list-item>
                <text:p text:style-name="P143"><text:s text:c="4"/>Q_INVOKABLE QStringList getLocalIps();</text:p>
              </text:list-item>
              <text:list-item>
                <text:p text:style-name="P143"><text:s text:c="4"/>Q_INVOKABLE bool pingServer(const QString &amp;host, int port);</text:p>
              </text:list-item>
              <text:list-item>
                <text:p text:style-name="P143"><text:s text:c="4"/>Q_INVOKABLE QVariantList getFoods();</text:p>
              </text:list-item>
              <text:list-item>
                <text:p text:style-name="P143"><text:s text:c="4"/>Q_INVOKABLE QVariantList getProducts();</text:p>
              </text:list-item>
              <text:list-item>
                <text:p text:style-name="P143"><text:s text:c="4"/>Q_INVOKABLE QVariantList getDishesList();</text:p>
              </text:list-item>
              <text:list-item>
                <text:p text:style-name="P143"><text:s text:c="4"/>Q_INVOKABLE QVariantList getWaitersList();</text:p>
              </text:list-item>
              <text:list-item>
                <text:p text:style-name="P143"><text:s text:c="4"/>Q_INVOKABLE bool updateProductQuantity(int productId, int newQuantity);</text:p>
              </text:list-item>
              <text:list-item>
                <text:p text:style-name="P143"><text:s text:c="4"/>Q_INVOKABLE bool addProductQuantity(int productId, int delta);</text:p>
              </text:list-item>
              <text:list-item>
                <text:p text:style-name="P143"><text:s text:c="4"/>Q_INVOKABLE int createOrder(int tableNumber, int userId, const QString &amp;specialRequests, double totalCost);</text:p>
              </text:list-item>
              <text:list-item>
                <text:p text:style-name="P143"><text:s text:c="4"/>Q_INVOKABLE bool addOrderItem(int orderId, int foodId, int quantity, double price);</text:p>
              </text:list-item>
              <text:list-item>
                <text:p text:style-name="P143"><text:s text:c="4"/>Q_INVOKABLE QVariantMap getReportRevenue(const QString &amp;from, const QString &amp;to,</text:p>
              </text:list-item>
              <text:list-item>
                <text:p text:style-name="P143"><text:s text:c="45"/>int dishId, int tableNumber, int waiterId);</text:p>
              </text:list-item>
              <text:list-item>
                <text:p text:style-name="P143"><text:s text:c="4"/>Q_INVOKABLE QVariantList getRevenueByDay(const QString &amp;from, const QString &amp;to,</text:p>
              </text:list-item>
              <text:list-item>
                <text:p text:style-name="P143"><text:s text:c="45"/>int dishId, int tableNumber, int waiterId);</text:p>
              </text:list-item>
              <text:list-item>
                <text:p text:style-name="P143"><text:s text:c="4"/>Q_INVOKABLE QVariantList getFoodPopularity(const QString &amp;from, const QString &amp;to);</text:p>
              </text:list-item>
              <text:list-item>
                <text:p text:style-name="P143"><text:s text:c="4"/>Q_INVOKABLE QVariantList getReportLowStock();</text:p>
              </text:list-item>
              <text:list-item>
                <text:p text:style-name="P143"><text:s text:c="4"/>Q_INVOKABLE QVariantList getLowStockWarning(int foodId, int quantity);</text:p>
              </text:list-item>
              <text:list-item>
                <text:p text:style-name="P143"/>
              </text:list-item>
              <text:list-item>
                <text:p text:style-name="P143">signals:</text:p>
              </text:list-item>
              <text:list-item>
                <text:p text:style-name="P143"><text:s text:c="4"/>void errorOccurred(const QString &amp;message); // для передачи ошибок в QML</text:p>
              </text:list-item>
              <text:list-item>
                <text:p text:style-name="P143"><text:s text:c="4"/>void foodAvailabilityChanged();</text:p>
              </text:list-item>
              <text:list-item>
                <text:p text:style-name="P143"/>
              </text:list-item>
              <text:list-item>
                <text:p text:style-name="P143">private:</text:p>
              </text:list-item>
              <text:list-item>
                <text:p text:style-name="P143"><text:s text:c="4"/>QSqlDatabase db;</text:p>
              </text:list-item>
              <text:list-item>
                <text:p text:style-name="P143"><text:s text:c="4"/>QString userName;</text:p>
              </text:list-item>
              <text:list-item>
                <text:p text:style-name="P143"><text:s text:c="4"/>QString userRole;</text:p>
              </text:list-item>
              <text:list-item>
                <text:p text:style-name="P143"><text:s text:c="4"/>int userId;</text:p>
              </text:list-item>
              <text:list-item>
                <text:p text:style-name="P143"><text:s text:c="4"/>Logs *loger;</text:p>
              </text:list-item>
              <text:list-item>
                <text:p text:style-name="P143">};</text:p>
              </text:list-item>
              <text:list-item>
                <text:p text:style-name="P143"/>
              </text:list-item>
              <text:list-item>
                <text:p text:style-name="P143">#endif // DBWORKER_H</text:p>
              </text:list-item>
            </text:list>
          </table:table-cell>
        </table:table-row>
      </table:table>
      <text:p text:style-name="P144"><text:soft-page-break/></text:p>
      <text:p text:style-name="P145">Листинг <text:sequence text:ref-name="refЛистинг2" text:name="Листинг" text:formula="ooow:Листинг+1" style:num-format="1">3</text:sequence><text:s/>— Файл <text:span text:style-name="T250">exceptions</text:span>.cpp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list text:continue-numbering="true" text:style-name="Нумерация_20_строк_20_кода">
              <text:list-item text:start-value="1">
                <text:p text:style-name="P143">#include "exceptions.h"</text:p>
              </text:list-item>
              <text:list-item>
                <text:p text:style-name="P143"/>
              </text:list-item>
              <text:list-item>
                <text:p text:style-name="P143">Exceptions::Exceptions(const QString &amp;message)</text:p>
              </text:list-item>
              <text:list-item>
                <text:p text:style-name="P143"><text:s text:c="4"/>: msg(message.toStdString())</text:p>
              </text:list-item>
              <text:list-item>
                <text:p text:style-name="P143">{</text:p>
              </text:list-item>
              <text:list-item>
                <text:p text:style-name="P143">}</text:p>
              </text:list-item>
              <text:list-item>
                <text:p text:style-name="P143"/>
              </text:list-item>
              <text:list-item>
                <text:p text:style-name="P143">const char* Exceptions::what() const noexcept</text:p>
              </text:list-item>
              <text:list-item>
                <text:p text:style-name="P143">{</text:p>
              </text:list-item>
              <text:list-item>
                <text:p text:style-name="P143"><text:s text:c="4"/>return msg.c_str();</text:p>
              </text:list-item>
              <text:list-item>
                <text:p text:style-name="P143">}</text:p>
              </text:list-item>
            </text:list>
          </table:table-cell>
        </table:table-row>
      </table:table>
      <text:p text:style-name="P144"/>
      <text:p text:style-name="P146">Листинг <text:sequence text:ref-name="refЛистинг3" text:name="Листинг" text:formula="ooow:Листинг+1" style:num-format="1">4</text:sequence><text:s/>— Файл <text:span text:style-name="T250">exceptions</text:span>.<text:span text:style-name="T250">h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list text:continue-numbering="true" text:style-name="Нумерация_20_строк_20_кода">
              <text:list-item text:start-value="1">
                <text:p text:style-name="P147">#ifndef EXCEPTIONS_H</text:p>
              </text:list-item>
              <text:list-item>
                <text:p text:style-name="P147">#define EXCEPTIONS_H</text:p>
              </text:list-item>
              <text:list-item>
                <text:p text:style-name="P147"/>
              </text:list-item>
              <text:list-item>
                <text:p text:style-name="P147">#include &lt;QString&gt;</text:p>
              </text:list-item>
              <text:list-item>
                <text:p text:style-name="P147">#include &lt;stdexcept&gt;</text:p>
              </text:list-item>
              <text:list-item>
                <text:p text:style-name="P147"/>
              </text:list-item>
              <text:list-item>
                <text:p text:style-name="P147">class Exceptions : public std::exception</text:p>
              </text:list-item>
              <text:list-item>
                <text:p text:style-name="P147">{</text:p>
              </text:list-item>
              <text:list-item>
                <text:p text:style-name="P147">public:</text:p>
              </text:list-item>
              <text:list-item>
                <text:p text:style-name="P147"><text:s text:c="4"/>explicit Exceptions(const QString &amp;message);</text:p>
              </text:list-item>
              <text:list-item>
                <text:p text:style-name="P147"><text:s text:c="4"/>virtual const char* what() const noexcept override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std::string msg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class ValidateEx : public Exceptions</text:p>
              </text:list-item>
              <text:list-item>
                <text:p text:style-name="P147">{</text:p>
              </text:list-item>
              <text:list-item>
                <text:p text:style-name="P147">public:</text:p>
              </text:list-item>
              <text:list-item>
                <text:p text:style-name="P147"><text:s text:c="4"/>explicit ValidateEx(const QString &amp;message) : Exceptions(message) {}</text:p>
              </text:list-item>
              <text:list-item>
                <text:p text:style-name="P147"><text:soft-page-break/>};</text:p>
              </text:list-item>
              <text:list-item>
                <text:p text:style-name="P147"/>
              </text:list-item>
              <text:list-item>
                <text:p text:style-name="P147">class DatabaseEx : public Exceptions</text:p>
              </text:list-item>
              <text:list-item>
                <text:p text:style-name="P147">{</text:p>
              </text:list-item>
              <text:list-item>
                <text:p text:style-name="P147">public:</text:p>
              </text:list-item>
              <text:list-item>
                <text:p text:style-name="P147"><text:s text:c="4"/>explicit DatabaseEx(const QString &amp;message) : Exceptions(message) {}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class NetworkEx : public Exceptions</text:p>
              </text:list-item>
              <text:list-item>
                <text:p text:style-name="P147">{</text:p>
              </text:list-item>
              <text:list-item>
                <text:p text:style-name="P147">public:</text:p>
              </text:list-item>
              <text:list-item>
                <text:p text:style-name="P147"><text:s text:c="4"/>explicit NetworkEx(const QString &amp;message) : Exceptions(message) {}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#endif // EXCEPTIONS_H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4" text:name="Листинг" text:formula="ooow:Листинг+1" style:num-format="1">5</text:sequence><text:s/>— Файл <text:span text:style-name="T251">logs</text:span>.cpp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list text:continue-numbering="true" text:style-name="Нумерация_20_строк_20_кода">
              <text:list-item text:start-value="1">
                <text:p text:style-name="P147">#include "logs.h"</text:p>
              </text:list-item>
              <text:list-item>
                <text:p text:style-name="P147">#include &lt;QDateTime&gt;</text:p>
              </text:list-item>
              <text:list-item>
                <text:p text:style-name="P147">#include &lt;QDebug&gt;</text:p>
              </text:list-item>
              <text:list-item>
                <text:p text:style-name="P147">#include &lt;QStandardPaths&gt;</text:p>
              </text:list-item>
              <text:list-item>
                <text:p text:style-name="P147">#include &lt;QDir&gt;</text:p>
              </text:list-item>
              <text:list-item>
                <text:p text:style-name="P147"/>
              </text:list-item>
              <text:list-item>
                <text:p text:style-name="P147">Logs::Logs(QObject *parent) : QObject(parent), m_logPath("logs.txt")</text:p>
              </text:list-item>
              <text:list-item>
                <text:p text:style-name="P147">{</text:p>
              </text:list-item>
              <text:list-item>
                <text:p text:style-name="P147"><text:s text:c="4"/>openLogFile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Logs::~Logs()</text:p>
              </text:list-item>
              <text:list-item>
                <text:p text:style-name="P147">{</text:p>
              </text:list-item>
              <text:list-item>
                <text:p text:style-name="P147"><text:s text:c="4"/>if (logFile.isOpen())</text:p>
              </text:list-item>
              <text:list-item>
                <text:p text:style-name="P147"><text:s text:c="8"/>logFile.close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Logs::setLogPath(const QString &amp;path)</text:p>
              </text:list-item>
              <text:list-item>
                <text:p text:style-name="P147"><text:soft-page-break/>{</text:p>
              </text:list-item>
              <text:list-item>
                <text:p text:style-name="P147"><text:s text:c="4"/>if (m_logPath == path) return;</text:p>
              </text:list-item>
              <text:list-item>
                <text:p text:style-name="P147"><text:s text:c="4"/>m_logPath = path;</text:p>
              </text:list-item>
              <text:list-item>
                <text:p text:style-name="P147"><text:s text:c="4"/>openLogFile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Logs::openLogFile()</text:p>
              </text:list-item>
              <text:list-item>
                <text:p text:style-name="P147">{</text:p>
              </text:list-item>
              <text:list-item>
                <text:p text:style-name="P147"><text:s text:c="4"/>if (logFile.isOpen())</text:p>
              </text:list-item>
              <text:list-item>
                <text:p text:style-name="P147"><text:s text:c="8"/>logFile.close();</text:p>
              </text:list-item>
              <text:list-item>
                <text:p text:style-name="P147"/>
              </text:list-item>
              <text:list-item>
                <text:p text:style-name="P147"><text:s text:c="4"/>QString actualPath = m_logPath;</text:p>
              </text:list-item>
              <text:list-item>
                <text:p text:style-name="P147"><text:s text:c="4"/>QFileInfo info(actualPath);</text:p>
              </text:list-item>
              <text:list-item>
                <text:p text:style-name="P147"><text:s text:c="4"/>if (info.isRelative()) {</text:p>
              </text:list-item>
              <text:list-item>
                <text:p text:style-name="P147"><text:s text:c="8"/>actualPath = QDir::current().absoluteFilePath(actualPath);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logFile.setFileName(actualPath);</text:p>
              </text:list-item>
              <text:list-item>
                <text:p text:style-name="P147"><text:s text:c="4"/>if (logFile.open(QIODevice::Append | QIODevice::Text)) {</text:p>
              </text:list-item>
              <text:list-item>
                <text:p text:style-name="P147"><text:s text:c="8"/>out.setDevice(&amp;logFile);</text:p>
              </text:list-item>
              <text:list-item>
                <text:p text:style-name="P147"><text:s text:c="8"/>writeLog("INF", "Лог-файл открыт: " + actualPath);</text:p>
              </text:list-item>
              <text:list-item>
                <text:p text:style-name="P147"><text:s text:c="8"/>return;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QString fallbackDir = QStandardPaths::writableLocation(QStandardPaths::AppLocalDataLocation);</text:p>
              </text:list-item>
              <text:list-item>
                <text:p text:style-name="P147"><text:s text:c="4"/>if (fallbackDir.isEmpty())</text:p>
              </text:list-item>
              <text:list-item>
                <text:p text:style-name="P147"><text:s text:c="8"/>fallbackDir = QDir::tempPath();</text:p>
              </text:list-item>
              <text:list-item>
                <text:p text:style-name="P147"><text:s text:c="4"/>else</text:p>
              </text:list-item>
              <text:list-item>
                <text:p text:style-name="P147"><text:s text:c="8"/>QDir().mkpath(fallbackDir);</text:p>
              </text:list-item>
              <text:list-item>
                <text:p text:style-name="P147"/>
              </text:list-item>
              <text:list-item>
                <text:p text:style-name="P147"><text:s text:c="4"/>QString fallbackPath = fallbackDir + "/logs.txt";</text:p>
              </text:list-item>
              <text:list-item>
                <text:p text:style-name="P147"><text:s text:c="4"/>logFile.setFileName(fallbackPath);</text:p>
              </text:list-item>
              <text:list-item>
                <text:p text:style-name="P147"><text:s text:c="4"/>if (logFile.open(QIODevice::Append | QIODevice::Text)) {</text:p>
              </text:list-item>
              <text:list-item>
                <text:p text:style-name="P147"><text:s text:c="8"/>out.setDevice(&amp;logFile);</text:p>
              </text:list-item>
              <text:list-item>
                <text:p text:style-name="P147"><text:s text:c="8"/>writeLog("WARN", "Не удалось открыть лог по пути " + actualPath + ", используется " + <text:soft-page-break/>fallbackPath);</text:p>
              </text:list-item>
              <text:list-item>
                <text:p text:style-name="P147"><text:s text:c="4"/>} else {</text:p>
              </text:list-item>
              <text:list-item>
                <text:p text:style-name="P147"><text:s text:c="8"/>qWarning() &lt;&lt; "Критическая ошибка: не удалось открыть лог-файл даже в системной папке"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Logs::writeLog(const QString &amp;level, const QString &amp;message)</text:p>
              </text:list-item>
              <text:list-item>
                <text:p text:style-name="P147">{</text:p>
              </text:list-item>
              <text:list-item>
                <text:p text:style-name="P147"><text:s text:c="4"/>if (!logFile.isOpen()) return;</text:p>
              </text:list-item>
              <text:list-item>
                <text:p text:style-name="P147"><text:s text:c="4"/>QString timestamp = QDateTime::currentDateTime().toString("yyyy-MM-dd hh:mm:ss");</text:p>
              </text:list-item>
              <text:list-item>
                <text:p text:style-name="P147"><text:s text:c="4"/>QString line = QString("%1 [%2] %3\n").arg(timestamp, level, message);</text:p>
              </text:list-item>
              <text:list-item>
                <text:p text:style-name="P147"><text:s text:c="4"/>out &lt;&lt; line;</text:p>
              </text:list-item>
              <text:list-item>
                <text:p text:style-name="P147"><text:s text:c="4"/>out.flush();</text:p>
              </text:list-item>
              <text:list-item>
                <text:p text:style-name="P147"/>
              </text:list-item>
              <text:list-item>
                <text:p text:style-name="P147"><text:s text:c="4"/>if (level == "ERR") qCritical() &lt;&lt; message;</text:p>
              </text:list-item>
              <text:list-item>
                <text:p text:style-name="P147"><text:s text:c="4"/>else if (level == "WARN") qWarning() &lt;&lt; message;</text:p>
              </text:list-item>
              <text:list-item>
                <text:p text:style-name="P147"><text:s text:c="4"/>else qInfo() &lt;&lt; message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Logs::info(const QString &amp;msg) <text:s text:c="3"/>{ writeLog("INF", msg); }</text:p>
              </text:list-item>
              <text:list-item>
                <text:p text:style-name="P147">void Logs::warning(const QString &amp;msg) { writeLog("WARN", msg); }</text:p>
              </text:list-item>
              <text:list-item>
                <text:p text:style-name="P147">void Logs::error(const QString &amp;msg) <text:s text:c="2"/>{ writeLog("ERR", msg); }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5" text:name="Листинг" text:formula="ooow:Листинг+1" style:num-format="1">6</text:sequence><text:s/>— Файл <text:span text:style-name="T251">logs</text:span>.<text:span text:style-name="T251">h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list text:continue-numbering="true" text:style-name="Нумерация_20_строк_20_кода">
              <text:list-item text:start-value="1">
                <text:p text:style-name="P147">#ifndef LOGS_H</text:p>
              </text:list-item>
              <text:list-item>
                <text:p text:style-name="P147">#define LOGS_H</text:p>
              </text:list-item>
              <text:list-item>
                <text:p text:style-name="P147"/>
              </text:list-item>
              <text:list-item>
                <text:p text:style-name="P147">#include &lt;QObject&gt;</text:p>
              </text:list-item>
              <text:list-item>
                <text:p text:style-name="P147">#include &lt;QFile&gt;</text:p>
              </text:list-item>
              <text:list-item>
                <text:p text:style-name="P147">#include &lt;QTextStream&gt;</text:p>
              </text:list-item>
              <text:list-item>
                <text:p text:style-name="P147">#include "exceptions.h"</text:p>
              </text:list-item>
              <text:list-item>
                <text:p text:style-name="P147"/>
              </text:list-item>
              <text:list-item>
                <text:p text:style-name="P147"/>
              </text:list-item>
              <text:list-item>
                <text:p text:style-name="P147">class Logs : public QObject</text:p>
              </text:list-item>
              <text:list-item>
                <text:p text:style-name="P147"><text:soft-page-break/>{</text:p>
              </text:list-item>
              <text:list-item>
                <text:p text:style-name="P147"><text:s text:c="4"/>Q_OBJECT</text:p>
              </text:list-item>
              <text:list-item>
                <text:p text:style-name="P147">public:</text:p>
              </text:list-item>
              <text:list-item>
                <text:p text:style-name="P147"><text:s text:c="4"/>explicit Logs(QObject *parent = nullptr);</text:p>
              </text:list-item>
              <text:list-item>
                <text:p text:style-name="P147"><text:s text:c="4"/>~Logs();</text:p>
              </text:list-item>
              <text:list-item>
                <text:p text:style-name="P147"/>
              </text:list-item>
              <text:list-item>
                <text:p text:style-name="P147"><text:s text:c="4"/>Q_INVOKABLE void info(const QString &amp;msg);</text:p>
              </text:list-item>
              <text:list-item>
                <text:p text:style-name="P147"><text:s text:c="4"/>Q_INVOKABLE void warning(const QString &amp;msg);</text:p>
              </text:list-item>
              <text:list-item>
                <text:p text:style-name="P147"><text:s text:c="4"/>Q_INVOKABLE void error(const QString &amp;msg);</text:p>
              </text:list-item>
              <text:list-item>
                <text:p text:style-name="P147"><text:s text:c="4"/>Q_INVOKABLE void setLogPath(const QString &amp;path)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void writeLog(const QString &amp;level, const QString &amp;message);</text:p>
              </text:list-item>
              <text:list-item>
                <text:p text:style-name="P147"><text:s text:c="4"/>void openLogFile();</text:p>
              </text:list-item>
              <text:list-item>
                <text:p text:style-name="P147"/>
              </text:list-item>
              <text:list-item>
                <text:p text:style-name="P147"><text:s text:c="4"/>QFile logFile;</text:p>
              </text:list-item>
              <text:list-item>
                <text:p text:style-name="P147"><text:s text:c="4"/>QString m_logPath;</text:p>
              </text:list-item>
              <text:list-item>
                <text:p text:style-name="P147"><text:s text:c="4"/>QTextStream out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#endif // LOGS_H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6" text:name="Листинг" text:formula="ooow:Листинг+1" style:num-format="1">7</text:sequence><text:s/>— Файл <text:span text:style-name="T252">main</text:span>.cpp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list text:continue-numbering="true" text:style-name="Нумерация_20_строк_20_кода">
              <text:list-item text:start-value="1">
                <text:p text:style-name="P147">#include &lt;QGuiApplication&gt;</text:p>
              </text:list-item>
              <text:list-item>
                <text:p text:style-name="P147">#include &lt;QQmlApplicationEngine&gt;</text:p>
              </text:list-item>
              <text:list-item>
                <text:p text:style-name="P147">#include &lt;QQmlContext&gt;</text:p>
              </text:list-item>
              <text:list-item>
                <text:p text:style-name="P147">#include &lt;QSettings&gt;</text:p>
              </text:list-item>
              <text:list-item>
                <text:p text:style-name="P147">#include "dbworker.h"</text:p>
              </text:list-item>
              <text:list-item>
                <text:p text:style-name="P147">#include "logs.h"</text:p>
              </text:list-item>
              <text:list-item>
                <text:p text:style-name="P147">#include "settings.h"</text:p>
              </text:list-item>
              <text:list-item>
                <text:p text:style-name="P147">#include "tcpclient.h"</text:p>
              </text:list-item>
              <text:list-item>
                <text:p text:style-name="P147">#include "tcpserver.h"</text:p>
              </text:list-item>
              <text:list-item>
                <text:p text:style-name="P147"/>
              </text:list-item>
              <text:list-item>
                <text:p text:style-name="P147">int main(int argc, char *argv[])</text:p>
              </text:list-item>
              <text:list-item>
                <text:p text:style-name="P147">{</text:p>
              </text:list-item>
              <text:list-item>
                <text:p text:style-name="P147"><text:soft-page-break/><text:s text:c="4"/>QGuiApplication app(argc, argv);</text:p>
              </text:list-item>
              <text:list-item>
                <text:p text:style-name="P147"><text:s text:c="4"/>QQmlApplicationEngine engine;</text:p>
              </text:list-item>
              <text:list-item>
                <text:p text:style-name="P147"/>
              </text:list-item>
              <text:list-item>
                <text:p text:style-name="P147"><text:s text:c="4"/>Logs logger;</text:p>
              </text:list-item>
              <text:list-item>
                <text:p text:style-name="P147"><text:s text:c="4"/>Logs *loger = &amp;logger;</text:p>
              </text:list-item>
              <text:list-item>
                <text:p text:style-name="P147"/>
              </text:list-item>
              <text:list-item>
                <text:p text:style-name="P147"><text:s text:c="4"/>Settings set(loger);</text:p>
              </text:list-item>
              <text:list-item>
                <text:p text:style-name="P147"><text:s text:c="4"/>engine.rootContext()-&gt;setContextProperty("appSettings", &amp;set);</text:p>
              </text:list-item>
              <text:list-item>
                <text:p text:style-name="P147"/>
              </text:list-item>
              <text:list-item>
                <text:p text:style-name="P147"><text:s text:c="4"/>loger-&gt;setLogPath(set.logPath());</text:p>
              </text:list-item>
              <text:list-item>
                <text:p text:style-name="P147"><text:s text:c="4"/>loger-&gt;info("Запуск приложения");</text:p>
              </text:list-item>
              <text:list-item>
                <text:p text:style-name="P147"><text:s text:c="4"/>engine.rootContext()-&gt;setContextProperty("loger", loger);</text:p>
              </text:list-item>
              <text:list-item>
                <text:p text:style-name="P147"><text:s text:c="4"/>loger-&gt;info("Настройки загружены");</text:p>
              </text:list-item>
              <text:list-item>
                <text:p text:style-name="P147"/>
              </text:list-item>
              <text:list-item>
                <text:p text:style-name="P147"><text:s text:c="4"/>QSettings qsettings("RestaurantApp", "Settings");</text:p>
              </text:list-item>
              <text:list-item>
                <text:p text:style-name="P147"><text:s text:c="4"/>bool serverMode = qsettings.value("isServerMode", false).toBool();</text:p>
              </text:list-item>
              <text:list-item>
                <text:p text:style-name="P147"><text:s text:c="4"/>loger-&gt;info("Режим сервера: " + QString::number(serverMode));</text:p>
              </text:list-item>
              <text:list-item>
                <text:p text:style-name="P147"/>
              </text:list-item>
              <text:list-item>
                <text:p text:style-name="P147"><text:s text:c="4"/>if (serverMode) {</text:p>
              </text:list-item>
              <text:list-item>
                <text:p text:style-name="P147"><text:s text:c="8"/>loger-&gt;info("Запуск в серверном режиме");</text:p>
              </text:list-item>
              <text:list-item>
                <text:p text:style-name="P147"><text:s text:c="8"/>DBWorker *worker = new DBWorker(loger, &amp;app);</text:p>
              </text:list-item>
              <text:list-item>
                <text:p text:style-name="P147"><text:s text:c="8"/>engine.rootContext()-&gt;setContextProperty("dbWorker", worker);</text:p>
              </text:list-item>
              <text:list-item>
                <text:p text:style-name="P147"><text:s text:c="8"/>loger-&gt;info("DBWorker создан");</text:p>
              </text:list-item>
              <text:list-item>
                <text:p text:style-name="P147"/>
              </text:list-item>
              <text:list-item>
                <text:p text:style-name="P147"><text:s text:c="8"/>TcpServer *tcpServer = new TcpServer(loger, worker, &amp;app);</text:p>
              </text:list-item>
              <text:list-item>
                <text:p text:style-name="P147"><text:s text:c="8"/>quint16 port = static_cast&lt;quint16&gt;(set.serverPort());</text:p>
              </text:list-item>
              <text:list-item>
                <text:p text:style-name="P147"><text:s text:c="8"/>if (!tcpServer-&gt;start(port)) {</text:p>
              </text:list-item>
              <text:list-item>
                <text:p text:style-name="P147"><text:s text:c="12"/>loger-&gt;error("Не удалось запустить сервер");</text:p>
              </text:list-item>
              <text:list-item>
                <text:p text:style-name="P147"><text:s text:c="12"/>delete tcpServer;</text:p>
              </text:list-item>
              <text:list-item>
                <text:p text:style-name="P147"><text:s text:c="12"/>delete worker;</text:p>
              </text:list-item>
              <text:list-item>
                <text:p text:style-name="P147"><text:s text:c="12"/>return -1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loger-&gt;info("Сервер запущен на порту " + QString::number(port));</text:p>
              </text:list-item>
              <text:list-item>
                <text:p text:style-name="P147"><text:s text:c="4"/>} else {</text:p>
              </text:list-item>
              <text:list-item>
                <text:p text:style-name="P147"><text:s text:c="8"/>loger-&gt;info("Запуск в клиентском режиме");</text:p>
              </text:list-item>
              <text:list-item>
                <text:p text:style-name="P147"><text:s text:c="8"/>TcpClient *client = new TcpClient(loger, &amp;app);</text:p>
              </text:list-item>
              <text:list-item>
                <text:p text:style-name="P147"><text:soft-page-break/><text:s text:c="8"/>engine.rootContext()-&gt;setContextProperty("dbWorker", client);</text:p>
              </text:list-item>
              <text:list-item>
                <text:p text:style-name="P147"/>
              </text:list-item>
              <text:list-item>
                <text:p text:style-name="P147"><text:s text:c="8"/>QString host = set.serverHost();</text:p>
              </text:list-item>
              <text:list-item>
                <text:p text:style-name="P147"><text:s text:c="8"/>quint16 port = static_cast&lt;quint16&gt;(set.serverPort());</text:p>
              </text:list-item>
              <text:list-item>
                <text:p text:style-name="P147"><text:s text:c="8"/>if (!client-&gt;connectToServer(host, port)) {</text:p>
              </text:list-item>
              <text:list-item>
                <text:p text:style-name="P147"><text:s text:c="12"/>loger-&gt;error("Не удалось подключиться к серверу");</text:p>
              </text:list-item>
              <text:list-item>
                <text:p text:style-name="P147"><text:s text:c="8"/>} else {</text:p>
              </text:list-item>
              <text:list-item>
                <text:p text:style-name="P147"><text:s text:c="12"/>loger-&gt;info("Подключено к серверу " + host + ":" + QString::number(port));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QObject::connect(&amp;engine, &amp;QQmlApplicationEngine::objectCreationFailed,</text:p>
              </text:list-item>
              <text:list-item>
                <text:p text:style-name="P147"><text:s text:c="21"/>&amp;app, []() { QCoreApplication::exit(-1); }, Qt::QueuedConnection);</text:p>
              </text:list-item>
              <text:list-item>
                <text:p text:style-name="P147"><text:s text:c="4"/>engine.loadFromModule("app", "Main");</text:p>
              </text:list-item>
              <text:list-item>
                <text:p text:style-name="P147"><text:s text:c="4"/>loger-&gt;info("QML загружен");</text:p>
              </text:list-item>
              <text:list-item>
                <text:p text:style-name="P147"/>
              </text:list-item>
              <text:list-item>
                <text:p text:style-name="P147"><text:s text:c="4"/>return app.exec();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7" text:name="Листинг" text:formula="ooow:Листинг+1" style:num-format="1">8</text:sequence><text:s/>— Файл <text:span text:style-name="T253">settings</text:span>.cpp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list text:continue-numbering="true" text:style-name="Нумерация_20_строк_20_кода">
              <text:list-item text:start-value="1">
                <text:p text:style-name="P147">#include "settings.h"</text:p>
              </text:list-item>
              <text:list-item>
                <text:p text:style-name="P147">#include &lt;QSettings&gt;</text:p>
              </text:list-item>
              <text:list-item>
                <text:p text:style-name="P147"/>
              </text:list-item>
              <text:list-item>
                <text:p text:style-name="P147">Settings::Settings(Logs *logger, QObject *parent) : QObject(parent), loger(logger)</text:p>
              </text:list-item>
              <text:list-item>
                <text:p text:style-name="P147">{</text:p>
              </text:list-item>
              <text:list-item>
                <text:p text:style-name="P147"><text:s text:c="4"/>loa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DbHost(const QString &amp;host)</text:p>
              </text:list-item>
              <text:list-item>
                <text:p text:style-name="P147">{</text:p>
              </text:list-item>
              <text:list-item>
                <text:p text:style-name="P147"><text:s text:c="4"/>if (m_dbHost == host) return;</text:p>
              </text:list-item>
              <text:list-item>
                <text:p text:style-name="P147"><text:s text:c="4"/>m_dbHost = host;</text:p>
              </text:list-item>
              <text:list-item>
                <text:p text:style-name="P147"><text:s text:c="4"/>emit dbHost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<text:soft-page-break/>void Settings::setDbPort(int port)</text:p>
              </text:list-item>
              <text:list-item>
                <text:p text:style-name="P147">{</text:p>
              </text:list-item>
              <text:list-item>
                <text:p text:style-name="P147"><text:s text:c="4"/>if (m_dbPort == port) return;</text:p>
              </text:list-item>
              <text:list-item>
                <text:p text:style-name="P147"><text:s text:c="4"/>m_dbPort = port;</text:p>
              </text:list-item>
              <text:list-item>
                <text:p text:style-name="P147"><text:s text:c="4"/>emit dbPort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DbName(const QString &amp;name)</text:p>
              </text:list-item>
              <text:list-item>
                <text:p text:style-name="P147">{</text:p>
              </text:list-item>
              <text:list-item>
                <text:p text:style-name="P147"><text:s text:c="4"/>if (m_dbName == name) return;</text:p>
              </text:list-item>
              <text:list-item>
                <text:p text:style-name="P147"><text:s text:c="4"/>m_dbName = name;</text:p>
              </text:list-item>
              <text:list-item>
                <text:p text:style-name="P147"><text:s text:c="4"/>emit dbName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DbUser(const QString &amp;user)</text:p>
              </text:list-item>
              <text:list-item>
                <text:p text:style-name="P147">{</text:p>
              </text:list-item>
              <text:list-item>
                <text:p text:style-name="P147"><text:s text:c="4"/>if (m_dbUser == user) return;</text:p>
              </text:list-item>
              <text:list-item>
                <text:p text:style-name="P147"><text:s text:c="4"/>m_dbUser = user;</text:p>
              </text:list-item>
              <text:list-item>
                <text:p text:style-name="P147"><text:s text:c="4"/>emit dbUser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DbPassword(const QString &amp;password)</text:p>
              </text:list-item>
              <text:list-item>
                <text:p text:style-name="P147">{</text:p>
              </text:list-item>
              <text:list-item>
                <text:p text:style-name="P147"><text:s text:c="4"/>if (m_dbPassword == password) return;</text:p>
              </text:list-item>
              <text:list-item>
                <text:p text:style-name="P147"><text:s text:c="4"/>m_dbPassword = password;</text:p>
              </text:list-item>
              <text:list-item>
                <text:p text:style-name="P147"><text:s text:c="4"/>emit dbPassword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load()</text:p>
              </text:list-item>
              <text:list-item>
                <text:p text:style-name="P147">{</text:p>
              </text:list-item>
              <text:list-item>
                <text:p text:style-name="P147"><text:s text:c="4"/>QSettings settings("RestaurantApp", "Settings");</text:p>
              </text:list-item>
              <text:list-item>
                <text:p text:style-name="P147"><text:s text:c="4"/>m_dbHost = settings.value("dbHost", "127.0.0.1").toString();</text:p>
              </text:list-item>
              <text:list-item>
                <text:p text:style-name="P147"><text:s text:c="4"/>m_dbPort = settings.value("dbPort", 5432).toInt();</text:p>
              </text:list-item>
              <text:list-item>
                <text:p text:style-name="P147"><text:s text:c="4"/>m_dbName = settings.value("dbName", "RestN").toString();</text:p>
              </text:list-item>
              <text:list-item>
                <text:p text:style-name="P147"><text:s text:c="4"/>m_dbUser = settings.value("dbUser", "R").toString();</text:p>
              </text:list-item>
              <text:list-item>
                <text:p text:style-name="P147"><text:s text:c="4"/>m_dbPassword = settings.value("dbPassword", "").toString();</text:p>
              </text:list-item>
              <text:list-item>
                <text:p text:style-name="P147"><text:soft-page-break/><text:s text:c="4"/>m_isServerMode = settings.value("isServerMode", false).toBool();</text:p>
              </text:list-item>
              <text:list-item>
                <text:p text:style-name="P147"><text:s text:c="4"/>m_logPath = settings.value("logPath", "logs.txt").toString();</text:p>
              </text:list-item>
              <text:list-item>
                <text:p text:style-name="P147"><text:s text:c="4"/>loger-&gt;info("Настройки загружены: хост=" + m_dbHost + ", порт=" + QString::number(m_dbPort));</text:p>
              </text:list-item>
              <text:list-item>
                <text:p text:style-name="P147"><text:s text:c="4"/>m_serverHost = settings.value("serverHost", "127.0.0.1").toString();</text:p>
              </text:list-item>
              <text:list-item>
                <text:p text:style-name="P147"><text:s text:c="4"/>m_serverPort = settings.value("serverPort", 12345).toInt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ave()</text:p>
              </text:list-item>
              <text:list-item>
                <text:p text:style-name="P147">{</text:p>
              </text:list-item>
              <text:list-item>
                <text:p text:style-name="P147"><text:s text:c="4"/>QSettings settings("RestaurantApp", "Settings");</text:p>
              </text:list-item>
              <text:list-item>
                <text:p text:style-name="P147"><text:s text:c="4"/>settings.setValue("dbHost", m_dbHost);</text:p>
              </text:list-item>
              <text:list-item>
                <text:p text:style-name="P147"><text:s text:c="4"/>settings.setValue("dbPort", m_dbPort);</text:p>
              </text:list-item>
              <text:list-item>
                <text:p text:style-name="P147"><text:s text:c="4"/>settings.setValue("dbName", m_dbName);</text:p>
              </text:list-item>
              <text:list-item>
                <text:p text:style-name="P147"><text:s text:c="4"/>settings.setValue("dbUser", m_dbUser);</text:p>
              </text:list-item>
              <text:list-item>
                <text:p text:style-name="P147"><text:s text:c="4"/>settings.setValue("dbPassword", m_dbPassword);</text:p>
              </text:list-item>
              <text:list-item>
                <text:p text:style-name="P147"><text:s text:c="4"/>settings.setValue("isServerMode", m_isServerMode);</text:p>
              </text:list-item>
              <text:list-item>
                <text:p text:style-name="P147"><text:s text:c="4"/>settings.setValue("logPath", m_logPath);</text:p>
              </text:list-item>
              <text:list-item>
                <text:p text:style-name="P147"><text:s text:c="4"/>settings.setValue("serverHost", m_serverHost);</text:p>
              </text:list-item>
              <text:list-item>
                <text:p text:style-name="P147"><text:s text:c="4"/>settings.setValue("serverPort", m_serverPort);</text:p>
              </text:list-item>
              <text:list-item>
                <text:p text:style-name="P147"><text:s text:c="4"/>loger-&gt;info("Настройки сохранены"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IsServerMode(bool mode)</text:p>
              </text:list-item>
              <text:list-item>
                <text:p text:style-name="P147">{</text:p>
              </text:list-item>
              <text:list-item>
                <text:p text:style-name="P147"><text:s text:c="4"/>if (m_isServerMode == mode) return;</text:p>
              </text:list-item>
              <text:list-item>
                <text:p text:style-name="P147"><text:s text:c="4"/>m_isServerMode = mode;</text:p>
              </text:list-item>
              <text:list-item>
                <text:p text:style-name="P147"><text:s text:c="4"/>emit isServerModeChanged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Settings::setLogPath(const QString &amp;path)</text:p>
              </text:list-item>
              <text:list-item>
                <text:p text:style-name="P147">{</text:p>
              </text:list-item>
              <text:list-item>
                <text:p text:style-name="P147"><text:s text:c="4"/>if (m_logPath == path) return;</text:p>
              </text:list-item>
              <text:list-item>
                <text:p text:style-name="P147"><text:s text:c="4"/>m_logPath = path;</text:p>
              </text:list-item>
              <text:list-item>
                <text:p text:style-name="P147"><text:s text:c="4"/>emit logPathChanged();</text:p>
              </text:list-item>
              <text:list-item>
                <text:p text:style-name="P147">}</text:p>
              </text:list-item>
              <text:list-item>
                <text:p text:style-name="P147"><text:soft-page-break/></text:p>
              </text:list-item>
              <text:list-item>
                <text:p text:style-name="P147">void Settings::setServerHost(const QString &amp;host)</text:p>
              </text:list-item>
              <text:list-item>
                <text:p text:style-name="P147">{</text:p>
              </text:list-item>
              <text:list-item>
                <text:p text:style-name="P147"><text:s text:c="4"/>if (m_serverHost == host) return;</text:p>
              </text:list-item>
              <text:list-item>
                <text:p text:style-name="P147"><text:s text:c="4"/>m_serverHost = host;</text:p>
              </text:list-item>
              <text:list-item>
                <text:p text:style-name="P147"><text:s text:c="4"/>emit serverHostChanged();</text:p>
              </text:list-item>
              <text:list-item>
                <text:p text:style-name="P147">}</text:p>
              </text:list-item>
              <text:list-item>
                <text:p text:style-name="P147">void Settings::setServerPort(int port)</text:p>
              </text:list-item>
              <text:list-item>
                <text:p text:style-name="P147">{</text:p>
              </text:list-item>
              <text:list-item>
                <text:p text:style-name="P147"><text:s text:c="4"/>if (m_serverPort == port) return;</text:p>
              </text:list-item>
              <text:list-item>
                <text:p text:style-name="P147"><text:s text:c="4"/>m_serverPort = port;</text:p>
              </text:list-item>
              <text:list-item>
                <text:p text:style-name="P147"><text:s text:c="4"/>emit serverPortChanged();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0">Листинг <text:sequence text:ref-name="refЛистинг8" text:name="Листинг" text:formula="ooow:Листинг+1" style:num-format="1">9</text:sequence><text:s/>— Файл <text:span text:style-name="T253">settings</text:span>.<text:span text:style-name="T253">h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list text:continue-numbering="true" text:style-name="Нумерация_20_строк_20_кода">
              <text:list-item text:start-value="1">
                <text:p text:style-name="P147">#ifndef SETTINGS_H</text:p>
              </text:list-item>
              <text:list-item>
                <text:p text:style-name="P147">#define SETTINGS_H</text:p>
              </text:list-item>
              <text:list-item>
                <text:p text:style-name="P147"/>
              </text:list-item>
              <text:list-item>
                <text:p text:style-name="P147">#include &lt;QObject&gt;</text:p>
              </text:list-item>
              <text:list-item>
                <text:p text:style-name="P147">#include &lt;QString&gt;</text:p>
              </text:list-item>
              <text:list-item>
                <text:p text:style-name="P147">#include "logs.h"</text:p>
              </text:list-item>
              <text:list-item>
                <text:p text:style-name="P147">#include "exceptions.h"</text:p>
              </text:list-item>
              <text:list-item>
                <text:p text:style-name="P147"/>
              </text:list-item>
              <text:list-item>
                <text:p text:style-name="P147">class Settings : public QObject</text:p>
              </text:list-item>
              <text:list-item>
                <text:p text:style-name="P147">{</text:p>
              </text:list-item>
              <text:list-item>
                <text:p text:style-name="P147"><text:s text:c="4"/>Q_OBJECT</text:p>
              </text:list-item>
              <text:list-item>
                <text:p text:style-name="P147"><text:s text:c="4"/>Q_PROPERTY(QString dbHost READ dbHost WRITE setDbHost NOTIFY dbHostChanged)</text:p>
              </text:list-item>
              <text:list-item>
                <text:p text:style-name="P147"><text:s text:c="4"/>Q_PROPERTY(int dbPort READ dbPort WRITE setDbPort NOTIFY dbPortChanged)</text:p>
              </text:list-item>
              <text:list-item>
                <text:p text:style-name="P147"><text:s text:c="4"/>Q_PROPERTY(QString dbName READ dbName WRITE setDbName NOTIFY dbNameChanged)</text:p>
              </text:list-item>
              <text:list-item>
                <text:p text:style-name="P147"><text:s text:c="4"/>Q_PROPERTY(QString dbUser READ dbUser WRITE setDbUser NOTIFY dbUserChanged)</text:p>
              </text:list-item>
              <text:list-item>
                <text:p text:style-name="P147"><text:s text:c="4"/>Q_PROPERTY(QString dbPassword READ dbPassword WRITE setDbPassword NOTIFY dbPasswordChanged)</text:p>
              </text:list-item>
              <text:list-item>
                <text:p text:style-name="P147"><text:s text:c="4"/>Q_PROPERTY(bool isServerMode READ isServerMode WRITE setIsServerMode NOTIFY isServerModeChanged)</text:p>
              </text:list-item>
              <text:list-item>
                <text:p text:style-name="P147"><text:soft-page-break/><text:s text:c="4"/>Q_PROPERTY(QString logPath READ logPath WRITE setLogPath NOTIFY logPathChanged)</text:p>
              </text:list-item>
              <text:list-item>
                <text:p text:style-name="P147"><text:s text:c="4"/>Q_PROPERTY(QString serverHost READ serverHost WRITE setServerHost NOTIFY serverHostChanged)</text:p>
              </text:list-item>
              <text:list-item>
                <text:p text:style-name="P147"><text:s text:c="4"/>Q_PROPERTY(int serverPort READ serverPort WRITE setServerPort NOTIFY serverPortChanged)</text:p>
              </text:list-item>
              <text:list-item>
                <text:p text:style-name="P147"/>
              </text:list-item>
              <text:list-item>
                <text:p text:style-name="P147">public:</text:p>
              </text:list-item>
              <text:list-item>
                <text:p text:style-name="P147"><text:s text:c="4"/>explicit Settings(Logs *logger, QObject *parent = nullptr);</text:p>
              </text:list-item>
              <text:list-item>
                <text:p text:style-name="P147"/>
              </text:list-item>
              <text:list-item>
                <text:p text:style-name="P147"><text:s text:c="4"/>QString dbHost() const { return m_dbHost; }</text:p>
              </text:list-item>
              <text:list-item>
                <text:p text:style-name="P147"><text:s text:c="4"/>void setDbHost(const QString &amp;host);</text:p>
              </text:list-item>
              <text:list-item>
                <text:p text:style-name="P147"/>
              </text:list-item>
              <text:list-item>
                <text:p text:style-name="P147"><text:s text:c="4"/>int dbPort() const { return m_dbPort; }</text:p>
              </text:list-item>
              <text:list-item>
                <text:p text:style-name="P147"><text:s text:c="4"/>void setDbPort(int port);</text:p>
              </text:list-item>
              <text:list-item>
                <text:p text:style-name="P147"/>
              </text:list-item>
              <text:list-item>
                <text:p text:style-name="P147"><text:s text:c="4"/>QString dbName() const { return m_dbName; }</text:p>
              </text:list-item>
              <text:list-item>
                <text:p text:style-name="P147"><text:s text:c="4"/>void setDbName(const QString &amp;name);</text:p>
              </text:list-item>
              <text:list-item>
                <text:p text:style-name="P147"/>
              </text:list-item>
              <text:list-item>
                <text:p text:style-name="P147"><text:s text:c="4"/>QString dbUser() const { return m_dbUser; }</text:p>
              </text:list-item>
              <text:list-item>
                <text:p text:style-name="P147"><text:s text:c="4"/>void setDbUser(const QString &amp;user);</text:p>
              </text:list-item>
              <text:list-item>
                <text:p text:style-name="P147"/>
              </text:list-item>
              <text:list-item>
                <text:p text:style-name="P147"><text:s text:c="4"/>QString dbPassword() const { return m_dbPassword; }</text:p>
              </text:list-item>
              <text:list-item>
                <text:p text:style-name="P147"><text:s text:c="4"/>void setDbPassword(const QString &amp;password);</text:p>
              </text:list-item>
              <text:list-item>
                <text:p text:style-name="P147"/>
              </text:list-item>
              <text:list-item>
                <text:p text:style-name="P147"><text:s text:c="4"/>bool isServerMode() const { return m_isServerMode; }</text:p>
              </text:list-item>
              <text:list-item>
                <text:p text:style-name="P147"><text:s text:c="4"/>void setIsServerMode(bool mode);</text:p>
              </text:list-item>
              <text:list-item>
                <text:p text:style-name="P147"/>
              </text:list-item>
              <text:list-item>
                <text:p text:style-name="P147"><text:s text:c="4"/>QString logPath() const { return m_logPath; }</text:p>
              </text:list-item>
              <text:list-item>
                <text:p text:style-name="P147"><text:s text:c="4"/>void setLogPath(const QString &amp;path);</text:p>
              </text:list-item>
              <text:list-item>
                <text:p text:style-name="P147"/>
              </text:list-item>
              <text:list-item>
                <text:p text:style-name="P147"><text:s text:c="4"/>QString serverHost() const { return m_serverHost; }</text:p>
              </text:list-item>
              <text:list-item>
                <text:p text:style-name="P147"><text:s text:c="4"/>void setServerHost(const QString &amp;host);</text:p>
              </text:list-item>
              <text:list-item>
                <text:p text:style-name="P147"><text:s text:c="4"/>int serverPort() const { return m_serverPort; }</text:p>
              </text:list-item>
              <text:list-item>
                <text:p text:style-name="P147"><text:s text:c="4"/>void setServerPort(int port);</text:p>
              </text:list-item>
              <text:list-item>
                <text:p text:style-name="P147"/>
              </text:list-item>
              <text:list-item>
                <text:p text:style-name="P147"><text:s text:c="4"/>Q_INVOKABLE void load();</text:p>
              </text:list-item>
              <text:list-item>
                <text:p text:style-name="P147"><text:soft-page-break/><text:s text:c="4"/>Q_INVOKABLE void save();</text:p>
              </text:list-item>
              <text:list-item>
                <text:p text:style-name="P147"/>
              </text:list-item>
              <text:list-item>
                <text:p text:style-name="P147">signals:</text:p>
              </text:list-item>
              <text:list-item>
                <text:p text:style-name="P147"><text:s text:c="4"/>void dbHostChanged();</text:p>
              </text:list-item>
              <text:list-item>
                <text:p text:style-name="P147"><text:s text:c="4"/>void dbPortChanged();</text:p>
              </text:list-item>
              <text:list-item>
                <text:p text:style-name="P147"><text:s text:c="4"/>void dbNameChanged();</text:p>
              </text:list-item>
              <text:list-item>
                <text:p text:style-name="P147"><text:s text:c="4"/>void dbUserChanged();</text:p>
              </text:list-item>
              <text:list-item>
                <text:p text:style-name="P147"><text:s text:c="4"/>void dbPasswordChanged();</text:p>
              </text:list-item>
              <text:list-item>
                <text:p text:style-name="P147"><text:s text:c="4"/>void isServerModeChanged();</text:p>
              </text:list-item>
              <text:list-item>
                <text:p text:style-name="P147"><text:s text:c="4"/>void logPathChanged();</text:p>
              </text:list-item>
              <text:list-item>
                <text:p text:style-name="P147"><text:s text:c="4"/>void serverHostChanged();</text:p>
              </text:list-item>
              <text:list-item>
                <text:p text:style-name="P147"><text:s text:c="4"/>void serverPortChanged()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QString m_dbHost;</text:p>
              </text:list-item>
              <text:list-item>
                <text:p text:style-name="P147"><text:s text:c="4"/>int m_dbPort;</text:p>
              </text:list-item>
              <text:list-item>
                <text:p text:style-name="P147"><text:s text:c="4"/>QString m_dbName;</text:p>
              </text:list-item>
              <text:list-item>
                <text:p text:style-name="P147"><text:s text:c="4"/>QString m_dbUser;</text:p>
              </text:list-item>
              <text:list-item>
                <text:p text:style-name="P147"><text:s text:c="4"/>QString m_dbPassword;</text:p>
              </text:list-item>
              <text:list-item>
                <text:p text:style-name="P147"><text:s text:c="4"/>bool m_isServerMode;</text:p>
              </text:list-item>
              <text:list-item>
                <text:p text:style-name="P147"><text:s text:c="4"/>QString m_logPath;</text:p>
              </text:list-item>
              <text:list-item>
                <text:p text:style-name="P147"><text:s text:c="4"/>Logs *loger;</text:p>
              </text:list-item>
              <text:list-item>
                <text:p text:style-name="P147"><text:s text:c="4"/>QString m_serverHost;</text:p>
              </text:list-item>
              <text:list-item>
                <text:p text:style-name="P147"><text:s text:c="4"/>int m_serverPort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#endif // SETTINGS_H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9" text:name="Листинг" text:formula="ooow:Листинг+1" style:num-format="1">10</text:sequence><text:s/>— Файл <text:span text:style-name="T254">tcpclient</text:span>.cpp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list text:continue-numbering="true" text:style-name="Нумерация_20_строк_20_кода">
              <text:list-item text:start-value="1">
                <text:p text:style-name="P147">#include "tcpclient.h"</text:p>
              </text:list-item>
              <text:list-item>
                <text:p text:style-name="P147">#include &lt;QEventLoop&gt;</text:p>
              </text:list-item>
              <text:list-item>
                <text:p text:style-name="P147">#include &lt;QJsonDocument&gt;</text:p>
              </text:list-item>
              <text:list-item>
                <text:p text:style-name="P147">#include &lt;QJsonObject&gt;</text:p>
              </text:list-item>
              <text:list-item>
                <text:p text:style-name="P147">#include &lt;QNetworkInterface&gt;</text:p>
              </text:list-item>
              <text:list-item>
                <text:p text:style-name="P147">#include &lt;QDebug&gt;</text:p>
              </text:list-item>
              <text:list-item>
                <text:p text:style-name="P147"><text:soft-page-break/>#include &lt;QCoreApplication&gt;</text:p>
              </text:list-item>
              <text:list-item>
                <text:p text:style-name="P147">#include &lt;QTimer&gt;</text:p>
              </text:list-item>
              <text:list-item>
                <text:p text:style-name="P147"/>
              </text:list-item>
              <text:list-item>
                <text:p text:style-name="P147">TcpClient::TcpClient(Logs *logger, QObject *parent)</text:p>
              </text:list-item>
              <text:list-item>
                <text:p text:style-name="P147"><text:s text:c="4"/>: QObject(parent), socket(nullptr), nextRequestId(1), userId(-1), loger(logger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создан"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TcpClient::~TcpClient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уничтожение");</text:p>
              </text:list-item>
              <text:list-item>
                <text:p text:style-name="P147"><text:s text:c="4"/>disconnectFromServer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connectToServer(const QString &amp;host, quint16 port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попытка подключения к " + host + ":" + QString::number(port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if (socket) disconnectFromServer();</text:p>
              </text:list-item>
              <text:list-item>
                <text:p text:style-name="P147"><text:s text:c="8"/>socket = new QTcpSocket(this);</text:p>
              </text:list-item>
              <text:list-item>
                <text:p text:style-name="P147"><text:s text:c="8"/>socket-&gt;connectToHost(host, port);</text:p>
              </text:list-item>
              <text:list-item>
                <text:p text:style-name="P147"><text:s text:c="8"/>if (!socket-&gt;waitForConnected(3000))</text:p>
              </text:list-item>
              <text:list-item>
                <text:p text:style-name="P147"><text:s text:c="12"/>throw NetworkEx("Ошибка подключения: " + socket-&gt;errorString());</text:p>
              </text:list-item>
              <text:list-item>
                <text:p text:style-name="P147"/>
              </text:list-item>
              <text:list-item>
                <text:p text:style-name="P147"><text:s text:c="8"/>loger-&gt;info("TcpClient: подключено к серверу");</text:p>
              </text:list-item>
              <text:list-item>
                <text:p text:style-name="P147"/>
              </text:list-item>
              <text:list-item>
                <text:p text:style-name="P147"><text:s text:c="8"/>connect(socket, &amp;QTcpSocket::disconnected, this, [this]() {</text:p>
              </text:list-item>
              <text:list-item>
                <text:p text:style-name="P147"><text:s text:c="12"/>loger-&gt;error("TcpClient: соединение с сервером разорвано");</text:p>
              </text:list-item>
              <text:list-item>
                <text:p text:style-name="P147"><text:s text:c="12"/>emit errorOccurred("Соединение с сервером потеряно. Проверьте сервер и перезапустите приложение.");</text:p>
              </text:list-item>
              <text:list-item>
                <text:p text:style-name="P147"><text:s text:c="8"/>});</text:p>
              </text:list-item>
              <text:list-item>
                <text:p text:style-name="P147"/>
              </text:list-item>
              <text:list-item>
                <text:p text:style-name="P147"><text:s text:c="8"/>connect(socket, &amp;QTcpSocket::readyRead, this, [this]() {</text:p>
              </text:list-item>
              <text:list-item>
                <text:p text:style-name="P147"><text:s text:c="12"/>QByteArray newData = socket-&gt;readAll();</text:p>
              </text:list-item>
              <text:list-item>
                <text:p text:style-name="P147"><text:s text:c="12"/>loger-&gt;info("TcpClient: получено " + QString::number(newData.size()) + " байт");</text:p>
              </text:list-item>
              <text:list-item>
                <text:p text:style-name="P147"><text:soft-page-break/><text:s text:c="12"/>buffer.append(newData);</text:p>
              </text:list-item>
              <text:list-item>
                <text:p text:style-name="P147"><text:s text:c="12"/>while (true) {</text:p>
              </text:list-item>
              <text:list-item>
                <text:p text:style-name="P147"><text:s text:c="16"/>int nl = buffer.indexOf('\n');</text:p>
              </text:list-item>
              <text:list-item>
                <text:p text:style-name="P147"><text:s text:c="16"/>if (nl == -1) break;</text:p>
              </text:list-item>
              <text:list-item>
                <text:p text:style-name="P147"><text:s text:c="16"/>QByteArray line = buffer.left(nl);</text:p>
              </text:list-item>
              <text:list-item>
                <text:p text:style-name="P147"><text:s text:c="16"/>buffer.remove(0, nl + 1);</text:p>
              </text:list-item>
              <text:list-item>
                <text:p text:style-name="P147"><text:s text:c="16"/>QJsonParseError err;</text:p>
              </text:list-item>
              <text:list-item>
                <text:p text:style-name="P147"><text:s text:c="16"/>QJsonDocument doc = QJsonDocument::fromJson(line, &amp;err);</text:p>
              </text:list-item>
              <text:list-item>
                <text:p text:style-name="P147"><text:s text:c="16"/>if (err.error != QJsonParseError::NoError) {</text:p>
              </text:list-item>
              <text:list-item>
                <text:p text:style-name="P147"><text:s text:c="20"/>loger-&gt;warning("TcpClient: ошибка парсинга JSON: " + err.errorString());</text:p>
              </text:list-item>
              <text:list-item>
                <text:p text:style-name="P147"><text:s text:c="20"/>continue;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if (!doc.isObject()) continue;</text:p>
              </text:list-item>
              <text:list-item>
                <text:p text:style-name="P147"><text:s text:c="16"/>QJsonObject obj = doc.object();</text:p>
              </text:list-item>
              <text:list-item>
                <text:p text:style-name="P147"><text:s text:c="16"/>if (obj.contains("response")) {</text:p>
              </text:list-item>
              <text:list-item>
                <text:p text:style-name="P147"><text:s text:c="20"/>int reqId = obj.value("requestId").toInt();</text:p>
              </text:list-item>
              <text:list-item>
                <text:p text:style-name="P147"><text:s text:c="20"/>bool success = obj.value("response").toBool();</text:p>
              </text:list-item>
              <text:list-item>
                <text:p text:style-name="P147"><text:s text:c="20"/>QVariantMap data = obj.value("data").toObject().toVariantMap();</text:p>
              </text:list-item>
              <text:list-item>
                <text:p text:style-name="P147"><text:s text:c="20"/>data["_success"] = success;</text:p>
              </text:list-item>
              <text:list-item>
                <text:p text:style-name="P147"><text:s text:c="20"/>pendingResponses[reqId] = data;</text:p>
              </text:list-item>
              <text:list-item>
                <text:p text:style-name="P147"><text:s text:c="20"/>emit responseReceived(reqId, success, data);</text:p>
              </text:list-item>
              <text:list-item>
                <text:p text:style-name="P147"><text:s text:c="20"/>loger-&gt;info("TcpClient: получен ответ на запрос " + QString::number(reqId) + ", успех=" + QString(success ? "true" : "false"));</text:p>
              </text:list-item>
              <text:list-item>
                <text:p text:style-name="P147"><text:s text:c="16"/>} else if (obj.contains("notification")) {</text:p>
              </text:list-item>
              <text:list-item>
                <text:p text:style-name="P147"><text:s text:c="20"/>QString type = obj.value("notification").toString();</text:p>
              </text:list-item>
              <text:list-item>
                <text:p text:style-name="P147"><text:s text:c="20"/>loger-&gt;info("TcpClient: получено уведомление: " + type);</text:p>
              </text:list-item>
              <text:list-item>
                <text:p text:style-name="P147"><text:s text:c="20"/>if (type == "data_changed")</text:p>
              </text:list-item>
              <text:list-item>
                <text:p text:style-name="P147"><text:s text:c="24"/>emit dataChanged();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);</text:p>
              </text:list-item>
              <text:list-item>
                <text:p text:style-name="P147"><text:s text:c="8"/>connect(socket, &amp;QTcpSocket::disconnected, this, &amp;TcpClient::disconnectFromServer);</text:p>
              </text:list-item>
              <text:list-item>
                <text:p text:style-name="P147"><text:s text:c="8"/>return true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connectToServer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oft-page-break/><text:s text:c="8"/>if (socket) {</text:p>
              </text:list-item>
              <text:list-item>
                <text:p text:style-name="P147"><text:s text:c="12"/>socket-&gt;deleteLater();</text:p>
              </text:list-item>
              <text:list-item>
                <text:p text:style-name="P147"><text:s text:c="12"/>socket = nullptr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connectToServer: неизвестная ошибка - ") + e.what());</text:p>
              </text:list-item>
              <text:list-item>
                <text:p text:style-name="P147"><text:s text:c="8"/>emit errorOccurred("Ошибка подключения к серверу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TcpClient::disconnectFromServer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отключение от сервера");</text:p>
              </text:list-item>
              <text:list-item>
                <text:p text:style-name="P147"><text:s text:c="4"/>if (socket) {</text:p>
              </text:list-item>
              <text:list-item>
                <text:p text:style-name="P147"><text:s text:c="8"/>socket-&gt;disconnectFromHost();</text:p>
              </text:list-item>
              <text:list-item>
                <text:p text:style-name="P147"><text:s text:c="8"/>socket-&gt;deleteLater();</text:p>
              </text:list-item>
              <text:list-item>
                <text:p text:style-name="P147"><text:s text:c="8"/>socket = nullptr;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buffer.clear();</text:p>
              </text:list-item>
              <text:list-item>
                <text:p text:style-name="P147"><text:s text:c="4"/>pendingResponses.clear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isConnected() const</text:p>
              </text:list-item>
              <text:list-item>
                <text:p text:style-name="P147">{</text:p>
              </text:list-item>
              <text:list-item>
                <text:p text:style-name="P147"><text:s text:c="4"/>return socket &amp;&amp; socket-&gt;state() == QAbstractSocket::ConnectedState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int TcpClient::sendRequest(const QString &amp;command, const QVariantMap &amp;data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отправка запроса '" + command + "'");</text:p>
              </text:list-item>
              <text:list-item>
                <text:p text:style-name="P147"><text:s text:c="4"/>if (!isConnected())</text:p>
              </text:list-item>
              <text:list-item>
                <text:p text:style-name="P147"><text:s text:c="8"/>throw NetworkEx("Нет соединения с сервером");</text:p>
              </text:list-item>
              <text:list-item>
                <text:p text:style-name="P147"/>
              </text:list-item>
              <text:list-item>
                <text:p text:style-name="P147"><text:s text:c="4"/>int reqId = nextRequestId++;</text:p>
              </text:list-item>
              <text:list-item>
                <text:p text:style-name="P147"><text:soft-page-break/><text:s text:c="4"/>QJsonObject obj;</text:p>
              </text:list-item>
              <text:list-item>
                <text:p text:style-name="P147"><text:s text:c="4"/>obj["command"] = command;</text:p>
              </text:list-item>
              <text:list-item>
                <text:p text:style-name="P147"><text:s text:c="4"/>obj["requestId"] = reqId;</text:p>
              </text:list-item>
              <text:list-item>
                <text:p text:style-name="P147"><text:s text:c="4"/>if (!data.isEmpty())</text:p>
              </text:list-item>
              <text:list-item>
                <text:p text:style-name="P147"><text:s text:c="8"/>obj["data"] = QJsonObject::fromVariantMap(data);</text:p>
              </text:list-item>
              <text:list-item>
                <text:p text:style-name="P147"><text:s text:c="4"/>QByteArray msg = QJsonDocument(obj).toJson(QJsonDocument::Compact) + "\n";</text:p>
              </text:list-item>
              <text:list-item>
                <text:p text:style-name="P147"><text:s text:c="4"/>qint64 bytes = socket-&gt;write(msg);</text:p>
              </text:list-item>
              <text:list-item>
                <text:p text:style-name="P147"><text:s text:c="4"/>if (bytes == -1)</text:p>
              </text:list-item>
              <text:list-item>
                <text:p text:style-name="P147"><text:s text:c="8"/>throw NetworkEx("Ошибка записи в сокет: " + socket-&gt;errorString());</text:p>
              </text:list-item>
              <text:list-item>
                <text:p text:style-name="P147"><text:s text:c="4"/>socket-&gt;flush();</text:p>
              </text:list-item>
              <text:list-item>
                <text:p text:style-name="P147"><text:s text:c="4"/>loger-&gt;info("TcpClient: запрос " + QString::number(reqId) + " отправлен, байт: " + QString::number(bytes));</text:p>
              </text:list-item>
              <text:list-item>
                <text:p text:style-name="P147"><text:s text:c="4"/>return reqId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waitForResponse(int requestId, QVariantMap &amp;resultData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 ожидание ответа на запрос " + QString::number(requestId));</text:p>
              </text:list-item>
              <text:list-item>
                <text:p text:style-name="P147"><text:s text:c="4"/>if (requestId == -1) return false;</text:p>
              </text:list-item>
              <text:list-item>
                <text:p text:style-name="P147"><text:s text:c="4"/>QEventLoop loop;</text:p>
              </text:list-item>
              <text:list-item>
                <text:p text:style-name="P147"><text:s text:c="4"/>QTimer timer;</text:p>
              </text:list-item>
              <text:list-item>
                <text:p text:style-name="P147"><text:s text:c="4"/>timer.setSingleShot(true);</text:p>
              </text:list-item>
              <text:list-item>
                <text:p text:style-name="P147"><text:s text:c="4"/>timer.start(60000);</text:p>
              </text:list-item>
              <text:list-item>
                <text:p text:style-name="P147"><text:s text:c="4"/>connect(this, &amp;TcpClient::responseReceived, &amp;loop, [&amp;](int id, bool, const QVariantMap&amp;) {</text:p>
              </text:list-item>
              <text:list-item>
                <text:p text:style-name="P147"><text:s text:c="8"/>if (id == requestId) loop.quit();</text:p>
              </text:list-item>
              <text:list-item>
                <text:p text:style-name="P147"><text:s text:c="4"/>});</text:p>
              </text:list-item>
              <text:list-item>
                <text:p text:style-name="P147"><text:s text:c="4"/>connect(&amp;timer, &amp;QTimer::timeout, &amp;loop, &amp;QEventLoop::quit);</text:p>
              </text:list-item>
              <text:list-item>
                <text:p text:style-name="P147"><text:s text:c="4"/>loop.exec();</text:p>
              </text:list-item>
              <text:list-item>
                <text:p text:style-name="P147"><text:s text:c="4"/>if (!timer.isActive()) {</text:p>
              </text:list-item>
              <text:list-item>
                <text:p text:style-name="P147"><text:s text:c="8"/>loger-&gt;error("TcpClient: таймаут ожидания ответа на запрос " + QString::number(requestId));</text:p>
              </text:list-item>
              <text:list-item>
                <text:p text:style-name="P147"><text:s text:c="8"/>throw NetworkEx("Таймаут ожидания ответа от сервера");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resultData = pendingResponses.take(requestId);</text:p>
              </text:list-item>
              <text:list-item>
                <text:p text:style-name="P147"><text:s text:c="4"/>bool success = resultData.value("_success").toBool();</text:p>
              </text:list-item>
              <text:list-item>
                <text:p text:style-name="P147"><text:s text:c="4"/>loger-&gt;info("TcpClient: получен ответ на запрос " + QString::number(requestId) + ", успех=" + QString::number(success));</text:p>
              </text:list-item>
              <text:list-item>
                <text:p text:style-name="P147"><text:s text:c="4"/>return success;</text:p>
              </text:list-item>
              <text:list-item>
                <text:p text:style-name="P147"><text:soft-page-break/>}</text:p>
              </text:list-item>
              <text:list-item>
                <text:p text:style-name="P147"/>
              </text:list-item>
              <text:list-item>
                <text:p text:style-name="P147">bool TcpClient::checkUser(const QString &amp;login, const QString &amp;password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checkUser: логин " + login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login"] = login;</text:p>
              </text:list-item>
              <text:list-item>
                <text:p text:style-name="P147"><text:s text:c="8"/>data["password"] = password;</text:p>
              </text:list-item>
              <text:list-item>
                <text:p text:style-name="P147"><text:s text:c="8"/>int reqId = sendRequest("checkUser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userRole = res["role"].toString();</text:p>
              </text:list-item>
              <text:list-item>
                <text:p text:style-name="P147"><text:s text:c="12"/>userName = res["name"].toString();</text:p>
              </text:list-item>
              <text:list-item>
                <text:p text:style-name="P147"><text:s text:c="12"/>userId = res["userId"].toInt();</text:p>
              </text:list-item>
              <text:list-item>
                <text:p text:style-name="P147"><text:s text:c="12"/>loger-&gt;info("TcpClient::checkUser: успешно, роль=" + userRole);</text:p>
              </text:list-item>
              <text:list-item>
                <text:p text:style-name="P147"><text:s text:c="12"/>return true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checkUser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checkUser: неизвестная ошибка - ") + e.what());</text:p>
              </text:list-item>
              <text:list-item>
                <text:p text:style-name="P147"><text:s text:c="8"/>emit errorOccurred("Ошибка связи с сервером при авторизации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String TcpClient::getUserName() const { return userName; }</text:p>
              </text:list-item>
              <text:list-item>
                <text:p text:style-name="P147">QString TcpClient::getUserRole() const { return userRole; }</text:p>
              </text:list-item>
              <text:list-item>
                <text:p text:style-name="P147">int TcpClient::getUserId() const { return userId; }</text:p>
              </text:list-item>
              <text:list-item>
                <text:p text:style-name="P147"/>
              </text:list-item>
              <text:list-item>
                <text:p text:style-name="P147">QVariantList TcpClient::getFoods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Foods");</text:p>
              </text:list-item>
              <text:list-item>
                <text:p text:style-name="P147"><text:soft-page-break/><text:s text:c="4"/>try {</text:p>
              </text:list-item>
              <text:list-item>
                <text:p text:style-name="P147"><text:s text:c="8"/>int reqId = sendRequest("getFoods"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QVariantList list = res["foods"].toList();</text:p>
              </text:list-item>
              <text:list-item>
                <text:p text:style-name="P147"><text:s text:c="12"/>loger-&gt;info("TcpClient::getFoods: получено " + QString::number(list.size()) + " блюд");</text:p>
              </text:list-item>
              <text:list-item>
                <text:p text:style-name="P147"><text:s text:c="12"/>return list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Foods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Foods: неизвестная ошибка - ") + e.what());</text:p>
              </text:list-item>
              <text:list-item>
                <text:p text:style-name="P147"><text:s text:c="8"/>emit errorOccurred("Ошибка получения меню с сервера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Products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Products"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int reqId = sendRequest("getProducts"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QVariantList list = res["products"].toList();</text:p>
              </text:list-item>
              <text:list-item>
                <text:p text:style-name="P147"><text:s text:c="12"/>loger-&gt;info("TcpClient::getProducts: получено " + QString::number(list.size()) + " продуктов");</text:p>
              </text:list-item>
              <text:list-item>
                <text:p text:style-name="P147"><text:s text:c="12"/>return list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Products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oft-page-break/><text:s text:c="4"/>} catch (const std::exception &amp;e) {</text:p>
              </text:list-item>
              <text:list-item>
                <text:p text:style-name="P147"><text:s text:c="8"/>loger-&gt;error(QString("getProducts: неизвестная ошибка - ") + e.what());</text:p>
              </text:list-item>
              <text:list-item>
                <text:p text:style-name="P147"><text:s text:c="8"/>emit errorOccurred("Ошибка получения списка продуктов с сервера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updateProductQuantity(int productId, int newQuantity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updateProductQuantity: id=" + QString::number(productId) + ", new=" + QString::number(newQuantity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productId"] = productId;</text:p>
              </text:list-item>
              <text:list-item>
                <text:p text:style-name="P147"><text:s text:c="8"/>data["newQuantity"] = newQuantity;</text:p>
              </text:list-item>
              <text:list-item>
                <text:p text:style-name="P147"><text:s text:c="8"/>int reqId = sendRequest("updateProductQuantity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return waitForResponse(reqId, res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updateProductQuantity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updateProductQuantity: неизвестная ошибка - ") + e.what());</text:p>
              </text:list-item>
              <text:list-item>
                <text:p text:style-name="P147"><text:s text:c="8"/>emit errorOccurred("Ошибка обновления количества продукта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addProductQuantity(int productId, int delta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addProductQuantity: id=" + QString::number(productId) + ", delta=" + QString::number(delta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productId"] = productId;</text:p>
              </text:list-item>
              <text:list-item>
                <text:p text:style-name="P147"><text:s text:c="8"/>data["delta"] = delta;</text:p>
              </text:list-item>
              <text:list-item>
                <text:p text:style-name="P147"><text:soft-page-break/><text:s text:c="8"/>int reqId = sendRequest("addProductQuantity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return waitForResponse(reqId, res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addProductQuantity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addProductQuantity: неизвестная ошибка - ") + e.what());</text:p>
              </text:list-item>
              <text:list-item>
                <text:p text:style-name="P147"><text:s text:c="8"/>emit errorOccurred("Ошибка изменения количества продукта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int TcpClient::createOrder(int tableNumber, int userId, const QString &amp;specialRequests, double totalCost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createOrder: table=" + QString::number(tableNumber) + ", user=" + QString::number(userId) + ", total=" + QString::number(totalCost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tableNumber"] = tableNumber;</text:p>
              </text:list-item>
              <text:list-item>
                <text:p text:style-name="P147"><text:s text:c="8"/>data["userId"] = userId;</text:p>
              </text:list-item>
              <text:list-item>
                <text:p text:style-name="P147"><text:s text:c="8"/>data["specialRequests"] = specialRequests;</text:p>
              </text:list-item>
              <text:list-item>
                <text:p text:style-name="P147"><text:s text:c="8"/>data["totalCost"] = totalCost;</text:p>
              </text:list-item>
              <text:list-item>
                <text:p text:style-name="P147"><text:s text:c="8"/>int reqId = sendRequest("createOrder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int orderId = res["orderId"].toInt();</text:p>
              </text:list-item>
              <text:list-item>
                <text:p text:style-name="P147"><text:s text:c="12"/>loger-&gt;info("TcpClient::createOrder: заказ создан, id=" + QString::number(orderId));</text:p>
              </text:list-item>
              <text:list-item>
                <text:p text:style-name="P147"><text:s text:c="12"/>return orderId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-1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createOrder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-1;</text:p>
              </text:list-item>
              <text:list-item>
                <text:p text:style-name="P147"><text:soft-page-break/><text:s text:c="4"/>} catch (const std::exception &amp;e) {</text:p>
              </text:list-item>
              <text:list-item>
                <text:p text:style-name="P147"><text:s text:c="8"/>loger-&gt;error(QString("createOrder: неизвестная ошибка - ") + e.what());</text:p>
              </text:list-item>
              <text:list-item>
                <text:p text:style-name="P147"><text:s text:c="8"/>emit errorOccurred("Ошибка создания заказа на сервере");</text:p>
              </text:list-item>
              <text:list-item>
                <text:p text:style-name="P147"><text:s text:c="8"/>return -1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addOrderItem(int orderId, int foodId, int quantity, double price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addOrderItem: order=" + QString::number(orderId) + ", food=" + QString::number(foodId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orderId"] = orderId;</text:p>
              </text:list-item>
              <text:list-item>
                <text:p text:style-name="P147"><text:s text:c="8"/>data["foodId"] = foodId;</text:p>
              </text:list-item>
              <text:list-item>
                <text:p text:style-name="P147"><text:s text:c="8"/>data["quantity"] = quantity;</text:p>
              </text:list-item>
              <text:list-item>
                <text:p text:style-name="P147"><text:s text:c="8"/>data["price"] = price;</text:p>
              </text:list-item>
              <text:list-item>
                <text:p text:style-name="P147"><text:s text:c="8"/>int reqId = sendRequest("addOrderItem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return waitForResponse(reqId, res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addOrderItem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addOrderItem: неизвестная ошибка - ") + e.what());</text:p>
              </text:list-item>
              <text:list-item>
                <text:p text:style-name="P147"><text:s text:c="8"/>emit errorOccurred("Ошибка добавления позиции заказа на сервере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checkAndConsume(int foodId, int quantity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checkAndConsume: food=" + QString::number(foodId) + ", qty=" + QString::number(quantity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oft-page-break/><text:s text:c="8"/>data["foodId"] = foodId;</text:p>
              </text:list-item>
              <text:list-item>
                <text:p text:style-name="P147"><text:s text:c="8"/>data["quantity"] = quantity;</text:p>
              </text:list-item>
              <text:list-item>
                <text:p text:style-name="P147"><text:s text:c="8"/>int reqId = sendRequest("checkAndConsume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return waitForResponse(reqId, res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checkAndConsume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checkAndConsume: неизвестная ошибка - ") + e.what());</text:p>
              </text:list-item>
              <text:list-item>
                <text:p text:style-name="P147"><text:s text:c="8"/>emit errorOccurred("Ошибка при проверке и списании продуктов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returnIngredients(int foodId, int quantity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returnIngredients: food=" + QString::number(foodId) + ", qty=" + QString::number(quantity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foodId"] = foodId;</text:p>
              </text:list-item>
              <text:list-item>
                <text:p text:style-name="P147"><text:s text:c="8"/>data["quantity"] = quantity;</text:p>
              </text:list-item>
              <text:list-item>
                <text:p text:style-name="P147"><text:s text:c="8"/>int reqId = sendRequest("returnIngredients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return waitForResponse(reqId, res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returnIngredients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returnIngredients: неизвестная ошибка - ") + e.what());</text:p>
              </text:list-item>
              <text:list-item>
                <text:p text:style-name="P147"><text:s text:c="8"/>emit errorOccurred("Ошибка при возврате продуктов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<text:soft-page-break/>}</text:p>
              </text:list-item>
              <text:list-item>
                <text:p text:style-name="P147"/>
              </text:list-item>
              <text:list-item>
                <text:p text:style-name="P147">QVariantList TcpClient::getLowStockWarning(int foodId, int quantity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LowStockWarning: food=" + QString::number(foodId) + ", qty=" + QString::number(quantity)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foodId"] = foodId;</text:p>
              </text:list-item>
              <text:list-item>
                <text:p text:style-name="P147"><text:s text:c="8"/>data["quantity"] = quantity;</text:p>
              </text:list-item>
              <text:list-item>
                <text:p text:style-name="P147"><text:s text:c="8"/>int reqId = sendRequest("getLowStockWarning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warnings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LowStockWarning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LowStockWarning: неизвестная ошибка - ") + e.what());</text:p>
              </text:list-item>
              <text:list-item>
                <text:p text:style-name="P147"><text:s text:c="8"/>emit errorOccurred("Ошибка получения предупреждения о малых остатках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Map TcpClient::getReportRevenue(const QString &amp;from, const QString &amp;to, int dishId, int tableNumber, int waiterId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ReportRevenue: " + from + " - " + to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from"] = from;</text:p>
              </text:list-item>
              <text:list-item>
                <text:p text:style-name="P147"><text:s text:c="8"/>data["to"] = to;</text:p>
              </text:list-item>
              <text:list-item>
                <text:p text:style-name="P147"><text:s text:c="8"/>data["dishId"] = dishId;</text:p>
              </text:list-item>
              <text:list-item>
                <text:p text:style-name="P147"><text:soft-page-break/><text:s text:c="8"/>data["tableNumber"] = tableNumber;</text:p>
              </text:list-item>
              <text:list-item>
                <text:p text:style-name="P147"><text:s text:c="8"/>data["waiterId"] = waiterId;</text:p>
              </text:list-item>
              <text:list-item>
                <text:p text:style-name="P147"><text:s text:c="8"/>int reqId = sendRequest("getReportRevenue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Map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ReportRevenue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Map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ReportRevenue: неизвестная ошибка - ") + e.what());</text:p>
              </text:list-item>
              <text:list-item>
                <text:p text:style-name="P147"><text:s text:c="8"/>emit errorOccurred("Ошибка получения отчёта о выручке");</text:p>
              </text:list-item>
              <text:list-item>
                <text:p text:style-name="P147"><text:s text:c="8"/>return QVariantMap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RevenueByDay(const QString &amp;from, const QString &amp;to, int dishId, int tableNumber, int waiterId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RevenueByDay: " + from + " - " + to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from"] = from;</text:p>
              </text:list-item>
              <text:list-item>
                <text:p text:style-name="P147"><text:s text:c="8"/>data["to"] = to;</text:p>
              </text:list-item>
              <text:list-item>
                <text:p text:style-name="P147"><text:s text:c="8"/>data["dishId"] = dishId;</text:p>
              </text:list-item>
              <text:list-item>
                <text:p text:style-name="P147"><text:s text:c="8"/>data["tableNumber"] = tableNumber;</text:p>
              </text:list-item>
              <text:list-item>
                <text:p text:style-name="P147"><text:s text:c="8"/>data["waiterId"] = waiterId;</text:p>
              </text:list-item>
              <text:list-item>
                <text:p text:style-name="P147"><text:s text:c="8"/>int reqId = sendRequest("getRevenueByDay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days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oft-page-break/><text:s text:c="8"/>loger-&gt;error(QString("getRevenueByDay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RevenueByDay: неизвестная ошибка - ") + e.what());</text:p>
              </text:list-item>
              <text:list-item>
                <text:p text:style-name="P147"><text:s text:c="8"/>emit errorOccurred("Ошибка получения выручки по дням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FoodPopularity(const QString &amp;from, const QString &amp;to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FoodPopularity: " + from + " - " + to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QVariantMap data;</text:p>
              </text:list-item>
              <text:list-item>
                <text:p text:style-name="P147"><text:s text:c="8"/>data["from"] = from;</text:p>
              </text:list-item>
              <text:list-item>
                <text:p text:style-name="P147"><text:s text:c="8"/>data["to"] = to;</text:p>
              </text:list-item>
              <text:list-item>
                <text:p text:style-name="P147"><text:s text:c="8"/>int reqId = sendRequest("getFoodPopularity", data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popularity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FoodPopularity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FoodPopularity: неизвестная ошибка - ") + e.what());</text:p>
              </text:list-item>
              <text:list-item>
                <text:p text:style-name="P147"><text:s text:c="8"/>emit errorOccurred("Ошибка получения популярности блюд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ReportLowStock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ReportLowStock");</text:p>
              </text:list-item>
              <text:list-item>
                <text:p text:style-name="P147"><text:soft-page-break/><text:s text:c="4"/>try {</text:p>
              </text:list-item>
              <text:list-item>
                <text:p text:style-name="P147"><text:s text:c="8"/>int reqId = sendRequest("getReportLowStock"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lowStock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ReportLowStock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ReportLowStock: неизвестная ошибка - ") + e.what());</text:p>
              </text:list-item>
              <text:list-item>
                <text:p text:style-name="P147"><text:s text:c="8"/>emit errorOccurred("Ошибка получения отчёта о малых остатках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DishesList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DishesList"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int reqId = sendRequest("getDishesList"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dishes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DishesList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DishesList: неизвестная ошибка - ") + e.what());</text:p>
              </text:list-item>
              <text:list-item>
                <text:p text:style-name="P147"><text:s text:c="8"/>emit errorOccurred("Ошибка получения списка блюд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oft-page-break/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VariantList TcpClient::getWaitersList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WaitersList");</text:p>
              </text:list-item>
              <text:list-item>
                <text:p text:style-name="P147"><text:s text:c="4"/>try {</text:p>
              </text:list-item>
              <text:list-item>
                <text:p text:style-name="P147"><text:s text:c="8"/>int reqId = sendRequest("getWaitersList");</text:p>
              </text:list-item>
              <text:list-item>
                <text:p text:style-name="P147"><text:s text:c="8"/>QVariantMap res;</text:p>
              </text:list-item>
              <text:list-item>
                <text:p text:style-name="P147"><text:s text:c="8"/>if (waitForResponse(reqId, res)) {</text:p>
              </text:list-item>
              <text:list-item>
                <text:p text:style-name="P147"><text:s text:c="12"/>return res["waiters"].toList();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NetworkEx &amp;e) {</text:p>
              </text:list-item>
              <text:list-item>
                <text:p text:style-name="P147"><text:s text:c="8"/>loger-&gt;error(QString("getWaitersList: ") + e.what());</text:p>
              </text:list-item>
              <text:list-item>
                <text:p text:style-name="P147"><text:s text:c="8"/>emit errorOccurred(e.what()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 catch (const std::exception &amp;e) {</text:p>
              </text:list-item>
              <text:list-item>
                <text:p text:style-name="P147"><text:s text:c="8"/>loger-&gt;error(QString("getWaitersList: неизвестная ошибка - ") + e.what());</text:p>
              </text:list-item>
              <text:list-item>
                <text:p text:style-name="P147"><text:s text:c="8"/>emit errorOccurred("Ошибка получения списка официантов");</text:p>
              </text:list-item>
              <text:list-item>
                <text:p text:style-name="P147"><text:s text:c="8"/>return QVariantList();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QStringList TcpClient::getLocalIps(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getLocalIps");</text:p>
              </text:list-item>
              <text:list-item>
                <text:p text:style-name="P147"><text:s text:c="4"/>QStringList result;</text:p>
              </text:list-item>
              <text:list-item>
                <text:p text:style-name="P147"><text:s text:c="4"/>const QList&lt;QNetworkInterface&gt; ifaces = QNetworkInterface::allInterfaces();</text:p>
              </text:list-item>
              <text:list-item>
                <text:p text:style-name="P147"><text:s text:c="4"/>for (const QNetworkInterface &amp;iface : ifaces) {</text:p>
              </text:list-item>
              <text:list-item>
                <text:p text:style-name="P147"><text:s text:c="8"/>if (!(iface.flags() &amp; QNetworkInterface::IsUp) || (iface.flags() &amp; QNetworkInterface::IsLoopBack))</text:p>
              </text:list-item>
              <text:list-item>
                <text:p text:style-name="P147"><text:s text:c="12"/>continue;</text:p>
              </text:list-item>
              <text:list-item>
                <text:p text:style-name="P147"><text:s text:c="8"/>for (const QNetworkAddressEntry &amp;entry : iface.addressEntries()) {</text:p>
              </text:list-item>
              <text:list-item>
                <text:p text:style-name="P147"><text:s text:c="12"/>if (entry.ip().protocol() == QAbstractSocket::IPv4Protocol)</text:p>
              </text:list-item>
              <text:list-item>
                <text:p text:style-name="P147"><text:s text:c="16"/>result &lt;&lt; entry.ip().toString();</text:p>
              </text:list-item>
              <text:list-item>
                <text:p text:style-name="P147"><text:soft-page-break/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loger-&gt;info("TcpClient::getLocalIps: найдено " + QString::number(result.size()) + " IP");</text:p>
              </text:list-item>
              <text:list-item>
                <text:p text:style-name="P147"><text:s text:c="4"/>return result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pingServer(const QString &amp;host, int port)</text:p>
              </text:list-item>
              <text:list-item>
                <text:p text:style-name="P147">{</text:p>
              </text:list-item>
              <text:list-item>
                <text:p text:style-name="P147"><text:s text:c="4"/>loger-&gt;info("TcpClient::pingServer: проверка " + host + ":" + QString::number(port));</text:p>
              </text:list-item>
              <text:list-item>
                <text:p text:style-name="P147"><text:s text:c="4"/>QTcpSocket socket;</text:p>
              </text:list-item>
              <text:list-item>
                <text:p text:style-name="P147"><text:s text:c="4"/>socket.connectToHost(host, port);</text:p>
              </text:list-item>
              <text:list-item>
                <text:p text:style-name="P147"><text:s text:c="4"/>bool ok = socket.waitForConnected(2000);</text:p>
              </text:list-item>
              <text:list-item>
                <text:p text:style-name="P147"><text:s text:c="4"/>loger-&gt;info("TcpClient::pingServer: результат " + QString(ok ? "успех" : "неудача"));</text:p>
              </text:list-item>
              <text:list-item>
                <text:p text:style-name="P147"><text:s text:c="4"/>return ok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Client::reconnect(const QString &amp;host, quint16 port)</text:p>
              </text:list-item>
              <text:list-item>
                <text:p text:style-name="P147">{</text:p>
              </text:list-item>
              <text:list-item>
                <text:p text:style-name="P147"><text:s text:c="4"/>disconnectFromServer();</text:p>
              </text:list-item>
              <text:list-item>
                <text:p text:style-name="P147"><text:s text:c="4"/>return connectToServer(host, port);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1">Листинг <text:sequence text:ref-name="refЛистинг10" text:name="Листинг" text:formula="ooow:Листинг+1" style:num-format="1">11</text:sequence><text:s/>— Файл <text:span text:style-name="T254">tcpclient</text:span>.<text:span text:style-name="T254">h</text:span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list text:continue-numbering="true" text:style-name="Нумерация_20_строк_20_кода">
              <text:list-item text:start-value="1">
                <text:p text:style-name="P147">#ifndef TCPCLIENT_H</text:p>
              </text:list-item>
              <text:list-item>
                <text:p text:style-name="P147">#define TCPCLIENT_H</text:p>
              </text:list-item>
              <text:list-item>
                <text:p text:style-name="P147"/>
              </text:list-item>
              <text:list-item>
                <text:p text:style-name="P147">#include &lt;QObject&gt;</text:p>
              </text:list-item>
              <text:list-item>
                <text:p text:style-name="P147">#include &lt;QTcpSocket&gt;</text:p>
              </text:list-item>
              <text:list-item>
                <text:p text:style-name="P147">#include &lt;QVariantList&gt;</text:p>
              </text:list-item>
              <text:list-item>
                <text:p text:style-name="P147">#include &lt;QVariantMap&gt;</text:p>
              </text:list-item>
              <text:list-item>
                <text:p text:style-name="P147">#include "logs.h"</text:p>
              </text:list-item>
              <text:list-item>
                <text:p text:style-name="P147">#include "exceptions.h"</text:p>
              </text:list-item>
              <text:list-item>
                <text:p text:style-name="P147"/>
              </text:list-item>
              <text:list-item>
                <text:p text:style-name="P147">class TcpClient : public QObject</text:p>
              </text:list-item>
              <text:list-item>
                <text:p text:style-name="P147">{</text:p>
              </text:list-item>
              <text:list-item>
                <text:p text:style-name="P147"><text:soft-page-break/><text:s text:c="4"/>Q_OBJECT</text:p>
              </text:list-item>
              <text:list-item>
                <text:p text:style-name="P147">public:</text:p>
              </text:list-item>
              <text:list-item>
                <text:p text:style-name="P147"><text:s text:c="4"/>explicit TcpClient(Logs *logger, QObject *parent = nullptr);</text:p>
              </text:list-item>
              <text:list-item>
                <text:p text:style-name="P147"><text:s text:c="4"/>~TcpClient();</text:p>
              </text:list-item>
              <text:list-item>
                <text:p text:style-name="P147"/>
              </text:list-item>
              <text:list-item>
                <text:p text:style-name="P147"><text:s text:c="4"/>bool connectToServer(const QString &amp;host, quint16 port);</text:p>
              </text:list-item>
              <text:list-item>
                <text:p text:style-name="P147"><text:s text:c="4"/>void disconnectFromServer();</text:p>
              </text:list-item>
              <text:list-item>
                <text:p text:style-name="P147"><text:s text:c="4"/>bool isConnected() const;</text:p>
              </text:list-item>
              <text:list-item>
                <text:p text:style-name="P147"/>
              </text:list-item>
              <text:list-item>
                <text:p text:style-name="P147"><text:s text:c="4"/>Q_INVOKABLE bool checkUser(const QString &amp;login, const QString &amp;password);</text:p>
              </text:list-item>
              <text:list-item>
                <text:p text:style-name="P147"><text:s text:c="4"/>Q_INVOKABLE QString getUserName() const;</text:p>
              </text:list-item>
              <text:list-item>
                <text:p text:style-name="P147"><text:s text:c="4"/>Q_INVOKABLE QString getUserRole() const;</text:p>
              </text:list-item>
              <text:list-item>
                <text:p text:style-name="P147"><text:s text:c="4"/>Q_INVOKABLE int getUserId() const;</text:p>
              </text:list-item>
              <text:list-item>
                <text:p text:style-name="P147"><text:s text:c="4"/>Q_INVOKABLE QVariantList getFoods();</text:p>
              </text:list-item>
              <text:list-item>
                <text:p text:style-name="P147"><text:s text:c="4"/>Q_INVOKABLE QVariantList getProducts();</text:p>
              </text:list-item>
              <text:list-item>
                <text:p text:style-name="P147"><text:s text:c="4"/>Q_INVOKABLE bool updateProductQuantity(int productId, int newQuantity);</text:p>
              </text:list-item>
              <text:list-item>
                <text:p text:style-name="P147"><text:s text:c="4"/>Q_INVOKABLE bool addProductQuantity(int productId, int delta);</text:p>
              </text:list-item>
              <text:list-item>
                <text:p text:style-name="P147"><text:s text:c="4"/>Q_INVOKABLE int createOrder(int tableNumber, int userId, const QString &amp;specialRequests, double totalCost);</text:p>
              </text:list-item>
              <text:list-item>
                <text:p text:style-name="P147"><text:s text:c="4"/>Q_INVOKABLE bool addOrderItem(int orderId, int foodId, int quantity, double price);</text:p>
              </text:list-item>
              <text:list-item>
                <text:p text:style-name="P147"><text:s text:c="4"/>Q_INVOKABLE bool checkAndConsume(int foodId, int quantity);</text:p>
              </text:list-item>
              <text:list-item>
                <text:p text:style-name="P147"><text:s text:c="4"/>Q_INVOKABLE bool returnIngredients(int foodId, int quantity);</text:p>
              </text:list-item>
              <text:list-item>
                <text:p text:style-name="P147"><text:s text:c="4"/>Q_INVOKABLE QVariantList getLowStockWarning(int foodId, int quantity);</text:p>
              </text:list-item>
              <text:list-item>
                <text:p text:style-name="P147"><text:s text:c="4"/>Q_INVOKABLE QVariantMap getReportRevenue(const QString &amp;from, const QString &amp;to, int dishId, int tableNumber, int waiterId);</text:p>
              </text:list-item>
              <text:list-item>
                <text:p text:style-name="P147"><text:s text:c="4"/>Q_INVOKABLE QVariantList getRevenueByDay(const QString &amp;from, const QString &amp;to, int dishId, int tableNumber, int waiterId);</text:p>
              </text:list-item>
              <text:list-item>
                <text:p text:style-name="P147"><text:s text:c="4"/>Q_INVOKABLE QVariantList getFoodPopularity(const QString &amp;from, const QString &amp;to);</text:p>
              </text:list-item>
              <text:list-item>
                <text:p text:style-name="P147"><text:s text:c="4"/>Q_INVOKABLE QVariantList getReportLowStock();</text:p>
              </text:list-item>
              <text:list-item>
                <text:p text:style-name="P147"><text:s text:c="4"/>Q_INVOKABLE QVariantList getDishesList();</text:p>
              </text:list-item>
              <text:list-item>
                <text:p text:style-name="P147"><text:s text:c="4"/>Q_INVOKABLE QVariantList getWaitersList();</text:p>
              </text:list-item>
              <text:list-item>
                <text:p text:style-name="P147"><text:s text:c="4"/>Q_INVOKABLE QStringList getLocalIps();</text:p>
              </text:list-item>
              <text:list-item>
                <text:p text:style-name="P147"><text:s text:c="4"/>Q_INVOKABLE bool pingServer(const QString &amp;host, int port);</text:p>
              </text:list-item>
              <text:list-item>
                <text:p text:style-name="P147"><text:s text:c="4"/>Q_INVOKABLE bool reconnect(const QString &amp;host, quint16 port);</text:p>
              </text:list-item>
              <text:list-item>
                <text:p text:style-name="P147"/>
              </text:list-item>
              <text:list-item>
                <text:p text:style-name="P147">signals:</text:p>
              </text:list-item>
              <text:list-item>
                <text:p text:style-name="P147"><text:soft-page-break/><text:s text:c="4"/>void errorOccurred(const QString &amp;message);</text:p>
              </text:list-item>
              <text:list-item>
                <text:p text:style-name="P147"><text:s text:c="4"/>void dataChanged();</text:p>
              </text:list-item>
              <text:list-item>
                <text:p text:style-name="P147"><text:s text:c="4"/>void responseReceived(int requestId, bool success, const QVariantMap &amp;data)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int sendRequest(const QString &amp;command, const QVariantMap &amp;data = QVariantMap());</text:p>
              </text:list-item>
              <text:list-item>
                <text:p text:style-name="P147"><text:s text:c="4"/>bool waitForResponse(int requestId, QVariantMap &amp;resultData);</text:p>
              </text:list-item>
              <text:list-item>
                <text:p text:style-name="P147"/>
              </text:list-item>
              <text:list-item>
                <text:p text:style-name="P147"><text:s text:c="4"/>QTcpSocket *socket;</text:p>
              </text:list-item>
              <text:list-item>
                <text:p text:style-name="P147"><text:s text:c="4"/>QByteArray buffer;</text:p>
              </text:list-item>
              <text:list-item>
                <text:p text:style-name="P147"><text:s text:c="4"/>int nextRequestId;</text:p>
              </text:list-item>
              <text:list-item>
                <text:p text:style-name="P147"><text:s text:c="4"/>QMap&lt;int, QVariantMap&gt; pendingResponses;</text:p>
              </text:list-item>
              <text:list-item>
                <text:p text:style-name="P147"/>
              </text:list-item>
              <text:list-item>
                <text:p text:style-name="P147"><text:s text:c="4"/>QString userName;</text:p>
              </text:list-item>
              <text:list-item>
                <text:p text:style-name="P147"><text:s text:c="4"/>QString userRole;</text:p>
              </text:list-item>
              <text:list-item>
                <text:p text:style-name="P147"><text:s text:c="4"/>int userId;</text:p>
              </text:list-item>
              <text:list-item>
                <text:p text:style-name="P147"><text:s text:c="4"/>Logs *loger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#endif // TCPCLIENT_H</text:p>
              </text:list-item>
            </text:list>
          </table:table-cell>
        </table:table-row>
      </table:table>
      <text:p text:style-name="P148"/>
      <text:p text:style-name="P149">Листинг <text:sequence text:ref-name="refЛистинг11" text:name="Листинг" text:formula="ooow:Листинг+1" style:num-format="1">12</text:sequence><text:s/>— Файл <text:span text:style-name="T255">tcpserver</text:span>.cpp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list text:continue-numbering="true" text:style-name="Нумерация_20_строк_20_кода">
              <text:list-item text:start-value="1">
                <text:p text:style-name="P147">#include "tcpserver.h"</text:p>
              </text:list-item>
              <text:list-item>
                <text:p text:style-name="P147">#include "dbworker.h"</text:p>
              </text:list-item>
              <text:list-item>
                <text:p text:style-name="P147">#include &lt;QJsonDocument&gt;</text:p>
              </text:list-item>
              <text:list-item>
                <text:p text:style-name="P147">#include &lt;QJsonObject&gt;</text:p>
              </text:list-item>
              <text:list-item>
                <text:p text:style-name="P147">#include &lt;QDebug&gt;</text:p>
              </text:list-item>
              <text:list-item>
                <text:p text:style-name="P147"/>
              </text:list-item>
              <text:list-item>
                <text:p text:style-name="P147">ClientConnection::ClientConnection(Logs *logger, qintptr socketDescriptor, DBWorker *dbWorker, QObject *parent)</text:p>
              </text:list-item>
              <text:list-item>
                <text:p text:style-name="P147"><text:s text:c="4"/>: QObject(parent), dbWorker(dbWorker), loger(logger)</text:p>
              </text:list-item>
              <text:list-item>
                <text:p text:style-name="P147">{</text:p>
              </text:list-item>
              <text:list-item>
                <text:p text:style-name="P147"><text:s text:c="4"/>socket = new QTcpSocket(this);</text:p>
              </text:list-item>
              <text:list-item>
                <text:p text:style-name="P147"><text:s text:c="4"/>socket-&gt;setSocketDescriptor(socketDescriptor);</text:p>
              </text:list-item>
              <text:list-item>
                <text:p text:style-name="P147"><text:s text:c="4"/>connect(socket, &amp;QTcpSocket::readyRead, this, &amp;ClientConnection::onReadyRead);</text:p>
              </text:list-item>
              <text:list-item>
                <text:p text:style-name="P147"><text:soft-page-break/><text:s text:c="4"/>connect(socket, &amp;QTcpSocket::disconnected, this, &amp;ClientConnection::onDisconnected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ClientConnection::~ClientConnection()</text:p>
              </text:list-item>
              <text:list-item>
                <text:p text:style-name="P147">{</text:p>
              </text:list-item>
              <text:list-item>
                <text:p text:style-name="P147"><text:s text:c="4"/>socket-&gt;deleteLater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ClientConnection::sendResponse(int requestId, bool success, const QVariantMap &amp;data)</text:p>
              </text:list-item>
              <text:list-item>
                <text:p text:style-name="P147">{</text:p>
              </text:list-item>
              <text:list-item>
                <text:p text:style-name="P147"><text:s text:c="4"/>QJsonObject resp;</text:p>
              </text:list-item>
              <text:list-item>
                <text:p text:style-name="P147"><text:s text:c="4"/>resp["response"] = success;</text:p>
              </text:list-item>
              <text:list-item>
                <text:p text:style-name="P147"><text:s text:c="4"/>resp["requestId"] = requestId;</text:p>
              </text:list-item>
              <text:list-item>
                <text:p text:style-name="P147"><text:s text:c="4"/>if (!data.isEmpty())</text:p>
              </text:list-item>
              <text:list-item>
                <text:p text:style-name="P147"><text:s text:c="8"/>resp["data"] = QJsonObject::fromVariantMap(data);</text:p>
              </text:list-item>
              <text:list-item>
                <text:p text:style-name="P147"><text:s text:c="4"/>QByteArray msg = QJsonDocument(resp).toJson(QJsonDocument::Compact) + "\n";</text:p>
              </text:list-item>
              <text:list-item>
                <text:p text:style-name="P147"><text:s text:c="4"/>qint64 bytes = socket-&gt;write(msg);</text:p>
              </text:list-item>
              <text:list-item>
                <text:p text:style-name="P147"><text:s text:c="4"/>socket-&gt;flush();</text:p>
              </text:list-item>
              <text:list-item>
                <text:p text:style-name="P147"><text:s text:c="4"/>loger-&gt;info("ClientConnection: отправлен ответ на запрос " + QString::number(requestId) +</text:p>
              </text:list-item>
              <text:list-item>
                <text:p text:style-name="P147"><text:s text:c="16"/>", успех=" + QString::number(success) + ", байт=" + QString::number(bytes)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ClientConnection::onReadyRead()</text:p>
              </text:list-item>
              <text:list-item>
                <text:p text:style-name="P147">{</text:p>
              </text:list-item>
              <text:list-item>
                <text:p text:style-name="P147"><text:s text:c="4"/>QByteArray data = socket-&gt;readAll();</text:p>
              </text:list-item>
              <text:list-item>
                <text:p text:style-name="P147"><text:s text:c="4"/>loger-&gt;info("ClientConnection: получено " + QString::number(data.size()) + " байт");</text:p>
              </text:list-item>
              <text:list-item>
                <text:p text:style-name="P147"><text:s text:c="4"/>buffer.append(data);</text:p>
              </text:list-item>
              <text:list-item>
                <text:p text:style-name="P147"><text:s text:c="4"/>while (true) {</text:p>
              </text:list-item>
              <text:list-item>
                <text:p text:style-name="P147"><text:s text:c="8"/>int nl = buffer.indexOf('\n');</text:p>
              </text:list-item>
              <text:list-item>
                <text:p text:style-name="P147"><text:s text:c="8"/>if (nl == -1) break;</text:p>
              </text:list-item>
              <text:list-item>
                <text:p text:style-name="P147"><text:s text:c="8"/>QByteArray line = buffer.left(nl);</text:p>
              </text:list-item>
              <text:list-item>
                <text:p text:style-name="P147"><text:s text:c="8"/>buffer.remove(0, nl + 1);</text:p>
              </text:list-item>
              <text:list-item>
                <text:p text:style-name="P147"><text:s text:c="8"/>QJsonParseError err;</text:p>
              </text:list-item>
              <text:list-item>
                <text:p text:style-name="P147"><text:s text:c="8"/>QJsonDocument doc = QJsonDocument::fromJson(line, &amp;err);</text:p>
              </text:list-item>
              <text:list-item>
                <text:p text:style-name="P147"><text:s text:c="8"/>if (err.error != QJsonParseError::NoError) continue;</text:p>
              </text:list-item>
              <text:list-item>
                <text:p text:style-name="P147"><text:s text:c="8"/>if (!doc.isObject()) continue;</text:p>
              </text:list-item>
              <text:list-item>
                <text:p text:style-name="P147"><text:soft-page-break/><text:s text:c="8"/>QJsonObject obj = doc.object();</text:p>
              </text:list-item>
              <text:list-item>
                <text:p text:style-name="P147"><text:s text:c="8"/>int requestId = obj.value("requestId").toInt();</text:p>
              </text:list-item>
              <text:list-item>
                <text:p text:style-name="P147"><text:s text:c="8"/>QString command = obj.value("command").toString();</text:p>
              </text:list-item>
              <text:list-item>
                <text:p text:style-name="P147"><text:s text:c="8"/>QVariantMap data = obj.value("data").toObject().toVariantMap();</text:p>
              </text:list-item>
              <text:list-item>
                <text:p text:style-name="P147"/>
              </text:list-item>
              <text:list-item>
                <text:p text:style-name="P147"><text:s text:c="8"/>if (command == "checkUser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checkUser(data["login"].toString(), data["password"].toString());</text:p>
              </text:list-item>
              <text:list-item>
                <text:p text:style-name="P147"><text:s text:c="16"/>if (ok) {</text:p>
              </text:list-item>
              <text:list-item>
                <text:p text:style-name="P147"><text:s text:c="20"/>QVariantMap result;</text:p>
              </text:list-item>
              <text:list-item>
                <text:p text:style-name="P147"><text:s text:c="20"/>result["role"] = dbWorker-&gt;getUserRole();</text:p>
              </text:list-item>
              <text:list-item>
                <text:p text:style-name="P147"><text:s text:c="20"/>result["name"] = dbWorker-&gt;getUserName();</text:p>
              </text:list-item>
              <text:list-item>
                <text:p text:style-name="P147"><text:s text:c="20"/>result["userId"] = dbWorker-&gt;getUserId();</text:p>
              </text:list-item>
              <text:list-item>
                <text:p text:style-name="P147"><text:s text:c="20"/>sendResponse(requestId, true, result);</text:p>
              </text:list-item>
              <text:list-item>
                <text:p text:style-name="P147"><text:s text:c="16"/>} else {</text:p>
              </text:list-item>
              <text:list-item>
                <text:p text:style-name="P147"><text:s text:c="20"/>sendResponse(requestId, false);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checkUser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Foods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foods = dbWorker-&gt;getFoods();</text:p>
              </text:list-item>
              <text:list-item>
                <text:p text:style-name="P147"><text:s text:c="16"/>sendResponse(requestId, true, {{"foods", food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Foods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Products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products = dbWorker-&gt;getProducts();</text:p>
              </text:list-item>
              <text:list-item>
                <text:p text:style-name="P147"><text:s text:c="16"/>sendResponse(requestId, true, {{"products", product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oft-page-break/><text:s text:c="16"/>loger-&gt;error("Исключение в getProducts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updateProductQuantity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updateProductQuantity(data["productId"].toInt(), data["newQuantity"].toInt());</text:p>
              </text:list-item>
              <text:list-item>
                <text:p text:style-name="P147"><text:s text:c="16"/>sendResponse(requestId, ok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updateProductQuantity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addProductQuantity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addProductQuantity(data["productId"].toInt(), data["delta"].toInt());</text:p>
              </text:list-item>
              <text:list-item>
                <text:p text:style-name="P147"><text:s text:c="16"/>sendResponse(requestId, ok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addProductQuantity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createOrder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int orderId = dbWorker-&gt;createOrder(data["tableNumber"].toInt(), data["userId"].toInt(),</text:p>
              </text:list-item>
              <text:list-item>
                <text:p text:style-name="P147"><text:s text:c="52"/>data["specialRequests"].toString(), data["totalCost"].toDouble());</text:p>
              </text:list-item>
              <text:list-item>
                <text:p text:style-name="P147"><text:s text:c="16"/>if (orderId &gt; 0) {</text:p>
              </text:list-item>
              <text:list-item>
                <text:p text:style-name="P147"><text:s text:c="20"/>sendResponse(requestId, true, {{"orderId", orderId}});</text:p>
              </text:list-item>
              <text:list-item>
                <text:p text:style-name="P147"><text:s text:c="16"/>} else {</text:p>
              </text:list-item>
              <text:list-item>
                <text:p text:style-name="P147"><text:s text:c="20"/>sendResponse(requestId, false);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createOrder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oft-page-break/><text:s text:c="8"/>}</text:p>
              </text:list-item>
              <text:list-item>
                <text:p text:style-name="P147"><text:s text:c="8"/>else if (command == "addOrderItem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addOrderItem(data["orderId"].toInt(), data["foodId"].toInt(),</text:p>
              </text:list-item>
              <text:list-item>
                <text:p text:style-name="P147"><text:s text:c="49"/>data["quantity"].toInt(), data["price"].toDouble());</text:p>
              </text:list-item>
              <text:list-item>
                <text:p text:style-name="P147"><text:s text:c="16"/>sendResponse(requestId, ok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addOrderItem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checkAndConsume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checkAndConsume(data["foodId"].toInt(), data["quantity"].toInt());</text:p>
              </text:list-item>
              <text:list-item>
                <text:p text:style-name="P147"><text:s text:c="16"/>sendResponse(requestId, ok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checkAndConsume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returnIngredients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bool ok = dbWorker-&gt;returnIngredients(data["foodId"].toInt(), data["quantity"].toInt());</text:p>
              </text:list-item>
              <text:list-item>
                <text:p text:style-name="P147"><text:s text:c="16"/>sendResponse(requestId, ok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returnIngredients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LowStockWarning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warnings = dbWorker-&gt;getLowStockWarning(data["foodId"].toInt(), data["quantity"].toInt());</text:p>
              </text:list-item>
              <text:list-item>
                <text:p text:style-name="P147"><text:s text:c="16"/>sendResponse(requestId, true, {{"warnings", warning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LowStockWarning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oft-page-break/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ReportRevenue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Map rev = dbWorker-&gt;getReportRevenue(data["from"].toString(), data["to"].toString(),</text:p>
              </text:list-item>
              <text:list-item>
                <text:p text:style-name="P147"><text:s text:c="61"/>data["dishId"].toInt(), data["tableNumber"].toInt(),</text:p>
              </text:list-item>
              <text:list-item>
                <text:p text:style-name="P147"><text:s text:c="61"/>data["waiterId"].toInt());</text:p>
              </text:list-item>
              <text:list-item>
                <text:p text:style-name="P147"><text:s text:c="16"/>sendResponse(requestId, true, rev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ReportRevenue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RevenueByDay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days = dbWorker-&gt;getRevenueByDay(data["from"].toString(), data["to"].toString(),</text:p>
              </text:list-item>
              <text:list-item>
                <text:p text:style-name="P147"><text:s text:c="62"/>data["dishId"].toInt(), data["tableNumber"].toInt(),</text:p>
              </text:list-item>
              <text:list-item>
                <text:p text:style-name="P147"><text:s text:c="62"/>data["waiterId"].toInt());</text:p>
              </text:list-item>
              <text:list-item>
                <text:p text:style-name="P147"><text:s text:c="16"/>sendResponse(requestId, true, {{"days", day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RevenueByDay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FoodPopularity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pop = dbWorker-&gt;getFoodPopularity(data["from"].toString(), data["to"].toString());</text:p>
              </text:list-item>
              <text:list-item>
                <text:p text:style-name="P147"><text:s text:c="16"/>sendResponse(requestId, true, {{"popularity", pop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FoodPopularity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ReportLowStock") {</text:p>
              </text:list-item>
              <text:list-item>
                <text:p text:style-name="P147"><text:soft-page-break/><text:s text:c="12"/>try {</text:p>
              </text:list-item>
              <text:list-item>
                <text:p text:style-name="P147"><text:s text:c="16"/>QVariantList low = dbWorker-&gt;getReportLowStock();</text:p>
              </text:list-item>
              <text:list-item>
                <text:p text:style-name="P147"><text:s text:c="16"/>sendResponse(requestId, true, {{"lowStock", low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ReportLowStock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DishesList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dishes = dbWorker-&gt;getDishesList();</text:p>
              </text:list-item>
              <text:list-item>
                <text:p text:style-name="P147"><text:s text:c="16"/>sendResponse(requestId, true, {{"dishes", dishe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DishesList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if (command == "getWaitersList") {</text:p>
              </text:list-item>
              <text:list-item>
                <text:p text:style-name="P147"><text:s text:c="12"/>try {</text:p>
              </text:list-item>
              <text:list-item>
                <text:p text:style-name="P147"><text:s text:c="16"/>QVariantList waiters = dbWorker-&gt;getWaitersList();</text:p>
              </text:list-item>
              <text:list-item>
                <text:p text:style-name="P147"><text:s text:c="16"/>sendResponse(requestId, true, {{"waiters", waiters}});</text:p>
              </text:list-item>
              <text:list-item>
                <text:p text:style-name="P147"><text:s text:c="12"/>} catch (const std::exception &amp;e) {</text:p>
              </text:list-item>
              <text:list-item>
                <text:p text:style-name="P147"><text:s text:c="16"/>loger-&gt;error("Исключение в getWaitersList: " + QString(e.what()));</text:p>
              </text:list-item>
              <text:list-item>
                <text:p text:style-name="P147"><text:s text:c="16"/>sendResponse(requestId, false, {{"error", e.what()}});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else {</text:p>
              </text:list-item>
              <text:list-item>
                <text:p text:style-name="P147"><text:s text:c="12"/>sendResponse(requestId, false, {{"error", "Unknown command"}});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ClientConnection::onDisconnected()</text:p>
              </text:list-item>
              <text:list-item>
                <text:p text:style-name="P147">{</text:p>
              </text:list-item>
              <text:list-item>
                <text:p text:style-name="P147"><text:s text:c="4"/>deleteLater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<text:soft-page-break/>TcpServer::TcpServer(Logs *logger, DBWorker *dbWorker, QObject *parent)</text:p>
              </text:list-item>
              <text:list-item>
                <text:p text:style-name="P147"><text:s text:c="4"/>: QObject(parent), server(nullptr), dbWorker(dbWorker), loger(logger)</text:p>
              </text:list-item>
              <text:list-item>
                <text:p text:style-name="P147">{</text:p>
              </text:list-item>
              <text:list-item>
                <text:p text:style-name="P147"><text:s text:c="4"/>loger-&gt;info("Инициализация TCP-сервера"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TcpServer::~TcpServer()</text:p>
              </text:list-item>
              <text:list-item>
                <text:p text:style-name="P147">{</text:p>
              </text:list-item>
              <text:list-item>
                <text:p text:style-name="P147"><text:s text:c="4"/>stop();</text:p>
              </text:list-item>
              <text:list-item>
                <text:p text:style-name="P147"><text:s text:c="4"/>loger-&gt;info("TCP-сервер уничтожен"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bool TcpServer::start(quint16 port)</text:p>
              </text:list-item>
              <text:list-item>
                <text:p text:style-name="P147">{</text:p>
              </text:list-item>
              <text:list-item>
                <text:p text:style-name="P147"><text:s text:c="4"/>if (server) {</text:p>
              </text:list-item>
              <text:list-item>
                <text:p text:style-name="P147"><text:s text:c="8"/>loger-&gt;warning("Сервер уже запущен")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server = new QTcpServer(this);</text:p>
              </text:list-item>
              <text:list-item>
                <text:p text:style-name="P147"><text:s text:c="4"/>connect(server, &amp;QTcpServer::newConnection, this, &amp;TcpServer::onNewConnection);</text:p>
              </text:list-item>
              <text:list-item>
                <text:p text:style-name="P147"><text:s text:c="4"/>if (!server-&gt;listen(QHostAddress::Any, port)) {</text:p>
              </text:list-item>
              <text:list-item>
                <text:p text:style-name="P147"><text:s text:c="8"/>loger-&gt;error("Ошибка запуска сервера: " + server-&gt;errorString());</text:p>
              </text:list-item>
              <text:list-item>
                <text:p text:style-name="P147"><text:s text:c="8"/>delete server;</text:p>
              </text:list-item>
              <text:list-item>
                <text:p text:style-name="P147"><text:s text:c="8"/>server = nullptr;</text:p>
              </text:list-item>
              <text:list-item>
                <text:p text:style-name="P147"><text:s text:c="8"/>return false;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loger-&gt;info("Сервер запущен на порту " + QString::number(port));</text:p>
              </text:list-item>
              <text:list-item>
                <text:p text:style-name="P147"><text:s text:c="4"/>return true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TcpServer::stop()</text:p>
              </text:list-item>
              <text:list-item>
                <text:p text:style-name="P147">{</text:p>
              </text:list-item>
              <text:list-item>
                <text:p text:style-name="P147"><text:s text:c="4"/>if (server) {</text:p>
              </text:list-item>
              <text:list-item>
                <text:p text:style-name="P147"><text:s text:c="8"/>server-&gt;close();</text:p>
              </text:list-item>
              <text:list-item>
                <text:p text:style-name="P147"><text:s text:c="8"/>delete server;</text:p>
              </text:list-item>
              <text:list-item>
                <text:p text:style-name="P147"><text:s text:c="8"/>server = nullptr;</text:p>
              </text:list-item>
              <text:list-item>
                <text:p text:style-name="P147"><text:soft-page-break/><text:s text:c="8"/>loger-&gt;info("Сервер остановлен");</text:p>
              </text:list-item>
              <text:list-item>
                <text:p text:style-name="P147"><text:s text:c="4"/>}</text:p>
              </text:list-item>
              <text:list-item>
                <text:p text:style-name="P147"><text:s text:c="4"/>qDeleteAll(connections);</text:p>
              </text:list-item>
              <text:list-item>
                <text:p text:style-name="P147"><text:s text:c="4"/>connections.clear();</text:p>
              </text:list-item>
              <text:list-item>
                <text:p text:style-name="P147">}</text:p>
              </text:list-item>
              <text:list-item>
                <text:p text:style-name="P147"/>
              </text:list-item>
              <text:list-item>
                <text:p text:style-name="P147">void TcpServer::onNewConnection()</text:p>
              </text:list-item>
              <text:list-item>
                <text:p text:style-name="P147">{</text:p>
              </text:list-item>
              <text:list-item>
                <text:p text:style-name="P147"><text:s text:c="4"/>QTcpSocket *clientSocket = server-&gt;nextPendingConnection();</text:p>
              </text:list-item>
              <text:list-item>
                <text:p text:style-name="P147"><text:s text:c="4"/>ClientConnection *conn = new ClientConnection(loger, clientSocket-&gt;socketDescriptor(), dbWorker, this);</text:p>
              </text:list-item>
              <text:list-item>
                <text:p text:style-name="P147"><text:s text:c="4"/>connections.append(conn);</text:p>
              </text:list-item>
              <text:list-item>
                <text:p text:style-name="P147"><text:s text:c="4"/>loger-&gt;info("Новое подключение, всего клиентов: " + QString::number(connections.size()));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2">Листинг <text:sequence text:ref-name="refЛистинг12" text:name="Листинг" text:formula="ooow:Листинг+1" style:num-format="1">13</text:sequence><text:s/>— Файл <text:span text:style-name="T255">tcpserver</text:span>.<text:span text:style-name="T255">h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list text:continue-numbering="true" text:style-name="Нумерация_20_строк_20_кода">
              <text:list-item text:start-value="1">
                <text:p text:style-name="P147">#ifndef TCPSERVER_H</text:p>
              </text:list-item>
              <text:list-item>
                <text:p text:style-name="P147">#define TCPSERVER_H</text:p>
              </text:list-item>
              <text:list-item>
                <text:p text:style-name="P147"/>
              </text:list-item>
              <text:list-item>
                <text:p text:style-name="P147">#include &lt;QObject&gt;</text:p>
              </text:list-item>
              <text:list-item>
                <text:p text:style-name="P147">#include &lt;QTcpServer&gt;</text:p>
              </text:list-item>
              <text:list-item>
                <text:p text:style-name="P147">#include &lt;QTcpSocket&gt;</text:p>
              </text:list-item>
              <text:list-item>
                <text:p text:style-name="P147">#include &lt;QMap&gt;</text:p>
              </text:list-item>
              <text:list-item>
                <text:p text:style-name="P147">#include "logs.h"</text:p>
              </text:list-item>
              <text:list-item>
                <text:p text:style-name="P147">#include "exceptions.h"</text:p>
              </text:list-item>
              <text:list-item>
                <text:p text:style-name="P147"/>
              </text:list-item>
              <text:list-item>
                <text:p text:style-name="P147">class DBWorker;</text:p>
              </text:list-item>
              <text:list-item>
                <text:p text:style-name="P147"/>
              </text:list-item>
              <text:list-item>
                <text:p text:style-name="P147">class ClientConnection : public QObject</text:p>
              </text:list-item>
              <text:list-item>
                <text:p text:style-name="P147">{</text:p>
              </text:list-item>
              <text:list-item>
                <text:p text:style-name="P147"><text:s text:c="4"/>Q_OBJECT</text:p>
              </text:list-item>
              <text:list-item>
                <text:p text:style-name="P147">public:</text:p>
              </text:list-item>
              <text:list-item>
                <text:p text:style-name="P147"><text:s text:c="4"/>ClientConnection(Logs *logger, qintptr socketDescriptor, DBWorker *dbWorker, QObject *parent = nullptr);</text:p>
              </text:list-item>
              <text:list-item>
                <text:p text:style-name="P147"><text:s text:c="4"/>~ClientConnection();</text:p>
              </text:list-item>
              <text:list-item>
                <text:p text:style-name="P147"><text:soft-page-break/></text:p>
              </text:list-item>
              <text:list-item>
                <text:p text:style-name="P147">private slots:</text:p>
              </text:list-item>
              <text:list-item>
                <text:p text:style-name="P147"><text:s text:c="4"/>void onReadyRead();</text:p>
              </text:list-item>
              <text:list-item>
                <text:p text:style-name="P147"><text:s text:c="4"/>void onDisconnected()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void sendResponse(int requestId, bool success, const QVariantMap &amp;data = QVariantMap());</text:p>
              </text:list-item>
              <text:list-item>
                <text:p text:style-name="P147"><text:s text:c="4"/>QTcpSocket *socket;</text:p>
              </text:list-item>
              <text:list-item>
                <text:p text:style-name="P147"><text:s text:c="4"/>DBWorker *dbWorker;</text:p>
              </text:list-item>
              <text:list-item>
                <text:p text:style-name="P147"><text:s text:c="4"/>QByteArray buffer;</text:p>
              </text:list-item>
              <text:list-item>
                <text:p text:style-name="P147"><text:s text:c="4"/>Logs *loger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class TcpServer : public QObject</text:p>
              </text:list-item>
              <text:list-item>
                <text:p text:style-name="P147">{</text:p>
              </text:list-item>
              <text:list-item>
                <text:p text:style-name="P147"><text:s text:c="4"/>Q_OBJECT</text:p>
              </text:list-item>
              <text:list-item>
                <text:p text:style-name="P147">public:</text:p>
              </text:list-item>
              <text:list-item>
                <text:p text:style-name="P147"><text:s text:c="4"/>explicit TcpServer(Logs *logger, DBWorker *dbWorker, QObject *parent = nullptr);</text:p>
              </text:list-item>
              <text:list-item>
                <text:p text:style-name="P147"><text:s text:c="4"/>~TcpServer();</text:p>
              </text:list-item>
              <text:list-item>
                <text:p text:style-name="P147"/>
              </text:list-item>
              <text:list-item>
                <text:p text:style-name="P147"><text:s text:c="4"/>bool start(quint16 port);</text:p>
              </text:list-item>
              <text:list-item>
                <text:p text:style-name="P147"><text:s text:c="4"/>void stop();</text:p>
              </text:list-item>
              <text:list-item>
                <text:p text:style-name="P147"/>
              </text:list-item>
              <text:list-item>
                <text:p text:style-name="P147">private slots:</text:p>
              </text:list-item>
              <text:list-item>
                <text:p text:style-name="P147"><text:s text:c="4"/>void onNewConnection();</text:p>
              </text:list-item>
              <text:list-item>
                <text:p text:style-name="P147"/>
              </text:list-item>
              <text:list-item>
                <text:p text:style-name="P147">private:</text:p>
              </text:list-item>
              <text:list-item>
                <text:p text:style-name="P147"><text:s text:c="4"/>QTcpServer *server;</text:p>
              </text:list-item>
              <text:list-item>
                <text:p text:style-name="P147"><text:s text:c="4"/>DBWorker *dbWorker;</text:p>
              </text:list-item>
              <text:list-item>
                <text:p text:style-name="P147"><text:s text:c="4"/>QList&lt;ClientConnection*&gt; connections;</text:p>
              </text:list-item>
              <text:list-item>
                <text:p text:style-name="P147"><text:s text:c="4"/>Logs *loger;</text:p>
              </text:list-item>
              <text:list-item>
                <text:p text:style-name="P147">};</text:p>
              </text:list-item>
              <text:list-item>
                <text:p text:style-name="P147"/>
              </text:list-item>
              <text:list-item>
                <text:p text:style-name="P147">#endif // TCPSERVER_H</text:p>
              </text:list-item>
            </text:list>
          </table:table-cell>
        </table:table-row>
      </table:table>
      <text:p text:style-name="P148"/>
      <text:p text:style-name="P149"><text:soft-page-break/>Листинг <text:sequence text:ref-name="refЛистинг13" text:name="Листинг" text:formula="ooow:Листинг+1" style:num-format="1">14</text:sequence><text:s/>— Файл <text:span text:style-name="T256">LoginPage.qml</text:span>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list text:continue-numbering="true" text:style-name="Нумерация_20_строк_20_кода">
              <text:list-item text:start-value="1">
                <text:p text:style-name="P147">import QtQuick 2.15</text:p>
              </text:list-item>
              <text:list-item>
                <text:p text:style-name="P147">import QtQuick.Controls 2.15</text:p>
              </text:list-item>
              <text:list-item>
                <text:p text:style-name="P147">import QtQuick.Controls.Material 2.15</text:p>
              </text:list-item>
              <text:list-item>
                <text:p text:style-name="P147">import QtQuick.Layouts 1.15</text:p>
              </text:list-item>
              <text:list-item>
                <text:p text:style-name="P147"/>
              </text:list-item>
              <text:list-item>
                <text:p text:style-name="P147">Page {</text:p>
              </text:list-item>
              <text:list-item>
                <text:p text:style-name="P147"><text:s text:c="4"/>id: loginPage</text:p>
              </text:list-item>
              <text:list-item>
                <text:p text:style-name="P147"><text:s text:c="4"/>signal loginSuccess(string role, string name)</text:p>
              </text:list-item>
              <text:list-item>
                <text:p text:style-name="P147"/>
              </text:list-item>
              <text:list-item>
                <text:p text:style-name="P147"><text:s text:c="4"/>background: Rectangle { color: "#FAFAFA" }</text:p>
              </text:list-item>
              <text:list-item>
                <text:p text:style-name="P147"/>
              </text:list-item>
              <text:list-item>
                <text:p text:style-name="P147"><text:s text:c="4"/>ColumnLayout {</text:p>
              </text:list-item>
              <text:list-item>
                <text:p text:style-name="P147"><text:s text:c="8"/>anchors.centerIn: parent</text:p>
              </text:list-item>
              <text:list-item>
                <text:p text:style-name="P147"><text:s text:c="8"/>width: Math.min(400, parent.width * 0.8)</text:p>
              </text:list-item>
              <text:list-item>
                <text:p text:style-name="P147"><text:s text:c="8"/>spacing: 20</text:p>
              </text:list-item>
              <text:list-item>
                <text:p text:style-name="P147"/>
              </text:list-item>
              <text:list-item>
                <text:p text:style-name="P147"><text:s text:c="8"/>Label {</text:p>
              </text:list-item>
              <text:list-item>
                <text:p text:style-name="P147"><text:s text:c="12"/>text: "Вход в систему"</text:p>
              </text:list-item>
              <text:list-item>
                <text:p text:style-name="P147"><text:s text:c="12"/>font.pixelSize: 28</text:p>
              </text:list-item>
              <text:list-item>
                <text:p text:style-name="P147"><text:s text:c="12"/>font.bold: true</text:p>
              </text:list-item>
              <text:list-item>
                <text:p text:style-name="P147"><text:s text:c="12"/>color: Material.primary</text:p>
              </text:list-item>
              <text:list-item>
                <text:p text:style-name="P147"><text:s text:c="12"/>Layout.alignment: Qt.AlignHCenter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TextField {</text:p>
              </text:list-item>
              <text:list-item>
                <text:p text:style-name="P147"><text:s text:c="12"/>id: loginField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placeholderText: "Логин"</text:p>
              </text:list-item>
              <text:list-item>
                <text:p text:style-name="P147"><text:s text:c="12"/>font.pixelSize: 18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TextField {</text:p>
              </text:list-item>
              <text:list-item>
                <text:p text:style-name="P147"><text:s text:c="12"/>id: passwordField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placeholderText: "Пароль"</text:p>
              </text:list-item>
              <text:list-item>
                <text:p text:style-name="P147"><text:soft-page-break/><text:s text:c="12"/>font.pixelSize: 18</text:p>
              </text:list-item>
              <text:list-item>
                <text:p text:style-name="P147"><text:s text:c="12"/>echoMode: TextInput.Password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Button {</text:p>
              </text:list-item>
              <text:list-item>
                <text:p text:style-name="P147"><text:s text:c="12"/>text: "Войти"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font.pixelSize: 18</text:p>
              </text:list-item>
              <text:list-item>
                <text:p text:style-name="P147"><text:s text:c="12"/>highlighted: true</text:p>
              </text:list-item>
              <text:list-item>
                <text:p text:style-name="P147"><text:s text:c="12"/>Material.background: Material.Green</text:p>
              </text:list-item>
              <text:list-item>
                <text:p text:style-name="P147"><text:s text:c="12"/>onClicked: {</text:p>
              </text:list-item>
              <text:list-item>
                <text:p text:style-name="P147"><text:s text:c="16"/>errorLabel.visible = false</text:p>
              </text:list-item>
              <text:list-item>
                <text:p text:style-name="P147"><text:s text:c="16"/>var success = dbWorker.checkUser(loginField.text, passwordField.text)</text:p>
              </text:list-item>
              <text:list-item>
                <text:p text:style-name="P147"><text:s text:c="16"/>if (success) {</text:p>
              </text:list-item>
              <text:list-item>
                <text:p text:style-name="P147"><text:s text:c="20"/>var role = dbWorker.getUserRole()</text:p>
              </text:list-item>
              <text:list-item>
                <text:p text:style-name="P147"><text:s text:c="20"/>var name = dbWorker.getUserName()</text:p>
              </text:list-item>
              <text:list-item>
                <text:p text:style-name="P147"><text:s text:c="20"/>loger.info("QML: Логин: role=" + role + ", name=" + name)</text:p>
              </text:list-item>
              <text:list-item>
                <text:p text:style-name="P147"><text:s text:c="20"/>loginSuccess(role, name)</text:p>
              </text:list-item>
              <text:list-item>
                <text:p text:style-name="P147"><text:s text:c="16"/>} else {</text:p>
              </text:list-item>
              <text:list-item>
                <text:p text:style-name="P147"><text:s text:c="20"/>errorLabel.visible = true</text:p>
              </text:list-item>
              <text:list-item>
                <text:p text:style-name="P147"><text:s text:c="20"/>loginField.text = ""</text:p>
              </text:list-item>
              <text:list-item>
                <text:p text:style-name="P147"><text:s text:c="20"/>passwordField.text = ""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Button {</text:p>
              </text:list-item>
              <text:list-item>
                <text:p text:style-name="P147"><text:s text:c="12"/>text: "Настройки"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font.pixelSize: 18</text:p>
              </text:list-item>
              <text:list-item>
                <text:p text:style-name="P147"><text:s text:c="12"/>onClicked: {</text:p>
              </text:list-item>
              <text:list-item>
                <text:p text:style-name="P147"><text:s text:c="16"/>if (window.settingsDialog) {</text:p>
              </text:list-item>
              <text:list-item>
                <text:p text:style-name="P147"><text:s text:c="20"/>window.settingsDialog.open()</text:p>
              </text:list-item>
              <text:list-item>
                <text:p text:style-name="P147"><text:s text:c="16"/>} else {</text:p>
              </text:list-item>
              <text:list-item>
                <text:p text:style-name="P147"/>
              </text:list-item>
              <text:list-item>
                <text:p text:style-name="P147"><text:s text:c="16"/>}</text:p>
              </text:list-item>
              <text:list-item>
                <text:p text:style-name="P147"><text:soft-page-break/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Label {</text:p>
              </text:list-item>
              <text:list-item>
                <text:p text:style-name="P147"><text:s text:c="12"/>id: errorLabel</text:p>
              </text:list-item>
              <text:list-item>
                <text:p text:style-name="P147"><text:s text:c="12"/>text: "Неверный логин или пароль"</text:p>
              </text:list-item>
              <text:list-item>
                <text:p text:style-name="P147"><text:s text:c="12"/>color: "red"</text:p>
              </text:list-item>
              <text:list-item>
                <text:p text:style-name="P147"><text:s text:c="12"/>font.pixelSize: 14</text:p>
              </text:list-item>
              <text:list-item>
                <text:p text:style-name="P147"><text:s text:c="12"/>visible: false</text:p>
              </text:list-item>
              <text:list-item>
                <text:p text:style-name="P147"><text:s text:c="12"/>Layout.alignment: Qt.AlignHCenter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3">Листинг <text:sequence text:ref-name="refЛистинг14" text:name="Листинг" text:formula="ooow:Листинг+1" style:num-format="1">15</text:sequence><text:s/>— Файл <text:span text:style-name="T256">Main.qml</text:span>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list text:continue-numbering="true" text:style-name="Нумерация_20_строк_20_кода">
              <text:list-item text:start-value="1">
                <text:p text:style-name="P147">import QtQuick 2.15</text:p>
              </text:list-item>
              <text:list-item>
                <text:p text:style-name="P147">import QtQuick.Controls 2.15</text:p>
              </text:list-item>
              <text:list-item>
                <text:p text:style-name="P147">import QtQuick.Controls.Material 2.15</text:p>
              </text:list-item>
              <text:list-item>
                <text:p text:style-name="P147">import QtQuick.Layouts 1.15</text:p>
              </text:list-item>
              <text:list-item>
                <text:p text:style-name="P147"/>
              </text:list-item>
              <text:list-item>
                <text:p text:style-name="P147">ApplicationWindow {</text:p>
              </text:list-item>
              <text:list-item>
                <text:p text:style-name="P147"><text:s text:c="4"/>id: window</text:p>
              </text:list-item>
              <text:list-item>
                <text:p text:style-name="P147"><text:s text:c="4"/>visible: true</text:p>
              </text:list-item>
              <text:list-item>
                <text:p text:style-name="P147"><text:s text:c="4"/>width: 1024</text:p>
              </text:list-item>
              <text:list-item>
                <text:p text:style-name="P147"><text:s text:c="4"/>height: 768</text:p>
              </text:list-item>
              <text:list-item>
                <text:p text:style-name="P147"><text:s text:c="4"/>title: "Ресторан - Автоматизация заказов"</text:p>
              </text:list-item>
              <text:list-item>
                <text:p text:style-name="P147"/>
              </text:list-item>
              <text:list-item>
                <text:p text:style-name="P147"><text:s text:c="4"/>Material.theme: Material.Light</text:p>
              </text:list-item>
              <text:list-item>
                <text:p text:style-name="P147"><text:s text:c="4"/>Material.accent: "#4CAF50"</text:p>
              </text:list-item>
              <text:list-item>
                <text:p text:style-name="P147"><text:s text:c="4"/>Material.primary: "#8B4513"</text:p>
              </text:list-item>
              <text:list-item>
                <text:p text:style-name="P147"/>
              </text:list-item>
              <text:list-item>
                <text:p text:style-name="P147"><text:s text:c="4"/>property alias settingsDialog: settingsDialog</text:p>
              </text:list-item>
              <text:list-item>
                <text:p text:style-name="P147"/>
              </text:list-item>
              <text:list-item>
                <text:p text:style-name="P147"><text:s text:c="4"/>property var currentUser: null</text:p>
              </text:list-item>
              <text:list-item>
                <text:p text:style-name="P147"><text:s text:c="4"/>signal dataRefreshRequested()</text:p>
              </text:list-item>
              <text:list-item>
                <text:p text:style-name="P147"><text:soft-page-break/></text:p>
              </text:list-item>
              <text:list-item>
                <text:p text:style-name="P147"><text:s text:c="4"/>function handleLogin(role, name) {</text:p>
              </text:list-item>
              <text:list-item>
                <text:p text:style-name="P147"><text:s text:c="8"/>print("handleLogin called with role: " + role + ", name: " + name)</text:p>
              </text:list-item>
              <text:list-item>
                <text:p text:style-name="P147"><text:s text:c="8"/>currentUser = { role: role, name: name }</text:p>
              </text:list-item>
              <text:list-item>
                <text:p text:style-name="P147"><text:s text:c="8"/>stackView.clear()</text:p>
              </text:list-item>
              <text:list-item>
                <text:p text:style-name="P147"><text:s text:c="8"/>if (role === "waiter") {</text:p>
              </text:list-item>
              <text:list-item>
                <text:p text:style-name="P147"><text:s text:c="12"/>stackView.push("OrderPage.qml")</text:p>
              </text:list-item>
              <text:list-item>
                <text:p text:style-name="P147"><text:s text:c="8"/>} else if (role === "storekeeper") {</text:p>
              </text:list-item>
              <text:list-item>
                <text:p text:style-name="P147"><text:s text:c="12"/>stackView.push("StockPage.qml")</text:p>
              </text:list-item>
              <text:list-item>
                <text:p text:style-name="P147"><text:s text:c="8"/>} else {</text:p>
              </text:list-item>
              <text:list-item>
                <text:p text:style-name="P147"><text:s text:c="12"/>stackView.push("OrderPage.qml"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Component {</text:p>
              </text:list-item>
              <text:list-item>
                <text:p text:style-name="P147"><text:s text:c="8"/>id: loginComponent</text:p>
              </text:list-item>
              <text:list-item>
                <text:p text:style-name="P147"><text:s text:c="8"/>LoginPage {</text:p>
              </text:list-item>
              <text:list-item>
                <text:p text:style-name="P147"><text:s text:c="12"/>id: loginPageInstance</text:p>
              </text:list-item>
              <text:list-item>
                <text:p text:style-name="P147"><text:s text:c="12"/>Connections {</text:p>
              </text:list-item>
              <text:list-item>
                <text:p text:style-name="P147"><text:s text:c="16"/>target: loginPageInstance</text:p>
              </text:list-item>
              <text:list-item>
                <text:p text:style-name="P147"><text:s text:c="16"/>function onLoginSuccess(role, name) {</text:p>
              </text:list-item>
              <text:list-item>
                <text:p text:style-name="P147"><text:s text:c="20"/>handleLogin(role, name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StackView {</text:p>
              </text:list-item>
              <text:list-item>
                <text:p text:style-name="P147"><text:s text:c="8"/>id: stackView</text:p>
              </text:list-item>
              <text:list-item>
                <text:p text:style-name="P147"><text:s text:c="8"/>anchors.fill: parent</text:p>
              </text:list-item>
              <text:list-item>
                <text:p text:style-name="P147"><text:s text:c="8"/>initialItem: loginComponent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Dialog {</text:p>
              </text:list-item>
              <text:list-item>
                <text:p text:style-name="P147"><text:s text:c="8"/>id: settingsDialog</text:p>
              </text:list-item>
              <text:list-item>
                <text:p text:style-name="P147"><text:s text:c="8"/>title: "Настройки"</text:p>
              </text:list-item>
              <text:list-item>
                <text:p text:style-name="P147"><text:soft-page-break/><text:s text:c="8"/>modal: true</text:p>
              </text:list-item>
              <text:list-item>
                <text:p text:style-name="P147"><text:s text:c="8"/>width: 800</text:p>
              </text:list-item>
              <text:list-item>
                <text:p text:style-name="P147"><text:s text:c="8"/>height: 560</text:p>
              </text:list-item>
              <text:list-item>
                <text:p text:style-name="P147"><text:s text:c="8"/>x: (parent.width - width) / 2</text:p>
              </text:list-item>
              <text:list-item>
                <text:p text:style-name="P147"><text:s text:c="8"/>y: (parent.height - height) / 2</text:p>
              </text:list-item>
              <text:list-item>
                <text:p text:style-name="P147"/>
              </text:list-item>
              <text:list-item>
                <text:p text:style-name="P147"><text:s text:c="8"/>contentItem: ScrollView {</text:p>
              </text:list-item>
              <text:list-item>
                <text:p text:style-name="P147"><text:s text:c="12"/>clip: true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spacing: 20</text:p>
              </text:list-item>
              <text:list-item>
                <text:p text:style-name="P147"><text:s text:c="16"/>width: parent.width</text:p>
              </text:list-item>
              <text:list-item>
                <text:p text:style-name="P147"/>
              </text:list-item>
              <text:list-item>
                <text:p text:style-name="P147"><text:s text:c="16"/>ColumnLayout {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Layout.alignment: Qt.AlignTop</text:p>
              </text:list-item>
              <text:list-item>
                <text:p text:style-name="P147"><text:s text:c="20"/>Frame {</text:p>
              </text:list-item>
              <text:list-item>
                <text:p text:style-name="P147"><text:s text:c="24"/>visible: appSettings.isServerMode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ColumnLayout {</text:p>
              </text:list-item>
              <text:list-item>
                <text:p text:style-name="P147"><text:s text:c="28"/>anchors.fill: parent</text:p>
              </text:list-item>
              <text:list-item>
                <text:p text:style-name="P147"><text:s text:c="28"/>spacing: 12</text:p>
              </text:list-item>
              <text:list-item>
                <text:p text:style-name="P147"><text:s text:c="28"/>Label { text: "База данных"; font.pixelSize: 18; font.bold: true }</text:p>
              </text:list-item>
              <text:list-item>
                <text:p text:style-name="P147"><text:s text:c="28"/>GridLayout {</text:p>
              </text:list-item>
              <text:list-item>
                <text:p text:style-name="P147"><text:s text:c="32"/>columns: 2; columnSpacing: 12; rowSpacing: 10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Label { text: "Хост:" }</text:p>
              </text:list-item>
              <text:list-item>
                <text:p text:style-name="P147"><text:s text:c="32"/>TextField { id: dbHostField; text: appSettings?.dbHost ?? "127.0.0.1"; Layout.fillWidth: true }</text:p>
              </text:list-item>
              <text:list-item>
                <text:p text:style-name="P147"><text:s text:c="32"/>Label { text: "Порт:" }</text:p>
              </text:list-item>
              <text:list-item>
                <text:p text:style-name="P147"><text:s text:c="32"/>SpinBox { id: dbPortSpin; from: 1; to: 65535; value: appSettings?.dbPort ?? 5432; editable: true; Layout.fillWidth: true }</text:p>
              </text:list-item>
              <text:list-item>
                <text:p text:style-name="P147"><text:s text:c="32"/>Label { text: "Имя БД:" }</text:p>
              </text:list-item>
              <text:list-item>
                <text:p text:style-name="P147"><text:s text:c="32"/>TextField { id: dbNameField; text: appSettings?.dbName ?? "RestN"; Layout.fillWidth: true }</text:p>
              </text:list-item>
              <text:list-item>
                <text:p text:style-name="P147"><text:s text:c="32"/>Label { text: "Пользователь:" }</text:p>
              </text:list-item>
              <text:list-item>
                <text:p text:style-name="P147"><text:s text:c="32"/>TextField { id: dbUserField; text: appSettings?.dbUser ?? "R"; Layout.fillWidth: true }</text:p>
              </text:list-item>
              <text:list-item>
                <text:p text:style-name="P147"><text:soft-page-break/><text:s text:c="32"/>Label { text: "Пароль:" }</text:p>
              </text:list-item>
              <text:list-item>
                <text:p text:style-name="P147"><text:s text:c="32"/>TextField { id: dbPasswordField; text: appSettings?.dbPassword ?? ""; echoMode: TextInput.Password; Layout.fillWidth: true 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Button {</text:p>
              </text:list-item>
              <text:list-item>
                <text:p text:style-name="P147"><text:s text:c="32"/>text: "Проверить подключение"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onClicked: {</text:p>
              </text:list-item>
              <text:list-item>
                <text:p text:style-name="P147"><text:s text:c="36"/>var ok = dbWorker.reconnect(dbHostField.text, dbPortSpin.value, dbNameField.text, dbUserField.text, dbPasswordField.text)</text:p>
              </text:list-item>
              <text:list-item>
                <text:p text:style-name="P147"><text:s text:c="36"/>statusLabel.text = ok ? "Подключено успешно" : "Ошибка подключения"</text:p>
              </text:list-item>
              <text:list-item>
                <text:p text:style-name="P147"><text:s text:c="36"/>statusLabel.color = ok ? "green" : "red"</text:p>
              </text:list-item>
              <text:list-item>
                <text:p text:style-name="P147"><text:s text:c="32"/>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Label { id: statusLabel; text: ""; wrapMode: Text.WordWrap; Layout.fillWidth: true 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ColumnLayout {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Layout.alignment: Qt.AlignTop</text:p>
              </text:list-item>
              <text:list-item>
                <text:p text:style-name="P147"><text:s text:c="20"/>Frame {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ColumnLayout {</text:p>
              </text:list-item>
              <text:list-item>
                <text:p text:style-name="P147"><text:s text:c="28"/>anchors.fill: parent</text:p>
              </text:list-item>
              <text:list-item>
                <text:p text:style-name="P147"><text:s text:c="28"/>spacing: 12</text:p>
              </text:list-item>
              <text:list-item>
                <text:p text:style-name="P147"><text:s text:c="28"/>Label { text: "Сеть"; font.pixelSize: 18; font.bold: true }</text:p>
              </text:list-item>
              <text:list-item>
                <text:p text:style-name="P147"><text:s text:c="28"/>GridLayout {</text:p>
              </text:list-item>
              <text:list-item>
                <text:p text:style-name="P147"><text:s text:c="32"/>columns: 2; columnSpacing: 12; rowSpacing: 10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Label { text: "IP сервера:" }</text:p>
              </text:list-item>
              <text:list-item>
                <text:p text:style-name="P147"><text:s text:c="32"/>TextField { id: serverHostField; text: appSettings.serverHost; Layout.fillWidth: true }</text:p>
              </text:list-item>
              <text:list-item>
                <text:p text:style-name="P147"><text:s text:c="32"/>Label { text: "Порт:" }</text:p>
              </text:list-item>
              <text:list-item>
                <text:p text:style-name="P147"><text:soft-page-break/><text:s text:c="32"/>TextField {</text:p>
              </text:list-item>
              <text:list-item>
                <text:p text:style-name="P147"><text:s text:c="36"/>id: serverPortField;</text:p>
              </text:list-item>
              <text:list-item>
                <text:p text:style-name="P147"><text:s text:c="36"/>text: appSettings.serverPort;</text:p>
              </text:list-item>
              <text:list-item>
                <text:p text:style-name="P147"><text:s text:c="36"/>validator: IntValidator { bottom: 1024; top: 65535 }</text:p>
              </text:list-item>
              <text:list-item>
                <text:p text:style-name="P147"><text:s text:c="36"/>Layout.fillWidth: true 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CheckBox {</text:p>
              </text:list-item>
              <text:list-item>
                <text:p text:style-name="P147"><text:s text:c="32"/>id: serverModeCheck</text:p>
              </text:list-item>
              <text:list-item>
                <text:p text:style-name="P147"><text:s text:c="32"/>text: "Режим сервера"</text:p>
              </text:list-item>
              <text:list-item>
                <text:p text:style-name="P147"><text:s text:c="32"/>checked: appSettings?.isServerMode ?? false</text:p>
              </text:list-item>
              <text:list-item>
                <text:p text:style-name="P147"><text:s text:c="32"/>onCheckedChanged: if (appSettings) appSettings.isServerMode = checked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Button {</text:p>
              </text:list-item>
              <text:list-item>
                <text:p text:style-name="P147"><text:s text:c="32"/>text: "Проверить сервер"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onClicked: {</text:p>
              </text:list-item>
              <text:list-item>
                <text:p text:style-name="P147"><text:s text:c="36"/>var host = serverHostField.text</text:p>
              </text:list-item>
              <text:list-item>
                <text:p text:style-name="P147"><text:s text:c="36"/>var port = parseInt(serverPortField.text)</text:p>
              </text:list-item>
              <text:list-item>
                <text:p text:style-name="P147"><text:s text:c="36"/>var ok = dbWorker.pingServer(host, port)</text:p>
              </text:list-item>
              <text:list-item>
                <text:p text:style-name="P147"><text:s text:c="36"/>serverStatusLabel.text = ok ? "Сервер доступен" : "Сервер не отвечает"</text:p>
              </text:list-item>
              <text:list-item>
                <text:p text:style-name="P147"><text:s text:c="36"/>serverStatusLabel.color = ok ? "green" : "red"</text:p>
              </text:list-item>
              <text:list-item>
                <text:p text:style-name="P147"><text:s text:c="32"/>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Label { id: serverStatusLabel; text: ""; wrapMode: Text.WordWrap; Layout.fillWidth: true }</text:p>
              </text:list-item>
              <text:list-item>
                <text:p text:style-name="P147"><text:s text:c="28"/>Button {</text:p>
              </text:list-item>
              <text:list-item>
                <text:p text:style-name="P147"><text:s text:c="32"/>text: "Показать IP устройства"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onClicked: {</text:p>
              </text:list-item>
              <text:list-item>
                <text:p text:style-name="P147"><text:s text:c="36"/>var ips = dbWorker.getLocalIps()</text:p>
              </text:list-item>
              <text:list-item>
                <text:p text:style-name="P147"><text:s text:c="36"/>var port = parseInt(serverPortField.text)</text:p>
              </text:list-item>
              <text:list-item>
                <text:p text:style-name="P147"><text:s text:c="36"/>var text = ""</text:p>
              </text:list-item>
              <text:list-item>
                <text:p text:style-name="P147"><text:s text:c="36"/>for (var i = 0; i &lt; ips.length; i++) {</text:p>
              </text:list-item>
              <text:list-item>
                <text:p text:style-name="P147"><text:s text:c="40"/>text += ips[i] + ":" + port</text:p>
              </text:list-item>
              <text:list-item>
                <text:p text:style-name="P147"><text:s text:c="40"/>if (i &lt; ips.length - 1) text += ", "</text:p>
              </text:list-item>
              <text:list-item>
                <text:p text:style-name="P147"><text:s text:c="36"/>}</text:p>
              </text:list-item>
              <text:list-item>
                <text:p text:style-name="P147"><text:soft-page-break/><text:s text:c="36"/>ipLabel.text = text ? text : "Нет доступных IP"</text:p>
              </text:list-item>
              <text:list-item>
                <text:p text:style-name="P147"><text:s text:c="32"/>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Label { id: ipLabel; text: ""; wrapMode: Text.WordWrap; Layout.fillWidth: true 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ColumnLayout {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Layout.alignment: Qt.AlignTop</text:p>
              </text:list-item>
              <text:list-item>
                <text:p text:style-name="P147"><text:s text:c="20"/>Frame {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ColumnLayout {</text:p>
              </text:list-item>
              <text:list-item>
                <text:p text:style-name="P147"><text:s text:c="28"/>anchors.fill: parent</text:p>
              </text:list-item>
              <text:list-item>
                <text:p text:style-name="P147"><text:s text:c="28"/>spacing: 12</text:p>
              </text:list-item>
              <text:list-item>
                <text:p text:style-name="P147"><text:s text:c="28"/>Label { text: "Прочее"; font.pixelSize: 18; font.bold: true }</text:p>
              </text:list-item>
              <text:list-item>
                <text:p text:style-name="P147"><text:s text:c="28"/>GridLayout {</text:p>
              </text:list-item>
              <text:list-item>
                <text:p text:style-name="P147"><text:s text:c="32"/>columns: 2; columnSpacing: 12; rowSpacing: 10</text:p>
              </text:list-item>
              <text:list-item>
                <text:p text:style-name="P147"><text:s text:c="32"/>Layout.fillWidth: true</text:p>
              </text:list-item>
              <text:list-item>
                <text:p text:style-name="P147"><text:s text:c="32"/>Label { text: "Путь к логам:" }</text:p>
              </text:list-item>
              <text:list-item>
                <text:p text:style-name="P147"><text:s text:c="32"/>TextField { id: logPathField; text: appSettings?.logPath ?? "logs.txt"; Layout.fillWidth: true 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footer: DialogButtonBox {</text:p>
              </text:list-item>
              <text:list-item>
                <text:p text:style-name="P147"><text:s text:c="12"/>standardButtons: DialogButtonBox.Ok | DialogButtonBox.Cancel</text:p>
              </text:list-item>
              <text:list-item>
                <text:p text:style-name="P147"><text:s text:c="12"/>onAccepted: {</text:p>
              </text:list-item>
              <text:list-item>
                <text:p text:style-name="P147"><text:s text:c="16"/>if (appSettings) {</text:p>
              </text:list-item>
              <text:list-item>
                <text:p text:style-name="P147"><text:s text:c="20"/>appSettings.logPath = logPathField.text</text:p>
              </text:list-item>
              <text:list-item>
                <text:p text:style-name="P147"><text:s text:c="20"/>appSettings.dbHost = dbHostField.text</text:p>
              </text:list-item>
              <text:list-item>
                <text:p text:style-name="P147"><text:s text:c="20"/>appSettings.dbPort = dbPortSpin.value</text:p>
              </text:list-item>
              <text:list-item>
                <text:p text:style-name="P147"><text:soft-page-break/><text:s text:c="20"/>appSettings.dbName = dbNameField.text</text:p>
              </text:list-item>
              <text:list-item>
                <text:p text:style-name="P147"><text:s text:c="20"/>appSettings.dbUser = dbUserField.text</text:p>
              </text:list-item>
              <text:list-item>
                <text:p text:style-name="P147"><text:s text:c="20"/>appSettings.dbPassword = dbPasswordField.text</text:p>
              </text:list-item>
              <text:list-item>
                <text:p text:style-name="P147"><text:s text:c="20"/>appSettings.serverHost = serverHostField.text</text:p>
              </text:list-item>
              <text:list-item>
                <text:p text:style-name="P147"><text:s text:c="20"/>appSettings.serverPort = parseInt(serverPortField.text)</text:p>
              </text:list-item>
              <text:list-item>
                <text:p text:style-name="P147"><text:s text:c="20"/>loger.setLogPath(logPathField.text)</text:p>
              </text:list-item>
              <text:list-item>
                <text:p text:style-name="P147"><text:s text:c="20"/>appSettings.save()</text:p>
              </text:list-item>
              <text:list-item>
                <text:p text:style-name="P147"><text:s text:c="20"/>loger.info("Вызов reconnect с хостом "+ serverHostField.text + " порт" + parseInt(serverPortField.text))</text:p>
              </text:list-item>
              <text:list-item>
                <text:p text:style-name="P147"><text:s text:c="20"/>dbWorker.reconnect(serverHostField.text, parseInt(serverPortField.text)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settingsDialog.close()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onRejected: settingsDialog.close(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header: ToolBar {</text:p>
              </text:list-item>
              <text:list-item>
                <text:p text:style-name="P147"><text:s text:c="8"/>visible: currentUser !== null</text:p>
              </text:list-item>
              <text:list-item>
                <text:p text:style-name="P147"><text:s text:c="8"/>Material.background: Material.primary</text:p>
              </text:list-item>
              <text:list-item>
                <text:p text:style-name="P147"/>
              </text:list-item>
              <text:list-item>
                <text:p text:style-name="P147"><text:s text:c="8"/>RowLayout {</text:p>
              </text:list-item>
              <text:list-item>
                <text:p text:style-name="P147"><text:s text:c="12"/>anchors.fill: parent</text:p>
              </text:list-item>
              <text:list-item>
                <text:p text:style-name="P147"><text:s text:c="12"/>anchors.leftMargin: 10</text:p>
              </text:list-item>
              <text:list-item>
                <text:p text:style-name="P147"><text:s text:c="12"/>anchors.rightMargin: 10</text:p>
              </text:list-item>
              <text:list-item>
                <text:p text:style-name="P147"/>
              </text:list-item>
              <text:list-item>
                <text:p text:style-name="P147"><text:s text:c="12"/>ToolButton {</text:p>
              </text:list-item>
              <text:list-item>
                <text:p text:style-name="P147"><text:s text:c="16"/>id: menuButton</text:p>
              </text:list-item>
              <text:list-item>
                <text:p text:style-name="P147"><text:s text:c="16"/>contentItem: Label {</text:p>
              </text:list-item>
              <text:list-item>
                <text:p text:style-name="P147"><text:s text:c="20"/>text: "☰"</text:p>
              </text:list-item>
              <text:list-item>
                <text:p text:style-name="P147"><text:s text:c="20"/>font.pixelSize: 28</text:p>
              </text:list-item>
              <text:list-item>
                <text:p text:style-name="P147"><text:s text:c="20"/>color: "white"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onClicked: drawer.open()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Label {</text:p>
              </text:list-item>
              <text:list-item>
                <text:p text:style-name="P147"><text:soft-page-break/><text:s text:c="16"/>text: "Ресторан"</text:p>
              </text:list-item>
              <text:list-item>
                <text:p text:style-name="P147"><text:s text:c="16"/>font.pixelSize: 22</text:p>
              </text:list-item>
              <text:list-item>
                <text:p text:style-name="P147"><text:s text:c="16"/>font.bold: true</text:p>
              </text:list-item>
              <text:list-item>
                <text:p text:style-name="P147"><text:s text:c="16"/>color: "white"</text:p>
              </text:list-item>
              <text:list-item>
                <text:p text:style-name="P147"><text:s text:c="16"/>Layout.alignment: Qt.AlignCenter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orizontalAlignment: Text.AlignHCenter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ToolButton {</text:p>
              </text:list-item>
              <text:list-item>
                <text:p text:style-name="P147"><text:s text:c="16"/>id: syncButton</text:p>
              </text:list-item>
              <text:list-item>
                <text:p text:style-name="P147"><text:s text:c="16"/>contentItem: Label {</text:p>
              </text:list-item>
              <text:list-item>
                <text:p text:style-name="P147"><text:s text:c="20"/>text: "⟳"</text:p>
              </text:list-item>
              <text:list-item>
                <text:p text:style-name="P147"><text:s text:c="20"/>font.pixelSize: 24</text:p>
              </text:list-item>
              <text:list-item>
                <text:p text:style-name="P147"><text:s text:c="20"/>color: "white"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loger.info("Синхронизация данных...")</text:p>
              </text:list-item>
              <text:list-item>
                <text:p text:style-name="P147"><text:s text:c="20"/>dataRefreshRequested()</text:p>
              </text:list-item>
              <text:list-item>
                <text:p text:style-name="P147"><text:s text:c="20"/>loger.info("Синхронизация данных завершена"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Drawer {</text:p>
              </text:list-item>
              <text:list-item>
                <text:p text:style-name="P147"><text:s text:c="8"/>id: drawer</text:p>
              </text:list-item>
              <text:list-item>
                <text:p text:style-name="P147"><text:s text:c="8"/>width: 300</text:p>
              </text:list-item>
              <text:list-item>
                <text:p text:style-name="P147"><text:s text:c="8"/>height: parent.height</text:p>
              </text:list-item>
              <text:list-item>
                <text:p text:style-name="P147"><text:s text:c="8"/>modal: true</text:p>
              </text:list-item>
              <text:list-item>
                <text:p text:style-name="P147"><text:s text:c="8"/>dragMargin: 0</text:p>
              </text:list-item>
              <text:list-item>
                <text:p text:style-name="P147"><text:s text:c="8"/>interactive: currentUser !== null</text:p>
              </text:list-item>
              <text:list-item>
                <text:p text:style-name="P147"/>
              </text:list-item>
              <text:list-item>
                <text:p text:style-name="P147"><text:s text:c="8"/>background: Rectangle { color: "#F0E6D2" }</text:p>
              </text:list-item>
              <text:list-item>
                <text:p text:style-name="P147"/>
              </text:list-item>
              <text:list-item>
                <text:p text:style-name="P147"><text:s text:c="8"/>ColumnLayout {</text:p>
              </text:list-item>
              <text:list-item>
                <text:p text:style-name="P147"><text:soft-page-break/><text:s text:c="12"/>anchors.fill: parent</text:p>
              </text:list-item>
              <text:list-item>
                <text:p text:style-name="P147"><text:s text:c="12"/>spacing: 2</text:p>
              </text:list-item>
              <text:list-item>
                <text:p text:style-name="P147"/>
              </text:list-item>
              <text:list-item>
                <text:p text:style-name="P147"><text:s text:c="12"/>Rectangle {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eight: 80</text:p>
              </text:list-item>
              <text:list-item>
                <text:p text:style-name="P147"><text:s text:c="16"/>color: "#E0D6C2"</text:p>
              </text:list-item>
              <text:list-item>
                <text:p text:style-name="P147"><text:s text:c="16"/>Label {</text:p>
              </text:list-item>
              <text:list-item>
                <text:p text:style-name="P147"><text:s text:c="20"/>anchors.centerIn: parent</text:p>
              </text:list-item>
              <text:list-item>
                <text:p text:style-name="P147"><text:s text:c="20"/>text: currentUser ? currentUser.name : ""</text:p>
              </text:list-item>
              <text:list-item>
                <text:p text:style-name="P147"><text:s text:c="20"/>font.pixelSize: 20</text:p>
              </text:list-item>
              <text:list-item>
                <text:p text:style-name="P147"><text:s text:c="20"/>font.bold: true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Repeater {</text:p>
              </text:list-item>
              <text:list-item>
                <text:p text:style-name="P147"><text:s text:c="16"/>model: {</text:p>
              </text:list-item>
              <text:list-item>
                <text:p text:style-name="P147"><text:s text:c="20"/>if (!currentUser) return []</text:p>
              </text:list-item>
              <text:list-item>
                <text:p text:style-name="P147"><text:s text:c="20"/>if (currentUser.role === "admin") {</text:p>
              </text:list-item>
              <text:list-item>
                <text:p text:style-name="P147"><text:s text:c="24"/>return [</text:p>
              </text:list-item>
              <text:list-item>
                <text:p text:style-name="P147"><text:s text:c="28"/>{ name: "Оформление заказа", page: "OrderPage.qml" },</text:p>
              </text:list-item>
              <text:list-item>
                <text:p text:style-name="P147"><text:s text:c="28"/>{ name: "Склад", page: "StockPage.qml" },</text:p>
              </text:list-item>
              <text:list-item>
                <text:p text:style-name="P147"><text:s text:c="28"/>{ name: "Отчёты", page: "ReportsPage.qml" }</text:p>
              </text:list-item>
              <text:list-item>
                <text:p text:style-name="P147"><text:s text:c="24"/>]</text:p>
              </text:list-item>
              <text:list-item>
                <text:p text:style-name="P147"><text:s text:c="20"/>} else if (currentUser.role === "waiter") {</text:p>
              </text:list-item>
              <text:list-item>
                <text:p text:style-name="P147"><text:s text:c="24"/>return [ { name: "Оформление заказа", page: "OrderPage.qml" } ]</text:p>
              </text:list-item>
              <text:list-item>
                <text:p text:style-name="P147"><text:s text:c="20"/>} else if (currentUser.role === "storekeeper") {</text:p>
              </text:list-item>
              <text:list-item>
                <text:p text:style-name="P147"><text:s text:c="24"/>return [ { name: "Склад", page: "StockPage.qml" } ]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return []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delegate: Button {</text:p>
              </text:list-item>
              <text:list-item>
                <text:p text:style-name="P147"><text:s text:c="20"/>text: modelData.name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height: 60</text:p>
              </text:list-item>
              <text:list-item>
                <text:p text:style-name="P147"><text:s text:c="20"/>font.pixelSize: 18</text:p>
              </text:list-item>
              <text:list-item>
                <text:p text:style-name="P147"><text:soft-page-break/><text:s text:c="20"/>flat: true</text:p>
              </text:list-item>
              <text:list-item>
                <text:p text:style-name="P147"><text:s text:c="20"/>onClicked: {</text:p>
              </text:list-item>
              <text:list-item>
                <text:p text:style-name="P147"><text:s text:c="24"/>stackView.replace(modelData.page)</text:p>
              </text:list-item>
              <text:list-item>
                <text:p text:style-name="P147"><text:s text:c="24"/>drawer.close()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Item { Layout.fillHeight: true }</text:p>
              </text:list-item>
              <text:list-item>
                <text:p text:style-name="P147"/>
              </text:list-item>
              <text:list-item>
                <text:p text:style-name="P147"><text:s text:c="12"/>Button {</text:p>
              </text:list-item>
              <text:list-item>
                <text:p text:style-name="P147"><text:s text:c="16"/>text: "Настройки"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eight: 60</text:p>
              </text:list-item>
              <text:list-item>
                <text:p text:style-name="P147"><text:s text:c="16"/>font.pixelSize: 18</text:p>
              </text:list-item>
              <text:list-item>
                <text:p text:style-name="P147"><text:s text:c="16"/>flat: true</text:p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settingsDialog.open()</text:p>
              </text:list-item>
              <text:list-item>
                <text:p text:style-name="P147"><text:s text:c="20"/>drawer.close(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Button {</text:p>
              </text:list-item>
              <text:list-item>
                <text:p text:style-name="P147"><text:s text:c="16"/>text: "Выйти"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eight: 60</text:p>
              </text:list-item>
              <text:list-item>
                <text:p text:style-name="P147"><text:s text:c="16"/>font.pixelSize: 18</text:p>
              </text:list-item>
              <text:list-item>
                <text:p text:style-name="P147"><text:s text:c="16"/>flat: true</text:p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loger.info("Выход из учётной записи")</text:p>
              </text:list-item>
              <text:list-item>
                <text:p text:style-name="P147"><text:s text:c="20"/>currentUser = null</text:p>
              </text:list-item>
              <text:list-item>
                <text:p text:style-name="P147"><text:s text:c="20"/>stackView.replace(loginComponent)</text:p>
              </text:list-item>
              <text:list-item>
                <text:p text:style-name="P147"><text:s text:c="20"/>drawer.close(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Button {</text:p>
              </text:list-item>
              <text:list-item>
                <text:p text:style-name="P147"><text:soft-page-break/><text:s text:c="16"/>text: "Закрыть приложение"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eight: 60</text:p>
              </text:list-item>
              <text:list-item>
                <text:p text:style-name="P147"><text:s text:c="16"/>font.pixelSize: 18</text:p>
              </text:list-item>
              <text:list-item>
                <text:p text:style-name="P147"><text:s text:c="16"/>flat: true</text:p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loger.info("Закрытие приложения");</text:p>
              </text:list-item>
              <text:list-item>
                <text:p text:style-name="P147"><text:s text:c="20"/>Qt.quit(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4">Листинг <text:sequence text:ref-name="refЛистинг15" text:name="Листинг" text:formula="ooow:Листинг+1" style:num-format="1">16</text:sequence><text:s/>— Файл <text:span text:style-name="T257">OrderPage</text:span><text:span text:style-name="T256">.qml</text:span>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list text:continue-numbering="true" text:style-name="Нумерация_20_строк_20_кода">
              <text:list-item text:start-value="1">
                <text:p text:style-name="P147">import QtQuick 2.15</text:p>
              </text:list-item>
              <text:list-item>
                <text:p text:style-name="P147">import QtQuick.Controls 2.15</text:p>
              </text:list-item>
              <text:list-item>
                <text:p text:style-name="P147">import QtQuick.Controls.Material 2.15</text:p>
              </text:list-item>
              <text:list-item>
                <text:p text:style-name="P147">import QtQuick.Layouts 1.15</text:p>
              </text:list-item>
              <text:list-item>
                <text:p text:style-name="P147"/>
              </text:list-item>
              <text:list-item>
                <text:p text:style-name="P147">Page {</text:p>
              </text:list-item>
              <text:list-item>
                <text:p text:style-name="P147"><text:s text:c="4"/>title: "Оформление заказа"</text:p>
              </text:list-item>
              <text:list-item>
                <text:p text:style-name="P147"/>
              </text:list-item>
              <text:list-item>
                <text:p text:style-name="P147"><text:s text:c="4"/>property var fullMenuModel: []</text:p>
              </text:list-item>
              <text:list-item>
                <text:p text:style-name="P147"><text:s text:c="4"/>ListModel { id: filteredMenuModel }</text:p>
              </text:list-item>
              <text:list-item>
                <text:p text:style-name="P147"><text:s text:c="4"/>ListModel { id: orderModel }</text:p>
              </text:list-item>
              <text:list-item>
                <text:p text:style-name="P147"><text:s text:c="4"/>property int selectedMenuIndex: -1</text:p>
              </text:list-item>
              <text:list-item>
                <text:p text:style-name="P147"/>
              </text:list-item>
              <text:list-item>
                <text:p text:style-name="P147"><text:s text:c="4"/>function reloadData() {</text:p>
              </text:list-item>
              <text:list-item>
                <text:p text:style-name="P147"><text:s text:c="8"/>loger.info("OrderPage: reloading foods")</text:p>
              </text:list-item>
              <text:list-item>
                <text:p text:style-name="P147"><text:s text:c="8"/>loadFoods()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Connections {</text:p>
              </text:list-item>
              <text:list-item>
                <text:p text:style-name="P147"><text:s text:c="8"/>target: window</text:p>
              </text:list-item>
              <text:list-item>
                <text:p text:style-name="P147"><text:soft-page-break/><text:s text:c="8"/>function onDataRefreshRequested() {</text:p>
              </text:list-item>
              <text:list-item>
                <text:p text:style-name="P147"><text:s text:c="12"/>reloadData(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function loadFoods() {</text:p>
              </text:list-item>
              <text:list-item>
                <text:p text:style-name="P147"><text:s text:c="8"/>var foods = dbWorker.getFoods()</text:p>
              </text:list-item>
              <text:list-item>
                <text:p text:style-name="P147"><text:s text:c="8"/>fullMenuModel = foods</text:p>
              </text:list-item>
              <text:list-item>
                <text:p text:style-name="P147"><text:s text:c="8"/>applyFilters()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Component.onCompleted: loadFoods()</text:p>
              </text:list-item>
              <text:list-item>
                <text:p text:style-name="P147"/>
              </text:list-item>
              <text:list-item>
                <text:p text:style-name="P147"><text:s text:c="4"/>function applyFilters() {</text:p>
              </text:list-item>
              <text:list-item>
                <text:p text:style-name="P147"><text:s text:c="8"/>filteredMenuModel.clear()</text:p>
              </text:list-item>
              <text:list-item>
                <text:p text:style-name="P147"><text:s text:c="8"/>for (var i = 0; i &lt; fullMenuModel.length; i++) {</text:p>
              </text:list-item>
              <text:list-item>
                <text:p text:style-name="P147"><text:s text:c="12"/>var item = fullMenuModel[i]</text:p>
              </text:list-item>
              <text:list-item>
                <text:p text:style-name="P147"><text:s text:c="12"/>if (categoryFilter.currentIndex &gt; 0 &amp;&amp; item.category !== categoryFilter.model[categoryFilter.currentIndex])</text:p>
              </text:list-item>
              <text:list-item>
                <text:p text:style-name="P147"><text:s text:c="16"/>continue</text:p>
              </text:list-item>
              <text:list-item>
                <text:p text:style-name="P147"><text:s text:c="12"/>if (availableOnly.checked &amp;&amp; !item.available)</text:p>
              </text:list-item>
              <text:list-item>
                <text:p text:style-name="P147"><text:s text:c="16"/>continue</text:p>
              </text:list-item>
              <text:list-item>
                <text:p text:style-name="P147"><text:s text:c="12"/>filteredMenuModel.append(item)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if (selectedMenuIndex &gt;= filteredMenuModel.count)</text:p>
              </text:list-item>
              <text:list-item>
                <text:p text:style-name="P147"><text:s text:c="12"/>selectedMenuIndex = -1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function addDishToOrder(foodId, quantity, dish) {</text:p>
              </text:list-item>
              <text:list-item>
                <text:p text:style-name="P147"><text:s text:c="8"/>var success = dbWorker.checkAndConsume(foodId, quantity)</text:p>
              </text:list-item>
              <text:list-item>
                <text:p text:style-name="P147"><text:s text:c="8"/>if (success) {</text:p>
              </text:list-item>
              <text:list-item>
                <text:p text:style-name="P147"><text:s text:c="12"/>var found = false</text:p>
              </text:list-item>
              <text:list-item>
                <text:p text:style-name="P147"><text:s text:c="12"/>for (var i = 0; i &lt; orderModel.count; i++) {</text:p>
              </text:list-item>
              <text:list-item>
                <text:p text:style-name="P147"><text:s text:c="16"/>if (orderModel.get(i).foodId === foodId) {</text:p>
              </text:list-item>
              <text:list-item>
                <text:p text:style-name="P147"><text:s text:c="20"/>var newQty = orderModel.get(i).quantity + quantity</text:p>
              </text:list-item>
              <text:list-item>
                <text:p text:style-name="P147"><text:s text:c="20"/>orderModel.setProperty(i, "quantity", newQty)</text:p>
              </text:list-item>
              <text:list-item>
                <text:p text:style-name="P147"><text:soft-page-break/><text:s text:c="20"/>found = true</text:p>
              </text:list-item>
              <text:list-item>
                <text:p text:style-name="P147"><text:s text:c="20"/>break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if (!found) {</text:p>
              </text:list-item>
              <text:list-item>
                <text:p text:style-name="P147"><text:s text:c="16"/>orderModel.append({</text:p>
              </text:list-item>
              <text:list-item>
                <text:p text:style-name="P147"><text:s text:c="20"/>name: dish.name,</text:p>
              </text:list-item>
              <text:list-item>
                <text:p text:style-name="P147"><text:s text:c="20"/>foodId: dish.foodId,</text:p>
              </text:list-item>
              <text:list-item>
                <text:p text:style-name="P147"><text:s text:c="20"/>price: dish.price,</text:p>
              </text:list-item>
              <text:list-item>
                <text:p text:style-name="P147"><text:s text:c="20"/>quantity: quantity</text:p>
              </text:list-item>
              <text:list-item>
                <text:p text:style-name="P147"><text:s text:c="16"/>})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 else {</text:p>
              </text:list-item>
              <text:list-item>
                <text:p text:style-name="P147"><text:s text:c="12"/>errorDialog.message = "Недостаточно продуктов для добавления блюда"</text:p>
              </text:list-item>
              <text:list-item>
                <text:p text:style-name="P147"><text:s text:c="12"/>errorDialog.open(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Dialog {</text:p>
              </text:list-item>
              <text:list-item>
                <text:p text:style-name="P147"><text:s text:c="8"/>id: warningDialog</text:p>
              </text:list-item>
              <text:list-item>
                <text:p text:style-name="P147"><text:s text:c="8"/>title: "Предупреждение"</text:p>
              </text:list-item>
              <text:list-item>
                <text:p text:style-name="P147"><text:s text:c="8"/>modal: true</text:p>
              </text:list-item>
              <text:list-item>
                <text:p text:style-name="P147"><text:s text:c="8"/>standardButtons: Dialog.Yes | Dialog.No</text:p>
              </text:list-item>
              <text:list-item>
                <text:p text:style-name="P147"><text:s text:c="8"/>width: 500</text:p>
              </text:list-item>
              <text:list-item>
                <text:p text:style-name="P147"><text:s text:c="8"/>x: (parent.width - width) / 2</text:p>
              </text:list-item>
              <text:list-item>
                <text:p text:style-name="P147"><text:s text:c="8"/>y: (parent.height - height) / 2</text:p>
              </text:list-item>
              <text:list-item>
                <text:p text:style-name="P147"><text:s text:c="8"/>property var dishInfo: ({})</text:p>
              </text:list-item>
              <text:list-item>
                <text:p text:style-name="P147"><text:s text:c="8"/>property string message: ""</text:p>
              </text:list-item>
              <text:list-item>
                <text:p text:style-name="P147"><text:s text:c="8"/>onAccepted: {</text:p>
              </text:list-item>
              <text:list-item>
                <text:p text:style-name="P147"><text:s text:c="12"/>addDishToOrder(dishInfo.foodId, dishInfo.quantity, dishInfo.dish)</text:p>
              </text:list-item>
              <text:list-item>
                <text:p text:style-name="P147"><text:s text:c="8"/>}</text:p>
              </text:list-item>
              <text:list-item>
                <text:p text:style-name="P147"><text:s text:c="8"/>contentItem: Label {</text:p>
              </text:list-item>
              <text:list-item>
                <text:p text:style-name="P147"><text:s text:c="12"/>text: warningDialog.message</text:p>
              </text:list-item>
              <text:list-item>
                <text:p text:style-name="P147"><text:s text:c="12"/>wrapMode: Text.WordWrap</text:p>
              </text:list-item>
              <text:list-item>
                <text:p text:style-name="P147"><text:s text:c="12"/>font.pixelSize: 24</text:p>
              </text:list-item>
              <text:list-item>
                <text:p text:style-name="P147"><text:s text:c="12"/>width: warningDialog.width - 40</text:p>
              </text:list-item>
              <text:list-item>
                <text:p text:style-name="P147"><text:soft-page-break/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Dialog {</text:p>
              </text:list-item>
              <text:list-item>
                <text:p text:style-name="P147"><text:s text:c="8"/>id: errorDialog</text:p>
              </text:list-item>
              <text:list-item>
                <text:p text:style-name="P147"><text:s text:c="8"/>title: "Ошибка"</text:p>
              </text:list-item>
              <text:list-item>
                <text:p text:style-name="P147"><text:s text:c="8"/>modal: true</text:p>
              </text:list-item>
              <text:list-item>
                <text:p text:style-name="P147"><text:s text:c="8"/>standardButtons: Dialog.Ok</text:p>
              </text:list-item>
              <text:list-item>
                <text:p text:style-name="P147"><text:s text:c="8"/>width: 500</text:p>
              </text:list-item>
              <text:list-item>
                <text:p text:style-name="P147"><text:s text:c="8"/>x: (parent.width - width) / 2</text:p>
              </text:list-item>
              <text:list-item>
                <text:p text:style-name="P147"><text:s text:c="8"/>y: (parent.height - height) / 2</text:p>
              </text:list-item>
              <text:list-item>
                <text:p text:style-name="P147"><text:s text:c="8"/>property string message: ""</text:p>
              </text:list-item>
              <text:list-item>
                <text:p text:style-name="P147"><text:s text:c="8"/>contentItem: Label {</text:p>
              </text:list-item>
              <text:list-item>
                <text:p text:style-name="P147"><text:s text:c="12"/>text: errorDialog.message</text:p>
              </text:list-item>
              <text:list-item>
                <text:p text:style-name="P147"><text:s text:c="12"/>wrapMode: Text.WordWrap</text:p>
              </text:list-item>
              <text:list-item>
                <text:p text:style-name="P147"><text:s text:c="12"/>font.pixelSize: 24</text:p>
              </text:list-item>
              <text:list-item>
                <text:p text:style-name="P147"><text:s text:c="12"/>width: errorDialog.width - 40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RowLayout {</text:p>
              </text:list-item>
              <text:list-item>
                <text:p text:style-name="P147"><text:s text:c="8"/>anchors.fill: parent</text:p>
              </text:list-item>
              <text:list-item>
                <text:p text:style-name="P147"><text:s text:c="8"/>anchors.margins: 10</text:p>
              </text:list-item>
              <text:list-item>
                <text:p text:style-name="P147"><text:s text:c="8"/>spacing: 10</text:p>
              </text:list-item>
              <text:list-item>
                <text:p text:style-name="P147"/>
              </text:list-item>
              <text:list-item>
                <text:p text:style-name="P147"><text:s text:c="8"/>ColumnLayout {</text:p>
              </text:list-item>
              <text:list-item>
                <text:p text:style-name="P147"><text:s text:c="12"/>Layout.preferredWidth: parent.width * 0.5</text:p>
              </text:list-item>
              <text:list-item>
                <text:p text:style-name="P147"><text:s text:c="12"/>Layout.fillHeight: true</text:p>
              </text:list-item>
              <text:list-item>
                <text:p text:style-name="P147"><text:s text:c="12"/>spacing: 10</text:p>
              </text:list-item>
              <text:list-item>
                <text:p text:style-name="P147"/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ComboBox {</text:p>
              </text:list-item>
              <text:list-item>
                <text:p text:style-name="P147"><text:s text:c="20"/>id: categoryFilter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model: ["Все категории", "Супы", "Горячее", "Салаты", "Напитки"]</text:p>
              </text:list-item>
              <text:list-item>
                <text:p text:style-name="P147"><text:soft-page-break/><text:s text:c="20"/>onCurrentIndexChanged: applyFilters(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CheckBox {</text:p>
              </text:list-item>
              <text:list-item>
                <text:p text:style-name="P147"><text:s text:c="20"/>id: availableOnly</text:p>
              </text:list-item>
              <text:list-item>
                <text:p text:style-name="P147"><text:s text:c="20"/>text: "Только доступные"</text:p>
              </text:list-item>
              <text:list-item>
                <text:p text:style-name="P147"><text:s text:c="20"/>onCheckedChanged: applyFilters()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ListView {</text:p>
              </text:list-item>
              <text:list-item>
                <text:p text:style-name="P147"><text:s text:c="16"/>id: menuListView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Layout.fillHeight: true</text:p>
              </text:list-item>
              <text:list-item>
                <text:p text:style-name="P147"><text:s text:c="16"/>clip: true</text:p>
              </text:list-item>
              <text:list-item>
                <text:p text:style-name="P147"><text:s text:c="16"/>model: filteredMenuModel</text:p>
              </text:list-item>
              <text:list-item>
                <text:p text:style-name="P147"><text:s text:c="16"/>delegate: Item {</text:p>
              </text:list-item>
              <text:list-item>
                <text:p text:style-name="P147"><text:s text:c="20"/>width: menuListView.width</text:p>
              </text:list-item>
              <text:list-item>
                <text:p text:style-name="P147"><text:s text:c="20"/>height: contentColumn.implicitHeight + 20</text:p>
              </text:list-item>
              <text:list-item>
                <text:p text:style-name="P147"/>
              </text:list-item>
              <text:list-item>
                <text:p text:style-name="P147"><text:s text:c="20"/>Rectangle {</text:p>
              </text:list-item>
              <text:list-item>
                <text:p text:style-name="P147"><text:s text:c="24"/>id: card</text:p>
              </text:list-item>
              <text:list-item>
                <text:p text:style-name="P147"><text:s text:c="24"/>anchors.fill: parent</text:p>
              </text:list-item>
              <text:list-item>
                <text:p text:style-name="P147"><text:s text:c="24"/>anchors.margins: 5</text:p>
              </text:list-item>
              <text:list-item>
                <text:p text:style-name="P147"><text:s text:c="24"/>radius: 8</text:p>
              </text:list-item>
              <text:list-item>
                <text:p text:style-name="P147"><text:s text:c="24"/>color: menuListView.currentIndex === index ? "#E8F5E9" : "#FFFFFF"</text:p>
              </text:list-item>
              <text:list-item>
                <text:p text:style-name="P147"><text:s text:c="24"/>border.color: "#DADADA"</text:p>
              </text:list-item>
              <text:list-item>
                <text:p text:style-name="P147"><text:s text:c="24"/>border.width: 1</text:p>
              </text:list-item>
              <text:list-item>
                <text:p text:style-name="P147"><text:s text:c="20"/>}</text:p>
              </text:list-item>
              <text:list-item>
                <text:p text:style-name="P147"/>
              </text:list-item>
              <text:list-item>
                <text:p text:style-name="P147"><text:s text:c="20"/>ColumnLayout {</text:p>
              </text:list-item>
              <text:list-item>
                <text:p text:style-name="P147"><text:s text:c="24"/>id: contentColumn</text:p>
              </text:list-item>
              <text:list-item>
                <text:p text:style-name="P147"><text:s text:c="24"/>anchors.fill: parent</text:p>
              </text:list-item>
              <text:list-item>
                <text:p text:style-name="P147"><text:s text:c="24"/>anchors.margins: 15</text:p>
              </text:list-item>
              <text:list-item>
                <text:p text:style-name="P147"><text:s text:c="24"/>spacing: 6</text:p>
              </text:list-item>
              <text:list-item>
                <text:p text:style-name="P147"/>
              </text:list-item>
              <text:list-item>
                <text:p text:style-name="P147"><text:s text:c="24"/>RowLayout {</text:p>
              </text:list-item>
              <text:list-item>
                <text:p text:style-name="P147"><text:soft-page-break/><text:s text:c="28"/>Layout.fillWidth: true</text:p>
              </text:list-item>
              <text:list-item>
                <text:p text:style-name="P147"><text:s text:c="28"/>Label {</text:p>
              </text:list-item>
              <text:list-item>
                <text:p text:style-name="P147"><text:s text:c="32"/>text: model.name</text:p>
              </text:list-item>
              <text:list-item>
                <text:p text:style-name="P147"><text:s text:c="32"/>font.pixelSize: 18</text:p>
              </text:list-item>
              <text:list-item>
                <text:p text:style-name="P147"><text:s text:c="32"/>font.bold: true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Label {</text:p>
              </text:list-item>
              <text:list-item>
                <text:p text:style-name="P147"><text:s text:c="32"/>text: model.price + " ₽"</text:p>
              </text:list-item>
              <text:list-item>
                <text:p text:style-name="P147"><text:s text:c="32"/>font.pixelSize: 16</text:p>
              </text:list-item>
              <text:list-item>
                <text:p text:style-name="P147"><text:s text:c="32"/>color: Material.accent</text:p>
              </text:list-item>
              <text:list-item>
                <text:p text:style-name="P147"><text:s text:c="32"/>Layout.alignment: Qt.AlignRight</text:p>
              </text:list-item>
              <text:list-item>
                <text:p text:style-name="P147"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/>
              </text:list-item>
              <text:list-item>
                <text:p text:style-name="P147"><text:s text:c="24"/>Label {</text:p>
              </text:list-item>
              <text:list-item>
                <text:p text:style-name="P147"><text:s text:c="28"/>text: model.category</text:p>
              </text:list-item>
              <text:list-item>
                <text:p text:style-name="P147"><text:s text:c="28"/>font.pixelSize: 14</text:p>
              </text:list-item>
              <text:list-item>
                <text:p text:style-name="P147"><text:s text:c="28"/>color: "#666666"</text:p>
              </text:list-item>
              <text:list-item>
                <text:p text:style-name="P147"><text:s text:c="24"/>}</text:p>
              </text:list-item>
              <text:list-item>
                <text:p text:style-name="P147"/>
              </text:list-item>
              <text:list-item>
                <text:p text:style-name="P147"><text:s text:c="24"/>Label {</text:p>
              </text:list-item>
              <text:list-item>
                <text:p text:style-name="P147"><text:s text:c="28"/>text: model.description</text:p>
              </text:list-item>
              <text:list-item>
                <text:p text:style-name="P147"><text:s text:c="28"/>font.pixelSize: 14</text:p>
              </text:list-item>
              <text:list-item>
                <text:p text:style-name="P147"><text:s text:c="28"/>color: "#777777"</text:p>
              </text:list-item>
              <text:list-item>
                <text:p text:style-name="P147"><text:s text:c="28"/>wrapMode: Text.WordWrap</text:p>
              </text:list-item>
              <text:list-item>
                <text:p text:style-name="P147"><text:s text:c="28"/>Layout.fillWidth: true</text:p>
              </text:list-item>
              <text:list-item>
                <text:p text:style-name="P147"><text:s text:c="24"/>}</text:p>
              </text:list-item>
              <text:list-item>
                <text:p text:style-name="P147"/>
              </text:list-item>
              <text:list-item>
                <text:p text:style-name="P147"><text:s text:c="24"/>Label {</text:p>
              </text:list-item>
              <text:list-item>
                <text:p text:style-name="P147"><text:s text:c="28"/>text: "Состав: " + model.composition</text:p>
              </text:list-item>
              <text:list-item>
                <text:p text:style-name="P147"><text:s text:c="28"/>font.pixelSize: 13</text:p>
              </text:list-item>
              <text:list-item>
                <text:p text:style-name="P147"><text:s text:c="28"/>color: "#888888"</text:p>
              </text:list-item>
              <text:list-item>
                <text:p text:style-name="P147"><text:s text:c="28"/>wrapMode: Text.WordWrap</text:p>
              </text:list-item>
              <text:list-item>
                <text:p text:style-name="P147"><text:s text:c="28"/>Layout.fillWidth: true</text:p>
              </text:list-item>
              <text:list-item>
                <text:p text:style-name="P147"><text:s text:c="24"/>}</text:p>
              </text:list-item>
              <text:list-item>
                <text:p text:style-name="P147"/>
              </text:list-item>
              <text:list-item>
                <text:p text:style-name="P147"><text:s text:c="24"/>Label {</text:p>
              </text:list-item>
              <text:list-item>
                <text:p text:style-name="P147"><text:soft-page-break/><text:s text:c="28"/>visible: !model.available</text:p>
              </text:list-item>
              <text:list-item>
                <text:p text:style-name="P147"><text:s text:c="28"/>text: "Нет в наличии"</text:p>
              </text:list-item>
              <text:list-item>
                <text:p text:style-name="P147"><text:s text:c="28"/>font.pixelSize: 13</text:p>
              </text:list-item>
              <text:list-item>
                <text:p text:style-name="P147"><text:s text:c="28"/>color: "#C62828"</text:p>
              </text:list-item>
              <text:list-item>
                <text:p text:style-name="P147"><text:s text:c="28"/>font.bold: true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/>
              </text:list-item>
              <text:list-item>
                <text:p text:style-name="P147"><text:s text:c="20"/>MouseArea {</text:p>
              </text:list-item>
              <text:list-item>
                <text:p text:style-name="P147"><text:s text:c="24"/>anchors.fill: parent</text:p>
              </text:list-item>
              <text:list-item>
                <text:p text:style-name="P147"><text:s text:c="24"/>onClicked: {</text:p>
              </text:list-item>
              <text:list-item>
                <text:p text:style-name="P147"><text:s text:c="28"/>menuListView.currentIndex = index</text:p>
              </text:list-item>
              <text:list-item>
                <text:p text:style-name="P147"><text:s text:c="28"/>selectedMenuIndex = index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ColumnLayout {</text:p>
              </text:list-item>
              <text:list-item>
                <text:p text:style-name="P147"><text:s text:c="12"/>Layout.preferredWidth: parent.width * 0.5</text:p>
              </text:list-item>
              <text:list-item>
                <text:p text:style-name="P147"><text:s text:c="12"/>Layout.fillHeight: true</text:p>
              </text:list-item>
              <text:list-item>
                <text:p text:style-name="P147"><text:s text:c="12"/>spacing: 10</text:p>
              </text:list-item>
              <text:list-item>
                <text:p text:style-name="P147"/>
              </text:list-item>
              <text:list-item>
                <text:p text:style-name="P147"><text:s text:c="12"/>GroupBox {</text:p>
              </text:list-item>
              <text:list-item>
                <text:p text:style-name="P147"><text:s text:c="16"/>title: "Текущий заказ"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Layout.fillHeight: true</text:p>
              </text:list-item>
              <text:list-item>
                <text:p text:style-name="P147"/>
              </text:list-item>
              <text:list-item>
                <text:p text:style-name="P147"><text:s text:c="16"/>ListView {</text:p>
              </text:list-item>
              <text:list-item>
                <text:p text:style-name="P147"><text:s text:c="20"/>id: orderListView</text:p>
              </text:list-item>
              <text:list-item>
                <text:p text:style-name="P147"><text:s text:c="20"/>anchors.fill: parent</text:p>
              </text:list-item>
              <text:list-item>
                <text:p text:style-name="P147"><text:s text:c="20"/>clip: true</text:p>
              </text:list-item>
              <text:list-item>
                <text:p text:style-name="P147"><text:s text:c="20"/>model: orderModel</text:p>
              </text:list-item>
              <text:list-item>
                <text:p text:style-name="P147"><text:s text:c="20"/>delegate: ItemDelegate {</text:p>
              </text:list-item>
              <text:list-item>
                <text:p text:style-name="P147"><text:s text:c="24"/>width: parent ? parent.width : 0</text:p>
              </text:list-item>
              <text:list-item>
                <text:p text:style-name="P147"><text:s text:c="24"/>height: 50</text:p>
              </text:list-item>
              <text:list-item>
                <text:p text:style-name="P147"><text:soft-page-break/><text:s text:c="24"/>highlighted: ListView.isCurrentItem</text:p>
              </text:list-item>
              <text:list-item>
                <text:p text:style-name="P147"><text:s text:c="24"/>text: model.name + " x" + model.quantity</text:p>
              </text:list-item>
              <text:list-item>
                <text:p text:style-name="P147"><text:s text:c="24"/>onClicked: orderListView.currentIndex = index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GridLayout {</text:p>
              </text:list-item>
              <text:list-item>
                <text:p text:style-name="P147"><text:s text:c="16"/>columns: 2</text:p>
              </text:list-item>
              <text:list-item>
                <text:p text:style-name="P147"><text:s text:c="16"/>columnSpacing: 10</text:p>
              </text:list-item>
              <text:list-item>
                <text:p text:style-name="P147"><text:s text:c="16"/>rowSpacing: 10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/>
              </text:list-item>
              <text:list-item>
                <text:p text:style-name="P147"><text:s text:c="16"/>Label { text: "Столик №:" }</text:p>
              </text:list-item>
              <text:list-item>
                <text:p text:style-name="P147"><text:s text:c="16"/>SpinBox {</text:p>
              </text:list-item>
              <text:list-item>
                <text:p text:style-name="P147"><text:s text:c="20"/>id: tableSpinBox</text:p>
              </text:list-item>
              <text:list-item>
                <text:p text:style-name="P147"><text:s text:c="20"/>from: 1; to: 50; value: 1</text:p>
              </text:list-item>
              <text:list-item>
                <text:p text:style-name="P147"><text:s text:c="20"/>editable: true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Label { text: "Кол-во:" }</text:p>
              </text:list-item>
              <text:list-item>
                <text:p text:style-name="P147"><text:s text:c="16"/>SpinBox {</text:p>
              </text:list-item>
              <text:list-item>
                <text:p text:style-name="P147"><text:s text:c="20"/>id: quantitySpinBox</text:p>
              </text:list-item>
              <text:list-item>
                <text:p text:style-name="P147"><text:s text:c="20"/>from: 1; to: 10; value: 1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Label { text: "Комментарий:" }</text:p>
              </text:list-item>
              <text:list-item>
                <text:p text:style-name="P147"><text:s text:c="16"/>TextField {</text:p>
              </text:list-item>
              <text:list-item>
                <text:p text:style-name="P147"><text:s text:c="20"/>id: requestField</text:p>
              </text:list-item>
              <text:list-item>
                <text:p text:style-name="P147"><text:s text:c="20"/>placeholderText: "без лука и т.п."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oft-page-break/><text:s text:c="12"/>RowLayout {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spacing: 10</text:p>
              </text:list-item>
              <text:list-item>
                <text:p text:style-name="P147"/>
              </text:list-item>
              <text:list-item>
                <text:p text:style-name="P147"><text:s text:c="16"/>Button {</text:p>
              </text:list-item>
              <text:list-item>
                <text:p text:style-name="P147"><text:s text:c="20"/>text: "Добавить"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enabled: selectedMenuIndex &gt;= 0</text:p>
              </text:list-item>
              <text:list-item>
                <text:p text:style-name="P147"><text:s text:c="20"/>onClicked: {</text:p>
              </text:list-item>
              <text:list-item>
                <text:p text:style-name="P147"><text:s text:c="24"/>var dish = filteredMenuModel.get(selectedMenuIndex)</text:p>
              </text:list-item>
              <text:list-item>
                <text:p text:style-name="P147"><text:s text:c="24"/>if (!dish.available) {</text:p>
              </text:list-item>
              <text:list-item>
                <text:p text:style-name="P147"><text:s text:c="28"/>errorDialog.message = "Это блюдо временно недоступно"</text:p>
              </text:list-item>
              <text:list-item>
                <text:p text:style-name="P147"><text:s text:c="28"/>errorDialog.open()</text:p>
              </text:list-item>
              <text:list-item>
                <text:p text:style-name="P147"><text:s text:c="28"/>return</text:p>
              </text:list-item>
              <text:list-item>
                <text:p text:style-name="P147"><text:s text:c="24"/>}</text:p>
              </text:list-item>
              <text:list-item>
                <text:p text:style-name="P147"/>
              </text:list-item>
              <text:list-item>
                <text:p text:style-name="P147"><text:s text:c="24"/>var warnings = dbWorker.getLowStockWarning(dish.foodId, quantitySpinBox.value)</text:p>
              </text:list-item>
              <text:list-item>
                <text:p text:style-name="P147"><text:s text:c="24"/>if (warnings.length &gt; 0) {</text:p>
              </text:list-item>
              <text:list-item>
                <text:p text:style-name="P147"><text:s text:c="28"/>var msg = "После добавления следующие продукты будут ниже минимального порога:\n"</text:p>
              </text:list-item>
              <text:list-item>
                <text:p text:style-name="P147"><text:s text:c="28"/>for (var i = 0; i &lt; warnings.length; i++) {</text:p>
              </text:list-item>
              <text:list-item>
                <text:p text:style-name="P147"><text:s text:c="32"/>msg += "• " + warnings[i].productName + ": "</text:p>
              </text:list-item>
              <text:list-item>
                <text:p text:style-name="P147"><text:s text:c="32"/>msg += warnings[i].newQuantity + " (мин. " + warnings[i].minThreshold + ")\n"</text:p>
              </text:list-item>
              <text:list-item>
                <text:p text:style-name="P147"><text:s text:c="28"/>}</text:p>
              </text:list-item>
              <text:list-item>
                <text:p text:style-name="P147"><text:s text:c="28"/>msg += "\nПродолжить добавление?"</text:p>
              </text:list-item>
              <text:list-item>
                <text:p text:style-name="P147"><text:s text:c="28"/>warningDialog.message = msg</text:p>
              </text:list-item>
              <text:list-item>
                <text:p text:style-name="P147"><text:s text:c="28"/>warningDialog.dishInfo = { foodId: dish.foodId, quantity: quantitySpinBox.value, dish: dish }</text:p>
              </text:list-item>
              <text:list-item>
                <text:p text:style-name="P147"><text:s text:c="28"/>warningDialog.open()</text:p>
              </text:list-item>
              <text:list-item>
                <text:p text:style-name="P147"><text:s text:c="24"/>} else {</text:p>
              </text:list-item>
              <text:list-item>
                <text:p text:style-name="P147"><text:s text:c="28"/>addDishToOrder(dish.foodId, quantitySpinBox.value, dish)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Button {</text:p>
              </text:list-item>
              <text:list-item>
                <text:p text:style-name="P147"><text:soft-page-break/><text:s text:c="20"/>text: "Удалить"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enabled: orderListView.currentIndex &gt;= 0</text:p>
              </text:list-item>
              <text:list-item>
                <text:p text:style-name="P147"><text:s text:c="20"/>onClicked: {</text:p>
              </text:list-item>
              <text:list-item>
                <text:p text:style-name="P147"><text:s text:c="24"/>var item = orderModel.get(orderListView.currentIndex)</text:p>
              </text:list-item>
              <text:list-item>
                <text:p text:style-name="P147"><text:s text:c="24"/>if (dbWorker.returnIngredients(item.foodId, item.quantity)) {</text:p>
              </text:list-item>
              <text:list-item>
                <text:p text:style-name="P147"><text:s text:c="28"/>orderModel.remove(orderListView.currentIndex)</text:p>
              </text:list-item>
              <text:list-item>
                <text:p text:style-name="P147"><text:s text:c="28"/>orderListView.currentIndex = -1</text:p>
              </text:list-item>
              <text:list-item>
                <text:p text:style-name="P147"><text:s text:c="24"/>} else {</text:p>
              </text:list-item>
              <text:list-item>
                <text:p text:style-name="P147"><text:s text:c="28"/>errorDialog.message = "Не удалось вернуть продукты. Удаление отменено."</text:p>
              </text:list-item>
              <text:list-item>
                <text:p text:style-name="P147"><text:s text:c="28"/>errorDialog.open()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/>
              </text:list-item>
              <text:list-item>
                <text:p text:style-name="P147"><text:s text:c="12"/>Button {</text:p>
              </text:list-item>
              <text:list-item>
                <text:p text:style-name="P147"><text:s text:c="16"/>text: "Оформить заказ"</text:p>
              </text:list-item>
              <text:list-item>
                <text:p text:style-name="P147"><text:s text:c="16"/>Layout.fillWidth: true</text:p>
              </text:list-item>
              <text:list-item>
                <text:p text:style-name="P147"><text:s text:c="16"/>height: 50</text:p>
              </text:list-item>
              <text:list-item>
                <text:p text:style-name="P147"><text:s text:c="16"/>font.pixelSize: 16</text:p>
              </text:list-item>
              <text:list-item>
                <text:p text:style-name="P147"><text:s text:c="16"/>highlighted: true</text:p>
              </text:list-item>
              <text:list-item>
                <text:p text:style-name="P147"><text:s text:c="16"/>Material.background: Material.Green</text:p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if (orderModel.count === 0) return</text:p>
              </text:list-item>
              <text:list-item>
                <text:p text:style-name="P147"/>
              </text:list-item>
              <text:list-item>
                <text:p text:style-name="P147"><text:s text:c="20"/>var total = 0</text:p>
              </text:list-item>
              <text:list-item>
                <text:p text:style-name="P147"><text:s text:c="20"/>for (var i = 0; i &lt; orderModel.count; i++) {</text:p>
              </text:list-item>
              <text:list-item>
                <text:p text:style-name="P147"><text:s text:c="24"/>var item = orderModel.get(i)</text:p>
              </text:list-item>
              <text:list-item>
                <text:p text:style-name="P147"><text:s text:c="24"/>total += item.price * item.quantity</text:p>
              </text:list-item>
              <text:list-item>
                <text:p text:style-name="P147"><text:s text:c="20"/>}</text:p>
              </text:list-item>
              <text:list-item>
                <text:p text:style-name="P147"/>
              </text:list-item>
              <text:list-item>
                <text:p text:style-name="P147"><text:s text:c="20"/>var userId = dbWorker.getUserId()</text:p>
              </text:list-item>
              <text:list-item>
                <text:p text:style-name="P147"><text:s text:c="20"/>var orderId = dbWorker.createOrder(tableSpinBox.value, userId, requestField.text, total)</text:p>
              </text:list-item>
              <text:list-item>
                <text:p text:style-name="P147"/>
              </text:list-item>
              <text:list-item>
                <text:p text:style-name="P147"><text:s text:c="20"/>if (orderId &gt; 0) {</text:p>
              </text:list-item>
              <text:list-item>
                <text:p text:style-name="P147"><text:soft-page-break/><text:s text:c="24"/>var success = true</text:p>
              </text:list-item>
              <text:list-item>
                <text:p text:style-name="P147"><text:s text:c="24"/>for (var i = 0; i &lt; orderModel.count; i++) {</text:p>
              </text:list-item>
              <text:list-item>
                <text:p text:style-name="P147"><text:s text:c="28"/>var item = orderModel.get(i)</text:p>
              </text:list-item>
              <text:list-item>
                <text:p text:style-name="P147"><text:s text:c="28"/>if (!dbWorker.addOrderItem(orderId, item.foodId, item.quantity, item.price)) {</text:p>
              </text:list-item>
              <text:list-item>
                <text:p text:style-name="P147"><text:s text:c="32"/>success = false</text:p>
              </text:list-item>
              <text:list-item>
                <text:p text:style-name="P147"><text:s text:c="32"/>break</text:p>
              </text:list-item>
              <text:list-item>
                <text:p text:style-name="P147"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4"/>if (success) {</text:p>
              </text:list-item>
              <text:list-item>
                <text:p text:style-name="P147"><text:s text:c="28"/>orderModel.clear()</text:p>
              </text:list-item>
              <text:list-item>
                <text:p text:style-name="P147"><text:s text:c="28"/>window.dataRefreshRequested()</text:p>
              </text:list-item>
              <text:list-item>
                <text:p text:style-name="P147"><text:s text:c="24"/>} else {</text:p>
              </text:list-item>
              <text:list-item>
                <text:p text:style-name="P147"><text:s text:c="28"/>loger.error("Ошибка добавления позиций заказа")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 else {</text:p>
              </text:list-item>
              <text:list-item>
                <text:p text:style-name="P147"><text:s text:c="24"/>loger.error("Ошибка создания заказа")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5">Листинг <text:sequence text:ref-name="refЛистинг16" text:name="Листинг" text:formula="ooow:Листинг+1" style:num-format="1">17</text:sequence><text:s/>— Файл <text:span text:style-name="T258">ReportsPage</text:span><text:span text:style-name="T256">.qml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list text:continue-numbering="true" text:style-name="Нумерация_20_строк_20_кода">
              <text:list-item text:start-value="1">
                <text:p text:style-name="P147">import QtQuick 2.15</text:p>
              </text:list-item>
              <text:list-item>
                <text:p text:style-name="P147">import QtQuick.Controls 2.15</text:p>
              </text:list-item>
              <text:list-item>
                <text:p text:style-name="P147">import QtQuick.Controls.Material 2.15</text:p>
              </text:list-item>
              <text:list-item>
                <text:p text:style-name="P147">import QtQuick.Layouts 1.15</text:p>
              </text:list-item>
              <text:list-item>
                <text:p text:style-name="P147"/>
              </text:list-item>
              <text:list-item>
                <text:p text:style-name="P147">Page {</text:p>
              </text:list-item>
              <text:list-item>
                <text:p text:style-name="P147"><text:s text:c="4"/>title: "Отчёты"</text:p>
              </text:list-item>
              <text:list-item>
                <text:p text:style-name="P147"/>
              </text:list-item>
              <text:list-item>
                <text:p text:style-name="P147"><text:s text:c="4"/>property int selectedReportIndex: 0</text:p>
              </text:list-item>
              <text:list-item>
                <text:p text:style-name="P147"/>
              </text:list-item>
              <text:list-item>
                <text:p text:style-name="P147"><text:s text:c="4"/>ListModel { id: dishModel }</text:p>
              </text:list-item>
              <text:list-item>
                <text:p text:style-name="P147"><text:soft-page-break/><text:s text:c="4"/>ListModel { id: waiterModel }</text:p>
              </text:list-item>
              <text:list-item>
                <text:p text:style-name="P147"/>
              </text:list-item>
              <text:list-item>
                <text:p text:style-name="P147"><text:s text:c="4"/>property int selectedDishId: 0</text:p>
              </text:list-item>
              <text:list-item>
                <text:p text:style-name="P147"><text:s text:c="4"/>property int selectedTable: 0</text:p>
              </text:list-item>
              <text:list-item>
                <text:p text:style-name="P147"><text:s text:c="4"/>property int selectedWaiterId: 0</text:p>
              </text:list-item>
              <text:list-item>
                <text:p text:style-name="P147"/>
              </text:list-item>
              <text:list-item>
                <text:p text:style-name="P147"><text:s text:c="4"/>ListModel {</text:p>
              </text:list-item>
              <text:list-item>
                <text:p text:style-name="P147"><text:s text:c="8"/>id: reportTypes</text:p>
              </text:list-item>
              <text:list-item>
                <text:p text:style-name="P147"><text:s text:c="8"/>ListElement { name: "Выручка"; type: "revenue" }</text:p>
              </text:list-item>
              <text:list-item>
                <text:p text:style-name="P147"><text:s text:c="8"/>ListElement { name: "Популярность блюд"; type: "popularity" }</text:p>
              </text:list-item>
              <text:list-item>
                <text:p text:style-name="P147"><text:s text:c="8"/>ListElement { name: "Малые остатки"; type: "lowstock" 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function loadFilterData() {</text:p>
              </text:list-item>
              <text:list-item>
                <text:p text:style-name="P147"><text:s text:c="8"/>dishModel.clear()</text:p>
              </text:list-item>
              <text:list-item>
                <text:p text:style-name="P147"><text:s text:c="8"/>dishModel.append({ id: 0, name: "Все блюда" })</text:p>
              </text:list-item>
              <text:list-item>
                <text:p text:style-name="P147"><text:s text:c="8"/>var dishes = dbWorker.getDishesList()</text:p>
              </text:list-item>
              <text:list-item>
                <text:p text:style-name="P147"><text:s text:c="8"/>for (var i = 0; i &lt; dishes.length; i++) {</text:p>
              </text:list-item>
              <text:list-item>
                <text:p text:style-name="P147"><text:s text:c="12"/>dishModel.append(dishes[i])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waiterModel.clear()</text:p>
              </text:list-item>
              <text:list-item>
                <text:p text:style-name="P147"><text:s text:c="8"/>waiterModel.append({ id: 0, name: "Все официанты" })</text:p>
              </text:list-item>
              <text:list-item>
                <text:p text:style-name="P147"><text:s text:c="8"/>var waiters = dbWorker.getWaitersList()</text:p>
              </text:list-item>
              <text:list-item>
                <text:p text:style-name="P147"><text:s text:c="8"/>for (var i = 0; i &lt; waiters.length; i++) {</text:p>
              </text:list-item>
              <text:list-item>
                <text:p text:style-name="P147"><text:s text:c="12"/>waiterModel.append(waiters[i]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Component.onCompleted: loadFilterData()</text:p>
              </text:list-item>
              <text:list-item>
                <text:p text:style-name="P147"/>
              </text:list-item>
              <text:list-item>
                <text:p text:style-name="P147"><text:s text:c="4"/>Connections {</text:p>
              </text:list-item>
              <text:list-item>
                <text:p text:style-name="P147"><text:s text:c="8"/>target: window</text:p>
              </text:list-item>
              <text:list-item>
                <text:p text:style-name="P147"><text:s text:c="8"/>function onDataRefreshRequested() {</text:p>
              </text:list-item>
              <text:list-item>
                <text:p text:style-name="P147"><text:s text:c="12"/>loadFilterData()</text:p>
              </text:list-item>
              <text:list-item>
                <text:p text:style-name="P147"><text:s text:c="8"/>}</text:p>
              </text:list-item>
              <text:list-item>
                <text:p text:style-name="P147"><text:soft-page-break/><text:s text:c="4"/>}</text:p>
              </text:list-item>
              <text:list-item>
                <text:p text:style-name="P147"/>
              </text:list-item>
              <text:list-item>
                <text:p text:style-name="P147"><text:s text:c="4"/>ColumnLayout {</text:p>
              </text:list-item>
              <text:list-item>
                <text:p text:style-name="P147"><text:s text:c="8"/>anchors.fill: parent</text:p>
              </text:list-item>
              <text:list-item>
                <text:p text:style-name="P147"><text:s text:c="8"/>anchors.margins: 10</text:p>
              </text:list-item>
              <text:list-item>
                <text:p text:style-name="P147"><text:s text:c="8"/>spacing: 15</text:p>
              </text:list-item>
              <text:list-item>
                <text:p text:style-name="P147"/>
              </text:list-item>
              <text:list-item>
                <text:p text:style-name="P147"><text:s text:c="8"/>ComboBox {</text:p>
              </text:list-item>
              <text:list-item>
                <text:p text:style-name="P147"><text:s text:c="12"/>id: reportCombo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model: reportTypes</text:p>
              </text:list-item>
              <text:list-item>
                <text:p text:style-name="P147"><text:s text:c="12"/>textRole: "name"</text:p>
              </text:list-item>
              <text:list-item>
                <text:p text:style-name="P147"><text:s text:c="12"/>onCurrentIndexChanged: selectedReportIndex = currentIndex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ColumnLayout {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visible: selectedReportIndex === 0</text:p>
              </text:list-item>
              <text:list-item>
                <text:p text:style-name="P147"><text:s text:c="12"/>spacing: 10</text:p>
              </text:list-item>
              <text:list-item>
                <text:p text:style-name="P147"/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Дата с (ГГГГ-ММ-ДД):"; Layout.preferredWidth: 120 }</text:p>
              </text:list-item>
              <text:list-item>
                <text:p text:style-name="P147"><text:s text:c="16"/>TextField { id: fromDateField; Layout.fillWidth: true; placeholderText: "2026-01-01" 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Дата по (ГГГГ-ММ-ДД):"; Layout.preferredWidth: 120 }</text:p>
              </text:list-item>
              <text:list-item>
                <text:p text:style-name="P147"><text:s text:c="16"/>TextField { id: toDateField; Layout.fillWidth: true; placeholderText: "2026-12-31" 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Блюдо:"; Layout.preferredWidth: 120 }</text:p>
              </text:list-item>
              <text:list-item>
                <text:p text:style-name="P147"><text:s text:c="16"/>ComboBox {</text:p>
              </text:list-item>
              <text:list-item>
                <text:p text:style-name="P147"><text:s text:c="20"/>id: dishCombo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model: dishModel</text:p>
              </text:list-item>
              <text:list-item>
                <text:p text:style-name="P147"><text:s text:c="20"/>textRole: "name"</text:p>
              </text:list-item>
              <text:list-item>
                <text:p text:style-name="P147"><text:s text:c="20"/>onCurrentIndexChanged: selectedDishId = model.get(currentIndex).id</text:p>
              </text:list-item>
              <text:list-item>
                <text:p text:style-name="P147"><text:soft-page-break/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Столик:"; Layout.preferredWidth: 120 }</text:p>
              </text:list-item>
              <text:list-item>
                <text:p text:style-name="P147"><text:s text:c="16"/>SpinBox {</text:p>
              </text:list-item>
              <text:list-item>
                <text:p text:style-name="P147"><text:s text:c="20"/>id: tableSpinBox</text:p>
              </text:list-item>
              <text:list-item>
                <text:p text:style-name="P147"><text:s text:c="20"/>from: 0; to: 50; value: 0</text:p>
              </text:list-item>
              <text:list-item>
                <text:p text:style-name="P147"><text:s text:c="20"/>editable: true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onValueChanged: selectedTable = value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Официант:"; Layout.preferredWidth: 120 }</text:p>
              </text:list-item>
              <text:list-item>
                <text:p text:style-name="P147"><text:s text:c="16"/>ComboBox {</text:p>
              </text:list-item>
              <text:list-item>
                <text:p text:style-name="P147"><text:s text:c="20"/>id: waiterCombo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model: waiterModel</text:p>
              </text:list-item>
              <text:list-item>
                <text:p text:style-name="P147"><text:s text:c="20"/>textRole: "name"</text:p>
              </text:list-item>
              <text:list-item>
                <text:p text:style-name="P147"><text:s text:c="20"/>onCurrentIndexChanged: selectedWaiterId = model.get(currentIndex).id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ColumnLayout {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visible: selectedReportIndex === 1</text:p>
              </text:list-item>
              <text:list-item>
                <text:p text:style-name="P147"><text:s text:c="12"/>spacing: 10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Дата с (ГГГГ-ММ-ДД):"; Layout.preferredWidth: 120 }</text:p>
              </text:list-item>
              <text:list-item>
                <text:p text:style-name="P147"><text:s text:c="16"/>TextField { id: popFromDateField; Layout.fillWidth: true; placeholderText: "2026-01-01" }</text:p>
              </text:list-item>
              <text:list-item>
                <text:p text:style-name="P147"><text:s text:c="12"/>}</text:p>
              </text:list-item>
              <text:list-item>
                <text:p text:style-name="P147"><text:s text:c="12"/>RowLayout {</text:p>
              </text:list-item>
              <text:list-item>
                <text:p text:style-name="P147"><text:s text:c="16"/>Label { text: "Дата по (ГГГГ-ММ-ДД):"; Layout.preferredWidth: 120 }</text:p>
              </text:list-item>
              <text:list-item>
                <text:p text:style-name="P147"><text:s text:c="16"/>TextField { id: popToDateField; Layout.fillWidth: true; placeholderText: "2026-12-31" }</text:p>
              </text:list-item>
              <text:list-item>
                <text:p text:style-name="P147"><text:s text:c="12"/>}</text:p>
              </text:list-item>
              <text:list-item>
                <text:p text:style-name="P147"><text:soft-page-break/><text:s text:c="8"/>}</text:p>
              </text:list-item>
              <text:list-item>
                <text:p text:style-name="P147"/>
              </text:list-item>
              <text:list-item>
                <text:p text:style-name="P147"><text:s text:c="8"/>Label {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visible: selectedReportIndex === 2</text:p>
              </text:list-item>
              <text:list-item>
                <text:p text:style-name="P147"><text:s text:c="12"/>text: "Отображаются продукты, количество которых ниже их минимального порога (MinThreshold)"</text:p>
              </text:list-item>
              <text:list-item>
                <text:p text:style-name="P147"><text:s text:c="12"/>font.pixelSize: 12</text:p>
              </text:list-item>
              <text:list-item>
                <text:p text:style-name="P147"><text:s text:c="12"/>color: Material.secondaryTextColor</text:p>
              </text:list-item>
              <text:list-item>
                <text:p text:style-name="P147"><text:s text:c="12"/>wrapMode: Text.WordWrap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Button {</text:p>
              </text:list-item>
              <text:list-item>
                <text:p text:style-name="P147"><text:s text:c="12"/>text: "Сформировать"</text:p>
              </text:list-item>
              <text:list-item>
                <text:p text:style-name="P147"><text:s text:c="12"/>Layout.alignment: Qt.AlignHCenter</text:p>
              </text:list-item>
              <text:list-item>
                <text:p text:style-name="P147"><text:s text:c="12"/>Layout.preferredWidth: 200</text:p>
              </text:list-item>
              <text:list-item>
                <text:p text:style-name="P147"><text:s text:c="12"/>height: 50</text:p>
              </text:list-item>
              <text:list-item>
                <text:p text:style-name="P147"><text:s text:c="12"/>font.pixelSize: 16</text:p>
              </text:list-item>
              <text:list-item>
                <text:p text:style-name="P147"><text:s text:c="12"/>highlighted: true</text:p>
              </text:list-item>
              <text:list-item>
                <text:p text:style-name="P147"><text:s text:c="12"/>Material.background: Material.Green</text:p>
              </text:list-item>
              <text:list-item>
                <text:p text:style-name="P147"><text:s text:c="12"/>onClicked: {</text:p>
              </text:list-item>
              <text:list-item>
                <text:p text:style-name="P147"><text:s text:c="16"/>resultsText.text = ""</text:p>
              </text:list-item>
              <text:list-item>
                <text:p text:style-name="P147"/>
              </text:list-item>
              <text:list-item>
                <text:p text:style-name="P147"><text:s text:c="16"/>if (selectedReportIndex === 0) {</text:p>
              </text:list-item>
              <text:list-item>
                <text:p text:style-name="P147"><text:s text:c="20"/>var from = fromDateField.text.trim()</text:p>
              </text:list-item>
              <text:list-item>
                <text:p text:style-name="P147"><text:s text:c="20"/>var to = toDateField.text.trim()</text:p>
              </text:list-item>
              <text:list-item>
                <text:p text:style-name="P147"><text:s text:c="20"/>if (from === "" || to === "") {</text:p>
              </text:list-item>
              <text:list-item>
                <text:p text:style-name="P147"><text:s text:c="24"/>resultsText.text = "Введите даты в формате ГГГГ-ММ-ДД"</text:p>
              </text:list-item>
              <text:list-item>
                <text:p text:style-name="P147"><text:s text:c="24"/>return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var totalReport = dbWorker.getReportRevenue(from, to, selectedDishId, selectedTable, selectedWaiterId)</text:p>
              </text:list-item>
              <text:list-item>
                <text:p text:style-name="P147"><text:s text:c="20"/>if (totalReport.error) {</text:p>
              </text:list-item>
              <text:list-item>
                <text:p text:style-name="P147"><text:s text:c="24"/>resultsText.text = "Ошибка: " + totalReport.error</text:p>
              </text:list-item>
              <text:list-item>
                <text:p text:style-name="P147"><text:s text:c="24"/>return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var text = "Общая выручка: " + totalReport.totalRevenue.toFixed(2) + " руб.\n\n"</text:p>
              </text:list-item>
              <text:list-item>
                <text:p text:style-name="P147"><text:soft-page-break/><text:s text:c="20"/>var days = dbWorker.getRevenueByDay(from, to, selectedDishId, selectedTable, selectedWaiterId)</text:p>
              </text:list-item>
              <text:list-item>
                <text:p text:style-name="P147"><text:s text:c="20"/>if (days.length === 0) {</text:p>
              </text:list-item>
              <text:list-item>
                <text:p text:style-name="P147"><text:s text:c="24"/>text += "Нет заказов за указанный период"</text:p>
              </text:list-item>
              <text:list-item>
                <text:p text:style-name="P147"><text:s text:c="20"/>} else {</text:p>
              </text:list-item>
              <text:list-item>
                <text:p text:style-name="P147"><text:s text:c="24"/>text += "Выручка по дням:\n"</text:p>
              </text:list-item>
              <text:list-item>
                <text:p text:style-name="P147"><text:s text:c="24"/>for (var i = 0; i &lt; days.length; i++) {</text:p>
              </text:list-item>
              <text:list-item>
                <text:p text:style-name="P147"><text:s text:c="28"/>text += days[i].date + ": " + days[i].total.toFixed(2) + " руб.\n"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resultsText.text = text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else if (selectedReportIndex === 1) {</text:p>
              </text:list-item>
              <text:list-item>
                <text:p text:style-name="P147"><text:s text:c="20"/>var from = popFromDateField.text.trim()</text:p>
              </text:list-item>
              <text:list-item>
                <text:p text:style-name="P147"><text:s text:c="20"/>var to = popToDateField.text.trim()</text:p>
              </text:list-item>
              <text:list-item>
                <text:p text:style-name="P147"><text:s text:c="20"/>if (from === "" || to === "") {</text:p>
              </text:list-item>
              <text:list-item>
                <text:p text:style-name="P147"><text:s text:c="24"/>resultsText.text = "Введите даты в формате ГГГГ-ММ-ДД"</text:p>
              </text:list-item>
              <text:list-item>
                <text:p text:style-name="P147"><text:s text:c="24"/>return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var popularity = dbWorker.getFoodPopularity(from, to)</text:p>
              </text:list-item>
              <text:list-item>
                <text:p text:style-name="P147"><text:s text:c="20"/>if (popularity.length === 0) {</text:p>
              </text:list-item>
              <text:list-item>
                <text:p text:style-name="P147"><text:s text:c="24"/>resultsText.text = "Нет заказов за указанный период"</text:p>
              </text:list-item>
              <text:list-item>
                <text:p text:style-name="P147"><text:s text:c="20"/>} else {</text:p>
              </text:list-item>
              <text:list-item>
                <text:p text:style-name="P147"><text:s text:c="24"/>var text = "Популярность блюд:\n"</text:p>
              </text:list-item>
              <text:list-item>
                <text:p text:style-name="P147"><text:s text:c="24"/>for (var i = 0; i &lt; popularity.length; i++) {</text:p>
              </text:list-item>
              <text:list-item>
                <text:p text:style-name="P147"><text:s text:c="28"/>text += "• " + popularity[i].foodName + ": " + popularity[i].count + " порц.\n"</text:p>
              </text:list-item>
              <text:list-item>
                <text:p text:style-name="P147"><text:s text:c="24"/>}</text:p>
              </text:list-item>
              <text:list-item>
                <text:p text:style-name="P147"><text:s text:c="24"/>resultsText.text = text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6"/>else if (selectedReportIndex === 2) {</text:p>
              </text:list-item>
              <text:list-item>
                <text:p text:style-name="P147"><text:s text:c="20"/>var lowStock = dbWorker.getReportLowStock()</text:p>
              </text:list-item>
              <text:list-item>
                <text:p text:style-name="P147"><text:s text:c="20"/>if (lowStock.length === 0) {</text:p>
              </text:list-item>
              <text:list-item>
                <text:p text:style-name="P147"><text:s text:c="24"/>resultsText.text = "Все продукты в наличии выше минимального порога"</text:p>
              </text:list-item>
              <text:list-item>
                <text:p text:style-name="P147"><text:s text:c="20"/>} else {</text:p>
              </text:list-item>
              <text:list-item>
                <text:p text:style-name="P147"><text:s text:c="24"/>var text = "Продукты ниже минимального порога:\n"</text:p>
              </text:list-item>
              <text:list-item>
                <text:p text:style-name="P147"><text:soft-page-break/><text:s text:c="24"/>for (var i = 0; i &lt; lowStock.length; i++) {</text:p>
              </text:list-item>
              <text:list-item>
                <text:p text:style-name="P147"><text:s text:c="28"/>text += "• " + lowStock[i].name + ": " + lowStock[i].quantity +</text:p>
              </text:list-item>
              <text:list-item>
                <text:p text:style-name="P147"><text:s text:c="36"/>" (мин. " + lowStock[i].minThreshold + ")\n"</text:p>
              </text:list-item>
              <text:list-item>
                <text:p text:style-name="P147"><text:s text:c="24"/>}</text:p>
              </text:list-item>
              <text:list-item>
                <text:p text:style-name="P147"><text:s text:c="24"/>resultsText.text = text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Flickable {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Layout.fillHeight: true</text:p>
              </text:list-item>
              <text:list-item>
                <text:p text:style-name="P147"><text:s text:c="12"/>contentHeight: resultsText.implicitHeight</text:p>
              </text:list-item>
              <text:list-item>
                <text:p text:style-name="P147"><text:s text:c="12"/>clip: true</text:p>
              </text:list-item>
              <text:list-item>
                <text:p text:style-name="P147"/>
              </text:list-item>
              <text:list-item>
                <text:p text:style-name="P147"><text:s text:c="12"/>TextArea {</text:p>
              </text:list-item>
              <text:list-item>
                <text:p text:style-name="P147"><text:s text:c="16"/>id: resultsText</text:p>
              </text:list-item>
              <text:list-item>
                <text:p text:style-name="P147"><text:s text:c="16"/>width: parent.width</text:p>
              </text:list-item>
              <text:list-item>
                <text:p text:style-name="P147"><text:s text:c="16"/>text: "Выберите отчёт и нажмите 'Сформировать'"</text:p>
              </text:list-item>
              <text:list-item>
                <text:p text:style-name="P147"><text:s text:c="16"/>font.pixelSize: 14</text:p>
              </text:list-item>
              <text:list-item>
                <text:p text:style-name="P147"><text:s text:c="16"/>readOnly: true</text:p>
              </text:list-item>
              <text:list-item>
                <text:p text:style-name="P147"><text:s text:c="16"/>wrapMode: TextEdit.Wrap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56">Листинг <text:sequence text:ref-name="refЛистинг17" text:name="Листинг" text:formula="ooow:Листинг+1" style:num-format="1">18</text:sequence><text:s/>— <text:span text:style-name="T259">StockPage</text:span><text:span text:style-name="T256">.qml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list text:continue-numbering="true" text:style-name="Нумерация_20_строк_20_кода">
              <text:list-item text:start-value="1">
                <text:p text:style-name="P147">import QtQuick 2.15</text:p>
              </text:list-item>
              <text:list-item>
                <text:p text:style-name="P147">import QtQuick.Controls 2.15</text:p>
              </text:list-item>
              <text:list-item>
                <text:p text:style-name="P147">import QtQuick.Controls.Material 2.15</text:p>
              </text:list-item>
              <text:list-item>
                <text:p text:style-name="P147">import QtQuick.Layouts 1.15</text:p>
              </text:list-item>
              <text:list-item>
                <text:p text:style-name="P147"/>
              </text:list-item>
              <text:list-item>
                <text:p text:style-name="P147">Page {</text:p>
              </text:list-item>
              <text:list-item>
                <text:p text:style-name="P147"><text:soft-page-break/><text:s text:c="4"/>title: "Склад"</text:p>
              </text:list-item>
              <text:list-item>
                <text:p text:style-name="P147"/>
              </text:list-item>
              <text:list-item>
                <text:p text:style-name="P147"><text:s text:c="4"/>ListModel { id: stockModel }</text:p>
              </text:list-item>
              <text:list-item>
                <text:p text:style-name="P147"><text:s text:c="4"/>property int selectedProductIndex: -1</text:p>
              </text:list-item>
              <text:list-item>
                <text:p text:style-name="P147"/>
              </text:list-item>
              <text:list-item>
                <text:p text:style-name="P147"><text:s text:c="4"/>function loadProducts() {</text:p>
              </text:list-item>
              <text:list-item>
                <text:p text:style-name="P147"><text:s text:c="8"/>var products = dbWorker.getProducts()</text:p>
              </text:list-item>
              <text:list-item>
                <text:p text:style-name="P147"><text:s text:c="8"/>stockModel.clear()</text:p>
              </text:list-item>
              <text:list-item>
                <text:p text:style-name="P147"><text:s text:c="8"/>for (var i = 0; i &lt; products.length; i++) {</text:p>
              </text:list-item>
              <text:list-item>
                <text:p text:style-name="P147"><text:s text:c="12"/>stockModel.append(products[i])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/>
              </text:list-item>
              <text:list-item>
                <text:p text:style-name="P147"><text:s text:c="4"/>function reloadData() {</text:p>
              </text:list-item>
              <text:list-item>
                <text:p text:style-name="P147"><text:s text:c="12"/>print("StockPage: reloading products")</text:p>
              </text:list-item>
              <text:list-item>
                <text:p text:style-name="P147"><text:s text:c="12"/>loadProducts()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Connections {</text:p>
              </text:list-item>
              <text:list-item>
                <text:p text:style-name="P147"><text:s text:c="12"/>target: window</text:p>
              </text:list-item>
              <text:list-item>
                <text:p text:style-name="P147"><text:s text:c="12"/>function onDataRefreshRequested() {</text:p>
              </text:list-item>
              <text:list-item>
                <text:p text:style-name="P147"><text:s text:c="16"/>reloadData()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4"/>Component.onCompleted: loadProducts()</text:p>
              </text:list-item>
              <text:list-item>
                <text:p text:style-name="P147"/>
              </text:list-item>
              <text:list-item>
                <text:p text:style-name="P147"><text:s text:c="4"/>ColumnLayout {</text:p>
              </text:list-item>
              <text:list-item>
                <text:p text:style-name="P147"><text:s text:c="8"/>anchors.fill: parent</text:p>
              </text:list-item>
              <text:list-item>
                <text:p text:style-name="P147"><text:s text:c="8"/>anchors.margins: 10</text:p>
              </text:list-item>
              <text:list-item>
                <text:p text:style-name="P147"><text:s text:c="8"/>spacing: 10</text:p>
              </text:list-item>
              <text:list-item>
                <text:p text:style-name="P147"/>
              </text:list-item>
              <text:list-item>
                <text:p text:style-name="P147"><text:s text:c="8"/>ListView {</text:p>
              </text:list-item>
              <text:list-item>
                <text:p text:style-name="P147"><text:s text:c="12"/>id: productListView</text:p>
              </text:list-item>
              <text:list-item>
                <text:p text:style-name="P147"><text:s text:c="12"/>Layout.fillWidth: true</text:p>
              </text:list-item>
              <text:list-item>
                <text:p text:style-name="P147"><text:s text:c="12"/>Layout.fillHeight: true</text:p>
              </text:list-item>
              <text:list-item>
                <text:p text:style-name="P147"><text:soft-page-break/><text:s text:c="12"/>clip: true</text:p>
              </text:list-item>
              <text:list-item>
                <text:p text:style-name="P147"><text:s text:c="12"/>model: stockModel</text:p>
              </text:list-item>
              <text:list-item>
                <text:p text:style-name="P147"><text:s text:c="12"/>delegate: ItemDelegate {</text:p>
              </text:list-item>
              <text:list-item>
                <text:p text:style-name="P147"><text:s text:c="16"/>width: parent ? parent.width : 0</text:p>
              </text:list-item>
              <text:list-item>
                <text:p text:style-name="P147"><text:s text:c="16"/>height: 60</text:p>
              </text:list-item>
              <text:list-item>
                <text:p text:style-name="P147"><text:s text:c="16"/>highlighted: ListView.isCurrentItem</text:p>
              </text:list-item>
              <text:list-item>
                <text:p text:style-name="P147"/>
              </text:list-item>
              <text:list-item>
                <text:p text:style-name="P147"><text:s text:c="16"/>background: Rectangle {</text:p>
              </text:list-item>
              <text:list-item>
                <text:p text:style-name="P147"><text:s text:c="20"/>color: model.quantity &lt; model.minThreshold ? "#FFCDD2" : "transparent"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RowLayout {</text:p>
              </text:list-item>
              <text:list-item>
                <text:p text:style-name="P147"><text:s text:c="20"/>anchors.fill: parent</text:p>
              </text:list-item>
              <text:list-item>
                <text:p text:style-name="P147"><text:s text:c="20"/>anchors.margins: 10</text:p>
              </text:list-item>
              <text:list-item>
                <text:p text:style-name="P147"><text:s text:c="20"/>Label {</text:p>
              </text:list-item>
              <text:list-item>
                <text:p text:style-name="P147"><text:s text:c="24"/>text: model.name</text:p>
              </text:list-item>
              <text:list-item>
                <text:p text:style-name="P147"><text:s text:c="24"/>font.pixelSize: 18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0"/>}</text:p>
              </text:list-item>
              <text:list-item>
                <text:p text:style-name="P147"><text:s text:c="20"/>Label {</text:p>
              </text:list-item>
              <text:list-item>
                <text:p text:style-name="P147"><text:s text:c="24"/>text: model.quantity + " " + model.unit</text:p>
              </text:list-item>
              <text:list-item>
                <text:p text:style-name="P147"><text:s text:c="24"/>font.pixelSize: 16</text:p>
              </text:list-item>
              <text:list-item>
                <text:p text:style-name="P147"><text:s text:c="24"/>color: "#555"</text:p>
              </text:list-item>
              <text:list-item>
                <text:p text:style-name="P147"><text:s text:c="24"/>Layout.alignment: Qt.AlignRight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onClicked: {</text:p>
              </text:list-item>
              <text:list-item>
                <text:p text:style-name="P147"><text:s text:c="20"/>productListView.currentIndex = index</text:p>
              </text:list-item>
              <text:list-item>
                <text:p text:style-name="P147"><text:s text:c="20"/>selectedProductIndex = index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/>
              </text:list-item>
              <text:list-item>
                <text:p text:style-name="P147"><text:s text:c="8"/>GroupBox {</text:p>
              </text:list-item>
              <text:list-item>
                <text:p text:style-name="P147"><text:s text:c="12"/>title: "Изменение остатка"</text:p>
              </text:list-item>
              <text:list-item>
                <text:p text:style-name="P147"><text:soft-page-break/><text:s text:c="12"/>Layout.fillWidth: true</text:p>
              </text:list-item>
              <text:list-item>
                <text:p text:style-name="P147"><text:s text:c="12"/>enabled: selectedProductIndex &gt;= 0</text:p>
              </text:list-item>
              <text:list-item>
                <text:p text:style-name="P147"/>
              </text:list-item>
              <text:list-item>
                <text:p text:style-name="P147"><text:s text:c="12"/>ColumnLayout {</text:p>
              </text:list-item>
              <text:list-item>
                <text:p text:style-name="P147"><text:s text:c="16"/>anchors.fill: parent</text:p>
              </text:list-item>
              <text:list-item>
                <text:p text:style-name="P147"><text:s text:c="16"/>spacing: 10</text:p>
              </text:list-item>
              <text:list-item>
                <text:p text:style-name="P147"/>
              </text:list-item>
              <text:list-item>
                <text:p text:style-name="P147"><text:s text:c="16"/>RowLayout {</text:p>
              </text:list-item>
              <text:list-item>
                <text:p text:style-name="P147"><text:s text:c="20"/>Label { text: "Продукт:"; font.bold: true }</text:p>
              </text:list-item>
              <text:list-item>
                <text:p text:style-name="P147"><text:s text:c="20"/>Label { text: selectedProductIndex &gt;= 0 ? stockModel.get(selectedProductIndex).name : "" 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TextField {</text:p>
              </text:list-item>
              <text:list-item>
                <text:p text:style-name="P147"><text:s text:c="20"/>id: deltaField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placeholderText: "Количество"</text:p>
              </text:list-item>
              <text:list-item>
                <text:p text:style-name="P147"><text:s text:c="20"/>validator: IntValidator { bottom: 0; top: 10000 }</text:p>
              </text:list-item>
              <text:list-item>
                <text:p text:style-name="P147"><text:s text:c="16"/>}</text:p>
              </text:list-item>
              <text:list-item>
                <text:p text:style-name="P147"/>
              </text:list-item>
              <text:list-item>
                <text:p text:style-name="P147"><text:s text:c="16"/>RowLayout {</text:p>
              </text:list-item>
              <text:list-item>
                <text:p text:style-name="P147"><text:s text:c="20"/>Layout.fillWidth: true</text:p>
              </text:list-item>
              <text:list-item>
                <text:p text:style-name="P147"><text:s text:c="20"/>spacing: 10</text:p>
              </text:list-item>
              <text:list-item>
                <text:p text:style-name="P147"/>
              </text:list-item>
              <text:list-item>
                <text:p text:style-name="P147"><text:s text:c="20"/>Button {</text:p>
              </text:list-item>
              <text:list-item>
                <text:p text:style-name="P147"><text:s text:c="24"/>text: "Добавить"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Material.background: Material.Green</text:p>
              </text:list-item>
              <text:list-item>
                <text:p text:style-name="P147"><text:s text:c="24"/>onClicked: {</text:p>
              </text:list-item>
              <text:list-item>
                <text:p text:style-name="P147"><text:s text:c="28"/>if (selectedProductIndex &lt; 0) return</text:p>
              </text:list-item>
              <text:list-item>
                <text:p text:style-name="P147"><text:s text:c="28"/>var delta = parseInt(deltaField.text) || 0</text:p>
              </text:list-item>
              <text:list-item>
                <text:p text:style-name="P147"><text:s text:c="28"/>if (delta &lt;= 0) return</text:p>
              </text:list-item>
              <text:list-item>
                <text:p text:style-name="P147"><text:s text:c="28"/>var product = stockModel.get(selectedProductIndex)</text:p>
              </text:list-item>
              <text:list-item>
                <text:p text:style-name="P147"><text:s text:c="28"/>if (dbWorker.addProductQuantity(product.productId, delta)) {</text:p>
              </text:list-item>
              <text:list-item>
                <text:p text:style-name="P147"><text:s text:c="32"/>product.quantity += delta</text:p>
              </text:list-item>
              <text:list-item>
                <text:p text:style-name="P147"><text:s text:c="32"/>stockModel.setProperty(selectedProductIndex, "quantity", product.quantity)</text:p>
              </text:list-item>
              <text:list-item>
                <text:p text:style-name="P147"><text:soft-page-break/><text:s text:c="32"/>deltaField.clear()</text:p>
              </text:list-item>
              <text:list-item>
                <text:p text:style-name="P147"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/>
              </text:list-item>
              <text:list-item>
                <text:p text:style-name="P147"><text:s text:c="20"/>Button {</text:p>
              </text:list-item>
              <text:list-item>
                <text:p text:style-name="P147"><text:s text:c="24"/>text: "Убавить"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Material.background: Material.Red</text:p>
              </text:list-item>
              <text:list-item>
                <text:p text:style-name="P147"><text:s text:c="24"/>onClicked: {</text:p>
              </text:list-item>
              <text:list-item>
                <text:p text:style-name="P147"><text:s text:c="28"/>if (selectedProductIndex &lt; 0) return</text:p>
              </text:list-item>
              <text:list-item>
                <text:p text:style-name="P147"><text:s text:c="28"/>var delta = parseInt(deltaField.text) || 0</text:p>
              </text:list-item>
              <text:list-item>
                <text:p text:style-name="P147"><text:s text:c="28"/>if (delta &lt;= 0) return</text:p>
              </text:list-item>
              <text:list-item>
                <text:p text:style-name="P147"><text:s text:c="28"/>var product = stockModel.get(selectedProductIndex)</text:p>
              </text:list-item>
              <text:list-item>
                <text:p text:style-name="P147"><text:s text:c="28"/>if (product.quantity - delta &gt;= 0) {</text:p>
              </text:list-item>
              <text:list-item>
                <text:p text:style-name="P147"><text:s text:c="32"/>if (dbWorker.addProductQuantity(product.productId, -delta)) {</text:p>
              </text:list-item>
              <text:list-item>
                <text:p text:style-name="P147"><text:s text:c="36"/>product.quantity -= delta</text:p>
              </text:list-item>
              <text:list-item>
                <text:p text:style-name="P147"><text:s text:c="36"/>stockModel.setProperty(selectedProductIndex, "quantity", product.quantity)</text:p>
              </text:list-item>
              <text:list-item>
                <text:p text:style-name="P147"><text:s text:c="36"/>deltaField.clear()</text:p>
              </text:list-item>
              <text:list-item>
                <text:p text:style-name="P147"><text:s text:c="32"/>}</text:p>
              </text:list-item>
              <text:list-item>
                <text:p text:style-name="P147"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/>
              </text:list-item>
              <text:list-item>
                <text:p text:style-name="P147"><text:s text:c="20"/>Button {</text:p>
              </text:list-item>
              <text:list-item>
                <text:p text:style-name="P147"><text:s text:c="24"/>text: "Установить"</text:p>
              </text:list-item>
              <text:list-item>
                <text:p text:style-name="P147"><text:s text:c="24"/>Layout.fillWidth: true</text:p>
              </text:list-item>
              <text:list-item>
                <text:p text:style-name="P147"><text:s text:c="24"/>Material.background: "#8B4513"</text:p>
              </text:list-item>
              <text:list-item>
                <text:p text:style-name="P147"><text:s text:c="24"/>onClicked: {</text:p>
              </text:list-item>
              <text:list-item>
                <text:p text:style-name="P147"><text:s text:c="28"/>if (selectedProductIndex &lt; 0) return</text:p>
              </text:list-item>
              <text:list-item>
                <text:p text:style-name="P147"><text:s text:c="28"/>var newVal = parseInt(deltaField.text) || 0</text:p>
              </text:list-item>
              <text:list-item>
                <text:p text:style-name="P147"><text:s text:c="28"/>var product = stockModel.get(selectedProductIndex)</text:p>
              </text:list-item>
              <text:list-item>
                <text:p text:style-name="P147"><text:s text:c="28"/>if (dbWorker.updateProductQuantity(product.productId, newVal)) {</text:p>
              </text:list-item>
              <text:list-item>
                <text:p text:style-name="P147"><text:s text:c="32"/>product.quantity = newVal</text:p>
              </text:list-item>
              <text:list-item>
                <text:p text:style-name="P147"><text:s text:c="32"/>stockModel.setProperty(selectedProductIndex, "quantity", product.quantity)</text:p>
              </text:list-item>
              <text:list-item>
                <text:p text:style-name="P147"><text:s text:c="32"/>deltaField.clear()</text:p>
              </text:list-item>
              <text:list-item>
                <text:p text:style-name="P147"><text:soft-page-break/><text:s text:c="28"/>}</text:p>
              </text:list-item>
              <text:list-item>
                <text:p text:style-name="P147"><text:s text:c="24"/>}</text:p>
              </text:list-item>
              <text:list-item>
                <text:p text:style-name="P147"><text:s text:c="20"/>}</text:p>
              </text:list-item>
              <text:list-item>
                <text:p text:style-name="P147"><text:s text:c="16"/>}</text:p>
              </text:list-item>
              <text:list-item>
                <text:p text:style-name="P147"><text:s text:c="12"/>}</text:p>
              </text:list-item>
              <text:list-item>
                <text:p text:style-name="P147"><text:s text:c="8"/>}</text:p>
              </text:list-item>
              <text:list-item>
                <text:p text:style-name="P147"><text:s text:c="4"/>}</text:p>
              </text:list-item>
              <text:list-item>
                <text:p text:style-name="P147">}</text:p>
              </text:list-item>
            </text:list>
          </table:table-cell>
        </table:table-row>
      </table:table>
      <text:p text:style-name="P148"/>
      <text:p text:style-name="P148"/>
      <text:p text:style-name="P3"/>
      <text:h text:style-name="P138" text:outline-level="1"><text:bookmark-start text:name="__RefHeading___Toc8908_1636301399 Копия 1"/>П<text:span text:style-name="T248">РИЛОЖЕНИЕ</text:span> <text:span text:style-name="T122">Б</text:span><text:bookmark-end text:name="__RefHeading___Toc8908_1636301399 Копия 1"/></text:h>
      <text:h text:style-name="P157" text:outline-level="1"/>
      <text:h text:style-name="P157" text:outline-level="1"><text:bookmark-start text:name="__RefHeading___Toc1722_2115060514"/>Тест-кейсы и тест-сьюты<text:bookmark-end text:name="__RefHeading___Toc1722_2115060514"/></text:h>
      <text:p text:style-name="P158"/>
      <text:p text:style-name="P158"/>
      <text:h text:style-name="P138" text:outline-level="1"><text:bookmark-start text:name="__RefHeading___Toc8908_1636301399"/>П<text:span text:style-name="T248">РИЛОЖЕНИЕ</text:span> <text:span text:style-name="T122">В</text:span><text:bookmark-end text:name="__RefHeading___Toc8908_1636301399"/></text:h>
      <text:h text:style-name="P139" text:outline-level="1"/>
      <text:h text:style-name="P139" text:outline-level="1"><text:bookmark-start text:name="__RefHeading___Toc1724_2115060514"/>Документирование программного кода<text:bookmark-end text:name="__RefHeading___Toc1724_2115060514"/></text:h>
      <text:p text:style-name="P3"/>
      <text:p text:style-name="P159">1. Окно авторизации</text:p>
      <text:p text:style-name="P159">При запуске приложения открывается окно входа в систему.</text:p>
      <text:p text:style-name="P159"><draw:frame draw:style-name="fr6" draw:name="Врезка5" text:anchor-type="char" svg:width="17cm" draw:z-index="11"><draw:text-box fo:min-height="13.266cm"><text:p text:style-name="Drawing"><draw:frame draw:style-name="fr5" draw:name="Изображение5" text:anchor-type="paragraph" svg:width="17cm" style:rel-width="100%" svg:height="13.266cm" style:rel-height="scale" draw:z-index="12"><draw:image xlink:href="Pictures/100000010000040100000320FD484C2E.png" xlink:type="simple" xlink:show="embed" xlink:actuate="onLoad" draw:mime-type="image/png"/></draw:frame>Рисунок <text:sequence text:ref-name="refDrawing4" text:name="Drawing" text:formula="ooow:Drawing+1" style:num-format="1">7</text:sequence><text:s/>— Окно авторизации</text:p></draw:text-box></draw:frame></text:p>
      <text:p text:style-name="P159">Элементы интерфейса:</text:p>
      <text:list text:style-name="L14">
        <text:list-item>
          <text:p text:style-name="P160">Поле «Логин» – введите имя пользователя.</text:p>
        </text:list-item>
        <text:list-item>
          <text:p text:style-name="P160">Поле «Пароль» – введите пароль (символы скрываются).</text:p>
        </text:list-item>
        <text:list-item>
          <text:p text:style-name="P160">Кнопка «Войти» – выполняет проверку данных.</text:p>
        </text:list-item>
        <text:list-item>
          <text:p text:style-name="P160"><text:soft-page-break/>Кнопка «Настройки» – открывает диалог настройки подключения </text:p>
        </text:list-item>
      </text:list>
      <text:p text:style-name="P161"/>
      <text:p text:style-name="P161">2. Диалог настроек</text:p>
      <text:p text:style-name="P161">Диалог предназначен для изменения параметров подключения к серверу и базе данных. Доступен из окна авторизации или из выдвижного меню.</text:p>
      <text:p text:style-name="P161"><draw:frame draw:style-name="fr1" draw:name="Врезка6" text:anchor-type="char" svg:width="17cm" draw:z-index="13"><draw:text-box fo:min-height="13.259cm"><text:p text:style-name="Drawing"><draw:frame draw:style-name="fr5" draw:name="Изображение6" text:anchor-type="paragraph" svg:width="17cm" style:rel-width="100%" svg:height="13.259cm" style:rel-height="scale" draw:z-index="14"><draw:image xlink:href="Pictures/10000001000003FF0000031E87334468.png" xlink:type="simple" xlink:show="embed" xlink:actuate="onLoad" draw:mime-type="image/png"/></draw:frame>Рисунок <text:sequence text:ref-name="refDrawing5" text:name="Drawing" text:formula="ooow:Drawing+1" style:num-format="1">8</text:sequence><text:s/>— Окно настроек</text:p></draw:text-box></draw:frame></text:p>
      <text:p text:style-name="P161">Содержимое диалога (три группы):</text:p>
      <text:p text:style-name="P161">База данных (видна только в серверном режиме):</text:p>
      <text:list text:style-name="L15">
        <text:list-item>
          <text:p text:style-name="P162">Хост (IP‑адрес сервера БД, по умолчанию 127.0.0.1)</text:p>
        </text:list-item>
        <text:list-item>
          <text:p text:style-name="P162">Порт (по умолчанию 5432)</text:p>
        </text:list-item>
        <text:list-item>
          <text:p text:style-name="P162">Имя базы данных (RestN)</text:p>
        </text:list-item>
        <text:list-item>
          <text:p text:style-name="P162">Пользователь и пароль для доступа к PostgreSQL</text:p>
        </text:list-item>
        <text:list-item>
          <text:p text:style-name="P162"><text:soft-page-break/>Кнопка «Проверить подключение» – тестирует соединение с БД.</text:p>
        </text:list-item>
        <text:list-item>
          <text:p text:style-name="P162">Поле статуса (успех/ошибка).</text:p>
        </text:list-item>
      </text:list>
      <text:p text:style-name="P161">Сеть:</text:p>
      <text:list text:style-name="L16">
        <text:list-item>
          <text:p text:style-name="P163">IP сервера – адрес устройства, на котором запущен сервер</text:p>
        </text:list-item>
        <text:list-item>
          <text:p text:style-name="P163">Порт сервера (по умолчанию 12345)</text:p>
        </text:list-item>
        <text:list-item>
          <text:p text:style-name="P163">Флажок «Режим сервера» – если установлен, приложение будет принимать клиентские подключения и работать напрямую с БД.</text:p>
        </text:list-item>
        <text:list-item>
          <text:p text:style-name="P163">Кнопка «Проверить сервер» – проверяет доступность сервера по указанному IP и порту.</text:p>
        </text:list-item>
        <text:list-item>
          <text:p text:style-name="P163">«Показать IP устройства» – отображает локальные IP‑адреса текущего устройства для настройки клиентов.</text:p>
        </text:list-item>
        <text:list-item>
          <text:p text:style-name="P163">Поле статуса сервера.</text:p>
        </text:list-item>
      </text:list>
      <text:p text:style-name="P161">Прочее:</text:p>
      <text:list text:style-name="L17">
        <text:list-item>
          <text:p text:style-name="P164">Путь к логам – имя файла для записи событий (по умолчанию logs.txt).</text:p>
        </text:list-item>
      </text:list>
      <text:p text:style-name="P161">Сохранение настроек:</text:p>
      <text:list text:style-name="L18">
        <text:list-item>
          <text:p text:style-name="P165">Нажмите «OK» – все параметры сохранятся и сразу применятся.</text:p>
        </text:list-item>
        <text:list-item>
          <text:p text:style-name="P165">Нажмите «Отмена» – изменения будут отброшены.</text:p>
        </text:list-item>
      </text:list>
      <text:p text:style-name="P161"/>
      <text:p text:style-name="P161">3. Главное окно и выдвижное меню</text:p>
      <text:p text:style-name="P166">После авторизации открывается главное окно.</text:p>
      <text:p text:style-name="P166"/>
      <text:p text:style-name="P166"><draw:frame draw:style-name="fr1" draw:name="Врезка7" text:anchor-type="char" svg:width="17cm" draw:z-index="15"><draw:text-box fo:min-height="20.218cm"><text:p text:style-name="Drawing"><draw:frame draw:style-name="fr5" draw:name="Изображение7" text:anchor-type="paragraph" svg:width="17cm" style:rel-width="100%" svg:height="20.218cm" style:rel-height="scale" draw:z-index="16"><draw:image xlink:href="Pictures/100000010000029F0000031E70E9EA05.png" xlink:type="simple" xlink:show="embed" xlink:actuate="onLoad" draw:mime-type="image/png"/></draw:frame>Рисунок <text:sequence text:ref-name="refDrawing6" text:name="Drawing" text:formula="ooow:Drawing+1" style:num-format="1">9</text:sequence><text:s/>— Выдвижное меню</text:p></draw:text-box></draw:frame><text:soft-page-break/></text:p>
      <text:p text:style-name="P166">В верхней панели находятся:</text:p>
      <text:list text:style-name="L19">
        <text:list-item>
          <text:p text:style-name="P167">Кнопка ☰ – открывает выдвижное меню (Drawer).</text:p>
        </text:list-item>
        <text:list-item>
          <text:p text:style-name="P167">Название «Ресторан» по центру.</text:p>
        </text:list-item>
        <text:list-item>
          <text:p text:style-name="P167"><text:soft-page-break/>Кнопка ⟳ – принудительная синхронизация данных (обновляет списки блюд, продуктов, отчётов).</text:p>
        </text:list-item>
      </text:list>
      <text:p text:style-name="P161">Выдвижное меню:</text:p>
      <text:list text:style-name="L20">
        <text:list-item>
          <text:p text:style-name="P168">Вверху отображается ФИО текущего пользователя.</text:p>
        </text:list-item>
        <text:list-item>
          <text:p text:style-name="P168">Список пунктов <text:span text:style-name="T260">(</text:span>зависит от роли<text:span text:style-name="T260">)</text:span>:</text:p>
        </text:list-item>
        <text:list-item>
          <text:p text:style-name="P169">Официант – «Оформление заказа».</text:p>
        </text:list-item>
        <text:list-item>
          <text:p text:style-name="P169">Кладовщик – «Склад».</text:p>
        </text:list-item>
        <text:list-item>
          <text:p text:style-name="P169">Администратор – «Оформление заказа», «Склад», «Отчёты».</text:p>
        </text:list-item>
        <text:list-item>
          <text:p text:style-name="P169">Кнопка «Настройки» – открывает диалог настроек.</text:p>
        </text:list-item>
        <text:list-item>
          <text:p text:style-name="P169">Кнопка «Выйти» – завершает сеанс и возвращает к окну авторизации.</text:p>
        </text:list-item>
        <text:list-item>
          <text:p text:style-name="P169">Кнопка «Закрыть приложение» – полностью выходит из программы.</text:p>
        </text:list-item>
        <text:list-item>
          <text:p text:style-name="P169">Чтобы закрыть меню, коснитесь области вне его или нажмите кнопку ☰ повторно.</text:p>
        </text:list-item>
      </text:list>
      <text:p text:style-name="P161"/>
      <text:p text:style-name="P161">4. Оформление заказа (страница для официанта)</text:p>
      <text:p text:style-name="P161">Страница (Рисунок В.5) разделена на две колонки: слева – меню блюд, справа – текущий заказ.</text:p>
      <text:p text:style-name="P161"><draw:frame draw:style-name="fr1" draw:name="Врезка8" text:anchor-type="char" svg:width="17cm" draw:z-index="17"><draw:text-box fo:min-height="13.298cm"><text:p text:style-name="Drawing"><draw:frame draw:style-name="fr5" draw:name="Изображение8" text:anchor-type="paragraph" svg:width="17cm" style:rel-width="100%" svg:height="13.298cm" style:rel-height="scale" draw:z-index="18"><draw:image xlink:href="Pictures/10000001000003FC0000031EFD3F3B7D.png" xlink:type="simple" xlink:show="embed" xlink:actuate="onLoad" draw:mime-type="image/png"/></draw:frame>Рисунок <text:sequence text:ref-name="refDrawing7" text:name="Drawing" text:formula="ooow:Drawing+1" style:num-format="1">10</text:sequence><text:s/>— Страница оформления заказов</text:p></draw:text-box></draw:frame><text:soft-page-break/></text:p>
      <text:p text:style-name="P161">Левая колонка – меню:</text:p>
      <text:list text:style-name="L21">
        <text:list-item>
          <text:p text:style-name="P170">Выпадающий список «Категория» – фильтр по типу блюд (Супы, Горячее, Салаты, Напитки, Все).</text:p>
        </text:list-item>
        <text:list-item>
          <text:p text:style-name="P170">Флажок «Только доступные» – скрывает блюда, временно отсутствующие из‑за нехватки ингредиентов.</text:p>
        </text:list-item>
        <text:list-item>
          <text:p text:style-name="P170">Под фильтрами – список блюд с названием, ценой, категорией, описанием и составом. Недоступные блюда выделены красной надписью «Нет в наличии».</text:p>
        </text:list-item>
        <text:list-item>
          <text:p text:style-name="P170">Чтобы выбрать блюдо – нажмите на него (оно подсветится).</text:p>
        </text:list-item>
      </text:list>
      <text:p text:style-name="P161">Правая колонка – оформление:</text:p>
      <text:list text:style-name="L22">
        <text:list-item>
          <text:p text:style-name="P171">Группа «Текущий заказ» – список добавленных блюд с количеством.</text:p>
        </text:list-item>
        <text:list-item>
          <text:p text:style-name="P171"><text:soft-page-break/>Поле «Столик №» – номер столика (от 1 до 50).</text:p>
        </text:list-item>
        <text:list-item>
          <text:p text:style-name="P171">Поле «Кол-во» – количество порций (от 1 до 10).</text:p>
        </text:list-item>
        <text:list-item>
          <text:p text:style-name="P171">Поле «Комментарий» – особые пожелания (например, «без лука»).</text:p>
        </text:list-item>
        <text:list-item>
          <text:p text:style-name="P171">Кнопка «Добавить» – добавляет выбранное блюдо в заказ. Перед добавлением проверяется наличие ингредиентов; если после добавления остатки станут ниже минимального порога – программа предупредит, но позволит продолжить. Если ингредиентов не хватает – появится ошибка.</text:p>
        </text:list-item>
        <text:list-item>
          <text:p text:style-name="P171">Кнопка «Удалить» – убирает выбранное блюдо из текущего заказа и возвращает ингредиенты на склад.</text:p>
        </text:list-item>
        <text:list-item>
          <text:p text:style-name="P171">Кнопка «Оформить заказ» – фиксирует заказ в системе: списываются ингредиенты, создаётся запись в базе. После оформления корзина очищается, и список блюд обновляется.</text:p>
        </text:list-item>
      </text:list>
      <text:p text:style-name="P161"/>
      <text:p text:style-name="P161">5. Управление складом (страница для кладовщика)</text:p>
      <text:p text:style-name="P161">Страница отображает полный список продуктов.</text:p>
      <text:p text:style-name="P161"><draw:frame draw:style-name="fr1" draw:name="Врезка9" text:anchor-type="char" svg:width="17cm" draw:z-index="19"><draw:text-box fo:min-height="13.249cm"><text:p text:style-name="Drawing"><draw:frame draw:style-name="fr5" draw:name="Изображение9" text:anchor-type="paragraph" svg:width="17cm" style:rel-width="100%" svg:height="13.249cm" style:rel-height="scale" draw:z-index="20"><draw:image xlink:href="Pictures/10000001000003FC0000031BA24A4AC1.png" xlink:type="simple" xlink:show="embed" xlink:actuate="onLoad" draw:mime-type="image/png"/></draw:frame>Рисунок <text:sequence text:ref-name="refDrawing8" text:name="Drawing" text:formula="ooow:Drawing+1" style:num-format="1">11</text:sequence><text:s/>— Страница управления складом</text:p></draw:text-box></draw:frame><text:soft-page-break/></text:p>
      <text:p text:style-name="P161">Основные элементы:</text:p>
      <text:list text:style-name="L23">
        <text:list-item>
          <text:p text:style-name="P172">Список продуктов – каждая строка содержит название и текущее количество в единицах измерения (кг, л, шт.). Продукты, количество которых ниже минимального порога, подсвечены розовым фоном.</text:p>
        </text:list-item>
        <text:list-item>
          <text:p text:style-name="P172">Выбор продукта – нажмите на строку.</text:p>
        </text:list-item>
        <text:list-item>
          <text:p text:style-name="P172">Поле «Количество» – введите число (только целое от 0 до 10000).</text:p>
        </text:list-item>
        <text:list-item>
          <text:p text:style-name="P172">Кнопка «Добавить» – увеличивает остаток выбранного продукта на введённое значение.</text:p>
        </text:list-item>
        <text:list-item>
          <text:p text:style-name="P172">Кнопка «Убавить» – уменьшает остаток (если результат неотрицательный).</text:p>
        </text:list-item>
        <text:list-item>
          <text:p text:style-name="P172"><text:soft-page-break/>Кнопка «Установить» – устанавливает точное значение остатка равным введённому числу.</text:p>
        </text:list-item>
      </text:list>
      <text:p text:style-name="P161">После любого изменения данные отправляются на сервер, а список автоматически обновляется. Если произошла ошибка (например, нет связи с сервером), появится сообщение.</text:p>
      <text:p text:style-name="P161"/>
      <text:p text:style-name="P161">6. Отчёты (страница для администратора)</text:p>
      <text:p text:style-name="P161">Страница позволяет формировать три типа отчётов.</text:p>
      <text:p text:style-name="P161"><draw:frame draw:style-name="fr1" draw:name="Врезка10" text:anchor-type="char" svg:width="17cm" draw:z-index="21"><draw:text-box fo:min-height="9.382cm"><text:p text:style-name="Drawing"><draw:frame draw:style-name="fr5" draw:name="Изображение10" text:anchor-type="paragraph" svg:width="17cm" style:rel-width="100%" svg:height="9.382cm" style:rel-height="scale" draw:z-index="22"><draw:image xlink:href="Pictures/10000001000003FC00000233816AA6CC.png" xlink:type="simple" xlink:show="embed" xlink:actuate="onLoad" draw:mime-type="image/png"/></draw:frame>Рисунок <text:sequence text:ref-name="refDrawing9" text:name="Drawing" text:formula="ooow:Drawing+1" style:num-format="1">12</text:sequence><text:s/>— Страница отчётов</text:p></draw:text-box></draw:frame></text:p>
      <text:p text:style-name="P161">Выбор отчёта <text:span text:style-name="T261">происходит выбором из</text:span> выпадающ<text:span text:style-name="T261">его</text:span> списк<text:span text:style-name="T261">а</text:span> в верхней части:</text:p>
      <text:list text:style-name="L24">
        <text:list-item>
          <text:p text:style-name="P173">Выручка – общая сумма заказов за период.</text:p>
        </text:list-item>
        <text:list-item>
          <text:p text:style-name="P173">Популярность блюд – сколько раз (суммарно порций) заказывалось каждое блюдо.</text:p>
        </text:list-item>
        <text:list-item>
          <text:p text:style-name="P173">Малые остатки – список продуктов, у которых текущий остаток ниже минимального порога.</text:p>
        </text:list-item>
      </text:list>
      <text:p text:style-name="P161">Фильтры (для «Выручка» и «Популярность блюд»):</text:p>
      <text:list text:style-name="L25">
        <text:list-item>
          <text:p text:style-name="P174"><text:soft-page-break/>Дата «с» и «по» (формат ГГГГ-ММ-ДД).</text:p>
        </text:list-item>
        <text:list-item>
          <text:p text:style-name="P174">Блюдо – можно выбрать конкретное блюдо (или «Все блюда»).</text:p>
        </text:list-item>
        <text:list-item>
          <text:p text:style-name="P174">Столик – номер столика (0 – все).</text:p>
        </text:list-item>
        <text:list-item>
          <text:p text:style-name="P174">Официант – конкретный сотрудник (или «Все официанты»).</text:p>
        </text:list-item>
      </text:list>
      <text:p text:style-name="P161">Формирование:</text:p>
      <text:list text:style-name="L26">
        <text:list-item>
          <text:p text:style-name="P175">Нажмите «Сформировать».</text:p>
        </text:list-item>
        <text:list-item>
          <text:p text:style-name="P175">В нижней области появится результат.</text:p>
        </text:list-item>
      </text:list>
      <text:p text:style-name="P161">Если за указанный период нет заказов, будет выведено соответствующее сообщение. Некорректно введённые даты также вызовут предупреждение.</text:p>
      <text:p text:style-name="P161"/>
      <text:p text:style-name="P161"/>
      <text:p text:style-name="P161"/>
      <text:p text:style-name="P161"/>
      <text:p text:style-name="P1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11:48:38.263020263</meta:creation-date>
    <meta:editing-duration>P1DT3H23M54S</meta:editing-duration>
    <meta:editing-cycles>368</meta:editing-cycles>
    <meta:generator>LibreOffice/25.8.5.2$Windows_X86_64 LibreOffice_project/9c8b85f387cc00a89945a79c9e6239f32e450ac2</meta:generator>
    <dc:date>2026-04-26T23:43:28.005088400</dc:date>
    <meta:print-date>2026-04-26T21:01:58.217693800</meta:print-date>
    <meta:printed-by>Файлы PDF</meta:printed-by>
    <meta:document-statistic meta:table-count="23" meta:image-count="12" meta:object-count="3" meta:page-count="139" meta:paragraph-count="3866" meta:word-count="17732" meta:character-count="165566" meta:non-whitespace-character-count="122626"/>
  </office:meta>
</office:document-meta>
</file>

<file path=Object 1/content.xml><?xml version="1.0" encoding="utf-8"?>
<math xmlns="http://www.w3.org/1998/Math/MathML" display="block">
  <semantics>
    <mrow>
      <mi>С</mi>
      <mo stretchy="false">=</mo>
      <mrow>
        <msub>
          <mi>М</mi>
          <mi mathvariant="italic">вс</mi>
        </msub>
        <mo stretchy="false">+</mo>
        <mi>Э</mi>
        <mo stretchy="false">+</mo>
        <msubsup>
          <mi>З</mi>
          <mi mathvariant="italic">зп</mi>
          <mi>о</mi>
        </msubsup>
        <mo stretchy="false">+</mo>
        <msubsup>
          <mi>З</mi>
          <mi mathvariant="italic">зп</mi>
          <mi>д</mi>
        </msubsup>
        <mo stretchy="false">+</mo>
        <msub>
          <mi>З</mi>
          <mi mathvariant="italic">сн</mi>
        </msub>
        <mo stretchy="false">+</mo>
        <mi>Н</mi>
      </mrow>
    </mrow>
    <annotation encoding="StarMath 5.0">С = М_вс + Э + З_зп^о + З_зп^д + З_сн + Н
</annotation>
  </semantics>
</math>
</file>

<file path=Object 2/content.xml><?xml version="1.0" encoding="utf-8"?>
<math xmlns="http://www.w3.org/1998/Math/MathML" display="block">
  <semantics>
    <mrow>
      <mrow>
        <msub>
          <mi>Э</mi>
          <mi mathvariant="italic">эф</mi>
        </msub>
        <mo stretchy="false">=</mo>
        <mi>N</mi>
      </mrow>
      <mi>·</mi>
      <mrow>
        <mo fence="true" form="prefix" stretchy="false">(</mo>
        <mrow>
          <mrow>
            <msub>
              <mi>t</mi>
              <mn>1</mn>
            </msub>
            <mi>—</mi>
            <msub>
              <mi>t</mi>
              <mn>2</mn>
            </msub>
          </mrow>
        </mrow>
        <mo fence="true" form="postfix" stretchy="false">)</mo>
      </mrow>
      <mi>·</mi>
      <msub>
        <mi>C</mi>
        <mi mathvariant="italic">чтс</mi>
      </msub>
      <mi>·</mi>
      <msub>
        <mi>К</mi>
        <mi mathvariant="italic">доп</mi>
      </msub>
      <mi>·</mi>
      <msub>
        <mi>К</mi>
        <mi mathvariant="italic">сн</mi>
      </msub>
      <mi>—</mi>
      <msub>
        <mi>Е</mi>
        <mi>н</mi>
      </msub>
      <mi>·</mi>
      <mi>К</mi>
    </mrow>
    <annotation encoding="StarMath 5.0">Э_эф = N · (t_1 — t_2) · C_чтс · К_доп · К_сн — Е_н · К</annotation>
  </semantics>
</math>
</file>

<file path=Object 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
</annotation>
  </semantics>
</math>
</file>