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 Semibold" svg:font-family="'Source Code Pro Semibold'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432cm" draw:marker-end-width="0.432cm" draw:textarea-horizontal-align="center" draw:textarea-vertical-align="middle" fo:padding-top="0.026cm" fo:padding-bottom="0.026cm" fo:padding-left="0.026cm" fo:padding-right="0.026cm" loext:decorative="false"/>
    </style:style>
    <style:style style:name="gr2" style:family="graphic" style:parent-style-name="standard">
      <style:graphic-properties svg:stroke-width="0.053cm" draw:marker-start-width="0.432cm" draw:marker-end-width="0.432cm" draw:fill="none" draw:textarea-horizontal-align="justify" draw:textarea-vertical-align="middle" draw:auto-grow-height="false" fo:min-height="0.691cm" fo:min-width="2.921cm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0.493cm" loext:decorative="false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1.439cm" loext:decorative="false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1.281cm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1.353cm" loext:decorative="false"/>
      <style:paragraph-properties style:writing-mode="lr-tb"/>
    </style:style>
    <style:style style:name="gr7" style:family="graphic" style:parent-style-name="standard">
      <style:graphic-properties svg:stroke-width="0.053cm" draw:marker-start-width="0.432cm" draw:marker-end-width="0.432cm" draw:fill="none" draw:textarea-vertical-align="middle" draw:auto-grow-height="false" fo:min-height="5.699cm" fo:min-width="0.33cm" fo:padding-top="0.026cm" fo:padding-bottom="0.026cm" fo:padding-left="0.026cm" fo:padding-right="0.026cm" loext:decorative="false"/>
    </style:style>
    <style:style style:name="gr8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0.933cm" loext:decorative="false"/>
      <style:paragraph-properties style:writing-mode="lr-tb"/>
    </style:style>
    <style:style style:name="gr9" style:family="graphic" style:parent-style-name="standard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none" svg:stroke-width="0.053cm" svg:stroke-color="#000000" draw:marker-start-width="0.432cm" draw:marker-end-width="0.432cm" draw:fill="none" draw:fill-color="#ffffff" fo:min-height="0.468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="none" draw:fill-color="#ffffff"/>
      <style:text-properties style:font-name="Source Code Pro Semibold" fo:font-size="10.5pt" style:font-size-asian="10.5pt" style:font-size-complex="10.5pt"/>
    </style:style>
    <style:style style:name="P4" style:family="paragraph">
      <style:paragraph-properties fo:margin-top="0.42cm" fo:margin-bottom="0.349cm" fo:text-align="start"/>
    </style:style>
    <style:style style:name="P5" style:family="paragraph">
      <loext:graphic-properties draw:fill="none" draw:fill-color="#ffffff"/>
      <style:paragraph-properties fo:margin-top="0.42cm" fo:margin-bottom="0.349cm"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49cm" fo:text-align="start"/>
      <style:text-properties style:font-name="Source Code Pro Semibold" fo:font-size="10.5pt" style:font-size-asian="10.5pt" style:font-size-complex="10.5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 draw:fill-color="#ffffff"/>
      <style:paragraph-properties fo:margin-top="0.42cm" fo:margin-bottom="0.349cm" fo:text-align="start"/>
      <style:text-properties style:font-name="Source Code Pro Semibold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Source Code Pro Semibold"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name="Вертикальная линия 1" draw:style-name="gr1" draw:text-style-name="P1" draw:layer="layout" svg:x1="4.574cm" svg:y1="5.01cm" svg:x2="4.574cm" svg:y2="25.75cm">
          <text:p/>
        </draw:line>
        <draw:line draw:name="Горизонтальная линия 1" draw:style-name="gr1" draw:text-style-name="P1" draw:layer="layout" svg:x1="4.573cm" svg:y1="6.458cm" svg:x2="6.335cm" svg:y2="6.458cm">
          <text:p/>
        </draw:line>
        <draw:custom-shape draw:name="Фигура 1" draw:style-name="gr2" draw:text-style-name="P2" draw:layer="layout" svg:width="2.973cm" svg:height="0.743cm" svg:x="6.284cm" svg:y="6.041cm">
          <text:p/>
          <draw:enhanced-geometry svg:viewBox="0 0 21600 21600" draw:type="rectangle" draw:enhanced-path="M 0 0 L 21600 0 21600 21600 0 21600 0 0 Z N"/>
        </draw:custom-shape>
        <draw:frame draw:name="Врезка 1" draw:style-name="gr3" draw:text-style-name="P3" draw:layer="layout" svg:width="2.322cm" svg:height="0.743cm" svg:x="6.418cm" svg:y="6.054cm">
          <draw:text-box>
            <text:p><text:span text:style-name="T1">build</text:span></text:p>
          </draw:text-box>
        </draw:frame>
        <draw:line draw:name="Горизонтальная линия 2" draw:style-name="gr1" draw:text-style-name="P1" draw:layer="layout" svg:x1="4.573cm" svg:y1="10.181cm" svg:x2="6.335cm" svg:y2="10.181cm">
          <text:p/>
        </draw:line>
        <draw:custom-shape draw:name="Фигура 2" draw:style-name="gr2" draw:text-style-name="P2" draw:layer="layout" svg:width="2.973cm" svg:height="0.743cm" svg:x="6.284cm" svg:y="9.765cm">
          <text:p/>
          <draw:enhanced-geometry svg:viewBox="0 0 21600 21600" draw:type="rectangle" draw:enhanced-path="M 0 0 L 21600 0 21600 21600 0 21600 0 0 Z N"/>
        </draw:custom-shape>
        <draw:frame draw:name="Врезка 2" draw:style-name="gr4" draw:text-style-name="P5" draw:layer="layout" svg:width="2.789cm" svg:height="1.689cm" svg:x="6.467cm" svg:y="9.778cm">
          <draw:text-box>
            <text:p text:style-name="P4"><text:span text:style-name="T1">deploy</text:span></text:p>
            <text:p text:style-name="P4"><text:span text:style-name="T2"/></text:p>
          </draw:text-box>
        </draw:frame>
        <draw:line draw:name="Горизонтальная линия 3" draw:style-name="gr1" draw:text-style-name="P1" draw:layer="layout" svg:x1="4.573cm" svg:y1="19.64cm" svg:x2="6.335cm" svg:y2="19.64cm">
          <text:p/>
        </draw:line>
        <draw:custom-shape draw:name="Фигура 3" draw:style-name="gr2" draw:text-style-name="P2" draw:layer="layout" svg:width="2.973cm" svg:height="0.743cm" svg:x="6.284cm" svg:y="19.223cm">
          <text:p/>
          <draw:enhanced-geometry svg:viewBox="0 0 21600 21600" draw:type="rectangle" draw:enhanced-path="M 0 0 L 21600 0 21600 21600 0 21600 0 0 Z N"/>
        </draw:custom-shape>
        <draw:frame draw:name="Врезка 3" draw:style-name="gr3" draw:text-style-name="P3" draw:layer="layout" svg:width="2.322cm" svg:height="0.743cm" svg:x="6.439cm" svg:y="19.236cm">
          <draw:text-box>
            <text:p><text:span text:style-name="T1">include</text:span></text:p>
          </draw:text-box>
        </draw:frame>
        <draw:frame draw:name="Врезка 4" draw:style-name="gr3" draw:text-style-name="P6" draw:layer="layout" svg:width="3.652cm" svg:height="0.743cm" svg:x="6.401cm" svg:y="24.379cm">
          <draw:text-box>
            <text:p text:style-name="P4"><text:span text:style-name="T1">CMakeLists.txt</text:span></text:p>
          </draw:text-box>
        </draw:frame>
        <draw:line draw:name="Горизонтальная линия 4" draw:style-name="gr1" draw:text-style-name="P1" draw:layer="layout" svg:x1="4.573cm" svg:y1="17.124cm" svg:x2="6.335cm" svg:y2="17.124cm">
          <text:p/>
        </draw:line>
        <draw:custom-shape draw:name="Фигура 4" draw:style-name="gr2" draw:text-style-name="P2" draw:layer="layout" svg:width="2.973cm" svg:height="0.743cm" svg:x="6.284cm" svg:y="16.707cm">
          <text:p/>
          <draw:enhanced-geometry svg:viewBox="0 0 21600 21600" draw:type="rectangle" draw:enhanced-path="M 0 0 L 21600 0 21600 21600 0 21600 0 0 Z N"/>
        </draw:custom-shape>
        <draw:frame draw:name="Врезка 5" draw:style-name="gr3" draw:text-style-name="P3" draw:layer="layout" svg:width="2.322cm" svg:height="0.743cm" svg:x="6.467cm" svg:y="16.72cm">
          <draw:text-box>
            <text:p><text:span text:style-name="T1">docs</text:span></text:p>
          </draw:text-box>
        </draw:frame>
        <draw:line draw:name="Горизонтальная линия 5" draw:style-name="gr1" draw:text-style-name="P1" draw:layer="layout" svg:x1="7.8cm" svg:y1="7.707cm" svg:x2="9.562cm" svg:y2="7.707cm">
          <text:p/>
        </draw:line>
        <draw:custom-shape draw:name="Фигура 5" draw:style-name="gr2" draw:text-style-name="P2" draw:layer="layout" svg:width="2.973cm" svg:height="0.743cm" svg:x="9.51cm" svg:y="7.29cm">
          <text:p/>
          <draw:enhanced-geometry svg:viewBox="0 0 21600 21600" draw:type="rectangle" draw:enhanced-path="M 0 0 L 21600 0 21600 21600 0 21600 0 0 Z N"/>
        </draw:custom-shape>
        <draw:frame draw:name="Врезка 6" draw:style-name="gr5" draw:text-style-name="P5" draw:layer="layout" svg:width="2.789cm" svg:height="1.531cm" svg:x="9.663cm" svg:y="8.218cm">
          <draw:text-box>
            <text:p text:style-name="P4"><text:span text:style-name="T1">Debug</text:span></text:p>
            <text:p text:style-name="P4"><text:span text:style-name="T2"/></text:p>
          </draw:text-box>
        </draw:frame>
        <draw:line draw:name="Горизонтальная линия 6" draw:style-name="gr1" draw:text-style-name="P1" draw:layer="layout" svg:x1="7.8cm" svg:y1="8.649cm" svg:x2="9.562cm" svg:y2="8.649cm">
          <text:p/>
        </draw:line>
        <draw:custom-shape draw:name="Фигура 12" draw:style-name="gr2" draw:text-style-name="P2" draw:layer="layout" svg:width="2.973cm" svg:height="0.743cm" svg:x="9.51cm" svg:y="8.232cm">
          <text:p/>
          <draw:enhanced-geometry svg:viewBox="0 0 21600 21600" draw:type="rectangle" draw:enhanced-path="M 0 0 L 21600 0 21600 21600 0 21600 0 0 Z N"/>
        </draw:custom-shape>
        <draw:frame draw:name="Врезка 7" draw:style-name="gr3" draw:text-style-name="P3" draw:layer="layout" svg:width="2.322cm" svg:height="0.743cm" svg:x="9.693cm" svg:y="7.275cm">
          <draw:text-box>
            <text:p><text:span text:style-name="T1">Release</text:span></text:p>
          </draw:text-box>
        </draw:frame>
        <draw:line draw:name="Горизонтальная линия 7" draw:style-name="gr1" draw:text-style-name="P1" draw:layer="layout" svg:x1="7.834cm" svg:y1="18.398cm" svg:x2="7.815cm" svg:y2="17.45cm">
          <text:p/>
        </draw:line>
        <draw:line draw:name="Горизонтальная линия 8" draw:style-name="gr1" draw:text-style-name="P1" draw:layer="layout" svg:x1="7.8cm" svg:y1="11.375cm" svg:x2="9.562cm" svg:y2="11.375cm">
          <text:p/>
        </draw:line>
        <draw:custom-shape draw:name="Фигура 13" draw:style-name="gr2" draw:text-style-name="P2" draw:layer="layout" svg:width="2.973cm" svg:height="0.743cm" svg:x="9.58cm" svg:y="11.992cm">
          <text:p/>
          <draw:enhanced-geometry svg:viewBox="0 0 21600 21600" draw:type="rectangle" draw:enhanced-path="M 0 0 L 21600 0 21600 21600 0 21600 0 0 Z N"/>
        </draw:custom-shape>
        <draw:line draw:name="Горизонтальная линия 9" draw:style-name="gr1" draw:text-style-name="P1" draw:layer="layout" svg:x1="7.8cm" svg:y1="12.317cm" svg:x2="9.562cm" svg:y2="12.317cm">
          <text:p/>
        </draw:line>
        <draw:frame draw:name="Врезка 8" draw:style-name="gr3" draw:text-style-name="P3" draw:layer="layout" svg:width="2.322cm" svg:height="0.743cm" svg:x="9.764cm" svg:y="10.943cm">
          <draw:text-box>
            <text:p><text:span text:style-name="T1">bin</text:span></text:p>
          </draw:text-box>
        </draw:frame>
        <draw:line draw:name="Горизонтальная линия 10" draw:style-name="gr1" draw:text-style-name="P7" draw:layer="layout" svg:x1="7.849cm" svg:y1="15.562cm" svg:x2="7.8cm" svg:y2="10.508cm">
          <text:p/>
        </draw:line>
        <draw:custom-shape draw:name="Фигура 14" draw:style-name="gr2" draw:text-style-name="P2" draw:layer="layout" svg:width="2.973cm" svg:height="0.743cm" svg:x="9.58cm" svg:y="10.955cm">
          <text:p/>
          <draw:enhanced-geometry svg:viewBox="0 0 21600 21600" draw:type="rectangle" draw:enhanced-path="M 0 0 L 21600 0 21600 21600 0 21600 0 0 Z N"/>
        </draw:custom-shape>
        <draw:frame draw:name="Врезка 9" draw:style-name="gr3" draw:text-style-name="P3" draw:layer="layout" svg:width="2.322cm" svg:height="0.743cm" svg:x="9.764cm" svg:y="12.041cm">
          <draw:text-box>
            <text:p><text:span text:style-name="T1">lib</text:span></text:p>
          </draw:text-box>
        </draw:frame>
        <draw:line draw:name="Горизонтальная линия 11" draw:style-name="gr1" draw:text-style-name="P1" draw:layer="layout" svg:x1="7.8cm" svg:y1="13.348cm" svg:x2="9.562cm" svg:y2="13.348cm">
          <text:p/>
        </draw:line>
        <draw:custom-shape draw:name="Фигура 15" draw:style-name="gr2" draw:text-style-name="P2" draw:layer="layout" svg:width="2.973cm" svg:height="0.743cm" svg:x="9.58cm" svg:y="13.033cm">
          <text:p/>
          <draw:enhanced-geometry svg:viewBox="0 0 21600 21600" draw:type="rectangle" draw:enhanced-path="M 0 0 L 21600 0 21600 21600 0 21600 0 0 Z N"/>
        </draw:custom-shape>
        <draw:line draw:name="Горизонтальная линия 12" draw:style-name="gr1" draw:text-style-name="P1" draw:layer="layout" svg:x1="7.818cm" svg:y1="14.501cm" svg:x2="9.58cm" svg:y2="14.501cm">
          <text:p/>
        </draw:line>
        <draw:frame draw:name="Врезка 10" draw:style-name="gr6" draw:text-style-name="P8" draw:layer="layout" svg:width="3.25cm" svg:height="1.603cm" svg:x="9.5cm" svg:y="14.165cm">
          <draw:text-box>
            <text:p text:style-name="P4"><text:span text:style-name="T1">translations</text:span></text:p>
            <text:p text:style-name="P4"><text:span text:style-name="T1"/></text:p>
          </draw:text-box>
        </draw:frame>
        <draw:custom-shape draw:name="Фигура 16" draw:style-name="gr2" draw:text-style-name="P2" draw:layer="layout" svg:width="2.973cm" svg:height="0.743cm" svg:x="9.58cm" svg:y="14.166cm">
          <text:p/>
          <draw:enhanced-geometry svg:viewBox="0 0 21600 21600" draw:type="rectangle" draw:enhanced-path="M 0 0 L 21600 0 21600 21600 0 21600 0 0 Z N"/>
        </draw:custom-shape>
        <draw:frame draw:name="Врезка 11" draw:style-name="gr3" draw:text-style-name="P3" draw:layer="layout" svg:width="2.322cm" svg:height="0.743cm" svg:x="9.764cm" svg:y="13.081cm">
          <draw:text-box>
            <text:p><text:span text:style-name="T1">plugins</text:span></text:p>
          </draw:text-box>
        </draw:frame>
        <draw:line draw:name="Горизонтальная линия 15" draw:style-name="gr1" draw:text-style-name="P1" draw:layer="layout" svg:x1="7.849cm" svg:y1="15.56cm" svg:x2="9.611cm" svg:y2="15.56cm">
          <text:p/>
        </draw:line>
        <draw:frame draw:name="Врезка 12" draw:style-name="gr3" draw:text-style-name="P6" draw:layer="layout" svg:width="3.652cm" svg:height="0.743cm" svg:x="9.764cm" svg:y="15.166cm">
          <draw:text-box>
            <text:p text:style-name="P4"><text:span text:style-name="T1">run.sh</text:span></text:p>
          </draw:text-box>
        </draw:frame>
        <draw:custom-shape draw:name="Фигура 17" draw:style-name="gr7" draw:text-style-name="P9" draw:layer="layout" svg:width="1.059cm" svg:height="6.067cm" svg:x="13.11cm" svg:y="9.6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name="Врезка 13" draw:style-name="gr3" draw:text-style-name="P6" draw:layer="layout" svg:width="3.652cm" svg:height="0.743cm" svg:x="14.579cm" svg:y="12.448cm">
          <draw:text-box>
            <text:p text:style-name="P4"><text:span text:style-name="T1">deployment</text:span></text:p>
          </draw:text-box>
        </draw:frame>
        <draw:line draw:name="Горизонтальная линия 16" draw:style-name="gr1" draw:text-style-name="P1" draw:layer="layout" svg:x1="4.573cm" svg:y1="24.692cm" svg:x2="6.335cm" svg:y2="24.692cm">
          <text:p/>
        </draw:line>
        <draw:line draw:name="Горизонтальная линия 17" draw:style-name="gr1" draw:text-style-name="P1" draw:layer="layout" svg:x1="4.573cm" svg:y1="20.64cm" svg:x2="6.335cm" svg:y2="20.64cm">
          <text:p/>
        </draw:line>
        <draw:custom-shape draw:name="Фигура 18" draw:style-name="gr2" draw:text-style-name="P2" draw:layer="layout" svg:width="2.973cm" svg:height="0.743cm" svg:x="6.284cm" svg:y="20.223cm">
          <text:p/>
          <draw:enhanced-geometry svg:viewBox="0 0 21600 21600" draw:type="rectangle" draw:enhanced-path="M 0 0 L 21600 0 21600 21600 0 21600 0 0 Z N"/>
        </draw:custom-shape>
        <draw:frame draw:name="Врезка 14" draw:style-name="gr8" draw:text-style-name="P3" draw:layer="layout" svg:width="2.811cm" svg:height="1.183cm" svg:x="6.439cm" svg:y="20.236cm">
          <draw:text-box>
            <text:p><text:span text:style-name="T1">resources</text:span></text:p>
          </draw:text-box>
        </draw:frame>
        <draw:line draw:name="Горизонтальная линия 18" draw:style-name="gr1" draw:text-style-name="P1" draw:layer="layout" svg:x1="4.573cm" svg:y1="22.64cm" svg:x2="6.335cm" svg:y2="22.64cm">
          <text:p/>
        </draw:line>
        <draw:custom-shape draw:name="Фигура 19" draw:style-name="gr2" draw:text-style-name="P2" draw:layer="layout" svg:width="2.973cm" svg:height="0.743cm" svg:x="6.284cm" svg:y="22.224cm">
          <text:p/>
          <draw:enhanced-geometry svg:viewBox="0 0 21600 21600" draw:type="rectangle" draw:enhanced-path="M 0 0 L 21600 0 21600 21600 0 21600 0 0 Z N"/>
        </draw:custom-shape>
        <draw:frame draw:name="Врезка 15" draw:style-name="gr3" draw:text-style-name="P3" draw:layer="layout" svg:width="2.322cm" svg:height="0.743cm" svg:x="6.439cm" svg:y="22.237cm">
          <draw:text-box>
            <text:p><text:span text:style-name="T1">src</text:span></text:p>
          </draw:text-box>
        </draw:frame>
        <draw:line draw:name="Горизонтальная линия 19" draw:style-name="gr1" draw:text-style-name="P1" draw:layer="layout" svg:x1="4.573cm" svg:y1="23.625cm" svg:x2="6.335cm" svg:y2="23.625cm">
          <text:p/>
        </draw:line>
        <draw:custom-shape draw:name="Фигура 20" draw:style-name="gr2" draw:text-style-name="P2" draw:layer="layout" svg:width="2.973cm" svg:height="0.743cm" svg:x="6.284cm" svg:y="23.21cm">
          <text:p/>
          <draw:enhanced-geometry svg:viewBox="0 0 21600 21600" draw:type="rectangle" draw:enhanced-path="M 0 0 L 21600 0 21600 21600 0 21600 0 0 Z N"/>
        </draw:custom-shape>
        <draw:frame draw:name="Врезка 16" draw:style-name="gr3" draw:text-style-name="P3" draw:layer="layout" svg:width="2.322cm" svg:height="0.743cm" svg:x="6.418cm" svg:y="23.223cm">
          <draw:text-box>
            <text:p><text:span text:style-name="T1">tests</text:span></text:p>
          </draw:text-box>
        </draw:frame>
        <draw:frame draw:name="Врезка 17" draw:style-name="gr3" draw:text-style-name="P6" draw:layer="layout" svg:width="3.652cm" svg:height="0.743cm" svg:x="9.601cm" svg:y="17.979cm">
          <draw:text-box>
            <text:p text:style-name="P4"><text:span text:style-name="T1">README.md</text:span></text:p>
          </draw:text-box>
        </draw:frame>
        <draw:line draw:name="Горизонтальная линия 21" draw:style-name="gr9" draw:text-style-name="P1" draw:layer="layout" svg:x1="10.201cm" svg:y1="17.142cm" svg:x2="12.399cm" svg:y2="17.142cm">
          <text:p/>
        </draw:line>
        <draw:frame draw:name="Врезка 18" draw:style-name="gr3" draw:text-style-name="P6" draw:layer="layout" svg:width="3.652cm" svg:height="0.743cm" svg:x="12.712cm" svg:y="16.781cm">
          <draw:text-box>
            <text:p text:style-name="P4"><text:span text:style-name="T1">Документация</text:span></text:p>
          </draw:text-box>
        </draw:frame>
        <draw:line draw:name="Горизонтальная линия 22" draw:style-name="gr9" draw:text-style-name="P1" draw:layer="layout" svg:x1="10.201cm" svg:y1="19.642cm" svg:x2="12.399cm" svg:y2="19.642cm">
          <text:p/>
        </draw:line>
        <draw:frame draw:name="Врезка 19" draw:style-name="gr10" draw:text-style-name="P6" draw:layer="layout" svg:width="4.788cm" svg:height="0.718cm" svg:x="12.712cm" svg:y="19.282cm">
          <draw:text-box>
            <text:p text:style-name="P4"><text:span text:style-name="T1">Заголовочные файлы</text:span></text:p>
          </draw:text-box>
        </draw:frame>
        <draw:line draw:name="Горизонтальная линия 23" draw:style-name="gr9" draw:text-style-name="P1" draw:layer="layout" svg:x1="10.201cm" svg:y1="22.642cm" svg:x2="12.399cm" svg:y2="22.642cm">
          <text:p/>
        </draw:line>
        <draw:frame draw:name="Врезка 20" draw:style-name="gr3" draw:text-style-name="P6" draw:layer="layout" svg:width="3.652cm" svg:height="0.743cm" svg:x="12.712cm" svg:y="22.282cm">
          <draw:text-box>
            <text:p text:style-name="P4"><text:span text:style-name="T1">Исходные файлы</text:span></text:p>
          </draw:text-box>
        </draw:frame>
        <draw:line draw:name="Горизонтальная линия 24" draw:style-name="gr1" draw:text-style-name="P1" draw:layer="layout" svg:x1="4.573cm" svg:y1="21.64cm" svg:x2="6.335cm" svg:y2="21.64cm">
          <text:p/>
        </draw:line>
        <draw:custom-shape draw:name="Фигура 21" draw:style-name="gr2" draw:text-style-name="P2" draw:layer="layout" svg:width="2.973cm" svg:height="0.743cm" svg:x="6.284cm" svg:y="21.224cm">
          <text:p/>
          <draw:enhanced-geometry svg:viewBox="0 0 21600 21600" draw:type="rectangle" draw:enhanced-path="M 0 0 L 21600 0 21600 21600 0 21600 0 0 Z N"/>
        </draw:custom-shape>
        <draw:frame draw:name="Врезка 21" draw:style-name="gr3" draw:text-style-name="P3" draw:layer="layout" svg:width="2.322cm" svg:height="0.743cm" svg:x="6.439cm" svg:y="21.236cm">
          <draw:text-box>
            <text:p><text:span text:style-name="T1">scripts</text:span></text:p>
          </draw:text-box>
        </draw:frame>
        <draw:frame draw:name="Врезка 22" draw:style-name="gr3" draw:text-style-name="P6" draw:layer="layout" svg:width="3.652cm" svg:height="0.743cm" svg:x="6.401cm" svg:y="25.379cm">
          <draw:text-box>
            <text:p text:style-name="P4"><text:span text:style-name="T1">file.AppImage</text:span></text:p>
          </draw:text-box>
        </draw:frame>
        <draw:line draw:name="Горизонтальная линия 25" draw:style-name="gr1" draw:text-style-name="P1" draw:layer="layout" svg:x1="4.573cm" svg:y1="25.692cm" svg:x2="6.335cm" svg:y2="25.692cm">
          <text:p/>
        </draw:line>
        <draw:custom-shape draw:name="Фигура 22" draw:style-name="gr2" draw:text-style-name="P2" draw:layer="layout" svg:width="2.973cm" svg:height="0.743cm" svg:x="3.084cm" svg:y="4.267cm">
          <text:p/>
          <draw:enhanced-geometry svg:viewBox="0 0 21600 21600" draw:type="rectangle" draw:enhanced-path="M 0 0 L 21600 0 21600 21600 0 21600 0 0 Z N"/>
        </draw:custom-shape>
        <draw:frame draw:name="Врезка 23" draw:style-name="gr8" draw:text-style-name="P3" draw:layer="layout" svg:width="2.532cm" svg:height="1.183cm" svg:x="3.218cm" svg:y="4.279cm">
          <draw:text-box>
            <text:p><text:span text:style-name="T1">MyProject</text:span></text:p>
          </draw:text-box>
        </draw:frame>
        <draw:line draw:name="Горизонтальная линия 13" draw:style-name="gr1" draw:text-style-name="P1" draw:layer="layout" svg:x1="7.8cm" svg:y1="18.4cm" svg:x2="9.562cm" svg:y2="18.4cm">
          <text:p/>
        </draw:line>
        <draw:line draw:name="Горизонтальная линия 14" draw:style-name="gr9" draw:text-style-name="P1" draw:layer="layout" svg:x1="10.202cm" svg:y1="23.543cm" svg:x2="12.4cm" svg:y2="23.543cm">
          <text:p/>
        </draw:line>
        <draw:frame draw:name="Врезка 24" draw:style-name="gr3" draw:text-style-name="P6" draw:layer="layout" svg:width="3.652cm" svg:height="0.743cm" svg:x="12.713cm" svg:y="23.183cm">
          <draw:text-box>
            <text:p text:style-name="P4"><text:span text:style-name="T1">Юнит-тесты</text:span></text:p>
          </draw:text-box>
        </draw:frame>
        <draw:line draw:name="Горизонтальная линия 26" draw:style-name="gr1" draw:text-style-name="P1" draw:layer="layout" svg:x1="7.784cm" svg:y1="8.65cm" svg:x2="7.784cm" svg:y2="6.749cm">
          <text:p/>
        </draw:line>
        <draw:line draw:name="Горизонтальная линия 20" draw:style-name="gr9" draw:text-style-name="P1" draw:layer="layout" svg:x1="10.202cm" svg:y1="20.642cm" svg:x2="12.4cm" svg:y2="20.642cm">
          <text:p/>
        </draw:line>
        <draw:frame draw:name="Врезка 25" draw:style-name="gr10" draw:text-style-name="P6" draw:layer="layout" svg:width="4.788cm" svg:height="0.718cm" svg:x="12.713cm" svg:y="20.282cm">
          <draw:text-box>
            <text:p text:style-name="P4"><text:span text:style-name="T1">Ресурс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 Semibold" svg:font-family="'Source Code Pro Semibold'" style:font-pitch="fixed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09:20:36.668097744</meta:creation-date>
    <dc:date>2026-03-20T23:42:37.888843504</dc:date>
    <meta:editing-duration>PT7M32S</meta:editing-duration>
    <meta:editing-cycles>2</meta:editing-cycles>
    <meta:generator>LibreOffice/25.8.5.2$Linux_X86_64 LibreOffice_project/580$Build-2</meta:generator>
    <meta:document-statistic meta:object-count="68"/>
  </office:meta>
</office:document-meta>
</file>