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6F00000364E4B017A7.png" manifest:media-type="image/png"/>
  <manifest:file-entry manifest:full-path="Pictures/1000000100000296000001F59C2D19A9.png" manifest:media-type="image/png"/>
  <manifest:file-entry manifest:full-path="Pictures/1000000100000296000001F5326C3DF9.png" manifest:media-type="image/png"/>
  <manifest:file-entry manifest:full-path="Pictures/100000010000058300000386422E6BDA.png" manifest:media-type="image/png"/>
  <manifest:file-entry manifest:full-path="Pictures/1000000100000296000001F5DBEC6110.png" manifest:media-type="image/png"/>
  <manifest:file-entry manifest:full-path="Pictures/100000010000025C00000266284EFBFF.png" manifest:media-type="image/png"/>
  <manifest:file-entry manifest:full-path="Pictures/10000000000001C000000187E8CED452.png" manifest:media-type="image/png"/>
  <manifest:file-entry manifest:full-path="Pictures/1000000100000296000001F5B9B4A385.png" manifest:media-type="image/png"/>
  <manifest:file-entry manifest:full-path="Pictures/1000000100000296000001F59A7F5C91.png" manifest:media-type="image/png"/>
  <manifest:file-entry manifest:full-path="Pictures/1000000100000296000001F529E55248.png" manifest:media-type="image/png"/>
  <manifest:file-entry manifest:full-path="Pictures/1000000100000394000001E2D2A239D7.png" manifest:media-type="image/png"/>
  <manifest:file-entry manifest:full-path="Pictures/10000001000003220000034CF7C1697B.png" manifest:media-type="image/png"/>
  <manifest:file-entry manifest:full-path="Pictures/100000010000040100000320FD484C2E.png" manifest:media-type="image/png"/>
  <manifest:file-entry manifest:full-path="Pictures/10000001000003FF0000031E87334468.png" manifest:media-type="image/png"/>
  <manifest:file-entry manifest:full-path="Pictures/100000010000029F0000031E416C704C.png" manifest:media-type="image/png"/>
  <manifest:file-entry manifest:full-path="Pictures/10000001000003FC0000031EFD3F3B7D.png" manifest:media-type="image/png"/>
  <manifest:file-entry manifest:full-path="Pictures/10000001000003FC0000031BA24A4AC1.png" manifest:media-type="image/png"/>
  <manifest:file-entry manifest:full-path="Pictures/10000001000003FC00000233816AA6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Обычный" style:font-pitch="fixed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0.997cm"/>
    </style:style>
    <style:style style:name="Таблица1.B" style:family="table-column">
      <style:table-column-properties style:column-width="8.59cm"/>
    </style:style>
    <style:style style:name="Таблица1.C" style:family="table-column">
      <style:table-column-properties style:column-width="2.616cm"/>
    </style:style>
    <style:style style:name="Таблица1.D" style:family="table-column">
      <style:table-column-properties style:column-width="4.79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4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1.984cm" style:rel-column-width="46196*"/>
    </style:style>
    <style:style style:name="Таблица7.B" style:family="table-column">
      <style:table-column-properties style:column-width="2.304cm" style:rel-column-width="8880*"/>
    </style:style>
    <style:style style:name="Таблица7.C" style:family="table-column">
      <style:table-column-properties style:column-width="2.713cm" style:rel-column-width="1045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  <style:text-properties style:font-name="PT Astra Serif"/>
    </style:style>
    <style:style style:name="P2" style:family="paragraph" style:parent-style-name="Основной_20_текст_20_на_20_титульной">
      <style:text-properties style:font-name="PT Astra Serif"/>
    </style:style>
    <style:style style:name="P3" style:family="paragraph" style:parent-style-name="Text_20_body">
      <style:text-properties style:font-name="PT Astra Serif"/>
    </style:style>
    <style:style style:name="P4" style:family="paragraph" style:parent-style-name="Заголовок_20_на_20_титульной">
      <style:text-properties style:font-name="PT Astra Serif"/>
    </style:style>
    <style:style style:name="P5" style:family="paragraph" style:parent-style-name="Основной_20_текст_20_на_20_титульной">
      <style:text-properties style:font-name="PT Astra Serif" officeooo:rsid="0033b918" officeooo:paragraph-rsid="0033b918"/>
    </style:style>
    <style:style style:name="P6" style:family="paragraph" style:parent-style-name="Блок_20_научного_20_руководителя">
      <style:text-properties style:font-name="PT Astra Serif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PT Astra Serif" officeooo:rsid="001438f3"/>
    </style:style>
    <style:style style:name="P11" style:family="paragraph" style:parent-style-name="Heading_20_1">
      <style:paragraph-properties fo:break-before="page"/>
      <style:text-properties style:font-name="PT Astra Serif"/>
    </style:style>
    <style:style style:name="P12" style:family="paragraph" style:parent-style-name="Text_20_body" style:list-style-name="L1">
      <style:text-properties style:font-name="PT Astra Serif"/>
    </style:style>
    <style:style style:name="P13" style:family="paragraph" style:parent-style-name="Text_20_body">
      <style:text-properties style:font-name="PT Astra Serif" officeooo:paragraph-rsid="023261bb"/>
    </style:style>
    <style:style style:name="P14" style:family="paragraph" style:parent-style-name="Heading_20_2">
      <style:text-properties officeooo:paragraph-rsid="02337386"/>
    </style:style>
    <style:style style:name="P15" style:family="paragraph" style:parent-style-name="Text_20_body">
      <style:text-properties officeooo:paragraph-rsid="02337386"/>
    </style:style>
    <style:style style:name="P16" style:family="paragraph" style:parent-style-name="Heading_20_2" style:master-page-name="Landscape">
      <style:paragraph-properties fo:margin-left="0cm" fo:text-indent="0cm" style:auto-text-indent="false" style:page-number="auto"/>
      <style:text-properties style:font-name="PT Astra Serif" officeooo:paragraph-rsid="0041e930"/>
    </style:style>
    <style:style style:name="P17" style:family="paragraph" style:parent-style-name="Text_20_body" style:master-page-name="Standard">
      <style:paragraph-properties style:page-number="auto"/>
    </style:style>
    <style:style style:name="P18" style:family="paragraph" style:parent-style-name="Text_20_body" style:list-style-name="L2">
      <style:text-properties style:font-name="PT Astra Serif"/>
    </style:style>
    <style:style style:name="P19" style:family="paragraph" style:parent-style-name="Text_20_body" style:master-page-name="Landscape">
      <style:paragraph-properties style:page-number="auto"/>
    </style:style>
    <style:style style:name="P20" style:family="paragraph" style:parent-style-name="Heading_20_3" style:master-page-name="Standard">
      <style:paragraph-properties style:page-number="auto"/>
    </style:style>
    <style:style style:name="P21" style:family="paragraph" style:parent-style-name="Text_20_body">
      <style:text-properties style:use-window-font-color="true" loext:opacity="0%" style:font-name="PT Astra Serif" officeooo:paragraph-rsid="00a1e78b"/>
    </style:style>
    <style:style style:name="P22" style:family="paragraph" style:parent-style-name="Text_20_body">
      <style:text-properties style:use-window-font-color="true" loext:opacity="0%" style:font-name="PT Astra Serif" fo:language="en" fo:country="US" officeooo:rsid="01fadc4c" officeooo:paragraph-rsid="01fadc4c"/>
    </style:style>
    <style:style style:name="P23" style:family="paragraph" style:parent-style-name="Text_20_body">
      <style:text-properties style:use-window-font-color="true" loext:opacity="0%" style:font-name="PT Astra Serif" fo:language="en" fo:country="US" officeooo:rsid="01ee196f" officeooo:paragraph-rsid="01ee196f"/>
    </style:style>
    <style:style style:name="P24" style:family="paragraph" style:parent-style-name="Text_20_body">
      <style:text-properties style:use-window-font-color="true" loext:opacity="0%" style:font-name="PT Astra Serif" fo:language="en" fo:country="US" officeooo:rsid="01ea9f8e" officeooo:paragraph-rsid="01ecb34f"/>
    </style:style>
    <style:style style:name="P25" style:family="paragraph" style:parent-style-name="Text_20_body">
      <style:text-properties style:use-window-font-color="true" loext:opacity="0%" style:font-name="PT Astra Serif" officeooo:paragraph-rsid="01f6e380"/>
    </style:style>
    <style:style style:name="P26" style:family="paragraph" style:parent-style-name="Text_20_body">
      <style:text-properties style:use-window-font-color="true" loext:opacity="0%" style:font-name="PT Astra Serif" officeooo:paragraph-rsid="00dc71f2"/>
    </style:style>
    <style:style style:name="P27" style:family="paragraph" style:parent-style-name="Text_20_body">
      <style:text-properties style:use-window-font-color="true" loext:opacity="0%" style:font-name="PT Astra Serif" officeooo:paragraph-rsid="00e12e35"/>
    </style:style>
    <style:style style:name="P28" style:family="paragraph" style:parent-style-name="Text_20_body">
      <style:text-properties style:use-window-font-color="true" loext:opacity="0%" style:font-name="PT Astra Serif" fo:language="en" fo:country="US" officeooo:rsid="01f41bf3" officeooo:paragraph-rsid="01f41bf3"/>
    </style:style>
    <style:style style:name="P29" style:family="paragraph" style:parent-style-name="Text_20_body">
      <style:text-properties style:use-window-font-color="true" loext:opacity="0%" style:font-name="PT Astra Serif" officeooo:paragraph-rsid="00c07da5"/>
    </style:style>
    <style:style style:name="P30" style:family="paragraph" style:parent-style-name="Text_20_body">
      <style:text-properties style:font-name="PT Astra Serif" officeooo:paragraph-rsid="00deba1a"/>
    </style:style>
    <style:style style:name="P31" style:family="paragraph" style:parent-style-name="Text_20_body">
      <style:text-properties style:font-name="PT Astra Serif" officeooo:paragraph-rsid="004655cf"/>
    </style:style>
    <style:style style:name="P32" style:family="paragraph" style:parent-style-name="Text_20_body" style:list-style-name="L3">
      <style:text-properties style:font-name="PT Astra Serif" officeooo:rsid="02ef8be9" officeooo:paragraph-rsid="0048e57b"/>
    </style:style>
    <style:style style:name="P33" style:family="paragraph" style:parent-style-name="Text_20_body" style:list-style-name="L3">
      <style:text-properties style:font-name="PT Astra Serif" officeooo:rsid="02f02dfa" officeooo:paragraph-rsid="0048e57b"/>
    </style:style>
    <style:style style:name="P34" style:family="paragraph" style:parent-style-name="Text_20_body" style:list-style-name="L3">
      <style:text-properties style:font-name="PT Astra Serif" officeooo:rsid="02f37159" officeooo:paragraph-rsid="0048e57b"/>
    </style:style>
    <style:style style:name="P35" style:family="paragraph" style:parent-style-name="Text_20_body" style:list-style-name="L3">
      <style:text-properties style:font-name="PT Astra Serif" officeooo:rsid="02f677de" officeooo:paragraph-rsid="0048e57b"/>
    </style:style>
    <style:style style:name="P36" style:family="paragraph" style:parent-style-name="Text_20_body">
      <style:text-properties officeooo:paragraph-rsid="004655cf"/>
    </style:style>
    <style:style style:name="P37" style:family="paragraph" style:parent-style-name="Text_20_body">
      <style:text-properties style:use-window-font-color="true" loext:opacity="0%" officeooo:paragraph-rsid="008d552c"/>
    </style:style>
    <style:style style:name="P38" style:family="paragraph" style:parent-style-name="Text_20_body">
      <style:text-properties style:use-window-font-color="true" loext:opacity="0%" officeooo:rsid="0204f296" officeooo:paragraph-rsid="0204f296"/>
    </style:style>
    <style:style style:name="P39" style:family="paragraph" style:parent-style-name="Text_20_body">
      <style:text-properties style:font-name="PT Astra Serif" officeooo:paragraph-rsid="00e7aa0c"/>
    </style:style>
    <style:style style:name="P40" style:family="paragraph" style:parent-style-name="Text_20_body">
      <style:text-properties style:font-name="PT Astra Serif" officeooo:paragraph-rsid="01399879"/>
    </style:style>
    <style:style style:name="P41" style:family="paragraph" style:parent-style-name="Text_20_body" style:list-style-name="L4">
      <style:text-properties style:font-name="PT Astra Serif" officeooo:paragraph-rsid="004cdf0f"/>
    </style:style>
    <style:style style:name="P42" style:family="paragraph" style:parent-style-name="Text_20_body">
      <style:text-properties style:font-name="PT Astra Serif" officeooo:paragraph-rsid="00e80780"/>
    </style:style>
    <style:style style:name="P43" style:family="paragraph" style:parent-style-name="Heading_20_3">
      <style:text-properties officeooo:paragraph-rsid="01d21ca6"/>
    </style:style>
    <style:style style:name="P44" style:family="paragraph" style:parent-style-name="Text_20_body">
      <style:text-properties officeooo:paragraph-rsid="01d21ca6"/>
    </style:style>
    <style:style style:name="P45" style:family="paragraph" style:parent-style-name="Text_20_body">
      <style:text-properties style:font-name="PT Astra Serif" officeooo:paragraph-rsid="0206fa42"/>
    </style:style>
    <style:style style:name="P46" style:family="paragraph" style:parent-style-name="Text_20_body">
      <style:text-properties style:font-name="PT Astra Serif" fo:language="en" fo:country="US" officeooo:rsid="00bc2486" officeooo:paragraph-rsid="0216f363"/>
    </style:style>
    <style:style style:name="P47" style:family="paragraph" style:parent-style-name="Text_20_body">
      <style:text-properties style:font-name="PT Astra Serif" fo:language="ru" fo:country="RU" officeooo:rsid="00ffccdd" officeooo:paragraph-rsid="0105b3e1"/>
    </style:style>
    <style:style style:name="P48" style:family="paragraph" style:parent-style-name="Text_20_body">
      <style:text-properties style:font-name="PT Astra Serif" fo:language="en" fo:country="US" officeooo:rsid="00bc2486" officeooo:paragraph-rsid="021bc237"/>
    </style:style>
    <style:style style:name="P49" style:family="paragraph" style:parent-style-name="Text_20_body">
      <style:text-properties style:font-name="PT Astra Serif" fo:language="ru" fo:country="RU" officeooo:rsid="021aca99" officeooo:paragraph-rsid="021bc237"/>
    </style:style>
    <style:style style:name="P50" style:family="paragraph" style:parent-style-name="Text_20_body">
      <style:text-properties style:font-name="PT Astra Serif" fo:language="en" fo:country="US" officeooo:rsid="00bc2486" officeooo:paragraph-rsid="00bda2ac"/>
    </style:style>
    <style:style style:name="P51" style:family="paragraph" style:parent-style-name="Text_20_body">
      <style:text-properties style:font-name="PT Astra Serif" fo:language="ru" fo:country="RU" officeooo:rsid="021e2a1b" officeooo:paragraph-rsid="00bda2ac"/>
    </style:style>
    <style:style style:name="P52" style:family="paragraph" style:parent-style-name="Text_20_body">
      <style:text-properties style:font-name="PT Astra Serif" officeooo:paragraph-rsid="0102ac1a"/>
    </style:style>
    <style:style style:name="P53" style:family="paragraph" style:parent-style-name="Text_20_body">
      <style:text-properties style:font-name="PT Astra Serif" fo:language="ru" fo:country="RU" officeooo:rsid="0220dffc" officeooo:paragraph-rsid="0102ac1a"/>
    </style:style>
    <style:style style:name="P54" style:family="paragraph" style:parent-style-name="Text_20_body">
      <style:text-properties style:font-name="PT Astra Serif" officeooo:paragraph-rsid="0139d14f"/>
    </style:style>
    <style:style style:name="P55" style:family="paragraph" style:parent-style-name="Text_20_body">
      <style:text-properties style:font-name="PT Astra Serif" fo:language="ru" fo:country="RU" officeooo:rsid="0139d14f" officeooo:paragraph-rsid="0139d14f"/>
    </style:style>
    <style:style style:name="P56" style:family="paragraph" style:parent-style-name="Text_20_body">
      <style:text-properties style:font-name="PT Astra Serif" officeooo:paragraph-rsid="004cdf0f"/>
    </style:style>
    <style:style style:name="P57" style:family="paragraph" style:parent-style-name="Text_20_body" style:list-style-name="L5">
      <style:text-properties style:font-name="PT Astra Serif" officeooo:paragraph-rsid="004cdf0f"/>
    </style:style>
    <style:style style:name="P58" style:family="paragraph" style:parent-style-name="Text_20_body">
      <style:text-properties officeooo:paragraph-rsid="022f2485"/>
    </style:style>
    <style:style style:name="P59" style:family="paragraph" style:parent-style-name="Text_20_body" style:list-style-name="L6">
      <style:text-properties officeooo:paragraph-rsid="022f2485"/>
    </style:style>
    <style:style style:name="P60" style:family="paragraph" style:parent-style-name="Text_20_body">
      <style:paragraph-properties fo:text-align="justify" style:justify-single-word="false"/>
      <style:text-properties style:use-window-font-color="true" loext:opacity="0%" style:font-name="PT Astra Serif" fo:language="en" fo:country="US" officeooo:rsid="00c88672" officeooo:paragraph-rsid="00ca7f4e"/>
    </style:style>
    <style:style style:name="P61" style:family="paragraph" style:parent-style-name="Text_20_body">
      <style:paragraph-properties fo:text-align="justify" style:justify-single-word="false"/>
      <style:text-properties style:use-window-font-color="true" loext:opacity="0%" style:font-name="PT Astra Serif" fo:language="en" fo:country="US" officeooo:rsid="00c88672" officeooo:paragraph-rsid="00f304dc"/>
    </style:style>
    <style:style style:name="P62" style:family="paragraph" style:parent-style-name="Text_20_body">
      <style:text-properties style:use-window-font-color="true" loext:opacity="0%" style:font-name="PT Astra Serif" fo:language="en" fo:country="US" officeooo:rsid="00c88672" officeooo:paragraph-rsid="00c88672"/>
    </style:style>
    <style:style style:name="P63" style:family="paragraph" style:parent-style-name="Text_20_body">
      <style:text-properties style:use-window-font-color="true" loext:opacity="0%" style:font-name="PT Astra Serif" fo:language="en" fo:country="US" officeooo:rsid="00c88672" officeooo:paragraph-rsid="00c9f418"/>
    </style:style>
    <style:style style:name="P64" style:family="paragraph" style:parent-style-name="Text_20_body">
      <style:text-properties style:use-window-font-color="true" loext:opacity="0%" style:font-name="PT Astra Serif" fo:language="en" fo:country="US" officeooo:rsid="00c88672" officeooo:paragraph-rsid="00d0db28"/>
    </style:style>
    <style:style style:name="P65" style:family="paragraph" style:parent-style-name="Text_20_body">
      <style:text-properties style:use-window-font-color="true" loext:opacity="0%" style:font-name="PT Astra Serif" fo:language="en" fo:country="US" officeooo:rsid="020a6e34" officeooo:paragraph-rsid="020a6e34"/>
    </style:style>
    <style:style style:name="P66" style:family="paragraph" style:parent-style-name="Text_20_body">
      <style:text-properties officeooo:paragraph-rsid="0244c5a3"/>
    </style:style>
    <style:style style:name="P67" style:family="paragraph" style:parent-style-name="Text_20_body">
      <style:text-properties style:use-window-font-color="true" loext:opacity="0%" style:font-name="PT Astra Serif" fo:language="ru" fo:country="RU" officeooo:rsid="0237039f" officeooo:paragraph-rsid="0235bb98"/>
    </style:style>
    <style:style style:name="P68" style:family="paragraph" style:parent-style-name="Text_20_body" style:list-style-name="L7">
      <style:text-properties style:use-window-font-color="true" loext:opacity="0%" style:font-name="PT Astra Serif" fo:language="ru" fo:country="RU" officeooo:rsid="0237039f" officeooo:paragraph-rsid="0235bb98"/>
    </style:style>
    <style:style style:name="P69" style:family="paragraph" style:parent-style-name="Heading_20_2">
      <style:text-properties style:font-name="PT Astra Serif" officeooo:paragraph-rsid="01d21ca6"/>
    </style:style>
    <style:style style:name="P70" style:family="paragraph" style:parent-style-name="Text_20_body">
      <style:text-properties style:use-window-font-color="true" loext:opacity="0%" style:font-name="PT Astra Serif" officeooo:rsid="024d24a1" officeooo:paragraph-rsid="024d24a1"/>
    </style:style>
    <style:style style:name="P71" style:family="paragraph" style:parent-style-name="Heading_20_3">
      <style:text-properties style:font-name="PT Astra Serif" officeooo:paragraph-rsid="01d21ca6"/>
    </style:style>
    <style:style style:name="P72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1.251cm" style:auto-text-indent="false"/>
      <style:text-properties style:font-name="PT Astra Serif" officeooo:paragraph-rsid="004e06f7"/>
    </style:style>
    <style:style style:name="P73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74" style:family="paragraph" style:parent-style-name="Table_20_Contents">
      <style:paragraph-properties fo:text-align="center" style:justify-single-word="false"/>
      <style:text-properties style:font-name="PT Astra Serif" officeooo:paragraph-rsid="004e06f7"/>
    </style:style>
    <style:style style:name="P75" style:family="paragraph" style:parent-style-name="Table_20_Contents">
      <style:paragraph-properties fo:text-align="end" style:justify-single-word="false"/>
      <style:text-properties style:font-name="PT Astra Serif" officeooo:paragraph-rsid="004e06f7"/>
    </style:style>
    <style:style style:name="P76" style:family="paragraph" style:parent-style-name="Standard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77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officeooo:paragraph-rsid="004e06f7"/>
    </style:style>
    <style:style style:name="P78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04e06f7"/>
    </style:style>
    <style:style style:name="P79" style:family="paragraph" style:parent-style-name="Text_20_body">
      <style:paragraph-properties fo:margin-left="0cm" fo:margin-right="0.235cm" fo:margin-top="0cm" fo:margin-bottom="0cm" style:contextual-spacing="false" fo:text-align="justify" style:justify-single-word="false" fo:text-indent="0cm" style:auto-text-indent="false"/>
      <style:text-properties officeooo:paragraph-rsid="004e06f7"/>
    </style:style>
    <style:style style:name="P80" style:family="paragraph" style:parent-style-name="Text_20_body">
      <style:paragraph-properties fo:margin-left="0cm" fo:text-indent="0cm" style:auto-text-indent="false"/>
      <style:text-properties style:font-name="PT Astra Serif" officeooo:paragraph-rsid="004e06f7"/>
    </style:style>
    <style:style style:name="P81" style:family="paragraph" style:parent-style-name="Text_20_body">
      <style:paragraph-properties fo:margin-left="0cm" fo:text-indent="0cm" style:auto-text-indent="false"/>
      <style:text-properties officeooo:paragraph-rsid="004e06f7"/>
    </style:style>
    <style:style style:name="P82" style:family="paragraph" style:parent-style-name="Table">
      <style:paragraph-properties fo:keep-with-next="always"/>
      <style:text-properties fo:font-weight="normal" officeooo:paragraph-rsid="004e06f7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PT Astra Serif" fo:font-size="12pt" officeooo:rsid="01e28a4f" officeooo:paragraph-rsid="004e06f7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1e28a4f" officeooo:paragraph-rsid="004e06f7" style:font-size-asian="12pt" style:font-size-complex="12pt"/>
    </style:style>
    <style:style style:name="P85" style:family="paragraph" style:parent-style-name="Table_20_Contents" style:list-style-name="L8">
      <style:paragraph-properties fo:text-align="start" style:justify-single-word="false"/>
      <style:text-properties style:font-name="PT Astra Serif" fo:font-size="12pt" officeooo:paragraph-rsid="004e06f7" style:font-size-asian="12pt" style:font-size-complex="12pt"/>
    </style:style>
    <style:style style:name="P86" style:family="paragraph" style:parent-style-name="Text_20_body">
      <style:text-properties style:font-name="PT Astra Serif" officeooo:paragraph-rsid="004e06f7"/>
    </style:style>
    <style:style style:name="P87" style:family="paragraph" style:parent-style-name="Table_20_Contents">
      <style:paragraph-properties fo:text-align="center" style:justify-single-word="false"/>
      <style:text-properties style:font-name="PT Astra Serif" fo:font-size="12pt" officeooo:rsid="01e3c667" officeooo:paragraph-rsid="004e06f7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PT Astra Serif" fo:font-size="12pt" officeooo:rsid="01f777d0" officeooo:paragraph-rsid="004e06f7" style:font-size-asian="12pt" style:font-size-complex="12pt"/>
    </style:style>
    <style:style style:name="P89" style:family="paragraph" style:parent-style-name="Text_20_body">
      <style:text-properties style:font-name="PT Astra Serif" fo:font-size="14pt" fo:letter-spacing="-0.004cm" officeooo:rsid="030e1e5d" officeooo:paragraph-rsid="004e06f7" style:font-size-asian="14pt"/>
    </style:style>
    <style:style style:name="P90" style:family="paragraph" style:parent-style-name="Table_20_Contents">
      <style:paragraph-properties fo:text-align="center" style:justify-single-word="false"/>
      <style:text-properties style:font-name="PT Astra Serif" fo:font-size="12pt" officeooo:rsid="01e3957c" officeooo:paragraph-rsid="004e06f7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PT Astra Serif" fo:font-size="12pt" fo:font-weight="bold" officeooo:rsid="01e28a4f" officeooo:paragraph-rsid="004e06f7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PT Astra Serif" fo:font-size="12pt" fo:font-weight="bold" officeooo:paragraph-rsid="004e06f7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PT Astra Serif" fo:font-size="12pt" fo:font-weight="bold" officeooo:rsid="01f777d0" officeooo:paragraph-rsid="004e06f7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style:font-name="PT Astra Serif" officeooo:rsid="01e6c657" officeooo:paragraph-rsid="004e06f7"/>
    </style:style>
    <style:style style:name="P95" style:family="paragraph" style:parent-style-name="Text_20_body">
      <style:text-properties style:font-name="PT Astra Serif" officeooo:rsid="01ea6119" officeooo:paragraph-rsid="004e06f7"/>
    </style:style>
    <style:style style:name="P96" style:family="paragraph" style:parent-style-name="Standard">
      <style:text-properties style:font-name="PT Astra Serif" officeooo:rsid="01ecebce" officeooo:paragraph-rsid="004e06f7"/>
    </style:style>
    <style:style style:name="P97" style:family="paragraph" style:parent-style-name="Text_20_body">
      <style:paragraph-properties fo:text-align="justify" style:justify-single-word="false"/>
      <style:text-properties style:font-name="PT Astra Serif" officeooo:rsid="01ecebce" officeooo:paragraph-rsid="004e06f7"/>
    </style:style>
    <style:style style:name="P98" style:family="paragraph" style:parent-style-name="Text_20_body">
      <style:paragraph-properties fo:text-align="justify" style:justify-single-word="false"/>
      <style:text-properties style:font-name="PT Astra Serif" officeooo:rsid="01ed5eca" officeooo:paragraph-rsid="004e06f7"/>
    </style:style>
    <style:style style:name="P99" style:family="paragraph" style:parent-style-name="Text_20_body">
      <style:paragraph-properties fo:text-align="start" style:justify-single-word="false"/>
      <style:text-properties style:font-name="PT Astra Serif" officeooo:rsid="01ecebce" officeooo:paragraph-rsid="004e06f7"/>
    </style:style>
    <style:style style:name="P100" style:family="paragraph" style:parent-style-name="Text_20_body">
      <style:paragraph-properties fo:text-align="start" style:justify-single-word="false"/>
      <style:text-properties style:font-name="PT Astra Serif" officeooo:rsid="01ee3056" officeooo:paragraph-rsid="004e06f7"/>
    </style:style>
    <style:style style:name="P101" style:family="paragraph" style:parent-style-name="Text_20_body">
      <style:paragraph-properties fo:margin-left="0cm" fo:text-indent="0cm" style:auto-text-indent="false"/>
      <style:text-properties officeooo:rsid="01ee3056" officeooo:paragraph-rsid="004e06f7"/>
    </style:style>
    <style:style style:name="P102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officeooo:rsid="020920a6" officeooo:paragraph-rsid="004e06f7"/>
    </style:style>
    <style:style style:name="P103" style:family="paragraph" style:parent-style-name="Text_20_body">
      <style:paragraph-properties fo:text-align="start" style:justify-single-word="false"/>
      <style:text-properties style:font-name="PT Astra Serif" fo:language="ru" fo:country="RU" officeooo:rsid="020a2eaf" officeooo:paragraph-rsid="004e06f7"/>
    </style:style>
    <style:style style:name="P104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a2eaf" officeooo:paragraph-rsid="004e06f7"/>
    </style:style>
    <style:style style:name="P105" style:family="paragraph" style:parent-style-name="Text_20_body">
      <style:paragraph-properties fo:text-align="start" style:justify-single-word="false"/>
      <style:text-properties style:font-name="PT Astra Serif" fo:language="ru" fo:country="RU" officeooo:rsid="020c061c" officeooo:paragraph-rsid="004e06f7"/>
    </style:style>
    <style:style style:name="P106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c061c" officeooo:paragraph-rsid="004e06f7"/>
    </style:style>
    <style:style style:name="P107" style:family="paragraph" style:parent-style-name="Standard">
      <style:text-properties style:font-name="PT Astra Serif" officeooo:paragraph-rsid="004e06f7"/>
    </style:style>
    <style:style style:name="P108" style:family="paragraph" style:parent-style-name="Text_20_body">
      <style:text-properties style:font-name="PT Astra Serif" officeooo:rsid="008f1409" officeooo:paragraph-rsid="004e06f7"/>
    </style:style>
    <style:style style:name="P109" style:family="paragraph" style:parent-style-name="Table">
      <style:paragraph-properties fo:keep-with-next="always"/>
      <style:text-properties style:font-name="PT Astra Serif" officeooo:paragraph-rsid="004e06f7"/>
    </style:style>
    <style:style style:name="P110" style:family="paragraph" style:parent-style-name="Text_20_body">
      <style:paragraph-properties fo:margin-left="0cm" fo:text-indent="0cm" style:auto-text-indent="false"/>
      <style:text-properties style:font-name="PT Astra Serif" officeooo:rsid="02ff5d15" officeooo:paragraph-rsid="004e06f7"/>
    </style:style>
    <style:style style:name="P111" style:family="paragraph" style:parent-style-name="Heading_20_2">
      <style:text-properties style:font-name="PT Astra Serif" officeooo:rsid="0033b918" officeooo:paragraph-rsid="00533dae"/>
    </style:style>
    <style:style style:name="P112" style:family="paragraph" style:parent-style-name="Text_20_body">
      <style:text-properties style:font-name="PT Astra Serif" officeooo:paragraph-rsid="00533dae"/>
    </style:style>
    <style:style style:name="P113" style:family="paragraph" style:parent-style-name="Heading_20_3">
      <style:text-properties style:use-window-font-color="true" loext:opacity="0%" officeooo:paragraph-rsid="01d2d460"/>
    </style:style>
    <style:style style:name="P114" style:family="paragraph" style:parent-style-name="Text_20_body" style:list-style-name="L9">
      <style:text-properties style:font-name="PT Astra Serif" officeooo:paragraph-rsid="00533dae"/>
    </style:style>
    <style:style style:name="P115" style:family="paragraph" style:parent-style-name="Text_20_body">
      <style:text-properties style:use-window-font-color="true" loext:opacity="0%" style:font-name="PT Astra Serif" officeooo:paragraph-rsid="011c7e73"/>
    </style:style>
    <style:style style:name="P116" style:family="paragraph" style:parent-style-name="Text_20_body" style:list-style-name="L10">
      <style:text-properties style:use-window-font-color="true" loext:opacity="0%" style:font-name="PT Astra Serif" fo:language="ru" fo:country="RU" officeooo:rsid="011b3a7a" officeooo:paragraph-rsid="011c7e73"/>
    </style:style>
    <style:style style:name="P117" style:family="paragraph" style:parent-style-name="Text_20_body" style:list-style-name="L10">
      <style:text-properties style:use-window-font-color="true" loext:opacity="0%" style:font-name="PT Astra Serif" fo:language="ru" fo:country="RU" officeooo:rsid="011dd740" officeooo:paragraph-rsid="011dd740"/>
    </style:style>
    <style:style style:name="P118" style:family="paragraph" style:parent-style-name="Text_20_body">
      <style:paragraph-properties fo:text-align="justify" style:justify-single-word="false"/>
      <style:text-properties style:font-name="PT Astra Serif" fo:language="ru" fo:country="RU" officeooo:rsid="020cf027" officeooo:paragraph-rsid="016d2340"/>
    </style:style>
    <style:style style:name="P119" style:family="paragraph" style:parent-style-name="Text_20_body">
      <style:paragraph-properties fo:text-align="justify" style:justify-single-word="false"/>
      <style:text-properties style:font-name="PT Astra Serif" officeooo:paragraph-rsid="016deff6"/>
    </style:style>
    <style:style style:name="P120" style:family="paragraph" style:parent-style-name="Text_20_body">
      <style:text-properties style:font-name="PT Astra Serif" officeooo:paragraph-rsid="016deff6"/>
    </style:style>
    <style:style style:name="P121" style:family="paragraph" style:parent-style-name="Text_20_body">
      <style:text-properties officeooo:paragraph-rsid="016deff6"/>
    </style:style>
    <style:style style:name="P122" style:family="paragraph" style:parent-style-name="Text_20_body">
      <style:text-properties fo:color="#ff0000" loext:opacity="100%" fo:language="ru" fo:country="RU" officeooo:rsid="016fb638" officeooo:paragraph-rsid="01702361"/>
    </style:style>
    <style:style style:name="P123" style:family="paragraph" style:parent-style-name="Heading_20_3">
      <style:text-properties officeooo:paragraph-rsid="01d2d460"/>
    </style:style>
    <style:style style:name="P124" style:family="paragraph" style:parent-style-name="Text_20_body" style:list-style-name="L11"/>
    <style:style style:name="P125" style:family="paragraph" style:parent-style-name="Text_20_body">
      <style:text-properties style:use-window-font-color="true" loext:opacity="0%" officeooo:rsid="01738282" officeooo:paragraph-rsid="01738282"/>
    </style:style>
    <style:style style:name="P126" style:family="paragraph" style:parent-style-name="Heading_20_2">
      <style:text-properties style:font-name="PT Astra Serif" officeooo:paragraph-rsid="01d2d460"/>
    </style:style>
    <style:style style:name="P127" style:family="paragraph" style:parent-style-name="Text_20_body">
      <style:text-properties officeooo:rsid="019b7e00" officeooo:paragraph-rsid="019b7e00"/>
    </style:style>
    <style:style style:name="P128" style:family="paragraph" style:parent-style-name="Heading_20_3">
      <style:text-properties officeooo:rsid="013e5aa0" officeooo:paragraph-rsid="01d2d460"/>
    </style:style>
    <style:style style:name="P129" style:family="paragraph" style:parent-style-name="Text_20_body">
      <style:text-properties officeooo:paragraph-rsid="01a1f0bc"/>
    </style:style>
    <style:style style:name="P130" style:family="paragraph" style:parent-style-name="Text_20_body" style:list-style-name="L12">
      <style:text-properties officeooo:paragraph-rsid="01a1f0bc"/>
    </style:style>
    <style:style style:name="P131" style:family="paragraph" style:parent-style-name="Text_20_body" style:list-style-name="L13">
      <style:text-properties officeooo:paragraph-rsid="01a1f0bc"/>
    </style:style>
    <style:style style:name="P132" style:family="paragraph" style:parent-style-name="Text_20_body" style:master-page-name="Landscape">
      <style:paragraph-properties style:page-number="auto"/>
      <style:text-properties style:font-name="PT Astra Serif" officeooo:rsid="019b7e00" officeooo:paragraph-rsid="019b7e00"/>
    </style:style>
    <style:style style:name="P133" style:family="paragraph" style:parent-style-name="Text_20_body">
      <style:text-properties style:font-name="PT Astra Serif" officeooo:rsid="019b7e00" officeooo:paragraph-rsid="019b7e00"/>
    </style:style>
    <style:style style:name="P134" style:family="paragraph" style:parent-style-name="Text_20_body">
      <style:text-properties style:font-name="PT Astra Serif" officeooo:rsid="015f611b"/>
    </style:style>
    <style:style style:name="P135" style:family="paragraph" style:parent-style-name="Heading_20_3" style:list-style-name="">
      <style:paragraph-properties fo:line-height="150%"/>
      <style:text-properties officeooo:rsid="013e5aa0" officeooo:paragraph-rsid="013e5aa0"/>
    </style:style>
    <style:style style:name="P136" style:family="paragraph" style:parent-style-name="Heading_20_3" style:master-page-name="Standard">
      <style:paragraph-properties style:page-number="auto"/>
      <style:text-properties officeooo:paragraph-rsid="01d311f3"/>
    </style:style>
    <style:style style:name="P137" style:family="paragraph" style:parent-style-name="Text_20_body">
      <style:text-properties officeooo:paragraph-rsid="01c30157"/>
    </style:style>
    <style:style style:name="P138" style:family="paragraph" style:parent-style-name="Text_20_body" style:list-style-name="L14">
      <style:text-properties officeooo:paragraph-rsid="013ee7ce"/>
    </style:style>
    <style:style style:name="P139" style:family="paragraph" style:parent-style-name="Text_20_body">
      <style:text-properties officeooo:paragraph-rsid="013ee7ce"/>
    </style:style>
    <style:style style:name="P140" style:family="paragraph" style:parent-style-name="Heading_20_3">
      <style:text-properties officeooo:rsid="013e5aa0" officeooo:paragraph-rsid="01d311f3"/>
    </style:style>
    <style:style style:name="P141" style:family="paragraph" style:parent-style-name="Text_20_body">
      <style:text-properties officeooo:paragraph-rsid="01c97e32"/>
    </style:style>
    <style:style style:name="P142" style:family="paragraph" style:parent-style-name="Heading_20_3">
      <style:text-properties officeooo:paragraph-rsid="01d311f3"/>
    </style:style>
    <style:style style:name="P143" style:family="paragraph" style:parent-style-name="Text_20_body" style:list-style-name="L15">
      <style:text-properties officeooo:paragraph-rsid="013ee7ce"/>
    </style:style>
    <style:style style:name="P144" style:family="paragraph" style:parent-style-name="Heading_20_2">
      <style:text-properties style:font-name="PT Astra Serif" officeooo:paragraph-rsid="01d311f3"/>
    </style:style>
    <style:style style:name="P145" style:family="paragraph" style:parent-style-name="Text_20_body">
      <style:text-properties officeooo:paragraph-rsid="01453ec4"/>
    </style:style>
    <style:style style:name="P146" style:family="paragraph" style:parent-style-name="Text_20_body">
      <style:paragraph-properties fo:text-align="justify" style:justify-single-word="false"/>
      <style:text-properties officeooo:rsid="01776f95" officeooo:paragraph-rsid="01776f95"/>
    </style:style>
    <style:style style:name="P147" style:family="paragraph" style:parent-style-name="Text_20_body">
      <style:paragraph-properties fo:margin-left="0cm" fo:text-align="start" style:justify-single-word="false" fo:text-indent="0cm" style:auto-text-indent="false"/>
      <style:text-properties fo:language="ru" fo:country="RU" officeooo:rsid="017944e5" officeooo:paragraph-rsid="01776f95"/>
    </style:style>
    <style:style style:name="P148" style:family="paragraph" style:parent-style-name="Text_20_body">
      <style:paragraph-properties fo:margin-left="0cm" fo:text-align="justify" style:justify-single-word="false" fo:text-indent="0cm" style:auto-text-indent="false"/>
      <style:text-properties fo:language="ru" fo:country="RU" officeooo:rsid="017aa67a" officeooo:paragraph-rsid="017aa67a"/>
    </style:style>
    <style:style style:name="P149" style:family="paragraph" style:parent-style-name="Heading_20_2">
      <style:text-properties style:font-name="PT Astra Serif" officeooo:paragraph-rsid="01d5afab"/>
    </style:style>
    <style:style style:name="P150" style:family="paragraph" style:parent-style-name="Text_20_body">
      <style:paragraph-properties fo:margin-left="0cm" fo:text-indent="0cm" style:auto-text-indent="false"/>
      <style:text-properties style:font-name="PT Astra Serif" officeooo:rsid="002a122f" officeooo:paragraph-rsid="01d76c5e"/>
    </style:style>
    <style:style style:name="P151" style:family="paragraph" style:parent-style-name="Text_20_body" style:list-style-name="L16">
      <style:paragraph-properties fo:margin-left="0cm" fo:text-indent="0cm" style:auto-text-indent="false"/>
      <style:text-properties style:font-name="PT Astra Serif" officeooo:rsid="002a122f" officeooo:paragraph-rsid="01d76c5e"/>
    </style:style>
    <style:style style:name="P152" style:family="paragraph" style:parent-style-name="Text_20_body">
      <style:text-properties style:font-name="PT Astra Serif" officeooo:rsid="002a122f" officeooo:paragraph-rsid="01d76c5e"/>
    </style:style>
    <style:style style:name="P153" style:family="paragraph" style:parent-style-name="Text_20_body" style:list-style-name="L17">
      <style:text-properties style:font-name="PT Astra Serif" officeooo:rsid="002a122f" officeooo:paragraph-rsid="01d76c5e"/>
    </style:style>
    <style:style style:name="P154" style:family="paragraph" style:parent-style-name="Text_20_body" style:list-style-name="L18">
      <style:text-properties style:font-name="PT Astra Serif" officeooo:rsid="002a122f" officeooo:paragraph-rsid="01d76c5e"/>
    </style:style>
    <style:style style:name="P155" style:family="paragraph" style:parent-style-name="Text_20_body" style:list-style-name="L19">
      <style:text-properties style:font-name="PT Astra Serif" officeooo:rsid="002a122f" officeooo:paragraph-rsid="01d76c5e"/>
    </style:style>
    <style:style style:name="P156" style:family="paragraph" style:parent-style-name="Text_20_body" style:list-style-name="L20">
      <style:text-properties style:font-name="PT Astra Serif" officeooo:rsid="002a122f" officeooo:paragraph-rsid="01d76c5e"/>
    </style:style>
    <style:style style:name="P157" style:family="paragraph" style:parent-style-name="Heading_20_3">
      <style:text-properties officeooo:paragraph-rsid="01d847cf"/>
    </style:style>
    <style:style style:name="P158" style:family="paragraph" style:parent-style-name="Text_20_body" style:list-style-name="L21">
      <style:text-properties style:font-name="PT Astra Serif" officeooo:rsid="002a122f" officeooo:paragraph-rsid="01d76c5e"/>
    </style:style>
    <style:style style:name="P159" style:family="paragraph" style:parent-style-name="Text_20_body" style:list-style-name="L22">
      <style:text-properties style:font-name="PT Astra Serif" officeooo:rsid="002a122f" officeooo:paragraph-rsid="01d76c5e"/>
    </style:style>
    <style:style style:name="P160" style:family="paragraph" style:parent-style-name="Text_20_body" style:list-style-name="L23">
      <style:text-properties style:font-name="PT Astra Serif" officeooo:rsid="002a122f" officeooo:paragraph-rsid="01d76c5e"/>
    </style:style>
    <style:style style:name="P161" style:family="paragraph" style:parent-style-name="Text_20_body" style:list-style-name="L24">
      <style:text-properties style:font-name="PT Astra Serif" officeooo:rsid="002a122f" officeooo:paragraph-rsid="01d76c5e"/>
    </style:style>
    <style:style style:name="P162" style:family="paragraph" style:parent-style-name="Text_20_body" style:list-style-name="L25">
      <style:text-properties style:font-name="PT Astra Serif" officeooo:rsid="002a122f" officeooo:paragraph-rsid="01d76c5e"/>
    </style:style>
    <style:style style:name="P163" style:family="paragraph" style:parent-style-name="Text_20_body" style:list-style-name="L26">
      <style:text-properties style:font-name="PT Astra Serif" officeooo:rsid="002a122f" officeooo:paragraph-rsid="01d76c5e"/>
    </style:style>
    <style:style style:name="P164" style:family="paragraph" style:parent-style-name="Text_20_body" style:list-style-name="L27">
      <style:text-properties style:font-name="PT Astra Serif" officeooo:rsid="002a122f" officeooo:paragraph-rsid="01d76c5e"/>
    </style:style>
    <style:style style:name="P165" style:family="paragraph" style:parent-style-name="Text_20_body" style:list-style-name="L28">
      <style:text-properties style:font-name="PT Astra Serif" officeooo:rsid="002a122f" officeooo:paragraph-rsid="01d76c5e"/>
    </style:style>
    <style:style style:name="P166" style:family="paragraph" style:parent-style-name="Text_20_body">
      <style:text-properties fo:color="#ff0000" loext:opacity="100%" style:font-name="PT Astra Serif" officeooo:rsid="0248b2ed" officeooo:paragraph-rsid="0248b2ed"/>
    </style:style>
    <style:style style:name="P167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PT Astra Serif" officeooo:paragraph-rsid="00292d7c"/>
    </style:style>
    <style:style style:name="P168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style:font-name="PT Astra Serif" officeooo:paragraph-rsid="00292d7c"/>
    </style:style>
    <style:style style:name="P169" style:family="paragraph" style:parent-style-name="Text_20_body" style:list-style-name="Нумерация_20_источников">
      <loext:graphic-properties draw:fill="none"/>
      <style:paragraph-properties fo:margin-lef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PT Astra Serif" officeooo:paragraph-rsid="00292d7c"/>
    </style:style>
    <style:style style:name="P170" style:family="paragraph" style:parent-style-name="Heading_20_1">
      <style:paragraph-properties fo:break-before="page"/>
      <style:text-properties style:font-name="PT Astra Serif" officeooo:paragraph-rsid="00360b9e"/>
    </style:style>
    <style:style style:name="P171" style:family="paragraph" style:parent-style-name="Heading_20_1">
      <style:text-properties style:font-name="PT Astra Serif" officeooo:paragraph-rsid="00360b9e"/>
    </style:style>
    <style:style style:name="P172" style:family="paragraph" style:parent-style-name="Листинг">
      <style:paragraph-properties fo:keep-with-next="always"/>
      <style:text-properties style:font-name="PT Astra Serif"/>
    </style:style>
    <style:style style:name="P173" style:family="paragraph" style:parent-style-name="Оформление_20_кода" style:list-style-name="Нумерация_20_строк_20_кода">
      <style:text-properties style:font-name="Source Code Pro"/>
    </style:style>
    <style:style style:name="P174" style:family="paragraph" style:parent-style-name="Листинг">
      <style:paragraph-properties fo:keep-with-next="always"/>
      <style:text-properties style:font-name="PT Astra Serif" officeooo:paragraph-rsid="0151a8b6"/>
    </style:style>
    <style:style style:name="P175" style:family="paragraph" style:parent-style-name="Text_20_body">
      <style:text-properties style:font-name="PT Astra Serif" officeooo:paragraph-rsid="014fd4d8"/>
    </style:style>
    <style:style style:name="P176" style:family="paragraph" style:parent-style-name="Heading_20_1">
      <style:text-properties style:font-name="PT Astra Serif" officeooo:rsid="0033b918" officeooo:paragraph-rsid="00360b9e"/>
    </style:style>
    <style:style style:name="P177" style:family="paragraph" style:parent-style-name="Heading_20_1">
      <style:text-properties style:font-name="PT Astra Serif" officeooo:rsid="01dee05b" officeooo:paragraph-rsid="01dee05b"/>
    </style:style>
    <style:style style:name="P178" style:family="paragraph" style:parent-style-name="Text_20_body">
      <style:text-properties style:font-name="PT Astra Serif" officeooo:paragraph-rsid="00360b9e"/>
    </style:style>
    <style:style style:name="P179" style:family="paragraph" style:parent-style-name="Text_20_body">
      <style:paragraph-properties fo:margin-left="0cm" fo:text-indent="0cm" style:auto-text-indent="false"/>
      <style:text-properties style:font-name="PT Astra Serif" officeooo:rsid="002a122f" officeooo:paragraph-rsid="01a7adad"/>
    </style:style>
    <style:style style:name="P180" style:family="paragraph" style:parent-style-name="Text_20_body">
      <style:text-properties style:font-name="PT Astra Serif" officeooo:rsid="002a122f" officeooo:paragraph-rsid="01a7adad"/>
    </style:style>
    <style:style style:name="P181" style:family="paragraph" style:parent-style-name="Heading_20_1">
      <style:paragraph-properties fo:break-before="page"/>
      <style:text-properties style:font-name="PT Astra Serif" officeooo:paragraph-rsid="01df1c6b"/>
    </style:style>
    <style:style style:name="P182" style:family="paragraph" style:parent-style-name="Heading_20_1">
      <style:text-properties style:font-name="PT Astra Serif" officeooo:paragraph-rsid="01df1c6b"/>
    </style:style>
    <style:style style:name="P183" style:family="paragraph" style:parent-style-name="Heading_20_1">
      <style:text-properties style:font-name="PT Astra Serif" officeooo:rsid="01df1c6b" officeooo:paragraph-rsid="01df1c6b"/>
    </style:style>
    <style:style style:name="P184" style:family="paragraph" style:parent-style-name="Text_20_body">
      <style:text-properties style:font-name="PT Astra Serif" officeooo:paragraph-rsid="01df1c6b"/>
    </style:style>
    <style:style style:name="T1" style:family="text">
      <style:text-properties officeooo:rsid="00391c0b"/>
    </style:style>
    <style:style style:name="T2" style:family="text">
      <style:text-properties officeooo:rsid="01d1a976"/>
    </style:style>
    <style:style style:name="T3" style:family="text">
      <style:text-properties fo:language="en" fo:country="US" officeooo:rsid="007a4a5b"/>
    </style:style>
    <style:style style:name="T4" style:family="text">
      <style:text-properties officeooo:rsid="007b93bc"/>
    </style:style>
    <style:style style:name="T5" style:family="text">
      <style:text-properties officeooo:rsid="008c0203"/>
    </style:style>
    <style:style style:name="T6" style:family="text">
      <style:text-properties officeooo:rsid="007a4a5b"/>
    </style:style>
    <style:style style:name="T7" style:family="text">
      <style:text-properties fo:language="en" fo:country="US" officeooo:rsid="007da002"/>
    </style:style>
    <style:style style:name="T8" style:family="text">
      <style:text-properties fo:language="ru" fo:country="RU" officeooo:rsid="007da002"/>
    </style:style>
    <style:style style:name="T9" style:family="text">
      <style:text-properties officeooo:rsid="00919965"/>
    </style:style>
    <style:style style:name="T10" style:family="text">
      <style:text-properties officeooo:rsid="01d1d87e"/>
    </style:style>
    <style:style style:name="T11" style:family="text">
      <style:text-properties officeooo:rsid="01e9046f"/>
    </style:style>
    <style:style style:name="T12" style:family="text">
      <style:text-properties officeooo:rsid="01e92033"/>
    </style:style>
    <style:style style:name="T13" style:family="text">
      <style:text-properties officeooo:rsid="00904fd3"/>
    </style:style>
    <style:style style:name="T14" style:family="text">
      <style:text-properties officeooo:rsid="02432bbe"/>
    </style:style>
    <style:style style:name="T15" style:family="text">
      <style:text-properties officeooo:rsid="00497d0e"/>
    </style:style>
    <style:style style:name="T16" style:family="text">
      <style:text-properties fo:language="en" fo:country="US" officeooo:rsid="0074e775"/>
    </style:style>
    <style:style style:name="T17" style:family="text">
      <style:text-properties fo:language="en" fo:country="US" officeooo:rsid="0075ec7d"/>
    </style:style>
    <style:style style:name="T18" style:family="text">
      <style:text-properties fo:language="ru" fo:country="RU" officeooo:rsid="00a1e78b"/>
    </style:style>
    <style:style style:name="T19" style:family="text">
      <style:text-properties fo:language="ru" fo:country="RU" officeooo:rsid="00d697a6"/>
    </style:style>
    <style:style style:name="T20" style:family="text">
      <style:text-properties fo:language="ru" fo:country="RU" officeooo:rsid="00d8215c"/>
    </style:style>
    <style:style style:name="T21" style:family="text">
      <style:text-properties fo:language="ru" fo:country="RU" officeooo:rsid="0111fd9e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1ffeb2f"/>
    </style:style>
    <style:style style:name="T24" style:family="text">
      <style:text-properties fo:language="ru" fo:country="RU" officeooo:rsid="01fdf971"/>
    </style:style>
    <style:style style:name="T25" style:family="text">
      <style:text-properties officeooo:rsid="01fdf971"/>
    </style:style>
    <style:style style:name="T26" style:family="text">
      <style:text-properties fo:language="ru" fo:country="RU" officeooo:rsid="01eb956e"/>
    </style:style>
    <style:style style:name="T27" style:family="text">
      <style:text-properties officeooo:rsid="01eb956e"/>
    </style:style>
    <style:style style:name="T28" style:family="text">
      <style:text-properties fo:language="en" fo:country="US" officeooo:rsid="00a6500f"/>
    </style:style>
    <style:style style:name="T29" style:family="text">
      <style:text-properties fo:language="ru" fo:country="RU" officeooo:rsid="00aa5872"/>
    </style:style>
    <style:style style:name="T30" style:family="text">
      <style:text-properties fo:language="ru" fo:country="RU" officeooo:rsid="00d96732"/>
    </style:style>
    <style:style style:name="T31" style:family="text">
      <style:text-properties fo:language="en" fo:country="US" officeooo:rsid="0082b733"/>
    </style:style>
    <style:style style:name="T32" style:family="text">
      <style:text-properties fo:language="ru" fo:country="RU" officeooo:rsid="0082b733"/>
    </style:style>
    <style:style style:name="T33" style:family="text">
      <style:text-properties fo:language="ru" fo:country="RU" officeooo:rsid="010af94c"/>
    </style:style>
    <style:style style:name="T34" style:family="text">
      <style:text-properties officeooo:rsid="0075ec7d"/>
    </style:style>
    <style:style style:name="T35" style:family="text">
      <style:text-properties officeooo:rsid="01ffeb2f"/>
    </style:style>
    <style:style style:name="T36" style:family="text">
      <style:text-properties officeooo:rsid="00a4cd5e"/>
    </style:style>
    <style:style style:name="T37" style:family="text">
      <style:text-properties officeooo:rsid="00dcae51"/>
    </style:style>
    <style:style style:name="T38" style:family="text">
      <style:text-properties fo:language="ru" fo:country="RU" officeooo:rsid="00a4cd5e"/>
    </style:style>
    <style:style style:name="T39" style:family="text">
      <style:text-properties fo:language="ru" fo:country="RU" officeooo:rsid="0109110b"/>
    </style:style>
    <style:style style:name="T40" style:family="text">
      <style:text-properties fo:language="ru" fo:country="RU" officeooo:rsid="01348bc8"/>
    </style:style>
    <style:style style:name="T41" style:family="text">
      <style:text-properties officeooo:rsid="00a5914e"/>
    </style:style>
    <style:style style:name="T42" style:family="text">
      <style:text-properties fo:language="ru" fo:country="RU" officeooo:rsid="0108a721"/>
    </style:style>
    <style:style style:name="T43" style:family="text">
      <style:text-properties officeooo:rsid="00de0626"/>
    </style:style>
    <style:style style:name="T44" style:family="text">
      <style:text-properties officeooo:rsid="00c07da5"/>
    </style:style>
    <style:style style:name="T45" style:family="text">
      <style:text-properties officeooo:rsid="00d2e536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officeooo:rsid="0075ec7d"/>
    </style:style>
    <style:style style:name="T48" style:family="text">
      <style:text-properties style:use-window-font-color="true" loext:opacity="0%" officeooo:rsid="01ffeb2f"/>
    </style:style>
    <style:style style:name="T49" style:family="text">
      <style:text-properties style:use-window-font-color="true" loext:opacity="0%" officeooo:rsid="00a4cd5e"/>
    </style:style>
    <style:style style:name="T50" style:family="text">
      <style:text-properties style:use-window-font-color="true" loext:opacity="0%" officeooo:rsid="00df9d49"/>
    </style:style>
    <style:style style:name="T51" style:family="text">
      <style:text-properties style:use-window-font-color="true" loext:opacity="0%" fo:language="en" fo:country="US" officeooo:rsid="01f8dcaf"/>
    </style:style>
    <style:style style:name="T52" style:family="text">
      <style:text-properties officeooo:rsid="0053bcae"/>
    </style:style>
    <style:style style:name="T53" style:family="text">
      <style:text-properties officeooo:rsid="0244dbe6"/>
    </style:style>
    <style:style style:name="T54" style:family="text">
      <style:text-properties officeooo:rsid="012fa61c"/>
    </style:style>
    <style:style style:name="T55" style:family="text">
      <style:text-properties officeooo:rsid="01309325"/>
    </style:style>
    <style:style style:name="T56" style:family="text">
      <style:text-properties officeooo:rsid="02ef8be9"/>
    </style:style>
    <style:style style:name="T57" style:family="text">
      <style:text-properties officeooo:rsid="02f4e288"/>
    </style:style>
    <style:style style:name="T58" style:family="text">
      <style:text-properties officeooo:rsid="02f37159"/>
    </style:style>
    <style:style style:name="T59" style:family="text">
      <style:text-properties officeooo:rsid="01d21ca6"/>
    </style:style>
    <style:style style:name="T60" style:family="text">
      <style:text-properties fo:language="en" fo:country="US" officeooo:rsid="00e768d4"/>
    </style:style>
    <style:style style:name="T61" style:family="text">
      <style:text-properties fo:language="en" fo:country="US" officeooo:rsid="00b3b522"/>
    </style:style>
    <style:style style:name="T62" style:family="text">
      <style:text-properties fo:language="ru" fo:country="RU" officeooo:rsid="00b3b522"/>
    </style:style>
    <style:style style:name="T63" style:family="text">
      <style:text-properties fo:language="ru" fo:country="RU" officeooo:rsid="0203e0a4"/>
    </style:style>
    <style:style style:name="T64" style:family="text">
      <style:text-properties fo:language="ru" fo:country="RU" officeooo:rsid="00b8a6f5"/>
    </style:style>
    <style:style style:name="T65" style:family="text">
      <style:text-properties style:use-window-font-color="true" loext:opacity="0%" fo:language="ru" fo:country="RU" officeooo:rsid="00aea037"/>
    </style:style>
    <style:style style:name="T66" style:family="text">
      <style:text-properties officeooo:rsid="00b3b522"/>
    </style:style>
    <style:style style:name="T67" style:family="text">
      <style:text-properties officeooo:rsid="0203e0a4"/>
    </style:style>
    <style:style style:name="T68" style:family="text">
      <style:text-properties officeooo:rsid="01399879"/>
    </style:style>
    <style:style style:name="T69" style:family="text">
      <style:text-properties officeooo:rsid="02cae8e1"/>
    </style:style>
    <style:style style:name="T70" style:family="text">
      <style:text-properties fo:language="en" fo:country="US" officeooo:rsid="00e80780"/>
    </style:style>
    <style:style style:name="T71" style:family="text">
      <style:text-properties fo:language="ru" fo:country="RU" officeooo:rsid="0205162a"/>
    </style:style>
    <style:style style:name="T72" style:family="text">
      <style:text-properties fo:language="ru" fo:country="RU" officeooo:rsid="00e9e399"/>
    </style:style>
    <style:style style:name="T73" style:family="text">
      <style:text-properties officeooo:rsid="00fbad12"/>
    </style:style>
    <style:style style:name="T74" style:family="text">
      <style:text-properties officeooo:rsid="0101d02c"/>
    </style:style>
    <style:style style:name="T75" style:family="text">
      <style:text-properties officeooo:rsid="005d8870"/>
    </style:style>
    <style:style style:name="T76" style:family="text">
      <style:text-properties officeooo:rsid="005eb102"/>
    </style:style>
    <style:style style:name="T77" style:family="text">
      <style:text-properties officeooo:rsid="0246b1bb"/>
    </style:style>
    <style:style style:name="T78" style:family="text">
      <style:text-properties officeooo:rsid="00604796"/>
    </style:style>
    <style:style style:name="T79" style:family="text">
      <style:text-properties officeooo:rsid="024d4fa3"/>
    </style:style>
    <style:style style:name="T80" style:family="text">
      <style:text-properties officeooo:rsid="024fb74d"/>
    </style:style>
    <style:style style:name="T81" style:family="text">
      <style:text-properties fo:language="ru" fo:country="RU" officeooo:rsid="0206fa42"/>
    </style:style>
    <style:style style:name="T82" style:family="text">
      <style:text-properties fo:language="ru" fo:country="RU" officeooo:rsid="01e41b2a"/>
    </style:style>
    <style:style style:name="T83" style:family="text">
      <style:text-properties officeooo:rsid="00c41def"/>
    </style:style>
    <style:style style:name="T84" style:family="text">
      <style:text-properties officeooo:rsid="020dec08"/>
    </style:style>
    <style:style style:name="T85" style:family="text">
      <style:text-properties officeooo:rsid="020fc5de"/>
    </style:style>
    <style:style style:name="T86" style:family="text">
      <style:text-properties officeooo:rsid="0211c3b3"/>
    </style:style>
    <style:style style:name="T87" style:family="text">
      <style:text-properties fo:language="ru" fo:country="RU" officeooo:rsid="0105b3e1"/>
    </style:style>
    <style:style style:name="T88" style:family="text">
      <style:text-properties fo:language="ru" fo:country="RU" officeooo:rsid="00be5c3d"/>
    </style:style>
    <style:style style:name="T89" style:family="text">
      <style:text-properties fo:language="ru" fo:country="RU" officeooo:rsid="0216f363"/>
    </style:style>
    <style:style style:name="T90" style:family="text">
      <style:text-properties fo:language="ru" fo:country="RU" officeooo:rsid="02188613"/>
    </style:style>
    <style:style style:name="T91" style:family="text">
      <style:text-properties fo:language="ru" fo:country="RU" officeooo:rsid="01288b1e"/>
    </style:style>
    <style:style style:name="T92" style:family="text">
      <style:text-properties fo:language="ru" fo:country="RU" officeooo:rsid="00ffccdd"/>
    </style:style>
    <style:style style:name="T93" style:family="text">
      <style:text-properties fo:language="ru" fo:country="RU" officeooo:rsid="0211c3b3"/>
    </style:style>
    <style:style style:name="T94" style:family="text">
      <style:text-properties fo:language="ru" fo:country="RU" officeooo:rsid="00bee246"/>
    </style:style>
    <style:style style:name="T95" style:family="text">
      <style:text-properties fo:language="ru" fo:country="RU" officeooo:rsid="021aca99"/>
    </style:style>
    <style:style style:name="T96" style:family="text">
      <style:text-properties fo:language="ru" fo:country="RU" officeooo:rsid="021bc237"/>
    </style:style>
    <style:style style:name="T97" style:family="text">
      <style:text-properties fo:language="ru" fo:country="RU" officeooo:rsid="00c1fdc7"/>
    </style:style>
    <style:style style:name="T98" style:family="text">
      <style:text-properties fo:language="ru" fo:country="RU" officeooo:rsid="021e2a1b"/>
    </style:style>
    <style:style style:name="T99" style:family="text">
      <style:text-properties fo:language="en" fo:country="US" officeooo:rsid="00bc2486"/>
    </style:style>
    <style:style style:name="T100" style:family="text">
      <style:text-properties fo:language="ru" fo:country="RU" officeooo:rsid="00c41def"/>
    </style:style>
    <style:style style:name="T101" style:family="text">
      <style:text-properties fo:language="ru" fo:country="RU" officeooo:rsid="021f5292"/>
    </style:style>
    <style:style style:name="T102" style:family="text">
      <style:text-properties fo:language="ru" fo:country="RU" officeooo:rsid="0100d151"/>
    </style:style>
    <style:style style:name="T103" style:family="text">
      <style:text-properties fo:language="ru" fo:country="RU" officeooo:rsid="0220dffc"/>
    </style:style>
    <style:style style:name="T104" style:family="text">
      <style:text-properties fo:language="en" fo:country="US" officeooo:rsid="0139d14f"/>
    </style:style>
    <style:style style:name="T105" style:family="text">
      <style:text-properties fo:language="ru" fo:country="RU" officeooo:rsid="0139d14f"/>
    </style:style>
    <style:style style:name="T106" style:family="text">
      <style:text-properties fo:language="ru" fo:country="RU" officeooo:rsid="02265df0"/>
    </style:style>
    <style:style style:name="T107" style:family="text">
      <style:text-properties fo:language="ru" fo:country="RU" officeooo:rsid="0227b90a"/>
    </style:style>
    <style:style style:name="T108" style:family="text">
      <style:text-properties fo:language="ru" fo:country="RU" officeooo:rsid="0229a8f7"/>
    </style:style>
    <style:style style:name="T109" style:family="text">
      <style:text-properties fo:language="ru" fo:country="RU" officeooo:rsid="022b6dbf"/>
    </style:style>
    <style:style style:name="T110" style:family="text">
      <style:text-properties officeooo:rsid="0068377b"/>
    </style:style>
    <style:style style:name="T111" style:family="text">
      <style:text-properties officeooo:rsid="006a322a"/>
    </style:style>
    <style:style style:name="T112" style:family="text">
      <style:text-properties fo:language="en" fo:country="US" officeooo:rsid="008a0b59"/>
    </style:style>
    <style:style style:name="T113" style:family="text">
      <style:text-properties fo:language="ru" fo:country="RU" officeooo:rsid="008a0b59"/>
    </style:style>
    <style:style style:name="T114" style:family="text">
      <style:text-properties officeooo:rsid="022f2485"/>
    </style:style>
    <style:style style:name="T115" style:family="text">
      <style:text-properties officeooo:rsid="0062add9"/>
    </style:style>
    <style:style style:name="T116" style:family="text">
      <style:text-properties officeooo:rsid="025118fc"/>
    </style:style>
    <style:style style:name="T117" style:family="text">
      <style:text-properties officeooo:rsid="00630d04"/>
    </style:style>
    <style:style style:name="T118" style:family="text">
      <style:text-properties fo:language="ru" fo:country="RU" officeooo:rsid="00ca7f4e"/>
    </style:style>
    <style:style style:name="T119" style:family="text">
      <style:text-properties fo:language="ru" fo:country="RU" officeooo:rsid="00f2e8fb"/>
    </style:style>
    <style:style style:name="T120" style:family="text">
      <style:text-properties fo:language="ru" fo:country="RU" officeooo:rsid="012baae1"/>
    </style:style>
    <style:style style:name="T121" style:family="text">
      <style:text-properties fo:language="ru" fo:country="RU" officeooo:rsid="00cbffff"/>
    </style:style>
    <style:style style:name="T122" style:family="text">
      <style:text-properties fo:language="ru" fo:country="RU" officeooo:rsid="00ccd59f"/>
    </style:style>
    <style:style style:name="T123" style:family="text">
      <style:text-properties fo:language="ru" fo:country="RU" officeooo:rsid="00ebcaa9"/>
    </style:style>
    <style:style style:name="T124" style:family="text">
      <style:text-properties fo:language="ru" fo:country="RU" officeooo:rsid="00f304dc"/>
    </style:style>
    <style:style style:name="T125" style:family="text">
      <style:text-properties fo:language="ru" fo:country="RU" officeooo:rsid="012bdba5"/>
    </style:style>
    <style:style style:name="T126" style:family="text">
      <style:text-properties fo:language="ru" fo:country="RU" officeooo:rsid="00edb031"/>
    </style:style>
    <style:style style:name="T127" style:family="text">
      <style:text-properties fo:language="ru" fo:country="RU" officeooo:rsid="00c90aa8"/>
    </style:style>
    <style:style style:name="T128" style:family="text">
      <style:text-properties fo:language="ru" fo:country="RU" officeooo:rsid="00f11f0e"/>
    </style:style>
    <style:style style:name="T129" style:family="text">
      <style:text-properties fo:language="ru" fo:country="RU" officeooo:rsid="00c9f418"/>
    </style:style>
    <style:style style:name="T130" style:family="text">
      <style:text-properties fo:language="ru" fo:country="RU" officeooo:rsid="00eea60d"/>
    </style:style>
    <style:style style:name="T131" style:family="text">
      <style:text-properties fo:language="ru" fo:country="RU" officeooo:rsid="00d0e1d2"/>
    </style:style>
    <style:style style:name="T132" style:family="text">
      <style:text-properties officeooo:rsid="020b56e7"/>
    </style:style>
    <style:style style:name="T133" style:family="text">
      <style:text-properties officeooo:rsid="0033b918"/>
    </style:style>
    <style:style style:name="T134" style:family="text">
      <style:text-properties fo:language="en" fo:country="US"/>
    </style:style>
    <style:style style:name="T135" style:family="text">
      <style:text-properties officeooo:rsid="007df13b"/>
    </style:style>
    <style:style style:name="T136" style:family="text">
      <style:text-properties officeooo:rsid="01dfb4a2"/>
    </style:style>
    <style:style style:name="T137" style:family="text">
      <style:text-properties fo:letter-spacing="-0.004cm"/>
    </style:style>
    <style:style style:name="T138" style:family="text">
      <style:text-properties fo:language="en" fo:country="US" officeooo:rsid="00719975"/>
    </style:style>
    <style:style style:name="T139" style:family="text">
      <style:text-properties style:font-name="PT Astra Serif" fo:letter-spacing="-0.004cm" officeooo:rsid="01dfc8de"/>
    </style:style>
    <style:style style:name="T140" style:family="text">
      <style:text-properties fo:font-variant="normal" fo:text-transform="none" style:use-window-font-color="true" loext:opacity="0%" style:font-name="PT Astra Serif" fo:letter-spacing="normal"/>
    </style:style>
    <style:style style:name="T141" style:family="text">
      <style:text-properties style:font-name="PT Astra Serif"/>
    </style:style>
    <style:style style:name="T142" style:family="text">
      <style:text-properties fo:font-variant="normal" fo:text-transform="none" style:use-window-font-color="true" loext:opacity="0%" style:font-name="PT Astra Serif" fo:font-weight="normal" style:font-weight-asian="normal" style:font-weight-complex="normal"/>
    </style:style>
    <style:style style:name="T143" style:family="text">
      <style:text-properties fo:font-variant="normal" fo:text-transform="none" style:use-window-font-color="true" loext:opacity="0%" style:text-position="sub 58%" style:font-name="PT Astra Serif" fo:font-weight="normal" style:font-weight-asian="normal" style:font-weight-complex="normal"/>
    </style:style>
    <style:style style:name="T144" style:family="text">
      <style:text-properties fo:font-variant="normal" fo:text-transform="none" style:use-window-font-color="true" loext:opacity="0%" style:text-position="super 58%" style:font-name="PT Astra Serif" fo:font-weight="normal" style:font-weight-asian="normal" style:font-weight-complex="normal"/>
    </style:style>
    <style:style style:name="T145" style:family="text">
      <style:text-properties fo:font-variant="normal" fo:text-transform="none" style:use-window-font-color="true" loext:opacity="0%" style:text-position="0% 100%" style:font-name="PT Astra Serif" fo:font-weight="normal" style:font-weight-asian="normal" style:font-weight-complex="normal"/>
    </style:style>
    <style:style style:name="T146" style:family="text">
      <style:text-properties fo:font-variant="normal" fo:text-transform="none" style:use-window-font-color="true" loext:opacity="0%" style:text-position="0% 100%" style:font-name="PT Astra Serif" fo:letter-spacing="normal"/>
    </style:style>
    <style:style style:name="T147" style:family="text">
      <style:text-properties fo:font-variant="normal" fo:text-transform="none" style:use-window-font-color="true" loext:opacity="0%" style:text-position="0% 100%" style:font-name="PT Astra Serif" fo:font-weight="normal" officeooo:rsid="01e0f486" style:font-weight-asian="normal" style:font-weight-complex="normal"/>
    </style:style>
    <style:style style:name="T148" style:family="text">
      <style:text-properties fo:font-variant="normal" fo:text-transform="none" style:use-window-font-color="true" loext:opacity="0%" style:text-position="0% 100%" style:font-name="PT Astra Serif" fo:letter-spacing="normal" officeooo:rsid="01e0f486"/>
    </style:style>
    <style:style style:name="T149" style:family="text">
      <style:text-properties fo:font-variant="normal" fo:text-transform="none" style:use-window-font-color="true" loext:opacity="0%" style:text-position="0% 100%" style:font-name="PT Astra Serif" fo:letter-spacing="normal" fo:font-weight="normal" officeooo:rsid="01e0f486" style:font-weight-asian="normal" style:font-weight-complex="normal"/>
    </style:style>
    <style:style style:name="T150" style:family="text">
      <style:text-properties fo:font-variant="normal" fo:text-transform="none" style:use-window-font-color="true" loext:opacity="0%" style:text-position="0% 100%" style:font-name="PT Astra Serif" fo:letter-spacing="-0.004cm" fo:font-weight="normal" officeooo:rsid="01dfc8de" style:font-weight-asian="normal" style:font-weight-complex="normal"/>
    </style:style>
    <style:style style:name="T151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a42fa" style:font-weight-asian="normal" style:font-weight-complex="normal"/>
    </style:style>
    <style:style style:name="T152" style:family="text">
      <style:text-properties officeooo:rsid="00789abd"/>
    </style:style>
    <style:style style:name="T153" style:family="text">
      <style:text-properties officeooo:rsid="01f9d0e1"/>
    </style:style>
    <style:style style:name="T154" style:family="text">
      <style:text-properties officeooo:rsid="0316cf8e"/>
    </style:style>
    <style:style style:name="T155" style:family="text">
      <style:text-properties officeooo:rsid="031c71a4"/>
    </style:style>
    <style:style style:name="T156" style:family="text">
      <style:text-properties officeooo:rsid="032198f1"/>
    </style:style>
    <style:style style:name="T157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21408" style:font-weight-asian="normal" style:font-weight-complex="normal"/>
    </style:style>
    <style:style style:name="T158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4024f" style:font-weight-asian="normal" style:font-weight-complex="normal"/>
    </style:style>
    <style:style style:name="T15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79137" style:font-weight-asian="normal" style:font-weight-complex="normal"/>
    </style:style>
    <style:style style:name="T160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b658a" style:font-weight-asian="normal" style:font-weight-complex="normal"/>
    </style:style>
    <style:style style:name="T161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9a9dd" style:font-weight-asian="normal" style:font-weight-complex="normal"/>
    </style:style>
    <style:style style:name="T162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ecb74" style:font-weight-asian="normal" style:font-weight-complex="normal"/>
    </style:style>
    <style:style style:name="T163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f20f2" style:font-weight-asian="normal" style:font-weight-complex="normal"/>
    </style:style>
    <style:style style:name="T164" style:family="text">
      <style:text-properties fo:font-variant="normal" fo:text-transform="none" style:use-window-font-color="true" loext:opacity="0%" style:text-position="0% 100%" style:font-name="PT Astra Serif" fo:font-size="14pt" fo:letter-spacing="normal" fo:language="ru" fo:country="RU" fo:font-weight="normal" officeooo:rsid="03183bcf" style:font-size-asian="14pt" style:font-weight-asian="normal" style:font-weight-complex="normal"/>
    </style:style>
    <style:style style:name="T165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a7602" style:font-weight-asian="normal" style:font-weight-complex="normal"/>
    </style:style>
    <style:style style:name="T166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c71a4" style:font-weight-asian="normal" style:font-weight-complex="normal"/>
    </style:style>
    <style:style style:name="T167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eba94" style:font-weight-asian="normal" style:font-weight-complex="normal"/>
    </style:style>
    <style:style style:name="T168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64420" style:font-weight-asian="normal" style:font-weight-complex="normal"/>
    </style:style>
    <style:style style:name="T16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officeooo:rsid="03221408"/>
    </style:style>
    <style:style style:name="T170" style:family="text">
      <style:text-properties fo:font-variant="normal" fo:text-transform="none" style:use-window-font-color="true" loext:opacity="0%" style:font-name="PT Astra Serif" fo:letter-spacing="normal" officeooo:rsid="01dfc8de"/>
    </style:style>
    <style:style style:name="T171" style:family="text">
      <style:text-properties fo:font-size="14pt" style:font-size-asian="14pt"/>
    </style:style>
    <style:style style:name="T172" style:family="text">
      <style:text-properties fo:font-size="14pt" fo:letter-spacing="-0.012cm" style:font-size-asian="14pt"/>
    </style:style>
    <style:style style:name="T173" style:family="text">
      <style:text-properties fo:font-size="14pt" fo:letter-spacing="-0.016cm" style:font-size-asian="14pt"/>
    </style:style>
    <style:style style:name="T174" style:family="text">
      <style:text-properties fo:font-size="14pt" fo:letter-spacing="-0.014cm" style:font-size-asian="14pt"/>
    </style:style>
    <style:style style:name="T175" style:family="text">
      <style:text-properties fo:font-size="14pt" fo:letter-spacing="-0.014cm" officeooo:rsid="030c6de9" style:font-size-asian="14pt"/>
    </style:style>
    <style:style style:name="T176" style:family="text">
      <style:text-properties fo:font-size="14pt" fo:letter-spacing="-0.004cm" style:font-size-asian="14pt"/>
    </style:style>
    <style:style style:name="T177" style:family="text">
      <style:text-properties style:text-position="0% 100%" officeooo:rsid="01ea42e7"/>
    </style:style>
    <style:style style:name="T178" style:family="text">
      <style:text-properties officeooo:rsid="01ea6119"/>
    </style:style>
    <style:style style:name="T179" style:family="text">
      <style:text-properties officeooo:rsid="007f467b"/>
    </style:style>
    <style:style style:name="T180" style:family="text">
      <style:text-properties officeooo:rsid="0082e206"/>
    </style:style>
    <style:style style:name="T181" style:family="text">
      <style:text-properties officeooo:rsid="01ee5f0b"/>
    </style:style>
    <style:style style:name="T182" style:family="text">
      <style:text-properties style:text-position="sub 58%"/>
    </style:style>
    <style:style style:name="T183" style:family="text">
      <style:text-properties officeooo:rsid="01ed5eca"/>
    </style:style>
    <style:style style:name="T184" style:family="text">
      <style:text-properties style:text-position="0% 100%"/>
    </style:style>
    <style:style style:name="T185" style:family="text">
      <style:text-properties style:text-position="0% 100%" officeooo:rsid="01ee5f0b"/>
    </style:style>
    <style:style style:name="T186" style:family="text">
      <style:text-properties style:text-position="sub 58%" officeooo:rsid="01ecebce"/>
    </style:style>
    <style:style style:name="T187" style:family="text">
      <style:text-properties style:text-position="0% 100%" officeooo:rsid="01ecebce"/>
    </style:style>
    <style:style style:name="T188" style:family="text">
      <style:text-properties style:text-position="0% 100%" officeooo:rsid="01ed5eca"/>
    </style:style>
    <style:style style:name="T189" style:family="text">
      <style:text-properties style:text-position="0% 100%" officeooo:rsid="00557991"/>
    </style:style>
    <style:style style:name="T190" style:family="text">
      <style:text-properties officeooo:rsid="01f2f670"/>
    </style:style>
    <style:style style:name="T191" style:family="text">
      <style:text-properties officeooo:rsid="008407e0"/>
    </style:style>
    <style:style style:name="T192" style:family="text">
      <style:text-properties officeooo:rsid="032e8980"/>
    </style:style>
    <style:style style:name="T193" style:family="text">
      <style:text-properties officeooo:rsid="01fc38ba"/>
    </style:style>
    <style:style style:name="T194" style:family="text">
      <style:text-properties officeooo:rsid="01ff4ae4"/>
    </style:style>
    <style:style style:name="T195" style:family="text">
      <style:text-properties officeooo:rsid="02043720"/>
    </style:style>
    <style:style style:name="T196" style:family="text">
      <style:text-properties officeooo:rsid="02065111"/>
    </style:style>
    <style:style style:name="T197" style:family="text">
      <style:text-properties officeooo:rsid="01ff4e74"/>
    </style:style>
    <style:style style:name="T198" style:family="text">
      <style:text-properties officeooo:rsid="0201b593"/>
    </style:style>
    <style:style style:name="T199" style:family="text">
      <style:text-properties style:text-position="0% 100%" officeooo:rsid="0202bda4"/>
    </style:style>
    <style:style style:name="T200" style:family="text">
      <style:text-properties style:text-position="0% 100%" fo:font-size="14pt" fo:letter-spacing="-0.004cm" officeooo:rsid="0202bda4" style:font-size-asian="14pt"/>
    </style:style>
    <style:style style:name="T201" style:family="text">
      <style:text-properties officeooo:rsid="0084ac64"/>
    </style:style>
    <style:style style:name="T202" style:family="text">
      <style:text-properties officeooo:rsid="0085e897"/>
    </style:style>
    <style:style style:name="T203" style:family="text">
      <style:text-properties style:text-position="sub 58%" style:font-name="PT Astra Serif"/>
    </style:style>
    <style:style style:name="T204" style:family="text">
      <style:text-properties fo:font-variant="normal" fo:text-transform="none" style:use-window-font-color="true" loext:opacity="0%" style:font-name="PT Astra Serif" fo:font-size="12pt" fo:letter-spacing="normal" officeooo:rsid="01dfc8de" style:font-size-asian="12pt" style:font-size-complex="12pt"/>
    </style:style>
    <style:style style:name="T205" style:family="text">
      <style:text-properties fo:font-variant="normal" fo:text-transform="none" style:use-window-font-color="true" loext:opacity="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style:use-window-font-color="true" loext:opacity="0%" style:text-position="sub 58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style:use-window-font-color="true" loext:opacity="0%" style:text-position="0% 10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style:use-window-font-color="true" loext:opacity="0%" style:text-position="0% 100%" style:font-name="PT Astra Serif" fo:font-size="12pt" fo:letter-spacing="normal" officeooo:rsid="01dfc8de" style:font-size-asian="12pt" style:font-size-complex="12pt"/>
    </style:style>
    <style:style style:name="T209" style:family="text">
      <style:text-properties officeooo:rsid="020d70ed"/>
    </style:style>
    <style:style style:name="T210" style:family="text">
      <style:text-properties fo:language="ru" fo:country="RU" officeooo:rsid="020a2eaf"/>
    </style:style>
    <style:style style:name="T211" style:family="text">
      <style:text-properties fo:language="ru" fo:country="RU" officeooo:rsid="020d70ed"/>
    </style:style>
    <style:style style:name="T212" style:family="text">
      <style:text-properties fo:language="ru" fo:country="RU" officeooo:rsid="020c061c"/>
    </style:style>
    <style:style style:name="T213" style:family="text">
      <style:text-properties fo:language="ru" fo:country="RU" officeooo:rsid="020e76f4"/>
    </style:style>
    <style:style style:name="T214" style:family="text">
      <style:text-properties fo:font-size="14pt" fo:letter-spacing="-0.021cm" style:font-size-asian="14pt"/>
    </style:style>
    <style:style style:name="T215" style:family="text">
      <style:text-properties fo:font-size="14pt" fo:letter-spacing="-0.018cm" style:font-size-asian="14pt"/>
    </style:style>
    <style:style style:name="T216" style:family="text">
      <style:text-properties fo:font-size="14pt" fo:letter-spacing="-0.03cm" style:font-size-asian="14pt"/>
    </style:style>
    <style:style style:name="T217" style:family="text">
      <style:text-properties fo:font-size="14pt" fo:letter-spacing="-0.023cm" style:font-size-asian="14pt"/>
    </style:style>
    <style:style style:name="T218" style:family="text">
      <style:text-properties fo:font-size="14pt" fo:letter-spacing="-0.026cm" style:font-size-asian="14pt"/>
    </style:style>
    <style:style style:name="T219" style:family="text">
      <style:text-properties fo:font-size="14pt" fo:letter-spacing="-0.028cm" style:font-size-asian="14pt"/>
    </style:style>
    <style:style style:name="T220" style:family="text">
      <style:text-properties fo:font-size="14pt" fo:letter-spacing="-0.007cm" style:font-size-asian="14pt"/>
    </style:style>
    <style:style style:name="T221" style:family="text">
      <style:text-properties fo:font-size="14pt" fo:letter-spacing="-0.011cm" style:font-size-asian="14pt"/>
    </style:style>
    <style:style style:name="T222" style:family="text">
      <style:text-properties fo:font-size="14pt" fo:letter-spacing="-0.005cm" style:font-size-asian="14pt"/>
    </style:style>
    <style:style style:name="T223" style:family="text">
      <style:text-properties fo:font-size="14pt" fo:letter-spacing="0.002cm" style:font-size-asian="14pt"/>
    </style:style>
    <style:style style:name="T224" style:family="text">
      <style:text-properties fo:font-size="14pt" fo:letter-spacing="-0.019cm" style:font-size-asian="14pt"/>
    </style:style>
    <style:style style:name="T225" style:family="text">
      <style:text-properties fo:font-size="14pt" fo:letter-spacing="-0.007cm" officeooo:rsid="020def9a" style:font-size-asian="14pt"/>
    </style:style>
    <style:style style:name="T226" style:family="text">
      <style:text-properties style:font-name="PT Astra Serif" officeooo:rsid="01d21ca6"/>
    </style:style>
    <style:style style:name="T227" style:family="text">
      <style:text-properties officeooo:rsid="008dbcf2"/>
    </style:style>
    <style:style style:name="T228" style:family="text">
      <style:text-properties officeooo:rsid="01d52393"/>
    </style:style>
    <style:style style:name="T229" style:family="text">
      <style:text-properties fo:language="ru" fo:country="RU" officeooo:rsid="011b1c09"/>
    </style:style>
    <style:style style:name="T230" style:family="text">
      <style:text-properties fo:language="ru" fo:country="RU" officeooo:rsid="020764ef"/>
    </style:style>
    <style:style style:name="T231" style:family="text">
      <style:text-properties fo:language="ru" fo:country="RU" officeooo:rsid="011b3a7a"/>
    </style:style>
    <style:style style:name="T232" style:family="text">
      <style:text-properties officeooo:rsid="015c84f7"/>
    </style:style>
    <style:style style:name="T233" style:family="text">
      <style:text-properties officeooo:rsid="015d19f1"/>
    </style:style>
    <style:style style:name="T234" style:family="text">
      <style:text-properties style:font-name="PT Astra Serif" officeooo:rsid="0033b918"/>
    </style:style>
    <style:style style:name="T235" style:family="text">
      <style:text-properties style:font-name="PT Astra Serif" officeooo:rsid="021f1ebe"/>
    </style:style>
    <style:style style:name="T236" style:family="text">
      <style:text-properties officeooo:rsid="015de6c0"/>
    </style:style>
    <style:style style:name="T237" style:family="text">
      <style:text-properties officeooo:rsid="02418c61"/>
    </style:style>
    <style:style style:name="T238" style:family="text">
      <style:text-properties fo:color="#ff0000" loext:opacity="100%" officeooo:rsid="02418c61"/>
    </style:style>
    <style:style style:name="T239" style:family="text">
      <style:text-properties fo:color="#ff0000" loext:opacity="100%" officeooo:rsid="02463025"/>
    </style:style>
    <style:style style:name="T240" style:family="text">
      <style:text-properties officeooo:rsid="015f41eb"/>
    </style:style>
    <style:style style:name="T241" style:family="text">
      <style:text-properties officeooo:rsid="0175002b"/>
    </style:style>
    <style:style style:name="T242" style:family="text">
      <style:text-properties fo:language="en" fo:country="US" officeooo:rsid="0175002b"/>
    </style:style>
    <style:style style:name="T243" style:family="text">
      <style:text-properties fo:language="ru" fo:country="RU" officeooo:rsid="0175002b"/>
    </style:style>
    <style:style style:name="T244" style:family="text">
      <style:text-properties fo:language="ru" fo:country="RU" officeooo:rsid="017dae1f"/>
    </style:style>
    <style:style style:name="T245" style:family="text">
      <style:text-properties fo:language="ru" fo:country="RU" officeooo:rsid="017f7050"/>
    </style:style>
    <style:style style:name="T246" style:family="text">
      <style:text-properties fo:language="ru" fo:country="RU" officeooo:rsid="0195496e"/>
    </style:style>
    <style:style style:name="T247" style:family="text">
      <style:text-properties officeooo:rsid="015f611b"/>
    </style:style>
    <style:style style:name="T248" style:family="text">
      <style:text-properties style:font-name="PT Astra Serif" officeooo:rsid="023d4f37"/>
    </style:style>
    <style:style style:name="T249" style:family="text">
      <style:text-properties officeooo:rsid="0183435c"/>
    </style:style>
    <style:style style:name="T250" style:family="text">
      <style:text-properties officeooo:rsid="018540d8"/>
    </style:style>
    <style:style style:name="T251" style:family="text">
      <style:text-properties officeooo:rsid="013e5aa0"/>
    </style:style>
    <style:style style:name="T252" style:family="text">
      <style:text-properties officeooo:rsid="013ee7ce"/>
    </style:style>
    <style:style style:name="T253" style:family="text">
      <style:text-properties officeooo:rsid="013fce50"/>
    </style:style>
    <style:style style:name="T254" style:family="text">
      <style:text-properties officeooo:rsid="01c80c4f"/>
    </style:style>
    <style:style style:name="T255" style:family="text">
      <style:text-properties officeooo:rsid="02405e13"/>
    </style:style>
    <style:style style:name="T256" style:family="text">
      <style:text-properties officeooo:rsid="014158f7"/>
    </style:style>
    <style:style style:name="T257" style:family="text">
      <style:text-properties officeooo:rsid="01c97e32"/>
    </style:style>
    <style:style style:name="T258" style:family="text">
      <style:text-properties officeooo:rsid="018ddb6c"/>
    </style:style>
    <style:style style:name="T259" style:family="text">
      <style:text-properties officeooo:rsid="0142c8c1"/>
    </style:style>
    <style:style style:name="T260" style:family="text">
      <style:text-properties fo:language="en" fo:country="US" officeooo:rsid="023b0311"/>
    </style:style>
    <style:style style:name="T261" style:family="text">
      <style:text-properties fo:color="#ff0000" loext:opacity="100%" fo:language="ru" fo:country="RU" officeooo:rsid="023b0311"/>
    </style:style>
    <style:style style:name="T262" style:family="text">
      <style:text-properties fo:color="#ff0000" loext:opacity="100%" fo:language="ru" fo:country="RU" officeooo:rsid="0247ebe4"/>
    </style:style>
    <style:style style:name="T263" style:family="text">
      <style:text-properties officeooo:rsid="01457a44"/>
    </style:style>
    <style:style style:name="T264" style:family="text">
      <style:text-properties fo:language="ru" fo:country="RU" officeooo:rsid="017944e5"/>
    </style:style>
    <style:style style:name="T265" style:family="text">
      <style:text-properties fo:language="en" fo:country="US" officeooo:rsid="017944e5"/>
    </style:style>
    <style:style style:name="T266" style:family="text">
      <style:text-properties fo:language="ru" fo:country="RU" officeooo:rsid="017aa67a"/>
    </style:style>
    <style:style style:name="T267" style:family="text">
      <style:text-properties officeooo:rsid="017944e5"/>
    </style:style>
    <style:style style:name="T268" style:family="text">
      <style:text-properties officeooo:rsid="023b8f84"/>
    </style:style>
    <style:style style:name="T269" style:family="text">
      <style:text-properties fo:color="#ff0000" loext:opacity="100%" officeooo:rsid="023b8f84"/>
    </style:style>
    <style:style style:name="T270" style:family="text">
      <style:text-properties fo:color="#ff0000" loext:opacity="100%" officeooo:rsid="024895c9"/>
    </style:style>
    <style:style style:name="T271" style:family="text">
      <style:text-properties officeooo:rsid="01d5afab"/>
    </style:style>
    <style:style style:name="T272" style:family="text">
      <style:text-properties officeooo:rsid="01d847cf"/>
    </style:style>
    <style:style style:name="T273" style:family="text">
      <style:text-properties style:font-name="PT Astra Serif" officeooo:rsid="01d847cf"/>
    </style:style>
    <style:style style:name="T274" style:family="text">
      <style:text-properties officeooo:rsid="01b58b8f"/>
    </style:style>
    <style:style style:name="T275" style:family="text">
      <style:text-properties officeooo:rsid="01be37cf"/>
    </style:style>
    <style:style style:name="T276" style:family="text">
      <style:text-properties officeooo:rsid="001ca832"/>
    </style:style>
    <style:style style:name="T277" style:family="text">
      <style:text-properties officeooo:rsid="01da1a85"/>
    </style:style>
    <style:style style:name="T278" style:family="text">
      <style:text-properties fo:language="en" fo:country="US" officeooo:rsid="0151a8b6"/>
    </style:style>
    <style:style style:name="T279" style:family="text">
      <style:text-properties officeooo:rsid="01df1c6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P2">Краснодарского края</text:p>
      <text:p text:style-name="P2">ГБПОУ КК ЕПК</text:p>
      <text:p text:style-name="P3"/>
      <text:p text:style-name="P3"/>
      <text:p text:style-name="P2">Отделение педагогики</text:p>
      <text:p text:style-name="P2">Специальность 09.02.07 Информационные системы и программирование</text:p>
      <text:p text:style-name="P3"/>
      <text:p text:style-name="P3"/>
      <text:p text:style-name="P3"/>
      <text:p text:style-name="P2">Студент И-42 группы</text:p>
      <text:p text:style-name="P2"><text:tab/>САМСЫКА РОДИОН МИХАЙЛОВИЧ</text:p>
      <text:p text:style-name="P3"/>
      <text:p text:style-name="P4">РАЗРАБОТКА ПРОГРАММЫ ДЛЯ АВТОМАТИЗАЦИИ ОФОРМЛЕНИЯ ЗАКАЗОВ В РЕСТОРАНЕ</text:p>
      <text:p text:style-name="P5"/>
      <text:p text:style-name="P5">Дипломная работа <text:span text:style-name="T1">(Дипломный проект)</text:span></text:p>
      <text:p text:style-name="P3"/>
      <text:p text:style-name="P3"/>
      <text:p text:style-name="P3"/>
      <text:p text:style-name="P3"/>
      <text:p text:style-name="P6">Научный руководитель:</text:p>
      <text:p text:style-name="P6">Фомин Андрей Томасович</text:p>
      <text:p text:style-name="P3"/>
      <text:p text:style-name="P3"/>
      <text:p text:style-name="P3"/>
      <text:p text:style-name="P3"/>
      <text:p text:style-name="P3"/>
      <text:p text:style-name="P2"/>
      <text:p text:style-name="P2">г. Ейск, 202<text:span text:style-name="T1">6</text:span>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7"><text:a xlink:type="simple" xlink:href="#__RefHeading___Toc8884_1636301399" office:name="ВВЕДЕНИЕ" text:style-name="Index_20_Link" text:visited-style-name="Index_20_Link">ВВЕДЕНИЕ<text:tab/>4</text:a></text:p>
          <text:p text:style-name="P7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6</text:a></text:p>
          <text:p text:style-name="P8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6</text:a></text:p>
          <text:p text:style-name="P8"><text:a xlink:type="simple" xlink:href="#__RefHeading___Toc3714_962412752%20%D0%9A%D0%BE%D0%BF%D0%B8%D1%8F%202" office:name="1.2 Предварительное определение требований" text:style-name="Index_20_Link" text:visited-style-name="Index_20_Link">1.2 Предварительное определение требований<text:tab/>8</text:a></text:p>
          <text:p text:style-name="P9"><text:a xlink:type="simple" xlink:href="#__RefHeading___Toc3033_3678218507" office:name="1.2.1 Общее описание" text:style-name="Index_20_Link" text:visited-style-name="Index_20_Link">1.2.1 Общее описание<text:tab/>8</text:a></text:p>
          <text:p text:style-name="P9"><text:a xlink:type="simple" xlink:href="#__RefHeading___Toc11346_567402320" office:name="1.2.2 Функциональные требования" text:style-name="Index_20_Link" text:visited-style-name="Index_20_Link">1.2.2 Функциональные требования<text:tab/>12</text:a></text:p>
          <text:p text:style-name="P9"><text:a xlink:type="simple" xlink:href="#__RefHeading___Toc11348_567402320" office:name="1.2.3 Требования к данным" text:style-name="Index_20_Link" text:visited-style-name="Index_20_Link">1.2.3 Требования к данным<text:tab/>13</text:a></text:p>
          <text:p text:style-name="P9"><text:a xlink:type="simple" xlink:href="#__RefHeading___Toc11356_567402320" office:name="1.2.4 Требования к внешним интерфейсам" text:style-name="Index_20_Link" text:visited-style-name="Index_20_Link">1.2.4 Требования к внешним интерфейсам<text:tab/>15</text:a></text:p>
          <text:p text:style-name="P9"><text:a xlink:type="simple" xlink:href="#__RefHeading___Toc11364_567402320" office:name="1.2.5 Атрибуты качества" text:style-name="Index_20_Link" text:visited-style-name="Index_20_Link">1.2.5 Атрибуты качества<text:tab/>19</text:a></text:p>
          <text:p text:style-name="P8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20</text:a></text:p>
          <text:p text:style-name="P9"><text:a xlink:type="simple" xlink:href="#__RefHeading___Toc2024_2593696514" office:name="1.3.1 Расчет себестоимости программного продукта" text:style-name="Index_20_Link" text:visited-style-name="Index_20_Link">1.3.1 Расчет себестоимости программного продукта<text:tab/>20</text:a></text:p>
          <text:p text:style-name="P9"><text:a xlink:type="simple" xlink:href="#__RefHeading___Toc2026_2593696514" office:name="1.1.3.2 Расчет экономического эффекта программного продукта" text:style-name="Index_20_Link" text:visited-style-name="Index_20_Link">1.1.3.2 Расчет экономического эффекта программного продукта<text:tab/>21</text:a></text:p>
          <text:p text:style-name="P7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23</text:a></text:p>
          <text:p text:style-name="P8"><text:a xlink:type="simple" xlink:href="#__RefHeading___Toc19695_1636301399%20%D0%9A%D0%BE%D0%BF%D0%B8%D1%8F%201" office:name="2.1 Технологии программирования" text:style-name="Index_20_Link" text:visited-style-name="Index_20_Link">2.1 Технологии программирования<text:tab/>23</text:a></text:p>
          <text:p text:style-name="P9"><text:a xlink:type="simple" xlink:href="#__RefHeading___Toc6583_2272482351" office:name="2.1.1 Выбор методологии разработки" text:style-name="Index_20_Link" text:visited-style-name="Index_20_Link">2.1.1 Выбор методологии разработки<text:tab/>23</text:a></text:p>
          <text:p text:style-name="P9"><text:a xlink:type="simple" xlink:href="#__RefHeading___Toc6583_2272482351%20%D0%9A%D0%BE%D0%BF%D0%B8%D1%8F%201" office:name="2.1.2 Языки программирования" text:style-name="Index_20_Link" text:visited-style-name="Index_20_Link">2.1.2 Языки программирования<text:tab/>23</text:a></text:p>
          <text:p text:style-name="P9"><text:a xlink:type="simple" xlink:href="#__RefHeading___Toc6583_2272482351%20%D0%9A%D0%BE%D0%BF%D0%B8%D1%8F%202" office:name="2.1.3 Инструменты и среды разработки" text:style-name="Index_20_Link" text:visited-style-name="Index_20_Link">2.1.3 Инструменты и среды разработки<text:tab/>24</text:a></text:p>
          <text:p text:style-name="P9"><text:a xlink:type="simple" xlink:href="#__RefHeading___Toc6583_2272482351%20%D0%9A%D0%BE%D0%BF%D0%B8%D1%8F%203" office:name="2.1.4 Архитектурные подходы (Исправить, но для этого нужен документ из другого чата...)" text:style-name="Index_20_Link" text:visited-style-name="Index_20_Link">2.1.4 Архитектурные подходы (Исправить, но для этого нужен документ из другого чата...)<text:tab/>24</text:a></text:p>
          <text:p text:style-name="P9"><text:a xlink:type="simple" xlink:href="#__RefHeading___Toc19695_1636301399%20%D0%9A%D0%BE%D0%BF%D0%B8%D1%8F%201%20%D0%9A%D0%BE%D0%BF%D0%B8%D1%8F%201" office:name="2.1.5 Библиотеки и фреймворки" text:style-name="Index_20_Link" text:visited-style-name="Index_20_Link">2.1.5 Библиотеки и фреймворки<text:tab/>24</text:a></text:p>
          <text:p text:style-name="P9"><text:a xlink:type="simple" xlink:href="#__RefHeading___Toc6583_2272482351%20%D0%9A%D0%BE%D0%BF%D0%B8%D1%8F%205" office:name="2.1.6 Тестирование и отладка" text:style-name="Index_20_Link" text:visited-style-name="Index_20_Link">2.1.6 Тестирование и отладка<text:tab/>24</text:a></text:p>
          <text:p text:style-name="P8"><text:a xlink:type="simple" xlink:href="#__RefHeading___Toc8896_1636301399" office:name="2.2 Описание программного кода продукта" text:style-name="Index_20_Link" text:visited-style-name="Index_20_Link">2.2 Описание программного кода продукта<text:tab/>25</text:a></text:p>
          <text:p text:style-name="P9"><text:a xlink:type="simple" xlink:href="#__RefHeading___Toc19695_1636301399%20%D0%9A%D0%BE%D0%BF%D0%B8%D1%8F%201%20%D0%9A%D0%BE%D0%BF%D0%B8%D1%8F%202" office:name="2.2.1 Общая архитектура" text:style-name="Index_20_Link" text:visited-style-name="Index_20_Link">2.2.1 Общая архитектура<text:tab/>25</text:a></text:p>
          <text:p text:style-name="P9"><text:a xlink:type="simple" xlink:href="#__RefHeading___Toc19695_1636301399%20%D0%9A%D0%BE%D0%BF%D0%B8%D1%8F%201%20%D0%9A%D0%BE%D0%BF%D0%B8%D1%8F%203" office:name="2.2.2 Модуль работы с базой данных" text:style-name="Index_20_Link" text:visited-style-name="Index_20_Link">2.2.2 Модуль работы с базой данных<text:tab/>27</text:a></text:p>
          <text:p text:style-name="P9"><text:a xlink:type="simple" xlink:href="#__RefHeading___Toc19695_1636301399%20%D0%9A%D0%BE%D0%BF%D0%B8%D1%8F%201%20%D0%9A%D0%BE%D0%BF%D0%B8%D1%8F%204" office:name="2.2.3 Модуль сетевого клиента" text:style-name="Index_20_Link" text:visited-style-name="Index_20_Link">2.2.3 Модуль сетевого клиента<text:tab/>28</text:a></text:p>
          <text:p text:style-name="P9"><text:a xlink:type="simple" xlink:href="#__RefHeading___Toc19695_1636301399%20%D0%9A%D0%BE%D0%BF%D0%B8%D1%8F%201%20%D0%9A%D0%BE%D0%BF%D0%B8%D1%8F%205" office:name="2.2.4 Модуль сетевого сервера" text:style-name="Index_20_Link" text:visited-style-name="Index_20_Link">2.2.4 Модуль сетевого сервера<text:tab/>28</text:a></text:p>
          <text:p text:style-name="P9"><text:a xlink:type="simple" xlink:href="#__RefHeading___Toc19695_1636301399%20%D0%9A%D0%BE%D0%BF%D0%B8%D1%8F%201%20%D0%9A%D0%BE%D0%BF%D0%B8%D1%8F%206" office:name="2.2.5 Модуль логирования" text:style-name="Index_20_Link" text:visited-style-name="Index_20_Link">2.2.5 Модуль логирования<text:tab/>30</text:a></text:p>
          <text:p text:style-name="P9"><text:a xlink:type="simple" xlink:href="#__RefHeading___Toc19695_1636301399%20%D0%9A%D0%BE%D0%BF%D0%B8%D1%8F%201%20%D0%9A%D0%BE%D0%BF%D0%B8%D1%8F%207" office:name="2.2.6 Модуль настроек" text:style-name="Index_20_Link" text:visited-style-name="Index_20_Link"><text:soft-page-break/>2.2.6 Модуль настроек<text:tab/>30</text:a></text:p>
          <text:p text:style-name="P9"><text:a xlink:type="simple" xlink:href="#__RefHeading___Toc19695_1636301399%20%D0%9A%D0%BE%D0%BF%D0%B8%D1%8F%201%20%D0%9A%D0%BE%D0%BF%D0%B8%D1%8F%208" office:name="2.2.7 Пользовательский интерфейс (Тут что то не так. Возможно, нужно удалить)" text:style-name="Index_20_Link" text:visited-style-name="Index_20_Link">2.2.7 Пользовательский интерфейс (Тут что то не так. Возможно, нужно удалить)<text:tab/>30</text:a></text:p>
          <text:p text:style-name="P8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31</text:a></text:p>
          <text:p text:style-name="P9"><text:a xlink:type="simple" xlink:href="#__RefHeading___Toc19695_1636301399%20%D0%9A%D0%BE%D0%BF%D0%B8%D1%8F%201%20%D0%9A%D0%BE%D0%BF%D0%B8%D1%8F%209" office:name="2.3.1 Подключаемые внешние модули" text:style-name="Index_20_Link" text:visited-style-name="Index_20_Link">2.3.1 Подключаемые внешние модули<text:tab/>31</text:a></text:p>
          <text:p text:style-name="P9"><text:a xlink:type="simple" xlink:href="#__RefHeading___Toc19695_1636301399%20%D0%9A%D0%BE%D0%BF%D0%B8%D1%8F%201%20%D0%9A%D0%BE%D0%BF%D0%B8%D1%8F%2010" office:name="2.3.2 Интеграция C++ и QML" text:style-name="Index_20_Link" text:visited-style-name="Index_20_Link">2.3.2 Интеграция C++ и QML<text:tab/>31</text:a></text:p>
          <text:p text:style-name="P9"><text:a xlink:type="simple" xlink:href="#__RefHeading___Toc19695_1636301399%20%D0%9A%D0%BE%D0%BF%D0%B8%D1%8F%201%20%D0%9A%D0%BE%D0%BF%D0%B8%D1%8F%2011" office:name="2.3.3 Клиент-серверное взаимодействие (Возможно не нужно. Либо написать подробнее и исправлено)" text:style-name="Index_20_Link" text:visited-style-name="Index_20_Link">2.3.3 Клиент-серверное взаимодействие (Возможно не нужно. Либо написать подробнее и исправлено)<text:tab/>31</text:a></text:p>
          <text:p text:style-name="P8"><text:a xlink:type="simple" xlink:href="#__RefHeading___Toc8898_1636301399%20%D0%9A%D0%BE%D0%BF%D0%B8%D1%8F%201" office:name="2.4 Описание программного интерфейса ПС" text:style-name="Index_20_Link" text:visited-style-name="Index_20_Link">2.4 Описание программного интерфейса ПС<text:tab/>32</text:a></text:p>
          <text:p text:style-name="P9"><text:a xlink:type="simple" xlink:href="#__RefHeading___Toc6495_305172339" office:name="2.4.1. Окно авторизации" text:style-name="Index_20_Link" text:visited-style-name="Index_20_Link">2.4.1. Окно авторизации<text:tab/>32</text:a></text:p>
          <text:p text:style-name="P9"><text:a xlink:type="simple" xlink:href="#__RefHeading___Toc6497_305172339" office:name="2.4.2. Диалог настроек" text:style-name="Index_20_Link" text:visited-style-name="Index_20_Link">2.4.2. Диалог настроек<text:tab/>33</text:a></text:p>
          <text:p text:style-name="P9"><text:a xlink:type="simple" xlink:href="#__RefHeading___Toc6499_305172339" office:name="2.4.3. Главное окно и выдвижное меню" text:style-name="Index_20_Link" text:visited-style-name="Index_20_Link">2.4.3. Главное окно и выдвижное меню<text:tab/>35</text:a></text:p>
          <text:p text:style-name="P9"><text:a xlink:type="simple" xlink:href="#__RefHeading___Toc6501_305172339" office:name="2.4.4. Оформление заказа (страница для официанта)" text:style-name="Index_20_Link" text:visited-style-name="Index_20_Link">2.4.4. Оформление заказа (страница для официанта)<text:tab/>37</text:a></text:p>
          <text:p text:style-name="P9"><text:a xlink:type="simple" xlink:href="#__RefHeading___Toc6503_305172339" office:name="2.4.5. Управление складом (страница для кладовщика)" text:style-name="Index_20_Link" text:visited-style-name="Index_20_Link">2.4.5. Управление складом (страница для кладовщика)<text:tab/>39</text:a></text:p>
          <text:p text:style-name="P9"><text:a xlink:type="simple" xlink:href="#__RefHeading___Toc6505_305172339" office:name="2.4.6. Отчёты (страница для администратора)" text:style-name="Index_20_Link" text:visited-style-name="Index_20_Link">2.4.6. Отчёты (страница для администратора)<text:tab/>41</text:a></text:p>
          <text:p text:style-name="P7"><text:a xlink:type="simple" xlink:href="#__RefHeading___Toc8902_1636301399" office:name="ЗАКЛЮЧЕНИЕ" text:style-name="Index_20_Link" text:visited-style-name="Index_20_Link">ЗАКЛЮЧЕНИЕ<text:tab/>43</text:a></text:p>
          <text:p text:style-name="P7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44</text:a></text:p>
          <text:p text:style-name="P7"><text:a xlink:type="simple" xlink:href="#__RefHeading___Toc8906_1636301399" office:name="ПРИЛОЖЕНИЕ А" text:style-name="Index_20_Link" text:visited-style-name="Index_20_Link">ПРИЛОЖЕНИЕ А<text:tab/>46</text:a></text:p>
          <text:p text:style-name="P7"><text:a xlink:type="simple" xlink:href="#__RefHeading___Toc1720_2115060514" office:name="Листинги ключевых фрагментов программного кода" text:style-name="Index_20_Link" text:visited-style-name="Index_20_Link">Листинги ключевых фрагментов программного кода<text:tab/>46</text:a></text:p>
          <text:p text:style-name="P7"><text:a xlink:type="simple" xlink:href="#__RefHeading___Toc8908_1636301399%20%D0%9A%D0%BE%D0%BF%D0%B8%D1%8F%201" office:name="ПРИЛОЖЕНИЕ Б" text:style-name="Index_20_Link" text:visited-style-name="Index_20_Link">ПРИЛОЖЕНИЕ Б<text:tab/>47</text:a></text:p>
          <text:p text:style-name="P7"><text:a xlink:type="simple" xlink:href="#__RefHeading___Toc1722_2115060514" office:name="Диаграммы" text:style-name="Index_20_Link" text:visited-style-name="Index_20_Link">Диаграммы<text:tab/>47</text:a></text:p>
          <text:p text:style-name="P7"><text:a xlink:type="simple" xlink:href="#__RefHeading___Toc8908_1636301399" office:name="ПРИЛОЖЕНИЕ В" text:style-name="Index_20_Link" text:visited-style-name="Index_20_Link">ПРИЛОЖЕНИЕ В<text:tab/>48</text:a></text:p>
          <text:p text:style-name="P7"><text:a xlink:type="simple" xlink:href="#__RefHeading___Toc1724_2115060514" office:name="Тест-кейсы и тест сьюты" text:style-name="Index_20_Link" text:visited-style-name="Index_20_Link">Тест-кейсы и тест сьюты<text:tab/>48</text:a></text:p>
          <text:p text:style-name="P7"><text:a xlink:type="simple" xlink:href="#__RefHeading___Toc8908_1636301399%20%D0%9A%D0%BE%D0%BF%D0%B8%D1%8F%202" office:name="ПРИЛОЖЕНИЕ Г" text:style-name="Index_20_Link" text:visited-style-name="Index_20_Link">ПРИЛОЖЕНИЕ Г<text:tab/>49</text:a></text:p>
          <text:p text:style-name="P7"><text:a xlink:type="simple" xlink:href="#__RefHeading___Toc1724_2115060514%20%D0%9A%D0%BE%D0%BF%D0%B8%D1%8F%201" office:name="Содержание электронного носителя" text:style-name="Index_20_Link" text:visited-style-name="Index_20_Link">Содержание электронного носителя<text:tab/>49</text:a></text:p>
        </text:index-body>
      </text:table-of-content>
      <text:p text:style-name="P10"/>
      <text:h text:style-name="P11" text:outline-level="1"><text:bookmark-start text:name="__RefHeading___Toc8884_1636301399"/>ВВЕДЕНИЕ<text:bookmark-end text:name="__RefHeading___Toc8884_1636301399"/></text:h>
      <text:p text:style-name="P3">Эффективность современного ресторанного бизнеса напрямую зависит от скорости и точности обслуживания гостей. Ручной приём заказов с использованием бумажных блокнотов неизбежно ведёт к ошибкам передачи информации на кухню, задержкам и невозможности оперативного учёта складских запасов. В результате страдает качество сервиса и снижается прибыль заведения. Автоматизация этих процессов позволяет не только ускорить работу персонала, но и обеспечить прозрачный контроль ингредиентов, исключив ситуации, когда блюдо невозможно приготовить из-за отсутствия продуктов.</text:p>
      <text:p text:style-name="P3">Актуальность темы дипломного проекта обусловлена острой потребностью малых и средних ресторанов в недорогих, простых во внедрении и кроссплатформенных решениях, работающих на планшетах в локальной сети без привязки к дорогостоящим проприетарным системам. Разработанное приложение использует клиент-серверную архитектуру на базе фреймворка Qt, что гарантирует кроссплатформенность и возможность работы под Android.</text:p>
      <text:p text:style-name="P3">Объект исследования – предметная область «Ресторан», включающая процессы приёма заказов, управления меню, складского учёта и формирования отчётности.</text:p>
      <text:p text:style-name="P3">Предмет исследования – автоматизация информационных процессов оформления заказов и управления складом в ресторане.</text:p>
      <text:p text:style-name="P3">Цель работы – разработка автоматизированной системы для оформления заказов с модулем складского учёта и отчётности, функционирующей в локальной сети на планшетах.</text:p>
      <text:p text:style-name="P3">Для достижения цели были поставлены следующие задачи:</text:p>
      <text:list text:style-name="L1">
        <text:list-item>
          <text:p text:style-name="P12">Провести анализ бизнес-процессов ресторана и обосновать необходимость автоматизации.</text:p>
        </text:list-item>
        <text:list-item>
          <text:p text:style-name="P12"><text:soft-page-break/>Спроектировать логическую модель данных и сформулировать функциональные и нефункциональные требования к системе.</text:p>
        </text:list-item>
        <text:list-item>
          <text:p text:style-name="P12">Выбрать технологический стек: язык C++, среда Qt Creator, СУБД PostgreSQL, архитектура «клиент-сервер».</text:p>
        </text:list-item>
        <text:list-item>
          <text:p text:style-name="P12">Разработать серверный модуль, реализующий бизнес-логику и взаимодействие с базой данных.</text:p>
        </text:list-item>
        <text:list-item>
          <text:p text:style-name="P12">Реализовать клиентское приложение с графическим интерфейсом на Qt Quick для официантов, кладовщиков и администраторов.</text:p>
        </text:list-item>
        <text:list-item>
          <text:p text:style-name="P12">Обеспечить надёжное сетевое взаимодействие по протоколу TCP с JSON-сериализацией.</text:p>
        </text:list-item>
        <text:list-item>
          <text:p text:style-name="P12">Провести тестирование модулей и оценить экономическую эффективность внедрения.</text:p>
        </text:list-item>
      </text:list>
      <text:p text:style-name="P3">Практическая значимость работы заключается в создании готового к использованию программного продукта, который может быть развёрнут в реальном ресторане без приобретения дорогостоящего ПО. Приложение легко масштабируется и адаптируется под изменяющиеся меню и складские номенклатуры.</text:p>
      <text:p text:style-name="P3">Структура работы. Дипломный проект состоит из введения, двух глав, заключения, списка использованных источников и приложений.</text:p>
      <text:p text:style-name="P3">В первой главе выполнен анализ предметной области, сформулированы требования и рассчитаны экономические показатели.</text:p>
      <text:p text:style-name="P3">Вторая глава посвящена реализации: описан выбор технологий, архитектура, программные модули, интеграция компонентов и пользовательский интерфейс.</text:p>
      <text:p text:style-name="P3">В приложения вынесены листинги ключевых фрагментов кода, диаграммы, тестовая документация и содержимое электронного носителя.</text:p>
      <text:p text:style-name="P3"/>
      <text:h text:style-name="P11" text:outline-level="1"><text:bookmark-start text:name="__RefHeading___Toc8886_1636301399"/>ГЛАВА 1 ПРОЕКТИРОВАНИЕ ПРИЛОЖЕНИЯ<text:bookmark-end text:name="__RefHeading___Toc8886_1636301399"/></text:h>
      <text:h text:style-name="Heading_20_2" text:outline-level="2"><text:bookmark-start text:name="__RefHeading___Toc8888_1636301399"/><text:span text:style-name="T2">1.</text:span>1 Модель предметной области<text:bookmark-end text:name="__RefHeading___Toc8888_1636301399"/></text:h>
      <text:p text:style-name="P3">Ресторан — это предприятие общественного питания <text:span text:style-name="T3">[</text:span><text:bookmark-ref text:reference-format="number-no-superior" text:ref-name="__RefNumPara__4995_2159724457">2</text:bookmark-ref>, <text:span text:style-name="T4">с.</text:span><text:span text:style-name="T5"> </text:span><text:span text:style-name="T6">3</text:span><text:span text:style-name="T3">]</text:span>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включая сложные, фирменные блюда и напитки. Основным способом организации потребления является подача блюд в зале ресторана <text:span text:style-name="T7">[</text:span><text:span text:style-name="T7"><text:bookmark-ref text:reference-format="number-no-superior" text:ref-name="__RefNumPara__4997_2159724457">1</text:bookmark-ref></text:span><text:span text:style-name="T7">, </text:span><text:span text:style-name="T8">с. 1</text:span><text:span text:style-name="T7">]</text:span>. </text:p>
      <text:p text:style-name="P3"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P3">Предварительное моделирование предметной области позволяет выявить основные бизнес-процессы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Иногда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контроля за их наличием на складе, проведения инвентаризации и своевременного формирования заявок для поставщиков. Отсутствие единой автоматизированной системы для управления этими процессами приводит к <text:soft-page-break/>риску человеческих ошибок, замедлению обслуживания и сложностям в оперативном управлении ресурсами.</text:p>
      <text:p text:style-name="P3"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на бумажный бланк заказа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На рисунк<text:span text:style-name="T9">е 1 изображена схема <text:s/>работы с заказом на текущий момент.</text:span></text:p>
      <text:p text:style-name="P13">Процесс управления складом в ресторане представляет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<text:soft-page-break/>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накладной, а также контроль соблюдения температурных режимов и сроков 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</text:p>
      <text:h text:style-name="P14" text:outline-level="2"><text:bookmark-start text:name="__RefHeading___Toc3714_962412752 Копия 2"/>1.2 Предварительное определение требований<text:bookmark-end text:name="__RefHeading___Toc3714_962412752 Копия 2"/></text:h>
      <text:h text:style-name="Heading_20_3" text:outline-level="3"><text:bookmark-start text:name="__RefHeading___Toc3033_3678218507"/>1.2.1 Общее описание <text:bookmark-end text:name="__RefHeading___Toc3033_3678218507"/></text:h>
      <text:p text:style-name="P15"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 и формирование финансовых отчётов [5]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p text:style-name="Text_20_body">1.2.1.1 Общий взгляд на продукт</text:p>
      <text:p text:style-name="Text_20_body"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На рисунке 2 изображена схема работы с заказом после внедрения программного продукта.</text:p>
      <text:p text:style-name="P3"/>
      <text:p text:style-name="P3"/>
      <text:h text:style-name="P16" text:outline-level="2" text:is-list-header="true"><text:bookmark-start text:name="__RefHeading___Toc8890_1636301399"/><draw:frame draw:style-name="fr1" draw:name="Врезка1" text:anchor-type="char" svg:width="25.7cm" draw:z-index="5"><draw:text-box fo:min-height="16.036cm"><text:p text:style-name="Drawing"><draw:frame draw:style-name="fr2" draw:name="Изображение1" text:anchor-type="paragraph" svg:width="25.7cm" style:rel-width="100%" svg:height="16.036cm" style:rel-height="scale" draw:z-index="6"><draw:image xlink:href="Pictures/100000010000056F00000364E4B017A7.png" xlink:type="simple" xlink:show="embed" xlink:actuate="onLoad" draw:mime-type="image/png"/></draw:frame>Рисунок <text:sequence text:ref-name="refDrawing0" text:name="Drawing" text:formula="ooow:Drawing+1" style:num-format="1">1</text:sequence><text:s/>— Схема работы с заказом на данный момент</text:p></draw:text-box></draw:frame><text:bookmark-end text:name="__RefHeading___Toc8890_1636301399"/></text:h>
      <text:p text:style-name="P17"><text:bookmark-start text:name="__RefHeading___Toc3720_962412752"/><text:span text:style-name="T10">1.</text:span>2.1.2 Классы и характеристики пользователей<text:bookmark-end text:name="__RefHeading___Toc3720_962412752"/></text:p>
      <text:p text:style-name="P3">Система предусматривает три роли:</text:p>
      <text:list text:style-name="L2">
        <text:list-item>
          <text:p text:style-name="P18">Официант (waiter) – может просматривать актуальное меню с учётом наличия продуктов, формировать заказы, добавлять/удалять блюда, при этом автоматически резервируются и списываются ингредиенты.</text:p>
        </text:list-item>
        <text:list-item>
          <text:p text:style-name="P18">Кладовщик (storekeeper) – управляет складскими позициями: увеличивает, уменьшает или устанавливает точное количество любого продукта.</text:p>
        </text:list-item>
        <text:list-item>
          <text:p text:style-name="P18">Администратор (admin) – имеет доступ ко всем функциям официанта и кладовщика, дополнительно формирует отчёты по выручке, популярности блюд и дефицитным товарам.</text:p>
        </text:list-item>
      </text:list>
      <text:p text:style-name="Text_20_body"><text:bookmark-start text:name="__RefHeading___Toc3722_962412752"/><text:span text:style-name="T10">1.</text:span>2.1.3 Ограничение дизайна и реализации<text:bookmark-end text:name="__RefHeading___Toc3722_962412752"/></text:p>
      <text:p text:style-name="P3"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p text:style-name="Text_20_body"><text:bookmark-start text:name="__RefHeading___Toc3724_962412752"/><text:span text:style-name="T10">1.</text:span>2.1.4 Предположения и зависимости<text:bookmark-end text:name="__RefHeading___Toc3724_962412752"/></text:p>
      <text:p text:style-name="P3">Для функционирования системы требуется корректно работающая локальная сеть. <text:span text:style-name="T11">На устройстве-сервере должна быть установлена и настроена база данных </text:span><text:span text:style-name="T12">под PostgreSQL</text:span><text:span text:style-name="T11">.</text:span> Установка дополнительных программ или приложений не требуется. </text:p>
      <text:p text:style-name="P19"><draw:frame draw:style-name="fr3" draw:name="Врезка3" text:anchor-type="paragraph" svg:width="25.7cm" style:rel-width="100%" svg:height="17.006cm" style:rel-height="scale-min" draw:z-index="7"><draw:text-box><text:p text:style-name="Drawing"><draw:frame draw:style-name="fr2" draw:name="Изображение3" text:anchor-type="paragraph" svg:width="25.7cm" style:rel-width="100%" svg:height="16.438cm" style:rel-height="scale" draw:z-index="8"><draw:image xlink:href="Pictures/100000010000058300000386422E6BDA.png" xlink:type="simple" xlink:show="embed" xlink:actuate="onLoad" draw:mime-type="image/png"/></draw:frame>Рисунок <text:sequence text:ref-name="refDrawing1" text:name="Drawing" text:formula="ooow:Drawing+1" style:num-format="1">2</text:sequence><text:s/>— Схема работы с заказом <text:span text:style-name="T13">при внедрении программного продукта</text:span></text:p></draw:text-box></draw:frame></text:p>
      <text:h text:style-name="P20" text:outline-level="3"><text:bookmark-start text:name="__RefHeading___Toc11346_567402320"/><text:span text:style-name="T10">1.</text:span><text:span text:style-name="T14">2.</text:span><text:span text:style-name="T15">2</text:span><text:span text:style-name="T14"> </text:span>Функциональные требования <text:bookmark-end text:name="__RefHeading___Toc11346_567402320"/></text:h>
      <text:p text:style-name="P21"><text:span text:style-name="T16">FUNC-</text:span><text:span text:style-name="T17">00</text:span><text:span text:style-name="T16">1. </text:span><text:span text:style-name="T18">Синхронизация: </text:span><text:span text:style-name="T19">при запуске приложения загружаются актуальные данные. </text:span><text:span text:style-name="T20">В</text:span><text:span text:style-name="T18">се изменения должны синхронизироваться с имеющимися данными при нажатии кнопки </text:span><text:span text:style-name="T21">обновления данных</text:span><text:span text:style-name="T18">.</text:span></text:p>
      <text:p text:style-name="P22">FUNC-<text:span text:style-name="T22">0</text:span><text:span text:style-name="T23">0</text:span><text:span text:style-name="T22">2</text:span>. <text:span text:style-name="T22">Настройки: </text:span><text:span text:style-name="T24">Возможность настраивать соединение с базой данных (Название, имя пользователя, порт, пароль) и с сервером (</text:span><text:span text:style-name="T25">ip </text:span><text:span text:style-name="T24">адрес, порт).</text:span></text:p>
      <text:p text:style-name="P23">FUNC-00<text:span text:style-name="T23">3</text:span>. Ролевое разграничение интерфейса: Меню навигации формируется динамически: официант видит только «Оформление заказа», кладовщик – «Склад», администратор – все разделы.</text:p>
      <text:p text:style-name="P24">FUNC-00<text:span text:style-name="T23">4</text:span>. <text:span text:style-name="T26">Авторизация пользователя: Система проверяет логин и пароль, вычисляя </text:span><text:span text:style-name="T27">SHA3-</text:span><text:span text:style-name="T26">256 от строки «пароль+соль». При успехе определяет роль и ФИО пользователя.</text:span></text:p>
      <text:p text:style-name="P25"><text:span text:style-name="T16">FUNC-</text:span><text:span text:style-name="T17">00</text:span><text:span text:style-name="T23">5</text:span><text:span text:style-name="T28">. </text:span><text:span text:style-name="T29">Оформление заказов: После нажатия кнопки «Оформить» все позиции корзины фиксируются в БД: создаётся запись в таблице Orders с привязкой официанта </text:span><text:span text:style-name="T30">(берётся из логина)</text:span><text:span text:style-name="T29"> и столика </text:span><text:span text:style-name="T30">(вводится вручную)</text:span><text:span text:style-name="T29"> к нему <text:s/>и связанные строки в OrderFood </text:span><text:span text:style-name="T31">[</text:span><text:span text:style-name="T31"><text:bookmark-ref text:reference-format="number-no-superior" text:ref-name="__RefNumPara__5190_2159724457">4</text:bookmark-ref></text:span><text:span text:style-name="T31">, </text:span><text:span text:style-name="T32">с. 108</text:span><text:span text:style-name="T31">].</text:span><text:span text:style-name="T29"> Корзина очищается. создание нового заказа </text:span><text:span text:style-name="T33">в базе данных</text:span><text:span text:style-name="T29"> </text:span></text:p>
      <text:p text:style-name="P26">FUNC-<text:span text:style-name="T34">00</text:span><text:span text:style-name="T35">6</text:span><text:span text:style-name="T36">. </text:span><text:span text:style-name="T37">Добавление блюда в заказ: официант нажимает на блюдо в списке, вводит количество, при необходимости – комментарий и нажимает «Добавить». Блюдо появляется в текущем заказе. При добавлении система <text:s/>проверяет наличие ингредиентов и, если их достаточно, списывает их со склада.</text:span></text:p>
      <text:p text:style-name="P27"><text:span text:style-name="T16">FUNC-</text:span><text:span text:style-name="T17">00</text:span><text:span text:style-name="T23">7</text:span><text:span text:style-name="T16">. </text:span><text:span text:style-name="T38">Автоматическое списание: при </text:span><text:span text:style-name="T39">добавлении блюда в заказ</text:span><text:span text:style-name="T38"> происходит списание продуктов на складе. </text:span><text:span text:style-name="T40">Если удалить блюдо из заказа, то продукты вернутся.</text:span></text:p>
      <text:p text:style-name="P27">FUNC-<text:span text:style-name="T34">00</text:span><text:span text:style-name="T35">8</text:span><text:span text:style-name="T36">. </text:span><text:span text:style-name="T41">Предупреждение о малом остатке: Если после списания количество какого-либо продукта станет ниже минимального порога, выводится предупреждение с перечнем продуктов, но добавление блюда разрешается.</text:span></text:p>
      <text:p text:style-name="P27"><text:soft-page-break/><text:span text:style-name="T16">FUNC-</text:span><text:span text:style-name="T17">00</text:span><text:span text:style-name="T23">9</text:span><text:span text:style-name="T16">. </text:span><text:span text:style-name="T42">Проверка перед добавлением: е</text:span><text:span text:style-name="T43">сли продуктов не хватает, то добавить в заказ блюдо нельзя.</text:span><text:span text:style-name="T41"> </text:span></text:p>
      <text:p text:style-name="P28">FUNC-01<text:span text:style-name="T23">0</text:span>. Удаление блюда из заказа: При удалении позиции ингредиенты автоматически возвращаются на склад.</text:p>
      <text:p text:style-name="P29">FUNC-<text:span text:style-name="T34">0</text:span><text:span text:style-name="T35">11</text:span><text:span text:style-name="T36">. </text:span><text:span text:style-name="T44">Фильтрация меню на окне оформления заказа </text:span><text:span text:style-name="T45">по категории и доступности</text:span><text:span text:style-name="T44">.</text:span></text:p>
      <text:p text:style-name="P30"><text:span text:style-name="T46">FUNC-</text:span><text:span text:style-name="T47">0</text:span><text:span text:style-name="T48">12</text:span><text:span text:style-name="T49">. </text:span><text:span text:style-name="T50">Управление складом</text:span><text:span text:style-name="T51">:</text:span><text:span text:style-name="T50"> Кладовщик может для выбранного продукта: прибавить, убавить или установить точное количество. Все изменения немедленно сохраняются на сервере.</text:span></text:p>
      <text:h text:style-name="Heading_20_3" text:outline-level="3"><text:bookmark-start text:name="__RefHeading___Toc11348_567402320"/><text:span text:style-name="T10">1.</text:span><text:span text:style-name="T52">2</text:span><text:span text:style-name="T14">.</text:span><text:span text:style-name="T53">3</text:span><text:span text:style-name="T14"> Требования к данным</text:span><text:bookmark-end text:name="__RefHeading___Toc11348_567402320"/></text:h>
      <text:p text:style-name="Text_20_body"><text:bookmark-start text:name="__RefHeading___Toc3726_962412752"/><text:span text:style-name="T10">1.</text:span>2.3.1 Логическая модель данных<text:bookmark-end text:name="__RefHeading___Toc3726_962412752"/></text:p>
      <text:p text:style-name="P31">Основные сущности которые отразятся в базе данных:</text:p>
      <text:list text:style-name="L3">
        <text:list-item>
          <text:p text:style-name="P32"><text:span text:style-name="T54">Пользователь</text:span> — <text:span text:style-name="T54">пользователи приложения, </text:span><text:span text:style-name="T55">оформляет заказ или редактирует склад</text:span>;</text:p>
        </text:list-item>
        <text:list-item>
          <text:p text:style-name="P32">Заказ — то, что записывается в базу данных. Хранит информацию о заказанных блюдах;</text:p>
        </text:list-item>
        <text:list-item>
          <text:p text:style-name="P32">Заказанное блюдо — блюдо которое запишется в заказ, его количество и просьба от клиента;</text:p>
        </text:list-item>
        <text:list-item>
          <text:p text:style-name="P33">Блюдо — экземпляр блюда который указан в меню, ссылается на состав<text:span text:style-name="T56">;</text:span></text:p>
        </text:list-item>
        <text:list-item>
          <text:p text:style-name="P34">Продукт в составе — <text:span text:style-name="T57">продукт который входит в состав блюда;</text:span></text:p>
        </text:list-item>
        <text:list-item>
          <text:p text:style-name="P35">Продукт <text:span text:style-name="T58"><text:s/>— </text:span>продукт для приготовления блюда.</text:p>
        </text:list-item>
      </text:list>
      <text:p text:style-name="P31">На рисунке 3 представлена логическая модель данных, описывающая основные сущности в выбранном бизнес процессе. </text:p>
      <text:p text:style-name="P31"/>
      <text:p text:style-name="P36"><draw:frame draw:style-name="fr3" draw:name="Врезка2" text:anchor-type="paragraph" svg:width="14.28cm" style:rel-width="84%" svg:height="9.611cm" style:rel-height="scale-min" draw:z-index="0"><draw:text-box><text:p text:style-name="Drawing"><draw:frame draw:style-name="fr2" draw:name="Изображение2" text:anchor-type="paragraph" svg:width="11.71cm" style:rel-width="82%" svg:height="9.043cm" style:rel-height="scale" draw:z-index="1"><draw:image xlink:href="Pictures/10000000000001C000000187E8CED452.png" xlink:type="simple" xlink:show="embed" xlink:actuate="onLoad" draw:mime-type="image/png"/></draw:frame>Рисунок <text:sequence text:ref-name="refDrawing2" text:name="Drawing" text:formula="ooow:Drawing+1" style:num-format="1">3</text:sequence><text:s/>— Модель данных</text:p></draw:text-box></draw:frame><text:soft-page-break/></text:p>
      <text:p text:style-name="P37"><text:span text:style-name="T59">1.</text:span>2.3.2 Отчёты</text:p>
      <text:p text:style-name="P38">Отчёты генерируются на соответствующей странице. Просмотреть их можно в любой момент, без возможности сохранения.</text:p>
      <text:p text:style-name="P39"><text:span text:style-name="T60">DATA</text:span><text:span text:style-name="T61">-</text:span><text:span text:style-name="T62">00</text:span><text:span text:style-name="T63">1</text:span><text:span text:style-name="T62">. </text:span><text:span text:style-name="T64">Отчёт о выручке: формирование отчёта о средней выручке с учётом блюд, столиков, официанта и даты.</text:span></text:p>
      <text:p text:style-name="P39"><text:span text:style-name="T60">DATA</text:span><text:span text:style-name="T61">-</text:span><text:span text:style-name="T62">00</text:span><text:span text:style-name="T63">2</text:span><text:span text:style-name="T62">. </text:span><text:span text:style-name="T65">Список о малом остатке: формирование списка продуктов, которых осталось меньше указанного значения.</text:span></text:p>
      <text:p text:style-name="P40"><text:span text:style-name="T60">DATA</text:span><text:span text:style-name="T61">-</text:span><text:span text:style-name="T66">00</text:span><text:span text:style-name="T67">3</text:span><text:span text:style-name="T66">. </text:span><text:span text:style-name="T68">Популярность блюд</text:span>: формирование списка <text:span text:style-name="T68">блюд по тому, как часто их заказывают</text:span>.</text:p>
      <text:p text:style-name="Text_20_body"><text:bookmark-start text:name="__RefHeading___Toc3730_962412752"/><text:span text:style-name="T59">1.</text:span>2.3.3 Получение, целостность, хранение и утилизация данных<text:bookmark-end text:name="__RefHeading___Toc3730_962412752"/></text:p>
      <text:p text:style-name="P3">Данные поступают из следующих источников:</text:p>
      <text:list text:style-name="L4">
        <text:list-item>
          <text:p text:style-name="P41">Планшеты официантов: данные о заказах в реальном времени.</text:p>
        </text:list-item>
        <text:list-item>
          <text:p text:style-name="P41">Планшеты <text:span text:style-name="T69">кладовщиков</text:span>: данные об остатках и операциях с ингредиентами.</text:p>
        </text:list-item>
      </text:list>
      <text:p text:style-name="P42"><text:soft-page-break/><text:span text:style-name="T60">DATA-</text:span><text:span text:style-name="T70">00</text:span><text:span text:style-name="T71">4</text:span><text:span text:style-name="T70">. </text:span>Все данные хранятся централизованно <text:span text:style-name="T72">в базе данных на устройстве-сервере</text:span>, <text:span text:style-name="T73">обеспечивая единый источник информации для синхрониз</text:span><text:span text:style-name="T74">а</text:span><text:span text:style-name="T73">ции</text:span>. </text:p>
      <text:h text:style-name="P43" text:outline-level="3"><text:bookmark-start text:name="__RefHeading___Toc11356_567402320"/><text:span text:style-name="T59">1.</text:span><text:span text:style-name="T75">2.</text:span><text:span text:style-name="T76">4</text:span><text:span text:style-name="T77"> </text:span>Требования к внешним интерфейсам<text:bookmark-end text:name="__RefHeading___Toc11356_567402320"/></text:h>
      <text:p text:style-name="P44"><text:bookmark-start text:name="__RefHeading___Toc11358_567402320"/><text:span text:style-name="T59">1.</text:span><text:span text:style-name="T78">2.4</text:span><text:span text:style-name="T79">.1</text:span> Пользовательские интерфе<text:span text:style-name="T80">й</text:span>сы<text:bookmark-end text:name="__RefHeading___Toc11358_567402320"/></text:p>
      <text:p text:style-name="P45">UI-00<text:span text:style-name="T81">1</text:span>. <text:span text:style-name="T82">Авторизация</text:span><text:span text:style-name="T83">: </text:span>окно <text:span text:style-name="T84">для авторизации пользователя.</text:span> <text:span text:style-name="T85">Содержит поля для ввода логина и пароля пользователя, и кнопки для входа и открытия настроек. </text:span><text:span text:style-name="T86">Схема окна авторизации представлена на рисунке 4.</text:span></text:p>
      <text:p text:style-name="P45"><draw:frame draw:style-name="fr4" draw:name="Врезка13" text:anchor-type="char" svg:width="11.439cm" draw:z-index="27"><draw:text-box fo:min-height="9.038cm"><text:p text:style-name="Drawing"><draw:frame draw:style-name="fr2" draw:name="Изображение13" text:anchor-type="paragraph" svg:width="11.439cm" style:rel-width="100%" svg:height="8.655cm" style:rel-height="scale" draw:z-index="28"><draw:image xlink:href="Pictures/1000000100000296000001F5DBEC6110.png" xlink:type="simple" xlink:show="embed" xlink:actuate="onLoad" draw:mime-type="image/png"/></draw:frame>Рисунок <text:sequence text:ref-name="refDrawing3" text:name="Drawing" text:formula="ooow:Drawing+1" style:num-format="1">4</text:sequence><text:s/>— Схема окна авторизации</text:p></draw:text-box></draw:frame></text:p>
      <text:p text:style-name="P46">UI-00<text:span text:style-name="T81">2</text:span>. <text:span text:style-name="T87">Меню: можно открыть </text:span><text:span text:style-name="T88">меню </text:span><text:span text:style-name="T87">навигации </text:span><text:span text:style-name="T89">нажатием на кнопку или смахиванием</text:span><text:span text:style-name="T87">. </text:span><text:span text:style-name="T89">Меню с</text:span><text:span text:style-name="T88">одерж</text:span><text:span text:style-name="T89">ит</text:span><text:span text:style-name="T88"> кнопки для перехода на каждую из форм </text:span><text:span text:style-name="T90">в соответствии с ролью</text:span><text:span text:style-name="T88">, <text:s/></text:span><text:span text:style-name="T87">внизу располагается кнопка для смены учётной записи </text:span><text:span text:style-name="T90">и открытия настроек</text:span><text:span text:style-name="T88">. </text:span><text:span text:style-name="T91">Сверху ФИО пользователя.</text:span><text:span text:style-name="T92"> </text:span><text:span text:style-name="T93">Схема </text:span><text:span text:style-name="T90">меню</text:span><text:span text:style-name="T93"> представлена на рисунке </text:span><text:span text:style-name="T90">5</text:span><text:span text:style-name="T93">.</text:span></text:p>
      <text:p text:style-name="P47"><draw:frame draw:style-name="fr4" draw:name="Врезка14" text:anchor-type="char" svg:width="10.372cm" draw:z-index="29"><draw:text-box fo:min-height="8.401cm"><text:p text:style-name="Drawing"><draw:frame draw:style-name="fr2" draw:name="Изображение14" text:anchor-type="paragraph" svg:width="10.372cm" style:rel-width="100%" svg:height="7.848cm" style:rel-height="scale" draw:z-index="30"><draw:image xlink:href="Pictures/1000000100000296000001F5326C3DF9.png" xlink:type="simple" xlink:show="embed" xlink:actuate="onLoad" draw:mime-type="image/png"/></draw:frame>Рисунок <text:sequence text:ref-name="refDrawing4" text:name="Drawing" text:formula="ooow:Drawing+1" style:num-format="1">5</text:sequence><text:s/>— Схема меню</text:p></draw:text-box></draw:frame><text:soft-page-break/></text:p>
      <text:p text:style-name="P48">UI-00<text:span text:style-name="T81">3</text:span>. <text:span text:style-name="T94">Оформление заказа: </text:span><text:span text:style-name="T95">окно содержит меню ресторана в левой части и текущий заказ в правой. Вверху находится выпадающий список для выбора сортировки меню. В правой части снизу поля для ввода требуемых данных и кнопки для работы с текущим заказом. </text:span><text:span text:style-name="T96">Схема окна отображена на рисунке 6.</text:span></text:p>
      <text:p text:style-name="P49"><draw:frame draw:style-name="fr4" draw:name="Врезка15" text:anchor-type="char" svg:width="10.34cm" draw:z-index="31"><draw:text-box fo:min-height="9.052cm"><text:p text:style-name="Drawing"><draw:frame draw:style-name="fr2" draw:name="Изображение15" text:anchor-type="paragraph" svg:width="10.34cm" style:rel-width="100%" svg:height="7.823cm" style:rel-height="scale" draw:z-index="32"><draw:image xlink:href="Pictures/1000000100000296000001F59C2D19A9.png" xlink:type="simple" xlink:show="embed" xlink:actuate="onLoad" draw:mime-type="image/png"/></draw:frame>Рисунок <text:sequence text:ref-name="refDrawing5" text:name="Drawing" text:formula="ooow:Drawing+1" style:num-format="1">6</text:sequence><text:s/>— Схема окна для оформления заказа</text:p></draw:text-box></draw:frame><text:s/></text:p>
      <text:p text:style-name="P50"><text:soft-page-break/>UI-00<text:span text:style-name="T81">4</text:span>.<text:span text:style-name="T22"> </text:span><text:span text:style-name="T97">Работа со складом: </text:span><text:span text:style-name="T98">окно выводящее все продукты со склада и их остаток. Кнопки «Добавить», «Убавить» и «Установить» для выбранного продукта. Поле для ввода количества. Схема окна представлена на рисунке 7.</text:span></text:p>
      <text:p text:style-name="P51"><draw:frame draw:style-name="fr4" draw:name="Врезка16" text:anchor-type="char" svg:width="10.351cm" draw:z-index="33"><draw:text-box fo:min-height="7.832cm"><text:p text:style-name="Drawing"><draw:frame draw:style-name="fr2" draw:name="Изображение16" text:anchor-type="paragraph" svg:width="10.351cm" style:rel-width="100%" svg:height="7.832cm" style:rel-height="scale" draw:z-index="34"><draw:image xlink:href="Pictures/1000000100000296000001F5B9B4A385.png" xlink:type="simple" xlink:show="embed" xlink:actuate="onLoad" draw:mime-type="image/png"/></draw:frame>Рисунок <text:sequence text:ref-name="refDrawing6" text:name="Drawing" text:formula="ooow:Drawing+1" style:num-format="1">7</text:sequence><text:s/>— Схема окна склада</text:p></draw:text-box></draw:frame></text:p>
      <text:p text:style-name="P52"><text:span text:style-name="T99">UI-00</text:span><text:span text:style-name="T81">5</text:span><text:span text:style-name="T99">. </text:span><text:span text:style-name="T100">Отчёты: </text:span><text:span text:style-name="T101">Окно с </text:span><text:span text:style-name="T100">выбор отчёта из </text:span><text:span text:style-name="T101">выпадающего </text:span><text:span text:style-name="T100">списка, поля</text:span><text:span text:style-name="T101">ми</text:span><text:span text:style-name="T100"> для ввода фильтров для каждого из отчётов, </text:span><text:span text:style-name="T102">область с выводом данных выбранного отчёта</text:span><text:span text:style-name="T100">. </text:span><text:span text:style-name="T103">Схема окна представлена на рисунке 8.</text:span></text:p>
      <text:p text:style-name="P53"><draw:frame draw:style-name="fr4" draw:name="Врезка17" text:anchor-type="char" svg:width="11.25cm" draw:z-index="35"><draw:text-box fo:min-height="8.513cm"><text:p text:style-name="Drawing"><draw:frame draw:style-name="fr2" draw:name="Изображение17" text:anchor-type="paragraph" svg:width="11.25cm" style:rel-width="100%" svg:height="8.513cm" style:rel-height="scale" draw:z-index="36"><draw:image xlink:href="Pictures/1000000100000296000001F59A7F5C91.png" xlink:type="simple" xlink:show="embed" xlink:actuate="onLoad" draw:mime-type="image/png"/></draw:frame>Рисунок <text:sequence text:ref-name="refDrawing7" text:name="Drawing" text:formula="ooow:Drawing+1" style:num-format="1">8</text:sequence><text:s/>— Схема окна с отчётами</text:p></draw:text-box></draw:frame></text:p>
      <text:p text:style-name="P54"><text:soft-page-break/><text:span text:style-name="T99">UI-00</text:span><text:span text:style-name="T81">6</text:span><text:span text:style-name="T99">. </text:span><text:span text:style-name="T104">Н</text:span><text:span text:style-name="T105">астройки</text:span><text:span text:style-name="T100">: </text:span><text:span text:style-name="T106">О</text:span><text:span text:style-name="T105">кно настроек базы данных, сетевы</text:span><text:span text:style-name="T107">х</text:span><text:span text:style-name="T105"> настро</text:span><text:span text:style-name="T107">ек</text:span><text:span text:style-name="T105"> для соединения с сервером </text:span><text:span text:style-name="T108">и прочими настройками. </text:span><text:span text:style-name="T109">Внизу окна кнопки для применения и отклонения настроек</text:span><text:span text:style-name="T108"> </text:span><text:span text:style-name="T109">Схема окна представлена на рисунке 9.</text:span></text:p>
      <text:p text:style-name="P55"><draw:frame draw:style-name="fr4" draw:name="Врезка18" text:anchor-type="char" svg:width="11.502cm" draw:z-index="37"><draw:text-box fo:min-height="8.703cm"><text:p text:style-name="Drawing"><draw:frame draw:style-name="fr2" draw:name="Изображение18" text:anchor-type="paragraph" svg:width="11.502cm" style:rel-width="100%" svg:height="8.703cm" style:rel-height="scale" draw:z-index="38"><draw:image xlink:href="Pictures/1000000100000296000001F529E55248.png" xlink:type="simple" xlink:show="embed" xlink:actuate="onLoad" draw:mime-type="image/png"/></draw:frame>Рисунок <text:sequence text:ref-name="refDrawing8" text:name="Drawing" text:formula="ooow:Drawing+1" style:num-format="1">9</text:sequence><text:s/>— Схема окна настроек</text:p></draw:text-box></draw:frame></text:p>
      <text:p text:style-name="P44"><text:bookmark-start text:name="__RefHeading___Toc11360_567402320"/><text:span text:style-name="T59">1.</text:span><text:span text:style-name="T78">2.4</text:span><text:span text:style-name="T79">.2</text:span> Интерфейсы ПО<text:bookmark-end text:name="__RefHeading___Toc11360_567402320"/></text:p>
      <text:p text:style-name="P56">Система работает на базе операционной системы Android версии не ниже 9. Для взаимодействия с базой данных используется <text:span text:style-name="T110">СУБД PostgreSQL </text:span><text:s/>с использованием языка SQL, <text:span text:style-name="T111">так как он обеспечивает корректную работу в системе «Клиент-Сервер» </text:span><text:span text:style-name="T112">[</text:span><text:span text:style-name="T112"><text:bookmark-ref text:reference-format="number-no-superior" text:ref-name="__RefNumPara__5637_2159724457">7</text:bookmark-ref></text:span><text:span text:style-name="T112">, </text:span><text:span text:style-name="T113">с. 34</text:span><text:span text:style-name="T112">]</text:span>. </text:p>
      <text:p text:style-name="P44"><text:bookmark-start text:name="__RefHeading___Toc11362_567402320"/><text:span text:style-name="T59">1.</text:span><text:span text:style-name="T78">2.4</text:span><text:span text:style-name="T79">.3</text:span> Интерфейсы оборудования<text:bookmark-end text:name="__RefHeading___Toc11362_567402320"/></text:p>
      <text:list text:style-name="L5">
        <text:list-item>
          <text:p text:style-name="P57">Сервер: любое устройство с PostgreSQL (ПК, одноплатный компьютер).</text:p>
        </text:list-item>
        <text:list-item>
          <text:p text:style-name="P57">Клиенты: планшеты с сенсорным экраном.</text:p>
        </text:list-item>
        <text:list-item>
          <text:p text:style-name="P57">Сеть: Wi-Fi.</text:p>
        </text:list-item>
      </text:list>
      <text:p text:style-name="P58"><text:bookmark-start text:name="__RefHeading___Toc11362_567402320 Копия 1"/><text:span text:style-name="T59">1.</text:span><text:span text:style-name="T78">2.4</text:span><text:span text:style-name="T79">.</text:span><text:span text:style-name="T114">4</text:span> <text:span text:style-name="T114">Коммуникационные интерфейсы</text:span><text:bookmark-end text:name="__RefHeading___Toc11362_567402320 Копия 1"/></text:p>
      <text:list text:style-name="L6">
        <text:list-item>
          <text:p text:style-name="P59">Транспортный уровень: TCP.</text:p>
        </text:list-item>
        <text:list-item>
          <text:p text:style-name="P59">Формат сообщений: JSON, каждое сообщение завершается символом \n.</text:p>
        </text:list-item>
        <text:list-item>
          <text:p text:style-name="P59">Таймаут ожидания ответа: 60 секунд.</text:p>
        </text:list-item>
      </text:list>
      <text:h text:style-name="P43" text:outline-level="3"><text:bookmark-start text:name="__RefHeading___Toc11364_567402320"/><text:soft-page-break/><text:span text:style-name="T59">1.</text:span><text:span text:style-name="T115">2.5</text:span><text:span text:style-name="T116"> </text:span>Атрибуты качества<text:bookmark-end text:name="__RefHeading___Toc11364_567402320"/></text:h>
      <text:p text:style-name="P44"><text:bookmark-start text:name="__RefHeading___Toc11366_567402320"/><text:span text:style-name="T59">1.</text:span><text:span text:style-name="T117">2.5</text:span><text:span text:style-name="T79">.1</text:span> Удобство использования<text:bookmark-end text:name="__RefHeading___Toc11366_567402320"/></text:p>
      <text:p text:style-name="P60">NF-001. <text:span text:style-name="T118">Для добавления блюда в заказ требуется не более 3 нажатий </text:span><text:span text:style-name="T119">(выбрать блюдо — ввести количество </text:span><text:span text:style-name="T120">—</text:span><text:span text:style-name="T119"> «Добавить»)</text:span><text:span text:style-name="T118">.</text:span></text:p>
      <text:p text:style-name="P61">NF-00<text:span text:style-name="T121">2</text:span>. <text:span text:style-name="T122">Для изменения остатка на складе требуется не </text:span><text:span text:style-name="T123">б</text:span><text:span text:style-name="T122">олее 3 нажатий </text:span><text:span text:style-name="T119">(выбрать </text:span><text:span text:style-name="T124">продукт</text:span><text:span text:style-name="T119"> — ввести количество </text:span><text:span text:style-name="T125">—</text:span><text:span text:style-name="T119"> «Добавить»/«</text:span><text:span text:style-name="T124">Убавить</text:span><text:span text:style-name="T119">»/«</text:span><text:span text:style-name="T124">Установить»</text:span><text:span text:style-name="T119">)</text:span><text:span text:style-name="T122">.</text:span></text:p>
      <text:p text:style-name="P44"><text:bookmark-start text:name="__RefHeading___Toc11368_567402320"/><text:span text:style-name="T59">1.</text:span><text:span text:style-name="T117">2.5</text:span><text:span text:style-name="T79">.2</text:span> Производительность<text:bookmark-end text:name="__RefHeading___Toc11368_567402320"/></text:p>
      <text:p text:style-name="P62">PERF-00<text:span text:style-name="T126">1</text:span>. <text:span text:style-name="T127">Обновление данных </text:span><text:span text:style-name="T128">занимает</text:span><text:span text:style-name="T127"> не более 3 секунд.</text:span></text:p>
      <text:p text:style-name="P63">PERF-00<text:span text:style-name="T126">2</text:span>. <text:span text:style-name="T129">Отзывчивый интерфейс с задержкой выполнения операций не более 1 секунды.</text:span></text:p>
      <text:p text:style-name="P44"><text:bookmark-start text:name="__RefHeading___Toc11370_567402320"/><text:span text:style-name="T59">1.</text:span><text:span text:style-name="T117">2.5</text:span><text:span text:style-name="T79">.3</text:span> Безопасность<text:bookmark-end text:name="__RefHeading___Toc11370_567402320"/></text:p>
      <text:p text:style-name="P64">SEC-00<text:span text:style-name="T130">1</text:span>. <text:span text:style-name="T131">Авторизация происходит по уникальному логину и паролю.</text:span></text:p>
      <text:p text:style-name="P65">SEC-00<text:span text:style-name="T132">2</text:span>. доступ к БД имеют только серверные процессы.</text:p>
      <text:p text:style-name="P66"><text:bookmark-start text:name="__RefHeading___Toc11372_567402320"/><text:span text:style-name="T59">1.</text:span><text:span text:style-name="T117">2.5</text:span><text:span text:style-name="T79">.4</text:span> Техника безопасности <text:bookmark-end text:name="__RefHeading___Toc11372_567402320"/></text:p>
      <text:p text:style-name="P67">Для обеспечения сохранности данных и бесперебойной работы системы персоналу ресторана необходимо соблюдать следующие правила:</text:p>
      <text:list text:style-name="L7">
        <text:list-item>
          <text:p text:style-name="P68">Пароли доступа к приложению и базе данных запрещается передавать третьим лицам, записывать в открытом виде на бумаге или сохранять в общедоступных файлах.</text:p>
        </text:list-item>
        <text:list-item>
          <text:p text:style-name="P68">Серверное устройство, на котором функционирует СУБД PostgreSQL, должно находиться в охраняемом помещении с ограниченным физическим доступом.</text:p>
        </text:list-item>
        <text:list-item>
          <text:p text:style-name="P68">Резервное копирование базы данных должно выполняться администратором не реже одного раза в сутки. Резервные копии следует хранить на отдельном носителе, физически изолированном от сервера.</text:p>
        </text:list-item>
      </text:list>
      <text:h text:style-name="P69" text:outline-level="2"><text:bookmark-start text:name="__RefHeading___Toc8892_1636301399"/><text:soft-page-break/><text:span text:style-name="T59">1.</text:span>3 <text:span text:style-name="T133">Показатели экономической эффективности</text:span><text:bookmark-end text:name="__RefHeading___Toc8892_1636301399"/></text:h>
      <text:p text:style-name="P70">Все расчёты были проведены используя формулы из лабораторной работы <text:span text:style-name="T22">№3 </text:span><text:span text:style-name="T134">[</text:span><text:span text:style-name="T134"><text:bookmark-ref text:reference-format="number-no-superior" text:ref-name="__RefNumPara__4213_1852506125">9</text:bookmark-ref></text:span><text:span text:style-name="T134">]</text:span></text:p>
      <text:h text:style-name="P71" text:outline-level="3"><text:bookmark-start text:name="__RefHeading___Toc2024_2593696514"/><text:span text:style-name="T59">1.</text:span><text:span text:style-name="T135">3.</text:span>1 Расчет себестоимости программного продукта<text:bookmark-end text:name="__RefHeading___Toc2024_2593696514"/></text:h>
      <text:p text:style-name="P72"><text:span text:style-name="T136">О</text:span>сновной задачей технико-экономического обоснования является определение технического и экономического эффекта от его <text:span text:style-name="T137">использования.</text:span></text:p>
      <text:p text:style-name="P73"><text:tab/>Выполним расчет себестоимости программного продукта по формуле <text:span text:style-name="T138">1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74"><draw:frame draw:style-name="fr5" draw:name="Объект1" text:anchor-type="as-char" svg:y="-0.439cm" svg:width="4.958cm" svg:height="0.59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76"/>
      <text:p text:style-name="P77"><text:span text:style-name="T139"><text:tab/>где Мвс — затраты на вспомогательные материалы, </text:span><text:span text:style-name="Strong_20_Emphasis"><text:span text:style-name="T140">₽</text:span></text:span><text:span text:style-name="T139">.</text:span></text:p>
      <text:p text:style-name="P78"><text:span text:style-name="T141">Э — затраты на электроэнергию и технологические цели, </text:span><text:span text:style-name="Strong_20_Emphasis"><text:span text:style-name="T140">₽</text:span></text:span></text:p>
      <text:p text:style-name="P78"><text:span text:style-name="Strong_20_Emphasis"><text:span text:style-name="T142">З</text:span></text:span><text:span text:style-name="Strong_20_Emphasis"><text:span text:style-name="T143">зп</text:span></text:span><text:span text:style-name="Strong_20_Emphasis"><text:span text:style-name="T144">о</text:span></text:span><text:span text:style-name="Strong_20_Emphasis"><text:span text:style-name="T145"> — основная зарплата работника, </text:span></text:span><text:span text:style-name="Strong_20_Emphasis"><text:span text:style-name="T146">₽</text:span></text:span></text:p>
      <text:p text:style-name="P78"><text:span text:style-name="Strong_20_Emphasis"><text:span text:style-name="T145">З</text:span></text:span><text:span text:style-name="Strong_20_Emphasis"><text:span text:style-name="T143">зп</text:span></text:span><text:span text:style-name="Strong_20_Emphasis"><text:span text:style-name="T144">д</text:span></text:span><text:span text:style-name="Strong_20_Emphasis"><text:span text:style-name="T145"> — </text:span></text:span><text:span text:style-name="Strong_20_Emphasis"><text:span text:style-name="T147">дополнительная зарплата разработчика,</text:span></text:span><text:span text:style-name="Strong_20_Emphasis"><text:span text:style-name="T145"> </text:span></text:span><text:span text:style-name="Strong_20_Emphasis"><text:span text:style-name="T148">₽</text:span></text:span></text:p>
      <text:p text:style-name="P78"><text:span text:style-name="Strong_20_Emphasis"><text:span text:style-name="T145">З</text:span></text:span><text:span text:style-name="Strong_20_Emphasis"><text:span text:style-name="T143">сн —</text:span></text:span><text:span text:style-name="Strong_20_Emphasis"><text:span text:style-name="T145"> </text:span></text:span><text:span text:style-name="Strong_20_Emphasis"><text:span text:style-name="T147">отчисления на соц. нужды,</text:span></text:span><text:span text:style-name="Strong_20_Emphasis"><text:span text:style-name="T145"> </text:span></text:span><text:span text:style-name="Strong_20_Emphasis"><text:span text:style-name="T148">₽</text:span></text:span></text:p>
      <text:p text:style-name="P77"><text:span text:style-name="Strong_20_Emphasis"><text:span text:style-name="T149">Н — накладные расходы,</text:span></text:span><text:span text:style-name="Strong_20_Emphasis"><text:span text:style-name="T150"> </text:span></text:span><text:span text:style-name="Strong_20_Emphasis"><text:span text:style-name="T148">₽</text:span></text:span></text:p>
      <text:p text:style-name="P79"><text:span text:style-name="Strong_20_Emphasis"><text:span text:style-name="T151"><text:tab/>Можно произвести расчёты для каждой переменной.</text:span></text:span></text:p>
      <text:p text:style-name="P80"><text:tab/>Вспомогательные материалы:</text:p>
      <text:p text:style-name="P80">Из таблицы 1 видно, что вспомогательные материалы <text:span text:style-name="T152">в сумме</text:span> стоят <text:span text:style-name="T153">300 р.</text:span></text:p>
      <text:p text:style-name="P80"><text:tab/>Затраты на электроэнергию:</text:p>
      <text:p text:style-name="P80">180 дней по 8 часов.</text:p>
      <text:p text:style-name="P80">Э = 0.5 * 7.5 * 1 440 * <text:span text:style-name="T154">0.6</text:span></text:p>
      <text:p text:style-name="P80">Э = 3 240</text:p>
      <text:p text:style-name="P80"><text:tab/>Общая зарплата:</text:p>
      <text:p text:style-name="P80">270 000 р.</text:p>
      <text:p text:style-name="P80"><text:tab/>Дополнительная зарплата:</text:p>
      <text:p text:style-name="P80"><text:span text:style-name="T155">27 000 </text:span><text:span text:style-name="T156">р.</text:span></text:p>
      <text:p text:style-name="P80"><text:tab/>Отчисления на социальные нужды:</text:p>
      <text:p text:style-name="P80">(270000 + 27000) * 0.3 = 89 100 р.</text:p>
      <text:p text:style-name="P80"><text:tab/>Накладные расходы:</text:p>
      <text:p text:style-name="P81"><text:soft-page-break/><text:span text:style-name="Strong_20_Emphasis"><text:span text:style-name="T157">(270000 + 27000) * 0.</text:span></text:span><text:span text:style-name="Strong_20_Emphasis"><text:span text:style-name="T158">1</text:span></text:span><text:span text:style-name="Strong_20_Emphasis"><text:span text:style-name="T157"> = 29 700 р.</text:span></text:span></text:p>
      <text:p text:style-name="P81"><text:span text:style-name="Strong_20_Emphasis"><text:span text:style-name="T157"><text:tab/></text:span></text:span><text:span text:style-name="Strong_20_Emphasis"><text:span text:style-name="T159">Таким образом: </text:span></text:span><text:span text:style-name="Strong_20_Emphasis"><text:span text:style-name="T160">C</text:span></text:span><text:span text:style-name="Strong_20_Emphasis"><text:span text:style-name="T161"> = </text:span></text:span><text:span text:style-name="Strong_20_Emphasis"><text:span text:style-name="T162">300 </text:span></text:span><text:span text:style-name="Strong_20_Emphasis"><text:span text:style-name="T163">+ </text:span></text:span><text:span text:style-name="Strong_20_Emphasis"><text:span text:style-name="T164">3 240</text:span></text:span><text:span text:style-name="Strong_20_Emphasis"><text:span text:style-name="T165"> </text:span></text:span><text:span text:style-name="Strong_20_Emphasis"><text:span text:style-name="T166">+ 270000 </text:span></text:span><text:span text:style-name="Strong_20_Emphasis"><text:span text:style-name="T167">+ </text:span></text:span><text:span text:style-name="Strong_20_Emphasis"><text:span text:style-name="T166">27000 </text:span></text:span><text:span text:style-name="Strong_20_Emphasis"><text:span text:style-name="T157">+ <text:s/>89 100 </text:span></text:span><text:span text:style-name="Strong_20_Emphasis"><text:span text:style-name="T168">+ <text:s/></text:span></text:span><text:span text:style-name="Strong_20_Emphasis"><text:span text:style-name="T157">29 700</text:span></text:span></text:p>
      <text:p text:style-name="P81"><text:span text:style-name="Strong_20_Emphasis"><text:span text:style-name="T157">С = 419 340 р.</text:span></text:span></text:p>
      <text:p text:style-name="P81"><text:span text:style-name="Strong_20_Emphasis"><text:span text:style-name="T169"/></text:span></text:p>
      <text:p text:style-name="P82"><text:span text:style-name="T141">Таблица </text:span><text:span text:style-name="T141"><text:sequence text:ref-name="refTable0" text:name="Table" text:formula="ooow:Table+1" style:num-format="1">1</text:sequence></text:span><text:span text:style-name="T141"><text:s/></text:span><text:span text:style-name="Strong_20_Emphasis"><text:span text:style-name="T150">—</text:span></text:span><text:span text:style-name="T141"> Затраты на вспомогательные материал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3"/>
          </table:table-cell>
          <table:table-cell table:style-name="Таблица1.A1" office:value-type="string">
            <text:p text:style-name="P83">Наименование затрат</text:p>
          </table:table-cell>
          <table:table-cell table:style-name="Таблица1.A1" office:value-type="string">
            <text:p text:style-name="P83">Кол-во, шт.</text:p>
          </table:table-cell>
          <table:table-cell table:style-name="Таблица1.D1" office:value-type="string">
            <text:p text:style-name="P84"><text:span text:style-name="T141">Сумма</text:span><text:span text:style-name="T139">, </text:span><text:span text:style-name="Strong_20_Emphasis"><text:span text:style-name="T170">₽</text:span></text:span><text:span text:style-name="T141">.</text:span></text:p>
          </table:table-cell>
        </table:table-row>
        <table:table-row>
          <table:table-cell table:style-name="Таблица1.A2" office:value-type="string">
            <text:list text:style-name="L8">
              <text:list-header>
                <text:p text:style-name="P85"/>
              </text:list-header>
            </text:list>
          </table:table-cell>
          <table:table-cell table:style-name="Таблица1.A2" office:value-type="string">
            <text:p text:style-name="P86"><text:span text:style-name="T171">Память</text:span><text:span text:style-name="T172"> </text:span><text:span text:style-name="T171">USB</text:span><text:span text:style-name="T173"> </text:span><text:span text:style-name="T171">FLASH</text:span><text:span text:style-name="T174"> </text:span><text:span text:style-name="T171">DRIVE</text:span><text:span text:style-name="T174"> </text:span><text:span text:style-name="T175">2G</text:span><text:span text:style-name="T176">b</text:span></text:p>
          </table:table-cell>
          <table:table-cell table:style-name="Таблица1.A2" office:value-type="string">
            <text:p text:style-name="P87">1</text:p>
          </table:table-cell>
          <table:table-cell table:style-name="Таблица1.D2" office:value-type="string">
            <text:p text:style-name="P88">200</text:p>
          </table:table-cell>
        </table:table-row>
        <table:table-row>
          <table:table-cell table:style-name="Таблица1.A2" office:value-type="string">
            <text:list text:continue-numbering="true" text:style-name="L8">
              <text:list-header>
                <text:p text:style-name="P85"/>
              </text:list-header>
            </text:list>
          </table:table-cell>
          <table:table-cell table:style-name="Таблица1.A2" office:value-type="string">
            <text:p text:style-name="P89">Переходник USB-A USB-C</text:p>
          </table:table-cell>
          <table:table-cell table:style-name="Таблица1.A2" office:value-type="string">
            <text:p text:style-name="P90">1</text:p>
          </table:table-cell>
          <table:table-cell table:style-name="Таблица1.D2" office:value-type="string">
            <text:p text:style-name="P88">100</text:p>
          </table:table-cell>
        </table:table-row>
        <table:table-row>
          <table:table-cell table:style-name="Таблица1.A2" office:value-type="string">
            <text:p text:style-name="P91"/>
          </table:table-cell>
          <table:table-cell table:style-name="Таблица1.A2" office:value-type="string">
            <text:p text:style-name="P91">Итого</text:p>
          </table:table-cell>
          <table:table-cell table:style-name="Таблица1.A2" office:value-type="string">
            <text:p text:style-name="P92"/>
          </table:table-cell>
          <table:table-cell table:style-name="Таблица1.D4" office:value-type="float" office:value="300">
            <text:p text:style-name="P93">300</text:p>
          </table:table-cell>
        </table:table-row>
      </table:table>
      <text:p text:style-name="P94"><text:span text:style-name="T177"/></text:p>
      <text:h text:style-name="P71" text:outline-level="3"><text:bookmark-start text:name="__RefHeading___Toc2026_2593696514"/><text:span text:style-name="T59">1.</text:span><text:span text:style-name="T178">1.</text:span><text:span text:style-name="T179">3.</text:span><text:span text:style-name="T178">2 </text:span>Расчет экономического эффекта программного продукта<text:bookmark-end text:name="__RefHeading___Toc2026_2593696514"/></text:h>
      <text:p text:style-name="P95">Экономический эффект от внедрения ПО рассчитывается по формуле <text:span text:style-name="T180">2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74"><draw:frame draw:style-name="fr5" draw:name="Объект3" text:anchor-type="as-char" svg:y="-0.388cm" svg:width="7.05cm" svg:height="0.54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7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96"/>
      <text:p text:style-name="P97">где</text:p>
      <text:p text:style-name="P97">N — количество обрабатываемых документов <text:span text:style-name="T181">(взять N = 6000)</text:span>;</text:p>
      <text:p text:style-name="P97">t<text:span text:style-name="T182">1</text:span>, t<text:span text:style-name="T182">2</text:span> — трудоемкость обработки документов до и после внедрения <text:span text:style-name="T183">программы:</text:span></text:p>
      <text:p text:style-name="P97">t<text:span text:style-name="T182">1</text:span><text:span text:style-name="T184"> </text:span><text:span text:style-name="T185">= 15, </text:span><text:span text:style-name="T184"><text:s/>t</text:span><text:span text:style-name="T182">2</text:span><text:span text:style-name="T184"> </text:span><text:span text:style-name="T185">= 7</text:span></text:p>
      <text:p text:style-name="P98">С<text:span text:style-name="T186">чтс </text:span><text:span text:style-name="T187">— </text:span><text:span text:style-name="T184">часовая тарифная тавка пользователя, р./час;</text:span></text:p>
      <text:p text:style-name="P98">К<text:span text:style-name="T182">доп</text:span> — коэффициент отчислений на дополнительную заработную плату, К<text:span text:style-name="T182">доп</text:span> = 0,1;</text:p>
      <text:p text:style-name="P99">К<text:span text:style-name="T182">сн</text:span><text:span text:style-name="T184"> — </text:span><text:span text:style-name="T188">коэффициент отчислений на соц. нужды, <text:s/></text:span><text:span text:style-name="T184">К</text:span><text:span text:style-name="T182">сн </text:span><text:span text:style-name="T188">= 0,3;</text:span></text:p>
      <text:p text:style-name="P99">Е<text:span text:style-name="T182">н</text:span><text:span text:style-name="T184"> — </text:span><text:span text:style-name="T188">нормативный коэффициент </text:span><text:span text:style-name="T189">о</text:span><text:span text:style-name="T188">купаемости капитальных вложений, <text:s/></text:span><text:span text:style-name="T184">Е</text:span><text:span text:style-name="T182">н </text:span><text:span text:style-name="T188">= 0,39;</text:span></text:p>
      <text:p text:style-name="P100">К — доп. капиталовложения, связанные с разработкой программного продукта <text:span text:style-name="T190">(здесь полная себестоимость рассчитанная выше)</text:span>.</text:p>
      <text:p text:style-name="P100">Используя ранее рассчитанные значения и подставляя в формулу выше, <text:span text:style-name="T191">можно выяснить что: </text:span><text:span text:style-name="T192">Э = </text:span><text:span text:style-name="T193">6000</text:span><text:span text:style-name="T192"> * (</text:span><text:span text:style-name="T194">15</text:span><text:span text:style-name="T192"> - </text:span><text:span text:style-name="T194">7</text:span><text:span text:style-name="T192">) * </text:span><text:span text:style-name="T195">16</text:span><text:span text:style-name="T196">5</text:span><text:span text:style-name="T192"> * </text:span><text:span text:style-name="T197">0.1</text:span><text:span text:style-name="T192"> * </text:span><text:span text:style-name="T188">0.3</text:span><text:span text:style-name="T192"> - </text:span><text:span text:style-name="T198">0.39</text:span><text:span text:style-name="T192"> *</text:span><text:span text:style-name="T188"> </text:span><text:span text:style-name="T199">4</text:span><text:span text:style-name="T200">19 340</text:span></text:p>
      <text:p text:style-name="P100"><text:soft-page-break/>Срок окупаемости программного продукта, <text:span text:style-name="T201">ра</text:span><text:span text:style-name="T202">сс</text:span><text:span text:style-name="T201">читанный по формуле 3</text:span>:</text:p>
      <text:p text:style-name="P101"><text:span text:style-name="T141">где C</text:span><text:span text:style-name="T203">пр</text:span><text:span text:style-name="T141"> — себестоимость программного продукта, </text:span><text:span text:style-name="Strong_20_Emphasis"><text:span text:style-name="T204">₽</text:span></text:span></text:p>
      <text:p text:style-name="P101"><text:span text:style-name="Strong_20_Emphasis"><text:span text:style-name="T205">С</text:span></text:span><text:span text:style-name="Strong_20_Emphasis"><text:span text:style-name="T206">1</text:span></text:span><text:span text:style-name="Strong_20_Emphasis"><text:span text:style-name="T207"> — стоимостные затраты при использовании ручного труда, </text:span></text:span><text:span text:style-name="Strong_20_Emphasis"><text:span text:style-name="T208">₽</text:span></text:span></text:p>
      <text:p text:style-name="P101"><text:span text:style-name="Strong_20_Emphasis"><text:span text:style-name="T207">С</text:span></text:span><text:span text:style-name="Strong_20_Emphasis"><text:span text:style-name="T206">2 —</text:span></text:span><text:span text:style-name="Strong_20_Emphasis"><text:span text:style-name="T207"> стоимостные затраты при использовании программы, </text:span></text:span><text:span text:style-name="Strong_20_Emphasis"><text:span text:style-name="T208">₽</text:span></text:span></text:p>
      <text:p text:style-name="P102">419340/<text:span text:style-name="T209">(</text:span><text:span text:style-name="T210">281 957,4 -</text:span><text:span text:style-name="T211"> </text:span><text:span text:style-name="T212">44 357,4</text:span><text:span text:style-name="T211">) = </text:span><text:span text:style-name="T213">1.8 лет</text:span></text:p>
      <text:p text:style-name="P103">Ручной труд:</text:p>
      <text:p text:style-name="P104">281 957,4</text:p>
      <text:p text:style-name="P105">Использование программы:</text:p>
      <text:p text:style-name="P106">44 357,4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4"><draw:frame draw:style-name="fr5" draw:name="Объект2" text:anchor-type="as-char" svg:y="-0.684cm" svg:width="2.231cm" svg:height="1.1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7"/>
      <text:p text:style-name="P108">В таблице 2 выведены результаты произведённых вычислений.</text:p>
      <text:p text:style-name="P109">Таблица <text:sequence text:ref-name="refTable1" text:name="Table" text:formula="ooow:Table+1" style:num-format="1">2</text:sequence><text:s/>— Итоговые значения показателей экономической эффективност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86">Наименование показателя</text:p>
          </table:table-cell>
          <table:table-cell table:style-name="Таблица7.A1" office:value-type="string">
            <text:p text:style-name="P110">Ед. Изм.</text:p>
          </table:table-cell>
          <table:table-cell table:style-name="Таблица7.C1" office:value-type="string">
            <text:p text:style-name="P80">Затраты, р.</text:p>
          </table:table-cell>
        </table:table-row>
        <table:table-row>
          <table:table-cell table:style-name="Таблица7.A2" office:value-type="string">
            <text:p text:style-name="P80"><text:span text:style-name="T171">1.</text:span><text:span text:style-name="T214"> </text:span><text:span text:style-name="T171">Основная</text:span><text:span text:style-name="T215"> </text:span><text:span text:style-name="T171">заработная</text:span><text:span text:style-name="T173"> </text:span><text:span text:style-name="T171">плата</text:span><text:span text:style-name="T173"> </text:span><text:span text:style-name="T176">разработчика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270 000</text:p>
          </table:table-cell>
        </table:table-row>
        <table:table-row>
          <table:table-cell table:style-name="Таблица7.A2" office:value-type="string">
            <text:p text:style-name="P80"><text:span text:style-name="T171">2.</text:span><text:span text:style-name="T216"> </text:span><text:span text:style-name="T171">Дополнительная</text:span><text:span text:style-name="T217"> </text:span><text:span text:style-name="T171">заработная</text:span><text:span text:style-name="T218"> </text:span><text:span text:style-name="T171">плата</text:span><text:span text:style-name="T219"> </text:span><text:span text:style-name="T176">разработчика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27 000</text:p>
          </table:table-cell>
        </table:table-row>
        <table:table-row>
          <table:table-cell table:style-name="Таблица7.A2" office:value-type="string">
            <text:p text:style-name="P80"><text:span text:style-name="T220">3.</text:span><text:span text:style-name="T174"> </text:span><text:span text:style-name="T220">Отчисления</text:span><text:span text:style-name="T172"> </text:span><text:span text:style-name="T220">на</text:span><text:span text:style-name="T172"> </text:span><text:span text:style-name="T220">социальные</text:span><text:span text:style-name="T221"> </text:span><text:span text:style-name="T220">нужды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89 100</text:p>
          </table:table-cell>
        </table:table-row>
        <table:table-row>
          <table:table-cell table:style-name="Таблица7.A2" office:value-type="string">
            <text:p text:style-name="P80"><text:span text:style-name="T171">4.</text:span><text:span text:style-name="T173"> </text:span><text:span text:style-name="T171">Накладные</text:span><text:span text:style-name="T174"> </text:span><text:span text:style-name="T176">расходы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29 700</text:p>
          </table:table-cell>
        </table:table-row>
        <table:table-row>
          <table:table-cell table:style-name="Таблица7.A2" office:value-type="string">
            <text:p text:style-name="P80"><text:span text:style-name="T171">5.</text:span><text:span text:style-name="T221"> </text:span><text:span text:style-name="T171">Затраты</text:span><text:span text:style-name="T220"> </text:span><text:span text:style-name="T171">на</text:span><text:span text:style-name="T221"> </text:span><text:span text:style-name="T176">электроэнергию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3 240</text:p>
          </table:table-cell>
        </table:table-row>
        <table:table-row>
          <table:table-cell table:style-name="Таблица7.A2" office:value-type="string">
            <text:p text:style-name="P80"><text:span text:style-name="T176">6.</text:span><text:span text:style-name="T222"> </text:span><text:span text:style-name="T176">Вспомогательные</text:span><text:span text:style-name="T223"> </text:span><text:span text:style-name="T176">материалы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300</text:p>
          </table:table-cell>
        </table:table-row>
        <table:table-row>
          <table:table-cell table:style-name="Таблица7.A2" office:value-type="string">
            <text:p text:style-name="P80"><text:span text:style-name="T171">7.</text:span><text:span text:style-name="T218"> </text:span><text:span text:style-name="T171">Полная</text:span><text:span text:style-name="T214"> </text:span><text:span text:style-name="T171">себестоимость</text:span><text:span text:style-name="T217"> </text:span><text:span text:style-name="T171">программного</text:span><text:span text:style-name="T217"> </text:span><text:span text:style-name="T176">продукта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419 340</text:p>
          </table:table-cell>
        </table:table-row>
        <table:table-row>
          <table:table-cell table:style-name="Таблица7.A2" office:value-type="string">
            <text:p text:style-name="P80"><text:span text:style-name="T171">8.</text:span><text:span text:style-name="T214"> </text:span><text:span text:style-name="T171">Экономический</text:span><text:span text:style-name="T224"> </text:span><text:span text:style-name="T176">эффект</text:span></text:p>
          </table:table-cell>
          <table:table-cell table:style-name="Таблица7.A2" office:value-type="string">
            <text:p text:style-name="P80">р.</text:p>
          </table:table-cell>
          <table:table-cell table:style-name="Таблица7.C2" office:value-type="string">
            <text:p text:style-name="P80">74 057,4</text:p>
          </table:table-cell>
        </table:table-row>
        <table:table-row>
          <table:table-cell table:style-name="Таблица7.A2" office:value-type="string">
            <text:p text:style-name="P80"><text:span text:style-name="T171">9.</text:span><text:span text:style-name="T214"> </text:span><text:span text:style-name="T171">Срок</text:span><text:span text:style-name="T214"> </text:span><text:span text:style-name="T171">окупаемости</text:span><text:span text:style-name="T215"> </text:span><text:span text:style-name="T171">программного</text:span><text:span text:style-name="T215"> </text:span><text:span text:style-name="T176">продукта</text:span></text:p>
          </table:table-cell>
          <table:table-cell table:style-name="Таблица7.A2" office:value-type="string">
            <text:p text:style-name="P80">лет</text:p>
          </table:table-cell>
          <table:table-cell table:style-name="Таблица7.C2" office:value-type="string">
            <text:p text:style-name="P80"><text:span text:style-name="T220">1,</text:span><text:span text:style-name="T225">8</text:span></text:p>
          </table:table-cell>
        </table:table-row>
      </table:table>
      <text:p text:style-name="P96"/>
      <text:h text:style-name="P11" text:outline-level="1"><text:bookmark-start text:name="__RefHeading___Toc8894_1636301399"/>ГЛАВА 2 РЕАЛИЗАЦИЯ ПРОГРАММНЫХ МОДУЛЕЙ<text:bookmark-end text:name="__RefHeading___Toc8894_1636301399"/></text:h>
      <text:h text:style-name="P111" text:outline-level="2"><text:bookmark-start text:name="__RefHeading___Toc19695_1636301399 Копия 1"/><text:span text:style-name="T59">2.</text:span>1 Технологии программирования<text:bookmark-end text:name="__RefHeading___Toc19695_1636301399 Копия 1"/></text:h>
      <text:p text:style-name="P112">Для разработки программного продукта были тщательно отобраны технологии и методы программирования, соответствующие поставленным целям. Ниже приведены используемые технологии и инструменты, их характеристики и обоснование выбора.</text:p>
      <text:h text:style-name="P113" text:outline-level="3"><text:bookmark-start text:name="__RefHeading___Toc6583_2272482351"/><text:span text:style-name="T226">2.</text:span><text:span text:style-name="T227">1.1 </text:span><text:span text:style-name="T228">Выбор методологии разработки</text:span><text:bookmark-end text:name="__RefHeading___Toc6583_2272482351"/></text:h>
      <text:p text:style-name="P112">При выборе <text:span text:style-name="T228">методологий</text:span> разработки необходимо учитывать следующие критерии: </text:p>
      <text:list text:style-name="L9">
        <text:list-item>
          <text:p text:style-name="P114">Четкое определение требований на начальном этапе;</text:p>
        </text:list-item>
        <text:list-item>
          <text:p text:style-name="P114">Структурированное планирование работ;</text:p>
        </text:list-item>
        <text:list-item>
          <text:p text:style-name="P114">Последовательное выполнение этапов проекта.</text:p>
        </text:list-item>
      </text:list>
      <text:p text:style-name="P115">С учетом данных критериев предпочтение отдается<text:span text:style-name="T22"> </text:span><text:span text:style-name="T229">водопадной методологии.</text:span><text:span text:style-name="T230"> </text:span><text:span text:style-name="T231">Она предполагает чёткое и последовательное разделение этапов разработки:</text:span></text:p>
      <text:list text:style-name="L10">
        <text:list-item>
          <text:p text:style-name="P116">Определение требований <text:s/></text:p>
        </text:list-item>
        <text:list-item>
          <text:p text:style-name="P116">Проектирование </text:p>
        </text:list-item>
        <text:list-item>
          <text:p text:style-name="P116">Кодирование </text:p>
        </text:list-item>
        <text:list-item>
          <text:p text:style-name="P116">Тестирование </text:p>
        </text:list-item>
        <text:list-item>
          <text:p text:style-name="P116">Эксплуатация</text:p>
          <text:p text:style-name="P117">В связи с этим данная методология является наиболее подходящей.</text:p>
        </text:list-item>
      </text:list>
      <text:h text:style-name="P113" text:outline-level="3"><text:bookmark-start text:name="__RefHeading___Toc6583_2272482351 Копия 1"/><text:span text:style-name="T226">2.</text:span><text:span text:style-name="T227">1.</text:span><text:span text:style-name="T232">2</text:span><text:span text:style-name="T227"> </text:span><text:span text:style-name="T232">Языки программирования</text:span><text:bookmark-end text:name="__RefHeading___Toc6583_2272482351 Копия 1"/></text:h>
      <text:p text:style-name="P118">Для разработки был выбран язык программирования C++. Это обусловлено его высокой производительностью и возможностью кроссплатформенной разработки. C++ используется в среде Qt Creator для создания как десктопных, так и мобильных приложений.</text:p>
      <text:p text:style-name="P119"><text:soft-page-break/>Для взаимодействия с базами данных используется структурированный язык запросов SQL, который характеризуется простотой и многофункциональностью, обеспечивая эффективное управление данными.</text:p>
      <text:h text:style-name="P113" text:outline-level="3"><text:bookmark-start text:name="__RefHeading___Toc6583_2272482351 Копия 2"/><text:span text:style-name="T226">2.</text:span><text:span text:style-name="T227">1.</text:span><text:span text:style-name="T233">3</text:span><text:span text:style-name="T227"> </text:span><text:span text:style-name="T233">Инструменты и среды разработки</text:span><text:bookmark-end text:name="__RefHeading___Toc6583_2272482351 Копия 2"/></text:h>
      <text:p text:style-name="P120">Инструментом для разработки выбрана интегрированная среда Qt Creator, обеспечивающая создание кроссплатформенных приложений. Система сборки CMake используется для конфигурации и сборки проекта.</text:p>
      <text:p text:style-name="P121"><text:bookmark-start text:name="__RefHeading___Toc19695_1636301399"/><text:span text:style-name="T234">Процесс разработки основан на объектно-ориентированном подходе, где каждый компонент программы представляется в виде отдельного объекта или класса. Этот подход соответствует требованиям и спецификациям разрабатываем</text:span><text:span text:style-name="T235">ой</text:span><text:span text:style-name="T234"> программ</text:span><text:span text:style-name="T235">ы</text:span><text:span text:style-name="T234">.</text:span><text:bookmark-end text:name="__RefHeading___Toc19695_1636301399"/></text:p>
      <text:h text:style-name="P113" text:outline-level="3"><text:bookmark-start text:name="__RefHeading___Toc6583_2272482351 Копия 3"/><text:span text:style-name="T226">2.</text:span><text:span text:style-name="T227">1.</text:span><text:span text:style-name="T236">4</text:span><text:span text:style-name="T227"> </text:span><text:span text:style-name="T236">Архитектурные подходы </text:span><text:span text:style-name="T237">(</text:span><text:span text:style-name="T238">Исправить, </text:span><text:span text:style-name="T239">но для этого нужен документ из другого чата...</text:span><text:span text:style-name="T237">)</text:span><text:bookmark-end text:name="__RefHeading___Toc6583_2272482351 Копия 3"/></text:h>
      <text:p text:style-name="P122">В связи с сетевой природой приложения, при разработке используется клиент-серверная архитектура. Это позволяет одному устройству функционировать в роли сервера, а другим – в роли клиентов.</text:p>
      <text:h text:style-name="P123" text:outline-level="3"><text:bookmark-start text:name="__RefHeading___Toc19695_1636301399 Копия 1 Копия 1"/><text:span text:style-name="T226">2.</text:span><text:span text:style-name="T227">1.</text:span><text:span text:style-name="T240">5</text:span><text:span text:style-name="T227"> </text:span><text:span text:style-name="T240">Библиотеки и фреймворки</text:span><text:bookmark-end text:name="__RefHeading___Toc19695_1636301399 Копия 1 Копия 1"/></text:h>
      <text:p text:style-name="Text_20_body">В проекте используются следующие библиотеки и фреймворки:</text:p>
      <text:list text:style-name="L11">
        <text:list-item>
          <text:p text:style-name="P124">Qt 6 – основной фреймворк, предоставляющий классы для работы с графическим интерфейсом (Qt Quick), сетевыми сокетами (QTcpSocket, QTcpServer), базами данных (QSqlDatabase), а также метаобъектную систему (сигналы/слоты, Q_PROPERTY, Q_INVOKABLE).</text:p>
        </text:list-item>
        <text:list-item>
          <text:p text:style-name="P124">Qt SQL – модуль для доступа к базам данных.</text:p>
        </text:list-item>
        <text:list-item>
          <text:p text:style-name="P124">Qt Network – модуль для реализации TCP-клиент-серверного взаимодействия.</text:p>
        </text:list-item>
      </text:list>
      <text:h text:style-name="P113" text:outline-level="3"><text:bookmark-start text:name="__RefHeading___Toc6583_2272482351 Копия 5"/><text:span text:style-name="T226">2.</text:span><text:span text:style-name="T227">1.</text:span><text:span text:style-name="T240">6</text:span><text:span text:style-name="T227"> </text:span><text:span text:style-name="T240">Тестирование и отладка</text:span><text:bookmark-end text:name="__RefHeading___Toc6583_2272482351 Копия 5"/></text:h>
      <text:p text:style-name="P125">Для тестирования <text:span text:style-name="T241">работоспособности приложения используется класс </text:span><text:span text:style-name="T242">Logs. </text:span><text:span text:style-name="T243">Его методы записывают сообщения в лог-файл с разным уровнем </text:span><text:span text:style-name="T244">важности</text:span><text:span text:style-name="T243">, а так же </text:span><text:span text:style-name="T245">дублиру</text:span><text:span text:style-name="T246">ю</text:span><text:span text:style-name="T245">т</text:span><text:span text:style-name="T243"> эти сообщения в терминал.</text:span></text:p>
      <text:h text:style-name="P126" text:outline-level="2"><text:bookmark-start text:name="__RefHeading___Toc8896_1636301399"/><text:soft-page-break/><text:span text:style-name="T59">2.</text:span><text:span text:style-name="T133">2</text:span> Описание <text:span text:style-name="T247">программного кода продукта</text:span><text:bookmark-end text:name="__RefHeading___Toc8896_1636301399"/></text:h>
      <text:p text:style-name="P127"><text:span text:style-name="T141">Приложение разделено на различные классы, созданные для конкретных задач. Общую диаграмму классов можно увидеть на рисунке </text:span><text:span text:style-name="T248">10</text:span></text:p>
      <text:h text:style-name="P128" text:outline-level="3"><text:bookmark-start text:name="__RefHeading___Toc19695_1636301399 Копия 1 Копия 2"/><text:span text:style-name="T226">2.</text:span>2.1 Общая архитектура<text:bookmark-end text:name="__RefHeading___Toc19695_1636301399 Копия 1 Копия 2"/></text:h>
      <text:p text:style-name="P129"><text:span text:style-name="T249">Программа построена</text:span> по клиент-серверной архитектуре. В зависимости от настроек приложение может работать в одном из двух режимов:</text:p>
      <text:list text:style-name="L12">
        <text:list-item>
          <text:p text:style-name="P130">Серверный режим – приложение напрямую взаимодействует с СУБД PostgreSQL, принимает TCP-подключения от клиентов и обрабатывает их запросы.</text:p>
        </text:list-item>
        <text:list-item>
          <text:p text:style-name="P130">Клиентский режим – приложение подключается к удалённому серверу через TCP-сокет и отправляет JSON-запросы, получая ответы.</text:p>
        </text:list-item>
      </text:list>
      <text:p text:style-name="P129">Взаимодействие с базой данных <text:span text:style-name="T250">реализовано</text:span> в классе DBWorker (сервер) или TcpClient (клиент). Это позволяет QML-интерфейсу не зависеть от режима работы – все методы вызываются одинаково. Основные модули:</text:p>
      <text:list text:style-name="L13">
        <text:list-item>
          <text:p text:style-name="P131">DBWorker – работа с PostgreSQL (только в серверном режиме).</text:p>
        </text:list-item>
        <text:list-item>
          <text:p text:style-name="P131">TcpServer + ClientConnection – TCP-сервер, принимающий запросы и использующий DBWorker.</text:p>
        </text:list-item>
        <text:list-item>
          <text:p text:style-name="P131">TcpClient – TCP-клиент, реализующий тот же API, что и DBWorker, но через сеть.</text:p>
        </text:list-item>
        <text:list-item>
          <text:p text:style-name="P131">Logs – логирование.</text:p>
        </text:list-item>
        <text:list-item>
          <text:p text:style-name="P131">Settings – хранение и загрузка настроек с помощью QSettings.</text:p>
        </text:list-item>
        <text:list-item>
          <text:p text:style-name="P131">QML-файлы – пользовательский интерфейс.</text:p>
        </text:list-item>
      </text:list>
      <text:p text:style-name="P132"/>
      <text:p text:style-name="P133"><draw:frame draw:style-name="fr1" draw:name="Врезка4" text:anchor-type="char" svg:width="24.236cm" draw:z-index="9"><draw:text-box fo:min-height="12.753cm"><text:p text:style-name="Drawing"><draw:frame draw:style-name="fr2" draw:name="Изображение4" text:anchor-type="paragraph" svg:width="24.236cm" style:rel-width="100%" svg:height="12.753cm" style:rel-height="scale" draw:z-index="10"><draw:image xlink:href="Pictures/1000000100000394000001E2D2A239D7.png" xlink:type="simple" xlink:show="embed" xlink:actuate="onLoad" draw:mime-type="image/png"/></draw:frame>Рисунок <text:sequence text:ref-name="refDrawing9" text:name="Drawing" text:formula="ooow:Drawing+1" style:num-format="1">10</text:sequence><text:s/>— Общая диаграмма классов</text:p></draw:text-box></draw:frame></text:p>
      <text:p text:style-name="P134"/>
      <text:h text:style-name="P135" text:outline-level="3"/>
      <text:h text:style-name="P136" text:outline-level="3"><text:bookmark-start text:name="__RefHeading___Toc19695_1636301399 Копия 1 Копия 3"/><text:span text:style-name="T226">2.</text:span><text:span text:style-name="T251">2.</text:span><text:span text:style-name="T252">2</text:span><text:span text:style-name="T251"> </text:span><text:span text:style-name="T253">Модуль работы с базой данных</text:span><text:bookmark-end text:name="__RefHeading___Toc19695_1636301399 Копия 1 Копия 3"/></text:h>
      <text:p text:style-name="P137">Класс DBWorker предназначен для выполнения всех операций с базой данных PostgreSQL. Он открывает соединение в конструкторе (параметры подключения жёстко заданы, но могут быть изменены через вызов reconnect). <text:span text:style-name="T254">Диаграмма классов работы с базой данных отображена на рисунке </text:span><text:span text:style-name="T255">11</text:span><text:span text:style-name="T254">.</text:span></text:p>
      <text:p text:style-name="P137"><draw:frame draw:style-name="fr1" draw:name="Врезка11" text:anchor-type="char" svg:width="17cm" draw:z-index="11"><draw:text-box fo:min-height="15.208cm"><text:p text:style-name="Drawing"><draw:frame draw:style-name="fr2" draw:name="Изображение11" text:anchor-type="paragraph" svg:width="17cm" style:rel-width="100%" svg:height="15.208cm" style:rel-height="scale" draw:z-index="12"><draw:image xlink:href="Pictures/100000010000025C00000266284EFBFF.png" xlink:type="simple" xlink:show="embed" xlink:actuate="onLoad" draw:mime-type="image/png"/></draw:frame>Рисунок <text:sequence text:ref-name="refDrawing10" text:name="Drawing" text:formula="ooow:Drawing+1" style:num-format="1">11</text:sequence><text:s/>— Диаграмма классов модуля работы с базой данных</text:p></draw:text-box></draw:frame></text:p>
      <text:p text:style-name="P137">Основные методы:</text:p>
      <text:list text:style-name="L14">
        <text:list-item>
          <text:p text:style-name="P138">checkUser(login, password) – авторизация пользователя. Из таблицы Users извлекаются соль и хэш пароля (SHA3-256), сравниваются с введёнными.</text:p>
        </text:list-item>
        <text:list-item>
          <text:p text:style-name="P138"><text:soft-page-break/>getFoods() – возвращает список блюд с их доступностью (рассчитывается на основе остатков продуктов), а также состав в виде строки.</text:p>
        </text:list-item>
        <text:list-item>
          <text:p text:style-name="P138">getProducts() – возвращает список продуктов с текущим количеством и минимальным порогом.</text:p>
        </text:list-item>
        <text:list-item>
          <text:p text:style-name="P138">updateProductQuantity() / addProductQuantity() – изменение остатков.</text:p>
        </text:list-item>
        <text:list-item>
          <text:p text:style-name="P138">checkAndConsume(foodId, quantity) – в транзакции проверяет наличие ингредиентов и списывает их для указанного количества блюда. При нехватке транзакция откатывается.</text:p>
        </text:list-item>
        <text:list-item>
          <text:p text:style-name="P138">returnIngredients() – возвращает ингредиенты при удалении блюда.</text:p>
        </text:list-item>
        <text:list-item>
          <text:p text:style-name="P138">createOrder(), addOrderItem() – создание заказа в БД.</text:p>
        </text:list-item>
      </text:list>
      <text:p text:style-name="P139">Все публичные методы обрабатывают исключения (классы DatabaseEx, ValidateEx), логируют ошибки и испускают сигнал errorOccurred для уведомления QML.</text:p>
      <text:h text:style-name="P140" text:outline-level="3"><text:bookmark-start text:name="__RefHeading___Toc19695_1636301399 Копия 1 Копия 4"/><text:span text:style-name="T226">2.</text:span>2.<text:span text:style-name="T252">3</text:span> <text:span text:style-name="T256">Модуль сетевого клиента</text:span><text:bookmark-end text:name="__RefHeading___Toc19695_1636301399 Копия 1 Копия 4"/></text:h>
      <text:p text:style-name="P141">Класс TcpClient реализует тот же интерфейс, что и DBWorker, но вместо прямых запросов к БД отправляет команды на сервер. Соединение устанавливается методом connectToServer(). Поток данных построен на JSON-формате: каждая команда – объект с полями command, requestId, data. Ответы приходят асинхронно; для синхронного ожидания используется waitForResponse с таймаутом и локальным циклом обработки событий. При потере соединения генерируется сигнал errorOccurred. <text:span text:style-name="T257">Диаграмма классов для сетевой работы отображена на рисунке </text:span><text:span text:style-name="T255">12</text:span><text:span text:style-name="T257">.</text:span></text:p>
      <text:h text:style-name="P140" text:outline-level="3"><text:bookmark-start text:name="__RefHeading___Toc19695_1636301399 Копия 1 Копия 5"/><text:span text:style-name="T226">2.</text:span>2.<text:span text:style-name="T252">4</text:span> <text:span text:style-name="T256">Модуль сетевого сервера</text:span><text:bookmark-end text:name="__RefHeading___Toc19695_1636301399 Копия 1 Копия 5"/></text:h>
      <text:p text:style-name="P139">TcpServer запускает серверный сокет и при подключении клиента создаёт объект ClientConnection, который получает сокет и обрабатывает входящие сообщения. В ClientConnection::onReadyRead() считываются строки, заканчивающиеся символом новой строки, парсится JSON, и в зависимости от команды вызывается соответствующий метод DBWorker. Результат <text:soft-page-break/>отправляется обратно в виде {"response": true/false, "requestId": N, "data": ...}. <text:span text:style-name="T257">Диаграмма классов для сетевой работы отображена на рисунке </text:span><text:span text:style-name="T255">12</text:span><text:span text:style-name="T257">.</text:span></text:p>
      <text:p text:style-name="P139"/>
      <text:p text:style-name="P139"><draw:frame draw:style-name="fr1" draw:name="Врезка12" text:anchor-type="char" svg:width="17cm" draw:z-index="13"><draw:text-box fo:min-height="17.912cm"><text:p text:style-name="Drawing"><draw:frame draw:style-name="fr2" draw:name="Изображение12" text:anchor-type="paragraph" svg:width="17cm" style:rel-width="100%" svg:height="17.912cm" style:rel-height="scale" draw:z-index="14"><draw:image xlink:href="Pictures/10000001000003220000034CF7C1697B.png" xlink:type="simple" xlink:show="embed" xlink:actuate="onLoad" draw:mime-type="image/png"/></draw:frame>Рисунок <text:sequence text:ref-name="refDrawing11" text:name="Drawing" text:formula="ooow:Drawing+1" style:num-format="1">12</text:sequence><text:s/>— Диаграмма классов работающих с сетью</text:p></draw:text-box></draw:frame></text:p>
      <text:p text:style-name="P139"/>
      <text:h text:style-name="P140" text:outline-level="3"><text:bookmark-start text:name="__RefHeading___Toc19695_1636301399 Копия 1 Копия 6"/><text:soft-page-break/><text:span text:style-name="T226">2.</text:span>2.<text:span text:style-name="T252">5</text:span> <text:span text:style-name="T256">Модуль логирования</text:span><text:bookmark-end text:name="__RefHeading___Toc19695_1636301399 Копия 1 Копия 6"/></text:h>
      <text:p text:style-name="P139">Класс Logs позволяет записывать сообщения в файл и дублировать их в консоль. Поддерживаются уровни: info(), warning(), error(). Методы доступны из QML, поэтому можно логировать события непосредственно из интерфейса.</text:p>
      <text:h text:style-name="P140" text:outline-level="3"><text:bookmark-start text:name="__RefHeading___Toc19695_1636301399 Копия 1 Копия 7"/><text:span text:style-name="T226">2.</text:span>2.<text:span text:style-name="T252">6</text:span> <text:span text:style-name="T256">Модуль настроек</text:span><text:bookmark-end text:name="__RefHeading___Toc19695_1636301399 Копия 1 Копия 7"/></text:h>
      <text:p text:style-name="P139">Класс Settings использует <text:span text:style-name="T258">макрос</text:span> Q_PROPERTY для привязки свойств к QML. Все параметры (хост, порт БД, адрес сервера, режим, путь к логам) сохраняются в системном реестре или конфигурационном файле через QSettings. Методы load() и save() вызываются при запуске и при закрытии диалога настроек.</text:p>
      <text:h text:style-name="P142" text:outline-level="3"><text:bookmark-start text:name="__RefHeading___Toc19695_1636301399 Копия 1 Копия 8"/><text:span text:style-name="T226">2.</text:span><text:span text:style-name="T251">2.</text:span><text:span text:style-name="T252">7</text:span><text:span text:style-name="T251"> </text:span><text:span text:style-name="T259">Пользовательский интерфейс </text:span><text:span text:style-name="T260">(</text:span><text:span text:style-name="T261">Тут что то не так. </text:span><text:span text:style-name="T262">Возможно, нужно удалить</text:span><text:span text:style-name="T260">)</text:span><text:bookmark-end text:name="__RefHeading___Toc19695_1636301399 Копия 1 Копия 8"/></text:h>
      <text:p text:style-name="P139">В проекте пять QML-файлов:</text:p>
      <text:list text:style-name="L15">
        <text:list-item>
          <text:p text:style-name="P143">LoginPage.qml – форма аутентификации. Содержит поля ввода, кнопки и обработчик вызова dbWorker.checkUser(). При успехе генерирует сигнал loginSuccess.</text:p>
        </text:list-item>
        <text:list-item>
          <text:p text:style-name="P143">Main.qml – главное окно приложения. Управляет навигацией через StackView, отображает ToolBar с кнопкой синхронизации и динамическое Drawer-меню, пункты которого зависят от роли пользователя.</text:p>
        </text:list-item>
        <text:list-item>
          <text:p text:style-name="P143">OrderPage.qml – экран оформления заказа. Связывает модель меню с ListView, реализует фильтрацию через JavaScript-функцию applyFilters(), управляет корзиной заказа и вызывает методы checkAndConsume/returnIngredients.</text:p>
        </text:list-item>
        <text:list-item>
          <text:p text:style-name="P143">StockPage.qml – экран склада. Отображает список продуктов с цветовой индикацией минимальных остатков, предоставляет операции добавления, убавления и установки количества через вызовы addProductQuantity/updateProductQuantity.</text:p>
        </text:list-item>
        <text:list-item>
          <text:p text:style-name="P143"><text:soft-page-break/>ReportsPage.qml – экран отчётов. Содержит динамические наборы фильтров (ComboBox для блюд, официантов) и формирует текстовый вывод, вызывая getReportRevenue и аналогичные методы.</text:p>
        </text:list-item>
      </text:list>
      <text:h text:style-name="P144" text:outline-level="2"><text:bookmark-start text:name="__RefHeading___Toc8898_1636301399"/><text:span text:style-name="T59">2.</text:span><text:span text:style-name="T133">3</text:span> Интеграция программных модулей<text:bookmark-end text:name="__RefHeading___Toc8898_1636301399"/></text:h>
      <text:h text:style-name="P140" text:outline-level="3"><text:bookmark-start text:name="__RefHeading___Toc19695_1636301399 Копия 1 Копия 9"/><text:span text:style-name="T226">2.</text:span><text:span text:style-name="T263">3</text:span>.1 Подключаемые внешние модули<text:bookmark-end text:name="__RefHeading___Toc19695_1636301399 Копия 1 Копия 9"/></text:h>
      <text:p text:style-name="P145">Для взаимодействия с базой данных PostgreSQL используется драйвер QPSQL, входящий в состав модуля Qt SQL, однако сам драйвер опирается на библиотеку libpq (клиентская библиотека PostgreSQL). Без неё невозможно открыть соединение с СУБД. Никакие другие внешние библиотеки, кроме стандартной поставки Qt, не требуются.</text:p>
      <text:h text:style-name="P140" text:outline-level="3"><text:bookmark-start text:name="__RefHeading___Toc19695_1636301399 Копия 1 Копия 10"/><text:span text:style-name="T226">2.</text:span><text:span text:style-name="T263">3</text:span>.<text:span text:style-name="T252">2</text:span> Интеграция C++ и QML<text:bookmark-end text:name="__RefHeading___Toc19695_1636301399 Копия 1 Копия 10"/></text:h>
      <text:p text:style-name="P146">Для использования методов и полей классов в <text:span text:style-name="T134">QML </text:span><text:span text:style-name="T22">файлах, используются Q_PROPERTY, при объявлении полей в заголовочных файлах, и Q_INVOKABLE, при объявлении методов и сигналов. </text:span><text:span text:style-name="T264">Эти макросы позволяют использовать объекты класса, если он зарегистрирован для использования в </text:span><text:span text:style-name="T265">QML. </text:span><text:span text:style-name="T264">Для его регистрации, в </text:span><text:span text:style-name="T265">main </text:span><text:span text:style-name="T264">файле прописывается </text:span><text:span text:style-name="T266">подобный</text:span><text:span text:style-name="T264"> код: DBWorker *worker = new DBWorker(loger, &amp;app);</text:span></text:p>
      <text:p text:style-name="P147">engine.rootContext()-&gt;setContextProperty("dbWorker", worker);</text:p>
      <text:p text:style-name="P148">Таким образом, класс для работы с базой данных регистрируется в программе под именем «<text:span text:style-name="T267">dbWorker</text:span>», в <text:span text:style-name="T134">QML </text:span>файлах его можно использовать именно под таким именем.</text:p>
      <text:p text:style-name="P145"/>
      <text:h text:style-name="P142" text:outline-level="3"><text:bookmark-start text:name="__RefHeading___Toc19695_1636301399 Копия 1 Копия 11"/><text:span text:style-name="T226">2.</text:span><text:span text:style-name="T263">3</text:span><text:span text:style-name="T251">.</text:span><text:span text:style-name="T252">3</text:span><text:span text:style-name="T251"> Клиент-серверное взаимодействие </text:span><text:span text:style-name="T268">(</text:span><text:span text:style-name="T269">Возможно не нужно. </text:span><text:span text:style-name="T270">Либо написать подробнее и исправлено</text:span><text:span text:style-name="T268">)</text:span><text:bookmark-end text:name="__RefHeading___Toc19695_1636301399 Копия 1 Копия 11"/></text:h>
      <text:p text:style-name="P145">Клиент-серверное взаимодействие построено на TCP-сокетах. Протокол прикладного уровня – JSON. Каждое сообщение завершается символом перевода строки (\n), что упрощает разделение пакетов.</text:p>
      <text:p text:style-name="P145">Запрос клиента:</text:p>
      <text:p text:style-name="P145"><text:soft-page-break/>{"command": "getFoods", "requestId": 1}</text:p>
      <text:p text:style-name="P145">Ответ сервера:</text:p>
      <text:p text:style-name="P145">{"response": true, "requestId": 1, "data": {"foods": [...]}}</text:p>
      <text:p text:style-name="P145">TcpClient отправляет запрос, сохраняет requestId и ждёт соответствующего ответа (max 60 секунд). Если ответ не получен – выбрасывается исключение NetworkEx и генерируется сигнал errorOccurred. Сервер (класс TcpServer) при подключении нового клиента создаёт объект ClientConnection, который асинхронно обрабатывает команды, используя переданный ему экземпляр DBWorker. Так достигается параллельность: несколько клиентов обслуживаются одновременно.</text:p>
      <text:h text:style-name="P149" text:outline-level="2"><text:bookmark-start text:name="__RefHeading___Toc8898_1636301399 Копия 1"/><text:span text:style-name="T59">2.</text:span><text:span text:style-name="T271">4</text:span> <text:span text:style-name="T271">Описание программного интерфейса ПС</text:span><text:bookmark-end text:name="__RefHeading___Toc8898_1636301399 Копия 1"/></text:h>
      <text:h text:style-name="Heading_20_3" text:outline-level="3"><text:bookmark-start text:name="__RefHeading___Toc6495_305172339"/><text:span text:style-name="T272">2.4.</text:span>1. Окно авторизации<text:bookmark-end text:name="__RefHeading___Toc6495_305172339"/></text:h>
      <text:p text:style-name="P150">При запуске приложения открывается окно входа в систему.</text:p>
      <text:p text:style-name="P150"/>
      <text:p text:style-name="P150"><draw:frame draw:style-name="fr4" draw:name="Врезка5" text:anchor-type="char" svg:width="17cm" draw:z-index="15"><draw:text-box fo:min-height="13.266cm"><text:p text:style-name="Drawing"><draw:frame draw:style-name="fr2" draw:name="Изображение5" text:anchor-type="paragraph" svg:width="17cm" style:rel-width="100%" svg:height="13.266cm" style:rel-height="scale" draw:z-index="16"><draw:image xlink:href="Pictures/100000010000040100000320FD484C2E.png" xlink:type="simple" xlink:show="embed" xlink:actuate="onLoad" draw:mime-type="image/png"/></draw:frame>Рисунок <text:sequence text:ref-name="refDrawing12" text:name="Drawing" text:formula="ooow:Drawing+1" style:num-format="1">13</text:sequence><text:s/>— Окно авторизации</text:p></draw:text-box></draw:frame><text:soft-page-break/></text:p>
      <text:p text:style-name="P150">Элементы интерфейса:</text:p>
      <text:list text:style-name="L16">
        <text:list-item>
          <text:p text:style-name="P151">Поле «Логин» – введите имя пользователя.</text:p>
        </text:list-item>
        <text:list-item>
          <text:p text:style-name="P151">Поле «Пароль» – введите пароль (символы скрываются).</text:p>
        </text:list-item>
        <text:list-item>
          <text:p text:style-name="P151">Кнопка «Войти» – выполняет проверку данных.</text:p>
        </text:list-item>
        <text:list-item>
          <text:p text:style-name="P151">Кнопка «Настройки» – открывает диалог настройки подключения </text:p>
        </text:list-item>
      </text:list>
      <text:p text:style-name="P152"/>
      <text:h text:style-name="Heading_20_3" text:outline-level="3"><text:bookmark-start text:name="__RefHeading___Toc6497_305172339"/><text:span text:style-name="T272">2.4.</text:span>2. Диалог настроек<text:bookmark-end text:name="__RefHeading___Toc6497_305172339"/></text:h>
      <text:p text:style-name="P152">Диалог предназначен для изменения параметров подключения к серверу и базе данных. Доступен из окна авторизации или из выдвижного меню.</text:p>
      <text:p text:style-name="P152"><draw:frame draw:style-name="fr1" draw:name="Врезка6" text:anchor-type="char" svg:width="17cm" draw:z-index="17"><draw:text-box fo:min-height="13.259cm"><text:p text:style-name="Drawing"><draw:frame draw:style-name="fr2" draw:name="Изображение6" text:anchor-type="paragraph" svg:width="17cm" style:rel-width="100%" svg:height="13.259cm" style:rel-height="scale" draw:z-index="18"><draw:image xlink:href="Pictures/10000001000003FF0000031E87334468.png" xlink:type="simple" xlink:show="embed" xlink:actuate="onLoad" draw:mime-type="image/png"/></draw:frame>Рисунок <text:sequence text:ref-name="refDrawing13" text:name="Drawing" text:formula="ooow:Drawing+1" style:num-format="1">14</text:sequence><text:s/>— Окно настроек</text:p></draw:text-box></draw:frame><text:soft-page-break/></text:p>
      <text:p text:style-name="P152">Содержимое диалога (три группы):</text:p>
      <text:p text:style-name="P152">База данных (видна только в серверном режиме):</text:p>
      <text:list text:style-name="L17">
        <text:list-item>
          <text:p text:style-name="P153">Хост (IP‑адрес сервера БД, по умолчанию 127.0.0.1)</text:p>
        </text:list-item>
        <text:list-item>
          <text:p text:style-name="P153">Порт (по умолчанию 5432)</text:p>
        </text:list-item>
        <text:list-item>
          <text:p text:style-name="P153">Имя базы данных (RestN)</text:p>
        </text:list-item>
        <text:list-item>
          <text:p text:style-name="P153">Пользователь и пароль для доступа к PostgreSQL</text:p>
        </text:list-item>
        <text:list-item>
          <text:p text:style-name="P153">Кнопка «Проверить подключение» – тестирует соединение с БД.</text:p>
        </text:list-item>
        <text:list-item>
          <text:p text:style-name="P153">Поле статуса (успех/ошибка).</text:p>
        </text:list-item>
      </text:list>
      <text:p text:style-name="P152">Сеть:</text:p>
      <text:list text:style-name="L18">
        <text:list-item>
          <text:p text:style-name="P154">IP сервера – адрес устройства, на котором запущен сервер</text:p>
        </text:list-item>
        <text:list-item>
          <text:p text:style-name="P154">Порт сервера (по умолчанию 12345)</text:p>
        </text:list-item>
        <text:list-item>
          <text:p text:style-name="P154"><text:soft-page-break/>Флажок «Режим сервера» – если установлен, приложение будет принимать клиентские подключения и работать напрямую с БД.</text:p>
        </text:list-item>
        <text:list-item>
          <text:p text:style-name="P154">Кнопка «Проверить сервер» – проверяет доступность сервера по указанному IP и порту.</text:p>
        </text:list-item>
        <text:list-item>
          <text:p text:style-name="P154">«Показать IP устройства» – отображает локальные IP‑адреса текущего устройства для настройки клиентов.</text:p>
        </text:list-item>
        <text:list-item>
          <text:p text:style-name="P154">Поле статуса сервера.</text:p>
        </text:list-item>
      </text:list>
      <text:p text:style-name="P152">Прочее:</text:p>
      <text:list text:style-name="L19">
        <text:list-item>
          <text:p text:style-name="P155">Путь к логам – имя файла для записи событий (по умолчанию logs.txt).</text:p>
        </text:list-item>
      </text:list>
      <text:p text:style-name="P152">Сохранение настроек:</text:p>
      <text:list text:style-name="L20">
        <text:list-item>
          <text:p text:style-name="P156">Нажмите «OK» – все параметры сохранятся и сразу применятся.</text:p>
        </text:list-item>
        <text:list-item>
          <text:p text:style-name="P156">Нажмите «Отмена» – изменения будут отброшены.</text:p>
        </text:list-item>
      </text:list>
      <text:p text:style-name="P152"/>
      <text:h text:style-name="P157" text:outline-level="3"><text:bookmark-start text:name="__RefHeading___Toc6499_305172339"/><text:span text:style-name="T273">2.4.</text:span>3. Главное окно и выдвижное меню<text:bookmark-end text:name="__RefHeading___Toc6499_305172339"/></text:h>
      <text:p text:style-name="P152">После авторизации открывается главное окно.</text:p>
      <text:p text:style-name="P152"/>
      <text:p text:style-name="P152"><draw:frame draw:style-name="fr1" draw:name="Врезка7" text:anchor-type="char" svg:width="17cm" draw:z-index="19"><draw:text-box fo:min-height="20.218cm"><text:p text:style-name="Drawing"><draw:frame draw:style-name="fr2" draw:name="Изображение7" text:anchor-type="paragraph" svg:width="17cm" style:rel-width="100%" svg:height="20.218cm" style:rel-height="scale" draw:z-index="20"><draw:image xlink:href="Pictures/100000010000029F0000031E416C704C.png" xlink:type="simple" xlink:show="embed" xlink:actuate="onLoad" draw:mime-type="image/png"/></draw:frame>Рисунок <text:sequence text:ref-name="refDrawing14" text:name="Drawing" text:formula="ooow:Drawing+1" style:num-format="1">15</text:sequence><text:s/>— Выдвижное меню</text:p></draw:text-box></draw:frame><text:soft-page-break/></text:p>
      <text:p text:style-name="P152">В верхней панели находятся:</text:p>
      <text:list text:style-name="L21">
        <text:list-item>
          <text:p text:style-name="P158">Кнопка ☰ – открывает выдвижное меню (Drawer).</text:p>
        </text:list-item>
        <text:list-item>
          <text:p text:style-name="P158">Название «Ресторан» по центру.</text:p>
        </text:list-item>
        <text:list-item>
          <text:p text:style-name="P158"><text:soft-page-break/>Кнопка ⟳ – принудительная синхронизация данных (обновляет списки блюд, продуктов, отчётов).</text:p>
        </text:list-item>
      </text:list>
      <text:p text:style-name="P152">Выдвижное меню:</text:p>
      <text:list text:style-name="L22">
        <text:list-item>
          <text:p text:style-name="P159">Вверху отображается ФИО текущего пользователя.</text:p>
        </text:list-item>
        <text:list-item>
          <text:p text:style-name="P159">Список пунктов <text:span text:style-name="T274">(</text:span>зависит от роли<text:span text:style-name="T274">)</text:span>:</text:p>
        </text:list-item>
        <text:list-item>
          <text:p text:style-name="P159">Официант – «Оформление заказа».</text:p>
        </text:list-item>
        <text:list-item>
          <text:p text:style-name="P159">Кладовщик – «Склад».</text:p>
        </text:list-item>
        <text:list-item>
          <text:p text:style-name="P159">Администратор – «Оформление заказа», «Склад», «Отчёты».</text:p>
        </text:list-item>
        <text:list-item>
          <text:p text:style-name="P159">Кнопка «Настройки» – открывает диалог настроек.</text:p>
        </text:list-item>
        <text:list-item>
          <text:p text:style-name="P159">Кнопка «Выйти» – завершает сеанс и возвращает к окну авторизации.</text:p>
        </text:list-item>
        <text:list-item>
          <text:p text:style-name="P159">Кнопка «Закрыть приложение» – полностью выходит из программы.</text:p>
        </text:list-item>
        <text:list-item>
          <text:p text:style-name="P159">Чтобы закрыть меню, коснитесь области вне его или нажмите кнопку ☰ повторно.</text:p>
        </text:list-item>
      </text:list>
      <text:p text:style-name="P152"/>
      <text:h text:style-name="Heading_20_3" text:outline-level="3"><text:bookmark-start text:name="__RefHeading___Toc6501_305172339"/><text:span text:style-name="T272">2.4.</text:span>4. Оформление заказа (страница для официанта)<text:bookmark-end text:name="__RefHeading___Toc6501_305172339"/></text:h>
      <text:p text:style-name="P152">Страница (Рисунок В.5) разделена на две колонки: слева – меню блюд, справа – текущий заказ.</text:p>
      <text:p text:style-name="P152"><draw:frame draw:style-name="fr1" draw:name="Врезка8" text:anchor-type="char" svg:width="17cm" draw:z-index="21"><draw:text-box fo:min-height="13.298cm"><text:p text:style-name="Drawing"><draw:frame draw:style-name="fr2" draw:name="Изображение8" text:anchor-type="paragraph" svg:width="17cm" style:rel-width="100%" svg:height="13.298cm" style:rel-height="scale" draw:z-index="22"><draw:image xlink:href="Pictures/10000001000003FC0000031EFD3F3B7D.png" xlink:type="simple" xlink:show="embed" xlink:actuate="onLoad" draw:mime-type="image/png"/></draw:frame>Рисунок <text:sequence text:ref-name="refDrawing15" text:name="Drawing" text:formula="ooow:Drawing+1" style:num-format="1">16</text:sequence><text:s/>— Страница оформления заказов</text:p></draw:text-box></draw:frame><text:soft-page-break/></text:p>
      <text:p text:style-name="P152">Левая колонка – меню:</text:p>
      <text:list text:style-name="L23">
        <text:list-item>
          <text:p text:style-name="P160">Выпадающий список «Категория» – фильтр по типу блюд (Супы, Горячее, Салаты, Напитки, Все).</text:p>
        </text:list-item>
        <text:list-item>
          <text:p text:style-name="P160">Флажок «Только доступные» – скрывает блюда, временно отсутствующие из‑за нехватки ингредиентов.</text:p>
        </text:list-item>
        <text:list-item>
          <text:p text:style-name="P160">Под фильтрами – список блюд с названием, ценой, категорией, описанием и составом. Недоступные блюда выделены красной надписью «Нет в наличии».</text:p>
        </text:list-item>
        <text:list-item>
          <text:p text:style-name="P160">Чтобы выбрать блюдо – нажмите на него (оно подсветится).</text:p>
        </text:list-item>
      </text:list>
      <text:p text:style-name="P152">Правая колонка – оформление:</text:p>
      <text:list text:style-name="L24">
        <text:list-item>
          <text:p text:style-name="P161">Группа «Текущий заказ» – список добавленных блюд с количеством.</text:p>
        </text:list-item>
        <text:list-item>
          <text:p text:style-name="P161"><text:soft-page-break/>Поле «Столик №» – номер столика (от 1 до 50).</text:p>
        </text:list-item>
        <text:list-item>
          <text:p text:style-name="P161">Поле «Кол-во» – количество порций (от 1 до 10).</text:p>
        </text:list-item>
        <text:list-item>
          <text:p text:style-name="P161">Поле «Комментарий» – особые пожелания (например, «без лука»).</text:p>
        </text:list-item>
        <text:list-item>
          <text:p text:style-name="P161">Кнопка «Добавить» – добавляет выбранное блюдо в заказ. Перед добавлением проверяется наличие ингредиентов; если после добавления остатки станут ниже минимального порога – программа предупредит, но позволит продолжить. Если ингредиентов не хватает – появится ошибка.</text:p>
        </text:list-item>
        <text:list-item>
          <text:p text:style-name="P161">Кнопка «Удалить» – убирает выбранное блюдо из текущего заказа и возвращает ингредиенты на склад.</text:p>
        </text:list-item>
        <text:list-item>
          <text:p text:style-name="P161">Кнопка «Оформить заказ» – фиксирует заказ в системе: списываются ингредиенты, создаётся запись в базе. После оформления корзина очищается, и список блюд обновляется.</text:p>
        </text:list-item>
      </text:list>
      <text:p text:style-name="P152"/>
      <text:h text:style-name="Heading_20_3" text:outline-level="3"><text:bookmark-start text:name="__RefHeading___Toc6503_305172339"/><text:span text:style-name="T272">2.4.</text:span>5. Управление складом (страница для кладовщика)<text:bookmark-end text:name="__RefHeading___Toc6503_305172339"/></text:h>
      <text:p text:style-name="P152">Страница отображает полный список продуктов.</text:p>
      <text:p text:style-name="P152"><draw:frame draw:style-name="fr1" draw:name="Врезка9" text:anchor-type="char" svg:width="17cm" draw:z-index="23"><draw:text-box fo:min-height="13.249cm"><text:p text:style-name="Drawing"><draw:frame draw:style-name="fr2" draw:name="Изображение9" text:anchor-type="paragraph" svg:width="17cm" style:rel-width="100%" svg:height="13.249cm" style:rel-height="scale" draw:z-index="24"><draw:image xlink:href="Pictures/10000001000003FC0000031BA24A4AC1.png" xlink:type="simple" xlink:show="embed" xlink:actuate="onLoad" draw:mime-type="image/png"/></draw:frame>Рисунок <text:sequence text:ref-name="refDrawing16" text:name="Drawing" text:formula="ooow:Drawing+1" style:num-format="1">17</text:sequence><text:s/>— Страница управления складом</text:p></draw:text-box></draw:frame><text:soft-page-break/></text:p>
      <text:p text:style-name="P152">Основные элементы:</text:p>
      <text:list text:style-name="L25">
        <text:list-item>
          <text:p text:style-name="P162">Список продуктов – каждая строка содержит название и текущее количество в единицах измерения (кг, л, шт.). Продукты, количество которых ниже минимального порога, подсвечены розовым фоном.</text:p>
        </text:list-item>
        <text:list-item>
          <text:p text:style-name="P162">Выбор продукта – нажмите на строку.</text:p>
        </text:list-item>
        <text:list-item>
          <text:p text:style-name="P162">Поле «Количество» – введите число (только целое от 0 до 10000).</text:p>
        </text:list-item>
        <text:list-item>
          <text:p text:style-name="P162">Кнопка «Добавить» – увеличивает остаток выбранного продукта на введённое значение.</text:p>
        </text:list-item>
        <text:list-item>
          <text:p text:style-name="P162">Кнопка «Убавить» – уменьшает остаток (если результат неотрицательный).</text:p>
        </text:list-item>
        <text:list-item>
          <text:p text:style-name="P162"><text:soft-page-break/>Кнопка «Установить» – устанавливает точное значение остатка равным введённому числу.</text:p>
        </text:list-item>
      </text:list>
      <text:p text:style-name="P152">После любого изменения данные отправляются на сервер, а список автоматически обновляется. Если произошла ошибка (например, нет связи с сервером), появится сообщение.</text:p>
      <text:p text:style-name="P152"/>
      <text:h text:style-name="Heading_20_3" text:outline-level="3"><text:bookmark-start text:name="__RefHeading___Toc6505_305172339"/><text:span text:style-name="T272">2.4.</text:span>6. Отчёты (страница для администратора)<text:bookmark-end text:name="__RefHeading___Toc6505_305172339"/></text:h>
      <text:p text:style-name="P152">Страница позволяет формировать три типа отчётов.</text:p>
      <text:p text:style-name="P152"><draw:frame draw:style-name="fr1" draw:name="Врезка10" text:anchor-type="char" svg:width="17cm" draw:z-index="25"><draw:text-box fo:min-height="9.382cm"><text:p text:style-name="Drawing"><draw:frame draw:style-name="fr2" draw:name="Изображение10" text:anchor-type="paragraph" svg:width="17cm" style:rel-width="100%" svg:height="9.382cm" style:rel-height="scale" draw:z-index="26"><draw:image xlink:href="Pictures/10000001000003FC00000233816AA6CC.png" xlink:type="simple" xlink:show="embed" xlink:actuate="onLoad" draw:mime-type="image/png"/></draw:frame>Рисунок <text:sequence text:ref-name="refDrawing17" text:name="Drawing" text:formula="ooow:Drawing+1" style:num-format="1">18</text:sequence><text:s/>— Страница отчётов</text:p></draw:text-box></draw:frame></text:p>
      <text:p text:style-name="P152">Выбор отчёта <text:span text:style-name="T275">происходит выбором из</text:span> выпадающ<text:span text:style-name="T275">его</text:span> списк<text:span text:style-name="T275">а</text:span> в верхней части:</text:p>
      <text:list text:style-name="L26">
        <text:list-item>
          <text:p text:style-name="P163">Выручка – общая сумма заказов за период.</text:p>
        </text:list-item>
        <text:list-item>
          <text:p text:style-name="P163">Популярность блюд – сколько раз (суммарно порций) заказывалось каждое блюдо.</text:p>
        </text:list-item>
        <text:list-item>
          <text:p text:style-name="P163">Малые остатки – список продуктов, у которых текущий остаток ниже минимального порога.</text:p>
        </text:list-item>
      </text:list>
      <text:p text:style-name="P152">Фильтры (для «Выручка» и «Популярность блюд»):</text:p>
      <text:list text:style-name="L27">
        <text:list-item>
          <text:p text:style-name="P164"><text:soft-page-break/>Дата «с» и «по» (формат ГГГГ-ММ-ДД).</text:p>
        </text:list-item>
        <text:list-item>
          <text:p text:style-name="P164">Блюдо – можно выбрать конкретное блюдо (или «Все блюда»).</text:p>
        </text:list-item>
        <text:list-item>
          <text:p text:style-name="P164">Столик – номер столика (0 – все).</text:p>
        </text:list-item>
        <text:list-item>
          <text:p text:style-name="P164">Официант – конкретный сотрудник (или «Все официанты»).</text:p>
        </text:list-item>
      </text:list>
      <text:p text:style-name="P152">Формирование:</text:p>
      <text:list text:style-name="L28">
        <text:list-item>
          <text:p text:style-name="P165">Нажмите «Сформировать».</text:p>
        </text:list-item>
        <text:list-item>
          <text:p text:style-name="P165">В нижней области появится результат.</text:p>
        </text:list-item>
      </text:list>
      <text:p text:style-name="P152">Если за указанный период нет заказов, будет выведено соответствующее сообщение. Некорректно введённые даты также вызовут предупреждение.</text:p>
      <text:p text:style-name="P152"/>
      <text:h text:style-name="P11" text:outline-level="1"><text:bookmark-start text:name="__RefHeading___Toc8902_1636301399"/>ЗАКЛЮЧЕНИЕ<text:bookmark-end text:name="__RefHeading___Toc8902_1636301399"/></text:h>
      <text:p text:style-name="P166">Заполнить</text:p>
      <text:h text:style-name="P11" text:outline-level="1"><text:bookmark-start text:name="__RefHeading___Toc8904_1636301399"/>СПИСОК ИСПОЛЬЗОВАННЫХ ИСТОЧНИКОВ<text:bookmark-end text:name="__RefHeading___Toc8904_1636301399"/></text:h>
      <text:p text:style-name="P3"/>
      <text:list text:style-name="Нумерация_20_источников">
        <text:list-item>
          <text:p text:style-name="P167"><text:bookmark-start text:name="__RefNumPara__4997_2159724457"/>ГОСТ 30389-2013. Услуги общественного питания. Предприятия общественного питания. Классификация и общие требования. — М.: Стандартинформ, 2014. — 16 с.<text:bookmark-end text:name="__RefNumPara__4997_2159724457"/></text:p>
        </text:list-item>
        <text:list-item>
          <text:p text:style-name="P167"><text:bookmark-start text:name="__RefNumPara__4995_2159724457"/>ГОСТ 31985-2013. Услуги общественного питания. Термины и определения. — М.: Стандартинформ, 2014. — 12 с.<text:bookmark-end text:name="__RefNumPara__4995_2159724457"/></text:p>
        </text:list-item>
        <text:list-item>
          <text:p text:style-name="P168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167"><text:bookmark-start text:name="__RefNumPara__5190_2159724457"/>Инженерия программного обеспечения, 6-е издание. : Пер. с англ. — М. : Издательский дом "Вильяме", 2002 — 624 с. : ил. — Парал. тит. англ.<text:bookmark-end text:name="__RefNumPara__5190_2159724457"/></text:p>
        </text:list-item>
        <text:list-item>
          <text:p text:style-name="P167"><text:bookmark-start text:name="__RefNumPara__5090_2159724457"/>Лебедев Е. Технологии помогают избежать штрафов: об осознанной автоматизации ресторана. — М.: Tochka.com, 2024. — URL: https://allo.tochka.com/restaurant-automatization<text:bookmark-end text:name="__RefNumPara__5090_2159724457"/></text:p>
        </text:list-item>
        <text:list-item>
          <text:p text:style-name="P167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167"><text:bookmark-start text:name="__RefNumPara__5637_2159724457"/>Стоунз Р., Мэтью Н. PostgreSQL. Основы. – Пер. с англ. – СПб: Символ Плюс, 2002 – 640 с., ил. ISBN 5 93286 043 X<text:bookmark-end text:name="__RefNumPara__5637_2159724457"/></text:p>
        </text:list-item>
        <text:list-item>
          <text:p text:style-name="P167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</text:list-item>
        <text:list-item>
          <text:p text:style-name="P167"><text:bookmark-start text:name="__RefNumPara__4213_1852506125"/><text:soft-page-break/>ЛАБОРАТОРНАЯ РАБОТА №3 по теме: «Показатели экономической эффективности».<text:bookmark-end text:name="__RefNumPara__4213_1852506125"/></text:p>
          <text:p text:style-name="P169"/>
        </text:list-item>
      </text:list>
      <text:h text:style-name="P170" text:outline-level="1"><text:bookmark-start text:name="__RefHeading___Toc8906_1636301399"/>П<text:span text:style-name="T276">РИЛОЖЕНИЕ</text:span> А<text:bookmark-end text:name="__RefHeading___Toc8906_1636301399"/></text:h>
      <text:h text:style-name="P171" text:outline-level="1"/>
      <text:h text:style-name="P171" text:outline-level="1"><text:bookmark-start text:name="__RefHeading___Toc1720_2115060514"/>Листинги <text:span text:style-name="T277">ключевых фрагментов программного кода</text:span><text:bookmark-end text:name="__RefHeading___Toc1720_2115060514"/></text:h>
      <text:p text:style-name="P172">Листинг <text:sequence text:ref-name="refЛистинг0" text:name="Листинг" text:formula="ooow:Листинг+1" style:num-format="1">1</text:sequence><text:s/>— Файл <text:span text:style-name="T278">dbworker</text:span>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style-name="Нумерация_20_строк_20_кода">
              <text:list-item text:start-value="1">
                <text:p text:style-name="P173">#include "dbworker.h"</text:p>
              </text:list-item>
              <text:list-item>
                <text:p text:style-name="P173">#include &lt;QCryptographicHash&gt;</text:p>
              </text:list-item>
              <text:list-item>
                <text:p text:style-name="P173">#include &lt;QRandomGenerator&gt;</text:p>
              </text:list-item>
              <text:list-item>
                <text:p text:style-name="P173">#include &lt;QSqlRecord&gt;</text:p>
              </text:list-item>
              <text:list-item>
                <text:p text:style-name="P173">#include &lt;qdatetime.h&gt;</text:p>
              </text:list-item>
              <text:list-item>
                <text:p text:style-name="P173">#include &lt;QNetworkInterface&gt;</text:p>
              </text:list-item>
              <text:list-item>
                <text:p text:style-name="P173">#include &lt;QAbstractSocket&gt;</text:p>
              </text:list-item>
              <text:list-item>
                <text:p text:style-name="P173"/>
              </text:list-item>
            </text:list>
          </table:table-cell>
        </table:table-row>
      </table:table>
      <text:p text:style-name="P3"/>
      <text:p text:style-name="P174"><text:span text:style-name="T278"/></text:p>
      <text:p text:style-name="P175"/>
      <text:p text:style-name="P3"/>
      <text:h text:style-name="P170" text:outline-level="1"><text:bookmark-start text:name="__RefHeading___Toc8908_1636301399 Копия 1"/>П<text:span text:style-name="T276">РИЛОЖЕНИЕ</text:span> <text:span text:style-name="T133">Б</text:span><text:bookmark-end text:name="__RefHeading___Toc8908_1636301399 Копия 1"/></text:h>
      <text:h text:style-name="P176" text:outline-level="1"/>
      <text:h text:style-name="P177" text:outline-level="1"><text:bookmark-start text:name="__RefHeading___Toc1722_2115060514"/>Диаграммы<text:bookmark-end text:name="__RefHeading___Toc1722_2115060514"/></text:h>
      <text:p text:style-name="P178"/>
      <text:p text:style-name="P178"/>
      <text:h text:style-name="P170" text:outline-level="1"><text:bookmark-start text:name="__RefHeading___Toc8908_1636301399"/>П<text:span text:style-name="T276">РИЛОЖЕНИЕ</text:span> <text:span text:style-name="T133">В</text:span><text:bookmark-end text:name="__RefHeading___Toc8908_1636301399"/></text:h>
      <text:h text:style-name="P171" text:outline-level="1"/>
      <text:h text:style-name="P177" text:outline-level="1"><text:bookmark-start text:name="__RefHeading___Toc1724_2115060514"/>Тест-кейсы и тест сьюты<text:bookmark-end text:name="__RefHeading___Toc1724_2115060514"/></text:h>
      <text:p text:style-name="P3"/>
      <text:p text:style-name="P179"/>
      <text:p text:style-name="P180"/>
      <text:p text:style-name="P180"/>
      <text:p text:style-name="P180"/>
      <text:p text:style-name="P180"/>
      <text:h text:style-name="P181" text:outline-level="1"><text:bookmark-start text:name="__RefHeading___Toc8908_1636301399 Копия 2"/>П<text:span text:style-name="T276">РИЛОЖЕНИЕ</text:span> <text:span text:style-name="T279">Г</text:span><text:bookmark-end text:name="__RefHeading___Toc8908_1636301399 Копия 2"/></text:h>
      <text:h text:style-name="P182" text:outline-level="1"/>
      <text:h text:style-name="P183" text:outline-level="1"><text:bookmark-start text:name="__RefHeading___Toc1724_2115060514 Копия 1"/>Содержание электронного носителя<text:bookmark-end text:name="__RefHeading___Toc1724_2115060514 Копия 1"/></text:h>
      <text:p text:style-name="P1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1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11:48:38.263020263</meta:creation-date>
    <meta:editing-duration>P1DT7H55M32S</meta:editing-duration>
    <meta:editing-cycles>480</meta:editing-cycles>
    <meta:generator>LibreOffice/25.8.5.2$Windows_X86_64 LibreOffice_project/9c8b85f387cc00a89945a79c9e6239f32e450ac2</meta:generator>
    <dc:date>2026-05-04T00:19:51.742457600</dc:date>
    <meta:print-date>2026-05-03T19:58:08.293128800</meta:print-date>
    <meta:printed-by>Файлы PDF</meta:printed-by>
    <meta:document-statistic meta:table-count="6" meta:image-count="18" meta:object-count="3" meta:page-count="49" meta:paragraph-count="485" meta:word-count="4980" meta:character-count="38264" meta:non-whitespace-character-count="33701"/>
  </office:meta>
</office:document-meta>
</file>

<file path=Object 1/content.xml><?xml version="1.0" encoding="utf-8"?>
<math xmlns="http://www.w3.org/1998/Math/MathML" display="block">
  <semantics>
    <mrow>
      <mi>С</mi>
      <mo stretchy="false">=</mo>
      <mrow>
        <msub>
          <mi>М</mi>
          <mi mathvariant="italic">вс</mi>
        </msub>
        <mo stretchy="false">+</mo>
        <mi>Э</mi>
        <mo stretchy="false">+</mo>
        <msubsup>
          <mi>З</mi>
          <mi mathvariant="italic">зп</mi>
          <mi>о</mi>
        </msubsup>
        <mo stretchy="false">+</mo>
        <msubsup>
          <mi>З</mi>
          <mi mathvariant="italic">зп</mi>
          <mi>д</mi>
        </msubsup>
        <mo stretchy="false">+</mo>
        <msub>
          <mi>З</mi>
          <mi mathvariant="italic">сн</mi>
        </msub>
        <mo stretchy="false">+</mo>
        <mi>Н</mi>
      </mrow>
    </mrow>
    <annotation encoding="StarMath 5.0">С = М_вс + Э + З_зп^о + З_зп^д + З_сн + Н
</annotation>
  </semantics>
</math>
</file>

<file path=Object 2/content.xml><?xml version="1.0" encoding="utf-8"?>
<math xmlns="http://www.w3.org/1998/Math/MathML" display="block">
  <semantics>
    <mrow>
      <mrow>
        <msub>
          <mi>Э</mi>
          <mi mathvariant="italic">эф</mi>
        </msub>
        <mo stretchy="false">=</mo>
        <mi>N</mi>
      </mrow>
      <mi>·</mi>
      <mrow>
        <mo fence="true" form="prefix" stretchy="false">(</mo>
        <mrow>
          <mrow>
            <msub>
              <mi>t</mi>
              <mn>1</mn>
            </msub>
            <mi>—</mi>
            <msub>
              <mi>t</mi>
              <mn>2</mn>
            </msub>
          </mrow>
        </mrow>
        <mo fence="true" form="postfix" stretchy="false">)</mo>
      </mrow>
      <mi>·</mi>
      <msub>
        <mi>C</mi>
        <mi mathvariant="italic">чтс</mi>
      </msub>
      <mi>·</mi>
      <msub>
        <mi>К</mi>
        <mi mathvariant="italic">доп</mi>
      </msub>
      <mi>·</mi>
      <msub>
        <mi>К</mi>
        <mi mathvariant="italic">сн</mi>
      </msub>
      <mi>—</mi>
      <msub>
        <mi>Е</mi>
        <mi>н</mi>
      </msub>
      <mi>·</mi>
      <mi>К</mi>
    </mrow>
    <annotation encoding="StarMath 5.0">Э_эф = N · (t_1 — t_2) · C_чтс · К_доп · К_сн — Е_н · К</annotation>
  </semantics>
</math>
</file>

<file path=Object 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sub>
          <mi>С</mi>
          <mi mathvariant="italic">пр</mi>
        </msub>
        <mrow>
          <msub>
            <mi>С</mi>
            <mn>1</mn>
          </msub>
          <mo stretchy="false">−</mo>
          <msub>
            <mi>С</mi>
            <mn>2</mn>
          </msub>
        </mrow>
      </mfrac>
    </mrow>
    <annotation encoding="StarMath 5.0">Т_ок = frac {С_пр} {С_1 - С_2} 
</annotation>
  </semantics>
</math>
</file>