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PT_Astra_Sans_2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content.xml" manifest:media-type="text/xml"/>
  <manifest:file-entry manifest:full-path="Pictures/1000000000000500000003D2BC888963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11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officeooo:rsid="0193909b" officeooo:paragraph-rsid="0193909b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1d3118c" officeooo:paragraph-rsid="01d3118c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8" style:family="paragraph" style:parent-style-name="Text_20_body">
      <style:paragraph-properties fo:line-height="100%"/>
    </style:style>
    <style:style style:name="P19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Text_20_body">
      <style:paragraph-properties fo:margin-left="0.004cm" fo:margin-right="0.247cm" fo:margin-top="0.42cm" fo:margin-bottom="0cm" style:contextual-spacing="false" fo:text-align="justify" style:justify-single-word="false" fo:text-indent="0cm" style:auto-text-indent="false"/>
      <style:text-properties officeooo:paragraph-rsid="019b08ae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paragraph-properties fo:text-align="justify" style:justify-single-word="false"/>
      <style:text-properties officeooo:paragraph-rsid="01d731fd"/>
    </style:style>
    <style:style style:name="P24" style:family="paragraph" style:parent-style-name="Text_20_body" style:list-style-name="L2">
      <style:paragraph-properties fo:text-align="justify" style:justify-single-word="false"/>
      <style:text-properties officeooo:rsid="01d0cd21" officeooo:paragraph-rsid="01d731fd"/>
    </style:style>
    <style:style style:name="P25" style:family="paragraph" style:parent-style-name="Text_20_body" style:list-style-name="L2">
      <style:paragraph-properties fo:text-align="justify" style:justify-single-word="false"/>
      <style:text-properties officeooo:rsid="01d28548" officeooo:paragraph-rsid="01d731fd"/>
    </style:style>
    <style:style style:name="P26" style:family="paragraph" style:parent-style-name="Text_20_body" style:list-style-name="L3">
      <style:paragraph-properties fo:text-align="justify" style:justify-single-word="false"/>
      <style:text-properties officeooo:rsid="01d28548" officeooo:paragraph-rsid="01d731fd"/>
    </style:style>
    <style:style style:name="P27" style:family="paragraph" style:parent-style-name="Text_20_body" style:list-style-name="L3">
      <style:paragraph-properties fo:text-align="justify" style:justify-single-word="false"/>
      <style:text-properties officeooo:rsid="01d45619" officeooo:paragraph-rsid="01d731fd"/>
    </style:style>
    <style:style style:name="P28" style:family="paragraph" style:parent-style-name="Text_20_body" style:list-style-name="L1">
      <style:paragraph-properties fo:text-align="justify" style:justify-single-word="false"/>
      <style:text-properties officeooo:paragraph-rsid="01d7e1c7"/>
    </style:style>
    <style:style style:name="P29" style:family="paragraph" style:parent-style-name="Text_20_body" style:list-style-name="L1">
      <style:paragraph-properties fo:text-align="justify" style:justify-single-word="false"/>
      <style:text-properties officeooo:paragraph-rsid="01d99ba5"/>
    </style:style>
    <style:style style:name="P30" style:family="paragraph" style:parent-style-name="Text_20_body" style:list-style-name="L4">
      <style:paragraph-properties fo:text-align="justify" style:justify-single-word="false"/>
      <style:text-properties officeooo:paragraph-rsid="01d99ba5"/>
    </style:style>
    <style:style style:name="P31" style:family="paragraph" style:parent-style-name="Text_20_body" style:list-style-name="L1">
      <style:paragraph-properties fo:text-align="justify" style:justify-single-word="false"/>
      <style:text-properties officeooo:paragraph-rsid="01da7bb7"/>
    </style:style>
    <style:style style:name="P32" style:family="paragraph" style:parent-style-name="Standard" style:list-style-name="L1">
      <style:text-properties officeooo:rsid="01d32893" officeooo:paragraph-rsid="01dc6816"/>
    </style:style>
    <style:style style:name="P33" style:family="paragraph" style:parent-style-name="Text_20_body" style:list-style-name="L1">
      <style:text-properties officeooo:rsid="01d49781" officeooo:paragraph-rsid="01dc6816"/>
    </style:style>
    <style:style style:name="P34" style:family="paragraph" style:parent-style-name="Text_20_body" style:list-style-name="L5">
      <style:text-properties officeooo:rsid="01d49781" officeooo:paragraph-rsid="01dc6816"/>
    </style:style>
    <style:style style:name="P35" style:family="paragraph" style:parent-style-name="Text_20_body" style:list-style-name="L5">
      <style:text-properties officeooo:rsid="01d5330d" officeooo:paragraph-rsid="01dc6816"/>
    </style:style>
    <style:style style:name="P36" style:family="paragraph" style:parent-style-name="Text_20_body" style:list-style-name="L5">
      <style:text-properties officeooo:rsid="01d693e3" officeooo:paragraph-rsid="01dc6816"/>
    </style:style>
    <style:style style:name="P37" style:family="paragraph" style:parent-style-name="Text_20_body" style:list-style-name="L1">
      <style:text-properties officeooo:paragraph-rsid="01dd5c1a"/>
    </style:style>
    <style:style style:name="P38" style:family="paragraph" style:parent-style-name="Text_20_body" style:list-style-name="L6">
      <style:text-properties officeooo:paragraph-rsid="01dd5c1a"/>
    </style:style>
    <style:style style:name="P39" style:family="paragraph" style:parent-style-name="Heading_20_2">
      <style:text-properties officeooo:rsid="01ca9b1d" officeooo:paragraph-rsid="01ca9b1d"/>
    </style:style>
    <style:style style:name="P40" style:family="paragraph" style:parent-style-name="Text_20_body">
      <style:text-properties officeooo:rsid="01cf69e5" officeooo:paragraph-rsid="01cf69e5"/>
    </style:style>
    <style:style style:name="P41" style:family="paragraph" style:parent-style-name="Text_20_body">
      <style:text-properties officeooo:rsid="01d0afb8" officeooo:paragraph-rsid="01d0afb8"/>
    </style:style>
    <style:style style:name="P42" style:family="paragraph" style:parent-style-name="Heading_20_2">
      <style:text-properties officeooo:paragraph-rsid="01d0afb8"/>
    </style:style>
    <style:style style:name="P43" style:family="paragraph" style:parent-style-name="Text_20_body" style:list-style-name="L7"/>
    <style:style style:name="P44" style:family="paragraph" style:parent-style-name="Text_20_body" style:list-style-name="L7">
      <style:text-properties officeooo:rsid="01d26f18" officeooo:paragraph-rsid="01d26f18"/>
    </style:style>
    <style:style style:name="P45" style:family="paragraph" style:parent-style-name="Standard">
      <style:text-properties officeooo:paragraph-rsid="01de3424"/>
    </style:style>
    <style:style style:name="P46" style:family="paragraph" style:parent-style-name="Text_20_body">
      <style:text-properties officeooo:paragraph-rsid="01de3424"/>
    </style:style>
    <style:style style:name="P47" style:family="paragraph" style:parent-style-name="Text_20_body">
      <style:text-properties fo:language="en" fo:country="US" officeooo:rsid="02e3f592" officeooo:paragraph-rsid="01de3424"/>
    </style:style>
    <style:style style:name="P48" style:family="paragraph" style:parent-style-name="Рис.">
      <style:text-properties officeooo:paragraph-rsid="02e66586"/>
    </style:style>
    <style:style style:name="P49" style:family="paragraph" style:parent-style-name="Text_20_body">
      <style:text-properties officeooo:rsid="01c74e2a"/>
    </style:style>
    <style:style style:name="P50" style:family="paragraph" style:parent-style-name="Heading_20_2">
      <style:text-properties officeooo:rsid="01e1d7c0" officeooo:paragraph-rsid="01e1d7c0"/>
    </style:style>
    <style:style style:name="P51" style:family="paragraph" style:parent-style-name="Text_20_body">
      <style:text-properties officeooo:rsid="01e1d7c0" officeooo:paragraph-rsid="01e1d7c0"/>
    </style:style>
    <style:style style:name="P52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P53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P54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P56" style:family="paragraph" style:parent-style-name="Text_20_body">
      <style:paragraph-properties fo:margin-left="0.035cm" fo:margin-right="0cm" fo:margin-top="0.016cm" fo:margin-bottom="0cm" style:contextual-spacing="false"/>
    </style:style>
    <style:style style:name="P57" style:family="paragraph" style:parent-style-name="Text_20_body">
      <style:paragraph-properties fo:margin-left="0.035cm" fo:margin-right="0cm" fo:margin-top="0.018cm" fo:margin-bottom="0cm" style:contextual-spacing="false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1c14592"/>
    </style:style>
    <style:style style:name="T3" style:family="text">
      <style:text-properties style:font-name="PT Astra Serif2" fo:font-size="20.7999992370605pt" fo:language="en" fo:country="US" fo:font-weight="bold" officeooo:rsid="01ca9b1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style:font-name="PT Astra Serif2" fo:font-size="20.7999992370605pt" fo:language="en" fo:country="US" fo:font-weight="bold" officeooo:rsid="01a5919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officeooo:rsid="01d3118c"/>
    </style:style>
    <style:style style:name="T10" style:family="text">
      <style:text-properties officeooo:rsid="00160dc7"/>
    </style:style>
    <style:style style:name="T11" style:family="text">
      <style:text-properties officeooo:rsid="011b053c"/>
    </style:style>
    <style:style style:name="T12" style:family="text">
      <style:text-properties fo:language="ru" fo:country="RU" officeooo:rsid="005e1027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9bf97" style:font-style-asian="normal" style:font-style-complex="normal"/>
    </style:style>
    <style:style style:name="T15" style:family="text">
      <style:text-properties fo:font-style="normal" officeooo:rsid="00e01459" style:font-style-asian="normal" style:font-style-complex="normal"/>
    </style:style>
    <style:style style:name="T16" style:family="text">
      <style:text-properties fo:letter-spacing="-0.002cm"/>
    </style:style>
    <style:style style:name="T17" style:family="text">
      <style:text-properties fo:letter-spacing="-0.004cm"/>
    </style:style>
    <style:style style:name="T18" style:family="text">
      <style:text-properties officeooo:rsid="01ca9b1d"/>
    </style:style>
    <style:style style:name="T19" style:family="text">
      <style:text-properties officeooo:rsid="01c285a9"/>
    </style:style>
    <style:style style:name="T20" style:family="text">
      <style:text-properties officeooo:rsid="01a77d50"/>
    </style:style>
    <style:style style:name="T21" style:family="text">
      <style:text-properties officeooo:rsid="021cb759"/>
    </style:style>
    <style:style style:name="T22" style:family="text">
      <style:text-properties officeooo:rsid="01d0cd21"/>
    </style:style>
    <style:style style:name="T23" style:family="text">
      <style:text-properties officeooo:rsid="01d28548"/>
    </style:style>
    <style:style style:name="T24" style:family="text">
      <style:text-properties officeooo:rsid="021d48ad"/>
    </style:style>
    <style:style style:name="T25" style:family="text">
      <style:text-properties officeooo:rsid="01d45619"/>
    </style:style>
    <style:style style:name="T26" style:family="text">
      <style:text-properties officeooo:rsid="01d49faf"/>
    </style:style>
    <style:style style:name="T27" style:family="text">
      <style:text-properties officeooo:rsid="01d49781"/>
    </style:style>
    <style:style style:name="T28" style:family="text">
      <style:text-properties officeooo:rsid="01f9a681"/>
    </style:style>
    <style:style style:name="T29" style:family="text">
      <style:text-properties officeooo:rsid="01d693e3"/>
    </style:style>
    <style:style style:name="T30" style:family="text">
      <style:text-properties officeooo:rsid="01fbc517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1d0afb8"/>
    </style:style>
    <style:style style:name="T33" style:family="text">
      <style:text-properties officeooo:rsid="01dddd2d"/>
    </style:style>
    <style:style style:name="T34" style:family="text">
      <style:text-properties officeooo:rsid="02e9fb89"/>
    </style:style>
    <style:style style:name="T35" style:family="text">
      <style:text-properties officeooo:rsid="02ea7725"/>
    </style:style>
    <style:style style:name="T36" style:family="text">
      <style:text-properties officeooo:rsid="02eb3bbc"/>
    </style:style>
    <style:style style:name="T37" style:family="text">
      <style:text-properties officeooo:rsid="029de65b"/>
    </style:style>
    <style:style style:name="T38" style:family="text">
      <style:text-properties officeooo:rsid="029e8940"/>
    </style:style>
    <style:style style:name="T39" style:family="text">
      <style:text-properties officeooo:rsid="02a14431"/>
    </style:style>
    <style:style style:name="T40" style:family="text">
      <style:text-properties fo:language="ru" fo:country="RU"/>
    </style:style>
    <style:style style:name="T41" style:family="text">
      <style:text-properties officeooo:rsid="02a09257"/>
    </style:style>
    <style:style style:name="T42" style:family="text">
      <style:text-properties officeooo:rsid="01e3c714"/>
    </style:style>
    <style:style style:name="T43" style:family="text">
      <style:text-properties fo:font-size="10pt" style:font-size-asian="10pt"/>
    </style:style>
    <style:style style:name="T44" style:family="text">
      <style:text-properties fo:font-size="10pt" fo:letter-spacing="-0.009cm" style:font-size-asian="10pt"/>
    </style:style>
    <style:style style:name="T45" style:family="text">
      <style:text-properties fo:letter-spacing="-0.009cm"/>
    </style:style>
    <style:style style:name="fr1" style:family="graphic" style:parent-style-name="Frame">
      <style:graphic-properties fo:margin-left="0cm" fo:margin-right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СОПРОВОЖДЕНИЕ И ОБСЛУЖИВАНИЕ ПРОГРАММНОГО ОБЕСПЕЧЕНИЯ КОМПЬЮТЕРНЫХ СИСТЕМ</text:p>
      <text:p text:style-name="P8"/>
      <text:p text:style-name="P9"/>
      <text:p text:style-name="P9">ЛАБОРАТОРНАЯ РАБОТА №<text:span text:style-name="T2">1</text:span></text:p>
      <text:p text:style-name="P10">по теме:</text:p>
      <text:h text:style-name="P11" text:outline-level="1"><text:span text:style-name="T3">Модель</text:span><text:span text:style-name="T4"> предметной области</text:span></text:h>
      <text:p text:style-name="Заголовок_20_2_20_титул"/>
      <text:p text:style-name="Заголовок_20_2_20_титул"/>
      <text:p text:style-name="P12"><text:span text:style-name="T5">Выполн</text:span><text:span text:style-name="T6">ил:</text:span><text:span text:style-name="T7"> </text:span></text:p>
      <text:p text:style-name="P12"><text:span text:style-name="T8">студент ЕПК,</text:span> <text:span text:style-name="T9">И-42 группы</text:span></text:p>
      <text:p text:style-name="P13">Самсыка Р. М.</text:p>
      <text:p text:style-name="P14"/>
      <text:p text:style-name="P15"><text:span text:style-name="T8">Проверил</text:span>:</text:p>
      <text:p text:style-name="P16"><text:span text:style-name="T8">преподаватель</text:span><text:span text:style-name="T10"> </text:span><text:span text:style-name="T11">спец</text:span><text:span text:style-name="T12">дисциплин</text:span></text:p>
      <text:p text:style-name="P17">Фомин А. Т.</text:p>
      <text:p text:style-name="P18"/>
      <text:p text:style-name="P18"/>
      <text:p text:style-name="P18"/>
      <text:p text:style-name="P18"/>
      <text:p text:style-name="P18"/>
      <text:p text:style-name="P4"/>
      <text:p text:style-name="P4"/>
      <text:p text:style-name="P4"/>
      <text:p text:style-name="P4"/>
      <text:p text:style-name="P19"><text:span text:style-name="Emphasis"/></text:p>
      <text:p text:style-name="P4">Ейск <text:span text:style-name="Emphasis"><text:span text:style-name="T13">20</text:span></text:span><text:span text:style-name="Emphasis"><text:span text:style-name="T14">2</text:span></text:span><text:span text:style-name="Emphasis"><text:span text:style-name="T15">5</text:span></text:span></text:p>
      <text:h text:style-name="P20" text:outline-level="3" text:is-list-header="true">Цель<text:span text:style-name="T16"> </text:span><text:span text:style-name="T17">работы</text:span></text:h>
      <text:p text:style-name="P21"><text:tab/><text:span text:style-name="T18">Получить практический опыт построения концептуальной модели предметной области</text:span></text:p>
      <text:h text:style-name="Heading_20_2" text:outline-level="2"><text:span text:style-name="T19">1 </text:span>Теоретические с<text:span text:style-name="T20">в</text:span>едения</text:h>
      <text:h text:style-name="Heading_20_2" text:outline-level="2"><text:span text:style-name="T18">2 О</text:span>твет<text:span text:style-name="T18">ить</text:span> на вопросы:</text:h>
      <text:list xml:id="list2257376808" text:style-name="L1">
        <text:list-item>
          <text:p text:style-name="P22">Необходимость обследований <text:s/>предметной области обусловлена сложностью процесса внедрения, большим разнообразием включаемых в него задач, нео<text:span text:style-name="T21">д</text:span>нозначностью применяемых решений.</text:p>
        </text:list-item>
        <text:list-item>
          <text:p text:style-name="P23"><text:span text:style-name="T22">К </text:span>модели предметной области <text:span text:style-name="T22">предъявляют требования:</text:span></text:p>
        </text:list-item>
      </text:list>
      <text:list text:style-name="L2">
        <text:list-item>
          <text:p text:style-name="P24">формализация, обеспечивающая однозначное описание структуры предметной области;</text:p>
        </text:list-item>
        <text:list-item>
          <text:p text:style-name="P25">понятность для заказчиков и разработчиков на основе применения графических средств;</text:p>
        </text:list-item>
        <text:list-item>
          <text:p text:style-name="P25">реализуемость, подразумевающая наличие средств физической реализации модели предметной области в информационной системе;</text:p>
        </text:list-item>
        <text:list-item>
          <text:p text:style-name="P25">обеспечение возможности оценки эффективности реализации модели предметной области на основе определённых методов и вычисляемых показателей.</text:p>
        </text:list-item>
      </text:list>
      <text:list xml:id="list203659260858743" text:continue-list="list2257376808" text:style-name="L1">
        <text:list-item>
          <text:p text:style-name="P23"><text:span text:style-name="T23">П</text:span>ри исследовании предметной области следует построить <text:span text:style-name="T23">следующие модели:</text:span></text:p>
        </text:list-item>
      </text:list>
      <text:list text:style-name="L3">
        <text:list-item>
          <text:p text:style-name="P26">объ<text:span text:style-name="T24">е</text:span>ктная модель, отражающая состав взаимодействующих <text:s/>в процессах материальных и информационных объ<text:span text:style-name="T24">е</text:span>ктов предметной области;</text:p>
        </text:list-item>
        <text:list-item>
          <text:p text:style-name="P26">функциональная модель, отражающая взаимосвязь функций по преобразованию объ<text:span text:style-name="T24">е</text:span>ктов в процессах;</text:p>
        </text:list-item>
        <text:list-item>
          <text:p text:style-name="P26">модель управления, отражающая события и бизнес-правила, которые воздействуют на выполнение процессов;</text:p>
        </text:list-item>
        <text:list-item>
          <text:p text:style-name="P27">организационная модель, отражающая взаимодействие организационных единиц предприятия и персонала в процессах;</text:p>
        </text:list-item>
        <text:list-item>
          <text:p text:style-name="P27">техническая модель, описывающая топологию расположения и способы коммуникации комплекса технических средств.</text:p>
        </text:list-item>
      </text:list>
      <text:list xml:id="list203660794783119" text:continue-list="list203659260858743" text:style-name="L1">
        <text:list-item>
          <text:p text:style-name="P28"><text:span text:style-name="T25">Под бизнес-процессом принято понимать цепь логически связанных повторяющихся действий, которые совместно реализуют некую бизнес-</text:span><text:soft-page-break/><text:span text:style-name="T25">задачу или цепь. </text:span><text:span text:style-name="T26">Основными бизнес-процессами являются процессы, непосредственно связанные с созданием продукции или оказанием услуг, составляющих основную деятельность организации и обеспечивающих получение дохода.</text:span></text:p>
        </text:list-item>
        <text:list-item>
          <text:p text:style-name="P29">Обследование предметной области включает в себя следующие шаги: </text:p>
        </text:list-item>
      </text:list>
      <text:list text:style-name="L4">
        <text:list-item>
          <text:p text:style-name="P30">определение структуры организации;</text:p>
        </text:list-item>
        <text:list-item>
          <text:p text:style-name="P30">определение целевых функций организации;</text:p>
        </text:list-item>
        <text:list-item>
          <text:p text:style-name="P30">анализ распределения функций по подразделениям и сотрудникам;</text:p>
        </text:list-item>
        <text:list-item>
          <text:p text:style-name="P30">выявление функциональных взаимодействий между подразделениями; </text:p>
        </text:list-item>
        <text:list-item>
          <text:p text:style-name="P30">анализ информационных потоков внутри подразделений и между ними; <text:s/></text:p>
        </text:list-item>
        <text:list-item>
          <text:p text:style-name="P30">анализ информации, поступающей из внешних источников; </text:p>
        </text:list-item>
        <text:list-item>
          <text:p text:style-name="P30">анализ существующих средств автоматизации деятельности организации; </text:p>
        </text:list-item>
        <text:list-item>
          <text:p text:style-name="P30">предварительное определение требований к будущей системе.</text:p>
        </text:list-item>
      </text:list>
      <text:list xml:id="list203660235857573" text:continue-list="list203660794783119" text:style-name="L1">
        <text:list-item>
          <text:p text:style-name="P31">Реинжиниринг бизнес-процессов — радикальное перепроектирование бизнес-процессов и технологий их обработки.</text:p>
        </text:list-item>
        <text:list-item>
          <text:p text:style-name="P32"><text:span text:style-name="T27">Все методы объед</text:span><text:span text:style-name="T28">и</text:span><text:span text:style-name="T27">няют в группы по различным признакам.</text:span></text:p>
          <text:p text:style-name="P33">По цели обследования выделяют:</text:p>
        </text:list-item>
      </text:list>
      <text:list text:style-name="L5">
        <text:list-item>
          <text:p text:style-name="P34">метод организации локального проведения обследования, используемый для разработки проекта отдельной задачи или для комплекса задач;</text:p>
        </text:list-item>
        <text:list-item>
          <text:p text:style-name="P34">метод системного обследования объекта, применяемый для изучения всего объекта в целях разработки для него проекта программного обеспечения в целом.</text:p>
        </text:list-item>
        <text:list-item>
          <text:p text:style-name="P34">По числу исполнителей, проводящих обследование:</text:p>
        </text:list-item>
        <text:list-item>
          <text:p text:style-name="P35">индивидуальное обследование, осуществляемое одним проектировщиком;</text:p>
        </text:list-item>
        <text:list-item>
          <text:p text:style-name="P35">бригадное <text:span text:style-name="T29">обследование, осуществляемое одним проектировщиком.</text:span></text:p>
        </text:list-item>
        <text:list-item>
          <text:p text:style-name="P36">По степени охвата предметной области:</text:p>
        </text:list-item>
        <text:list-item>
          <text:p text:style-name="P36">метод сплошного обследования, охватывающий все подразделения производственной или экономической системы;</text:p>
        </text:list-item>
        <text:list-item>
          <text:p text:style-name="P36">метод выборочного обследования, применяемого при наличии типовых по структуре объектов.</text:p>
        </text:list-item>
      </text:list>
      <text:list text:continue-list="list203660235857573" text:style-name="L1">
        <text:list-item>
          <text:p text:style-name="P37"><text:span text:style-name="T30">О</text:span>сновные разделы технического задания согласно стандартам:</text:p>
        </text:list-item>
      </text:list>
      <text:list text:style-name="L6">
        <text:list-item>
          <text:p text:style-name="P38"><text:span text:style-name="Strong_20_Emphasis"><text:span text:style-name="T31">Общие сведения</text:span></text:span></text:p>
        </text:list-item>
        <text:list-item>
          <text:p text:style-name="P38"><text:span text:style-name="Strong_20_Emphasis"><text:span text:style-name="T31">Назначение и цели создания (развития) системы</text:span></text:span></text:p>
        </text:list-item>
        <text:list-item>
          <text:p text:style-name="P38"><text:span text:style-name="Strong_20_Emphasis"><text:span text:style-name="T31">Характеристика объектов автоматизации</text:span></text:span></text:p>
        </text:list-item>
        <text:list-item>
          <text:p text:style-name="P38"><text:span text:style-name="Strong_20_Emphasis"><text:span text:style-name="T31">Требования к системе</text:span></text:span><text:span text:style-name="T31"> </text:span></text:p>
        </text:list-item>
        <text:list-item>
          <text:p text:style-name="P38"><text:span text:style-name="Strong_20_Emphasis"><text:span text:style-name="T31">Состав и содержание работ по созданию системы</text:span></text:span><text:span text:style-name="T31"> </text:span></text:p>
        </text:list-item>
        <text:list-item>
          <text:p text:style-name="P38"><text:soft-page-break/><text:span text:style-name="Strong_20_Emphasis"><text:span text:style-name="T31">Порядок контроля и приемки системы</text:span></text:span><text:span text:style-name="T31"> </text:span></text:p>
        </text:list-item>
        <text:list-item>
          <text:p text:style-name="P38"><text:span text:style-name="Strong_20_Emphasis"><text:span text:style-name="T31">Требования к составу и содержанию работ по подготовке объекта автоматизации к вводу системы в действие</text:span></text:span><text:span text:style-name="T31"> </text:span></text:p>
        </text:list-item>
        <text:list-item>
          <text:p text:style-name="P38"><text:span text:style-name="Strong_20_Emphasis"><text:span text:style-name="T31">Требования к документированию</text:span></text:span><text:span text:style-name="T31"> </text:span></text:p>
        </text:list-item>
        <text:list-item>
          <text:p text:style-name="P38"><text:span text:style-name="Strong_20_Emphasis"><text:span text:style-name="T31">Источники разработки</text:span></text:span><text:span text:style-name="T31"> </text:span></text:p>
        </text:list-item>
      </text:list>
      <text:h text:style-name="P39" text:outline-level="2">3 Теоретические сведения</text:h>
      <text:p text:style-name="P40"><text:tab/>Предварительное исследование предметной области и анализ бизнес-процессов предшествует созданию и <text:span text:style-name="T32">внедрению любой</text:span>информационной системы. Необходимость в проведении исследлований обусловлена сложностью процесса внедрения, большим разнообразием включаемых в него залач, неоднозначностью принимаемых решений.</text:p>
      <text:p text:style-name="P40"><text:tab/>Результатом проведения исследования, как правило, является <text:span text:style-name="T5">графическое</text:span> и <text:span text:style-name="T5">текстовое описание</text:span> предметной области, называемое <text:span text:style-name="T5">моделью предметной области</text:span>. Модель должна быть а<text:span text:style-name="T32">де</text:span>кватна предметной области и отражать все аспекты функционирования предприятия/организации. Она необходима на всех этапах жизненного цикла информационной системы, но особую роль играет на стадии формирования требований к информационной системе. Предварительное моделирование предметной области позволяет сократить время и сроки проведения проектировочных работ и получить более эффективный и качественный проект. Без моделирования предметнои области велика вероятность допущения большого количества ошибок в решении стратегических вопросов, приводящих к экономическим потерям и высоким затратам на последующее перепроектирование.</text:p>
      <text:p text:style-name="P40"><text:tab/>Предметная область характериз<text:span text:style-name="T32">уется совокупностью выполняемых</text:span> в ней бизнес-процессов.</text:p>
      <text:p text:style-name="P40"><text:tab/>Под <text:span text:style-name="T5">бизнес-процессом</text:span> <text:span text:style-name="T32">принято понимать цепь логически связанных повторяющихся действий, которые совместно </text:span>реализуют некую бизнес-за<text:span text:style-name="T32">д</text:span>ачу или цель. Бизнес-процессы выделяются для структуризации деятельности организации. Их можно классифицировать следующим образом: основные бизнес-процессы; обеспечивающие бизнес-процессы и бизнес-процессы управления.</text:p>
      <text:p text:style-name="P40"><text:span text:style-name="T5">Основными бизнес-процессами</text:span> являются процессы, непосредственно связанные с созданием продукции или оказанием услуг, составляющих основную деятельность организации и обеспечивающих получение дохода.</text:p>
      <text:p text:style-name="P40"><text:soft-page-break/><text:span text:style-name="T5">Обеспечивающие бизнес-процессы</text:span> необходимы для <text:span text:style-name="T32">д</text:span>еятельности предприятия и предназначены для поддержки выполнения основных бизнес-процессов. Такими процессами являются обеспечение кадрами, юридическое обеспечение, администрирование, обеспечение безопасности и т. д.</text:p>
      <text:p text:style-name="P40"><text:span text:style-name="T5">Бизнес-процессы управления</text:span> охватывают функции управления на уровне каждого бизнес-процесса и системы в целом. Примерами таких процессов могут быть процессы стратегического, оперативного и текущего планирования. Процессы управления оказывают воздействие на все остальные процессы организации.</text:p>
      <text:p text:style-name="P40"><text:span text:style-name="T5">Бизнес-модель</text:span> — формализованное (графическое, табличное, текстовое, символьное) описание бизнес-процессов.</text:p>
      <text:p text:style-name="P40">Построение бизнес-моделей заключается в применении различных методов и средств для визуального моделирования бизнес-процессов. Под методологией создания <text:span text:style-name="T32">модели бизнесс-процесса понимается совокупность сп</text:span>особов, с помощью <text:span text:style-name="T32">которых объекты реального мира и связи между ними представляются в виде модели.</text:span></text:p>
      <text:p text:style-name="P41">Бизнес-модели создаются для обеспечния понимания структуры организации и динамики происходящих в ней процессов, текущих проблем организации и возможностей их решения. Бизнес-модели строятся на основании результатов обследования предметной области, т. е. автоматизируемого объекта.</text:p>
      <text:p text:style-name="P41"><text:s/></text:p>
      <text:h text:style-name="P42" text:outline-level="2"><text:span text:style-name="T18">4</text:span> Постановка задачи</text:h>
      <text:list text:style-name="L7">
        <text:list-item>
          <text:p text:style-name="P43">Произвести предварительное исследование предметной области и анализ бизнес-процессов;</text:p>
        </text:list-item>
        <text:list-item>
          <text:p text:style-name="P43">Выполнить графическое и текстовое описание предметной области (построить модель предметной области);</text:p>
        </text:list-item>
        <text:list-item>
          <text:p text:style-name="P44">Графичеcкое моделирование выполнить с помощью нотаций: BPNM, EPC или IDEF0</text:p>
        </text:list-item>
      </text:list>
      <text:h text:style-name="Heading_20_2" text:outline-level="2"><text:span text:style-name="T33">5</text:span><text:span text:style-name="T19"> </text:span><text:span text:style-name="T33">Предварительное исследование предметной области</text:span></text:h>
      <text:p text:style-name="P45"><text:tab/>Ресторан — это предприятие общественного питания, предоставляющее услуги в сфере кулинарии повышенной категории. Он специализируется на производстве, реализации и организации потребления кулинарной продукции, <text:soft-page-break/>включая сложные, фирменные блюда и напитки. Основным способом организации потребления является подача блюд в зале ресторана. </text:p>
      <text:p text:style-name="P46"><text:tab/>В отличие от заведений более простого формата, ресторан делает акцент на уникальном меню, высоком уровне сервиса и создании особой атмосферы, что формирует его ценностное предложение для гостей. Несмотря на более высокий ценовой сегмент, ресторан, как и любое предприятие общественного питания, является важной и высококонкурентной сферой деятельности, где борьба за клиента ведется не только за счет качества кухни, но и за счет общего впечатления и уровня обслуживания.</text:p>
      <text:p text:style-name="P46"><text:tab/><text:span text:style-name="T34">Предварительное моделирование предметной области позволяет выявить основные бизнес-процессы</text:span>. К ним относятся приём и обработка заказов от гостей, передача заказов на кухню и в бар, непосредственно процесс приготовления блюд и напитков, обслуживание клиентов, а также учёт и управление складскими запасами. <text:span text:style-name="T35">Иногда</text:span> в ресторанах сохраняются устаревшие, не автоматизированные методы работы: официанты принимают заказы, записывая их в блокноты или на листы бумаги, которые затем вручную переносятся на кухню и в бар. Для обеспечения бесперебойного процесса приготовления необходимы поставки продуктов, что требует постоянного контроля за их наличием на складе, проведения инвентаризации и своевременного формирования заявок <text:span text:style-name="T36">для поставщиков</text:span>. Отсутствие единой автоматизированной системы для управления этими процессами приводит к риску человеческих ошибок, замедлению обслуживания и сложностям в оперативном управлении ресурсами.</text:p>
      <text:p text:style-name="P46"><text:tab/>Процесс приема заказа в ресторане представляет собой последовательность взаимосвязанных операций, начинающихся с установления контакта с гостем и заканчивающихся передачей сформированного заказа на производство. Изначально официант осуществляет подход к столику с целью приветствия и представления меню, после чего следует этап консультирования по ассортименту блюд и напитков, их особенностям, составу и возможным модификациям, учитывая индивидуальные предпочтения и ограничения гостя, такие как аллергенные компоненты или диетические требования. На этапе фиксации заказа официант детально записывает выбранные позиции <text:span text:style-name="T37">на бумажный </text:span><text:span text:style-name="T38">бланк заказа</text:span> с указанием точных наименований, количества порций, специфических пожеланий по приготовлению и подаче, включая степень прожарки для мясных блюд или исключение определенных ингредиентов из салатов. После полного формирования перечня заказанных позиций официант <text:soft-page-break/>повторно озвучивает гостю весь список для окончательного подтверждения и устранения возможных недоразумений, после чего заказ считается принятым и подлежит дальнейшей обработке. Завершающей стадией процесса является передача оформленного заказа на кухню и в бар, где он регистрируется, получает уникальный идентификатор и поступает в работу к соответствующим поварам и барменам, при этом официант отмечает время приема заказа для последующего контроля сроков его выполнения. <text:span text:style-name="T39">На рисунке 1 изображена схема процесса приёма заказа.</text:span></text:p>
      <text:p text:style-name="P47"><text:tab/>Процесс управления складом в <text:span text:style-name="T40">ресторане</text:span> <text:span text:style-name="T40">представляет</text:span> собой непрерывный цикл взаимосвязанных операций, начинающихся с планирования потребности в продукции и заканчивающихся списанием использованных ингредиентов. Первоначальным этапом является составление заявки на поставку продуктов на основе анализа текущих остатков и прогнозируемого объема производства, при этом учитываются такие факторы, как сезонность, планируемые акции и исторические данные о расходе. После формирования заявки осуществляется процедура приемки поставки, которая включает проверку соответствия количества и качества прибывшей продукции товарной <text:span text:style-name="T40">накладной</text:span>, а также контроль соблюдения температурных режимов и сроков годности. Принятые товары перемещаются в соответствующие зоны хранения с соблюдением принципа товарного соседства и маркировкой даты поступления для обеспечения ротации запасов. В процессе хранения регулярно проводится инвентаризация остатков с фиксацией фактического наличия продуктов и выявлением расхождений с данными системы. </text:p>
      <text:p text:style-name="P45"/>
      <text:p text:style-name="P45"><draw:frame draw:style-name="fr1" draw:name="Врезка25" text:anchor-type="char" svg:width="17cm" draw:z-index="15"><draw:text-box fo:min-height="12.989cm"><text:p text:style-name="P48"><draw:frame draw:style-name="fr2" draw:name="Image1" text:anchor-type="paragraph" svg:width="17cm" style:rel-width="100%" svg:height="12.989cm" style:rel-height="scale" draw:z-index="16"><draw:image xlink:href="Pictures/1000000000000500000003D2BC888963.jpg" xlink:type="simple" xlink:show="embed" xlink:actuate="onLoad" draw:mime-type="image/jpeg"/></draw:frame>Рис. <text:sequence text:ref-name="refРис.0" text:name="Рис." text:formula="ooow:Рис.+1" style:num-format="1">1</text:sequence>— <text:span text:style-name="T41">Схема процесса оформления заказа</text:span></text:p></draw:text-box></draw:frame><text:soft-page-break/></text:p>
      <text:p text:style-name="P45"><text:tab/></text:p>
      <text:p text:style-name="P49"/>
      <text:h text:style-name="P50" text:outline-level="2">Вывод</text:h>
      <text:p text:style-name="P51">В ходе выполнения работы была проанализирована предметная область, построена её предварительная модель. <text:span text:style-name="T42">Выявлены основные бизнес-процессы и построено графическое представление модели предметной област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chapter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4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3cm" fo:margin-right="0.247cm" fo:text-align="justify" style:justify-single-word="false" fo:text-indent="1.2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style="normal" fo:font-weight="bold" fo:background-color="transparent" style:font-size-asian="9.14999961853027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PT Astra Serif1" fo:font-family="'PT Astra Serif'" style:font-family-generic="roman" style:font-pitch="variable" fo:font-size="18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5.7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style-complex="normal" style:font-weight-complex="bold" style:text-scale="96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4" style:display-name="ListLabel 264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5" style:display-name="ListLabel 255" style:family="text">
      <style:text-properties fo:language="ru" fo:country="RU" style:language-asian="en" style:country-asian="US" style:language-complex="ar" style:country-complex="SA"/>
    </style:style>
    <style:style style:name="ListLabel_20_256" style:display-name="ListLabel 256" style:family="text">
      <style:text-properties fo:language="ru" fo:country="RU" style:language-asian="en" style:country-asian="US" style:language-complex="ar" style:country-complex="SA"/>
    </style:style>
    <style:style style:name="ListLabel_20_257" style:display-name="ListLabel 257" style:family="text">
      <style:text-properties fo:language="ru" fo:country="RU" style:language-asian="en" style:country-asian="US" style:language-complex="ar" style:country-complex="SA"/>
    </style:style>
    <style:style style:name="ListLabel_20_258" style:display-name="ListLabel 258" style:family="text">
      <style:text-properties fo:language="ru" fo:country="RU" style:language-asian="en" style:country-asian="US" style:language-complex="ar" style:country-complex="SA"/>
    </style:style>
    <style:style style:name="ListLabel_20_259" style:display-name="ListLabel 259" style:family="text">
      <style:text-properties fo:language="ru" fo:country="RU" style:language-asian="en" style:country-asian="US" style:language-complex="ar" style:country-complex="SA"/>
    </style:style>
    <style:style style:name="ListLabel_20_260" style:display-name="ListLabel 260" style:family="text">
      <style:text-properties fo:language="ru" fo:country="RU" style:language-asian="en" style:country-asian="US" style:language-complex="ar" style:country-complex="SA"/>
    </style:style>
    <style:style style:name="ListLabel_20_261" style:display-name="ListLabel 261" style:family="text">
      <style:text-properties fo:language="ru" fo:country="RU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45" style:display-name="ListLabel 245" style:family="text">
      <style:text-properties fo:language="ru" fo:country="RU" style:language-asian="en" style:country-asian="US" style:language-complex="ar" style:country-complex="SA"/>
    </style:style>
    <style:style style:name="ListLabel_20_246" style:display-name="ListLabel 246" style:family="text">
      <style:text-properties fo:language="ru" fo:country="RU" style:language-asian="en" style:country-asian="US" style:language-complex="ar" style:country-complex="SA"/>
    </style:style>
    <style:style style:name="ListLabel_20_247" style:display-name="ListLabel 247" style:family="text">
      <style:text-properties fo:language="ru" fo:country="RU" style:language-asian="en" style:country-asian="US" style:language-complex="ar" style:country-complex="SA"/>
    </style:style>
    <style:style style:name="ListLabel_20_248" style:display-name="ListLabel 248" style:family="text">
      <style:text-properties fo:language="ru" fo:country="RU" style:language-asian="en" style:country-asian="US" style:language-complex="ar" style:country-complex="SA"/>
    </style:style>
    <style:style style:name="ListLabel_20_249" style:display-name="ListLabel 249" style:family="text">
      <style:text-properties fo:language="ru" fo:country="RU" style:language-asian="en" style:country-asian="US" style:language-complex="ar" style:country-complex="SA"/>
    </style:style>
    <style:style style:name="ListLabel_20_250" style:display-name="ListLabel 250" style:family="text">
      <style:text-properties fo:language="ru" fo:country="RU" style:language-asian="en" style:country-asian="US" style:language-complex="ar" style:country-complex="SA"/>
    </style:style>
    <style:style style:name="ListLabel_20_251" style:display-name="ListLabel 251" style:family="text">
      <style:text-properties fo:language="ru" fo:country="RU" style:language-asian="en" style:country-asian="US" style:language-complex="ar" style:country-complex="SA"/>
    </style:style>
    <style:style style:name="ListLabel_20_252" style:display-name="ListLabel 252" style:family="text">
      <style:text-properties fo:language="ru" fo:country="RU" style:language-asian="en" style:country-asian="US" style:language-complex="ar" style:country-complex="SA"/>
    </style:style>
    <style:style style:name="ListLabel_20_235" style:display-name="ListLabel 235" style:family="text">
      <style:text-properties fo:font-size="14pt" fo:letter-spacing="normal" fo:language="ru" fo:country="RU" fo:font-style="normal" fo:font-weight="normal" style:font-name-asian="Wingdings" style:font-family-asian="Wingdings" style:font-family-generic-asian="system" style:font-pitch-asian="variable" style:font-size-asian="14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6" style:display-name="ListLabel 236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7" style:display-name="ListLabel 237" style:family="text">
      <style:text-properties fo:language="ru" fo:country="RU" style:language-asian="en" style:country-asian="US" style:language-complex="ar" style:country-complex="SA"/>
    </style:style>
    <style:style style:name="ListLabel_20_238" style:display-name="ListLabel 238" style:family="text">
      <style:text-properties fo:language="ru" fo:country="RU" style:language-asian="en" style:country-asian="US" style:language-complex="ar" style:country-complex="SA"/>
    </style:style>
    <style:style style:name="ListLabel_20_239" style:display-name="ListLabel 239" style:family="text">
      <style:text-properties fo:language="ru" fo:country="RU" style:language-asian="en" style:country-asian="US" style:language-complex="ar" style:country-complex="SA"/>
    </style:style>
    <style:style style:name="ListLabel_20_240" style:display-name="ListLabel 240" style:family="text">
      <style:text-properties fo:language="ru" fo:country="RU" style:language-asian="en" style:country-asian="US" style:language-complex="ar" style:country-complex="SA"/>
    </style:style>
    <style:style style:name="ListLabel_20_241" style:display-name="ListLabel 241" style:family="text">
      <style:text-properties fo:language="ru" fo:country="RU" style:language-asian="en" style:country-asian="US" style:language-complex="ar" style:country-complex="SA"/>
    </style:style>
    <style:style style:name="ListLabel_20_242" style:display-name="ListLabel 242" style:family="text">
      <style:text-properties fo:language="ru" fo:country="RU" style:language-asian="en" style:country-asian="US" style:language-complex="ar" style:country-complex="SA"/>
    </style:style>
    <style:style style:name="ListLabel_20_243" style:display-name="ListLabel 243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3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.49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2.663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3.83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5.011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6.186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7.359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8.534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9.7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50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1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4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7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2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7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8.31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9.3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0.42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1.48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2.53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3.58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4.6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57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4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4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4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8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7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1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9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415cm" fo:margin-left="0.753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246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422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7.601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77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956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3.251cm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7cm" fo:margin-left="4.122cm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5.722cm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7.318cm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8.915cm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0.511cm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2.107cm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3.702cm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5.2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2.515cm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4.29cm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6.064cm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7.84cm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9.615cm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1.389cm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3.166cm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4.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1.249cm" fo:margin-left="3.2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4.939cm"/>
        </style:list-level-properties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632cm"/>
        </style:list-level-properties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327cm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21cm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714cm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409cm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5.1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35cm" fo:margin-right="0cm" fo:margin-top="0.018cm" fo:margin-bottom="0cm" style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MP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line-height="6%"/>
      <style:text-properties fo:font-size="10pt" style:font-size-asian="10pt"/>
    </style:style>
    <style:style style:name="MP8" style:family="paragraph" style:parent-style-name="Text_20_body">
      <style:paragraph-properties fo:margin-left="0.035cm" fo:margin-right="0cm" fo:margin-top="0.016cm" fo:margin-bottom="0cm" style:contextual-spacing="false"/>
    </style:style>
    <style:style style:name="MP9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09cm"/>
    </style:style>
    <style:style style:name="MT3" style:family="text">
      <style:text-properties fo:font-size="10pt" fo:letter-spacing="-0.009cm" style:font-size-asian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341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7">
      <style:page-layout-properties fo:page-width="14.801cm" fo:page-height="21.001cm" style:num-format="1" style:print-orientation="portrait" fo:margin-top="1.376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252cm" fo:margin-bottom="0.494cm" fo:margin-left="2.9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82cm" fo:margin-left="0cm" fo:margin-right="0cm" fo:margin-bottom="0.482cm" style:dynamic-spacing="tru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834cm" fo:margin-bottom="0.771cm" fo:margin-left="2.249cm" fo:margin-right="0.24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.905cm" fo:margin-bottom="0.771cm" fo:margin-left="2.249cm" fo:margin-right="0.24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Converted13" style:page-layout-name="Mpm6" draw:style-name="Mdp1">
      <style:footer>
        <text:p text:style-name="MP2" loext:marker-style-name="MT1"><draw:custom-shape text:anchor-type="char" draw:z-index="1" draw:name="Textbox 13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3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4" style:page-layout-name="Mpm6" draw:style-name="Mdp1">
      <style:footer>
        <text:p text:style-name="MP2" loext:marker-style-name="MT1"><draw:custom-shape text:anchor-type="char" draw:z-index="12" draw:name="Textbox 14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2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4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5" style:page-layout-name="Mpm7" draw:style-name="Mdp1">
      <style:footer>
        <text:p text:style-name="MP2" loext:marker-style-name="MT1"><draw:custom-shape text:anchor-type="char" draw:z-index="0" draw:name="Textbox 15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3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3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3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5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6" style:page-layout-name="Mpm7" draw:style-name="Mdp1">
      <style:footer>
        <text:p text:style-name="MP2" loext:marker-style-name="MT1"><draw:custom-shape text:anchor-type="char" draw:z-index="2" draw:name="Textbox 16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4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4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4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6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7" style:page-layout-name="Mpm7" draw:style-name="Mdp1">
      <style:footer>
        <text:p text:style-name="MP2" loext:marker-style-name="MT1"><draw:custom-shape text:anchor-type="char" draw:z-index="4" draw:name="Textbox 17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5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5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" text:anchor-type="char" svg:x="7.304cm" svg:y="18.671cm" svg:width="0.497cm" svg:height="0.542cm" draw:z-index="0"><draw:text-box><text:p text:style-name="MP5"><text:page-number text:select-page="current">0</text:page-number></text:p></draw:text-box></draw:frame><draw:frame draw:style-name="Mfr1" draw:name="Врезка5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7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6" style:page-layout-name="Mpm8" draw:style-name="Mdp1">
      <style:header>
        <text:p text:style-name="MP2" loext:marker-style-name="MT1"><draw:custom-shape text:anchor-type="char" draw:z-index="5" draw:name="Textbox 6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6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" text:anchor-type="char" svg:x="11.04cm" svg:y="1.219cm" svg:width="0.43cm" svg:height="0.462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7" style:page-layout-name="Mpm8" draw:style-name="Mdp1">
      <style:header>
        <text:p text:style-name="MP2" loext:marker-style-name="MT1"><draw:custom-shape text:anchor-type="char" draw:z-index="6" draw:name="Textbox 7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7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8" style:page-layout-name="Mpm8" draw:style-name="Mdp1">
      <style:header>
        <text:p text:style-name="MP2" loext:marker-style-name="MT1"><draw:custom-shape text:anchor-type="char" draw:z-index="7" draw:name="Textbox 8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9" style:page-layout-name="Mpm8" draw:style-name="Mdp1">
      <style:header>
        <text:p text:style-name="MP2" loext:marker-style-name="MT1"><draw:custom-shape text:anchor-type="char" draw:z-index="14" draw:name="Textbox 9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9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0" style:page-layout-name="Mpm8" draw:style-name="Mdp1">
      <style:header>
        <text:p text:style-name="MP2" loext:marker-style-name="MT1"><draw:custom-shape text:anchor-type="char" draw:z-index="8" draw:name="Textbox 10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0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1" style:page-layout-name="Mpm8" draw:style-name="Mdp1">
      <style:header>
        <text:p text:style-name="MP2" loext:marker-style-name="MT1"><draw:custom-shape text:anchor-type="char" draw:z-index="9" draw:name="Textbox 11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2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2" style:page-layout-name="Mpm8" draw:style-name="Mdp1">
      <style:header>
        <text:p text:style-name="MP2" loext:marker-style-name="MT1"><draw:custom-shape text:anchor-type="char" draw:z-index="10" draw:name="Textbox 12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8" style:page-layout-name="Mpm9" draw:style-name="Mdp1">
      <style:footer>
        <text:p text:style-name="MP7" loext:marker-style-name="MT1"><draw:custom-shape text:anchor-type="char" draw:z-index="11" draw:name="Textbox 22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9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19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2" text:anchor-type="char" svg:x="19.477cm" svg:y="28.541cm" svg:width="0.681cm" svg:height="0.623cm" draw:z-index="0"><draw:text-box><text:p text:style-name="MP9"><text:page-number text:select-page="current">0</text:page-number></text:p></draw:text-box></draw:frame></text:p>
      </style:footer>
    </style:master-page>
    <style:master-page style:name="Converted19" style:page-layout-name="Mpm9" draw:style-name="Mdp1">
      <style:footer>
        <text:p text:style-name="MP7" loext:marker-style-name="MT1"><draw:custom-shape text:anchor-type="char" draw:z-index="13" draw:name="Textbox 23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0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0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3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Converted20" style:page-layout-name="Mpm10" draw:style-name="Mdp1">
      <style:footer>
        <text:p text:style-name="MP7" loext:marker-style-name="MT1"><draw:custom-shape text:anchor-type="char" draw:z-index="3" draw:name="Textbox 24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4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4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9T12:02:46.711000000</meta:creation-date>
    <meta:editing-duration>PT23H1M48S</meta:editing-duration>
    <meta:editing-cycles>217</meta:editing-cycles>
    <meta:generator>LibreOffice/25.8.2.1$Windows_X86_64 LibreOffice_project/345526217a4027cb1b9ab39bd7153c8c141a1d64</meta:generator>
    <dc:title>Реферат ГОСТ</dc:title>
    <dc:date>2025-10-27T20:36:57.575140000</dc:date>
    <meta:print-date>2025-03-27T21:49:41.572929170</meta:print-date>
    <meta:printed-by>Файлы PDF</meta:printed-by>
    <meta:document-statistic meta:table-count="0" meta:image-count="1" meta:object-count="0" meta:page-count="8" meta:paragraph-count="192" meta:word-count="1482" meta:character-count="11864" meta:non-whitespace-character-count="10584"/>
  </office:meta>
</office:document-meta>
</file>