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3D2BC888963.jpg" manifest:media-type="image/jpeg"/>
  <manifest:file-entry manifest:full-path="Pictures/100000000000025800000187062973CC.png" manifest:media-type="image/png"/>
  <manifest:file-entry manifest:full-path="Pictures/10000001000004C50000030D30DFCC1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0.997cm"/>
    </style:style>
    <style:style style:name="Таблица1.B" style:family="table-column">
      <style:table-column-properties style:column-width="8.59cm"/>
    </style:style>
    <style:style style:name="Таблица1.C" style:family="table-column">
      <style:table-column-properties style:column-width="2.616cm"/>
    </style:style>
    <style:style style:name="Таблица1.D" style:family="table-column">
      <style:table-column-properties style:column-width="4.792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D4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5.111cm" style:rel-column-width="58251*"/>
    </style:style>
    <style:style style:name="Таблица6.B" style:family="table-column">
      <style:table-column-properties style:column-width="1.889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5.111cm" style:rel-column-width="58251*"/>
    </style:style>
    <style:style style:name="Таблица2.B" style:family="table-column">
      <style:table-column-properties style:column-width="1.889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1.984cm" style:rel-column-width="46196*"/>
    </style:style>
    <style:style style:name="Таблица7.B" style:family="table-column">
      <style:table-column-properties style:column-width="2.304cm" style:rel-column-width="8880*"/>
    </style:style>
    <style:style style:name="Таблица7.C" style:family="table-column">
      <style:table-column-properties style:column-width="2.713cm" style:rel-column-width="10459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fo:margin-top="0cm" fo:margin-bottom="0.3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199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P1" style:family="paragraph" style:parent-style-name="Основной_20_текст_20_на_20_титульной" style:master-page-name="First_20_Page">
      <style:paragraph-properties style:page-number="auto"/>
      <style:text-properties style:font-name="PT Astra Serif"/>
    </style:style>
    <style:style style:name="P2" style:family="paragraph" style:parent-style-name="Основной_20_текст_20_на_20_титульной">
      <style:text-properties style:font-name="PT Astra Serif"/>
    </style:style>
    <style:style style:name="P3" style:family="paragraph" style:parent-style-name="Text_20_body">
      <style:text-properties style:font-name="PT Astra Serif"/>
    </style:style>
    <style:style style:name="P4" style:family="paragraph" style:parent-style-name="Заголовок_20_на_20_титульной">
      <style:text-properties style:font-name="PT Astra Serif"/>
    </style:style>
    <style:style style:name="P5" style:family="paragraph" style:parent-style-name="Основной_20_текст_20_на_20_титульной">
      <style:text-properties style:font-name="PT Astra Serif" officeooo:rsid="0033b918" officeooo:paragraph-rsid="0033b918"/>
    </style:style>
    <style:style style:name="P6" style:family="paragraph" style:parent-style-name="Блок_20_научного_20_руководителя">
      <style:text-properties style:font-name="PT Astra Serif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748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PT Astra Serif" officeooo:paragraph-rsid="000ff272"/>
    </style:style>
    <style:style style:name="P11" style:family="paragraph" style:parent-style-name="Heading_20_1">
      <style:paragraph-properties fo:break-before="page"/>
      <style:text-properties style:font-name="PT Astra Serif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/>
      <style:text-properties style:font-name="PT Astra Serif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ackground-color="transparent"/>
      <style:text-properties style:font-name="PT Astra Serif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ackground-color="transparent"/>
      <style:text-properties style:font-name="PT Astra Serif" officeooo:rsid="0066deae" officeooo:paragraph-rsid="0066deae"/>
    </style:style>
    <style:style style:name="P15" style:family="paragraph" style:parent-style-name="Text_20_body">
      <style:text-properties style:font-name="PT Astra Serif" officeooo:rsid="001438f3"/>
    </style:style>
    <style:style style:name="P16" style:family="paragraph" style:parent-style-name="Text_20_body" style:list-style-name="L1">
      <style:text-properties style:font-name="PT Astra Serif"/>
    </style:style>
    <style:style style:name="P17" style:family="paragraph" style:parent-style-name="Heading_20_2">
      <style:text-properties style:font-name="PT Astra Serif"/>
    </style:style>
    <style:style style:name="P18" style:family="paragraph" style:parent-style-name="Heading_20_2" style:master-page-name="Landscape">
      <style:paragraph-properties style:page-number="auto"/>
      <style:text-properties style:font-name="PT Astra Serif" officeooo:paragraph-rsid="0041e930"/>
    </style:style>
    <style:style style:name="P19" style:family="paragraph" style:parent-style-name="Heading_20_2" style:master-page-name="Standard">
      <style:paragraph-properties style:page-number="auto"/>
      <style:text-properties style:font-name="PT Astra Serif" officeooo:paragraph-rsid="0041e930"/>
    </style:style>
    <style:style style:name="P20" style:family="paragraph" style:parent-style-name="Text_20_body">
      <style:text-properties style:font-name="PT Astra Serif" officeooo:paragraph-rsid="004655cf"/>
    </style:style>
    <style:style style:name="P21" style:family="paragraph" style:parent-style-name="Text_20_body">
      <style:text-properties style:font-name="PT Astra Serif" officeooo:paragraph-rsid="0082b733"/>
    </style:style>
    <style:style style:name="P22" style:family="paragraph" style:parent-style-name="Text_20_body" style:list-style-name="L2">
      <style:text-properties style:font-name="PT Astra Serif" officeooo:rsid="02ef8be9" officeooo:paragraph-rsid="0048e57b"/>
    </style:style>
    <style:style style:name="P23" style:family="paragraph" style:parent-style-name="Text_20_body" style:list-style-name="L2">
      <style:text-properties style:font-name="PT Astra Serif" officeooo:rsid="02f02dfa" officeooo:paragraph-rsid="0048e57b"/>
    </style:style>
    <style:style style:name="P24" style:family="paragraph" style:parent-style-name="Text_20_body" style:list-style-name="L2">
      <style:text-properties style:font-name="PT Astra Serif" officeooo:rsid="02f37159" officeooo:paragraph-rsid="0048e57b"/>
    </style:style>
    <style:style style:name="P25" style:family="paragraph" style:parent-style-name="Text_20_body" style:list-style-name="L2">
      <style:text-properties style:font-name="PT Astra Serif" officeooo:rsid="02f677de" officeooo:paragraph-rsid="0048e57b"/>
    </style:style>
    <style:style style:name="P26" style:family="paragraph" style:parent-style-name="Text_20_body">
      <style:text-properties style:font-name="PT Astra Serif" officeooo:paragraph-rsid="006f8f7e"/>
    </style:style>
    <style:style style:name="P27" style:family="paragraph" style:parent-style-name="Text_20_body" style:list-style-name="L3">
      <style:text-properties style:font-name="PT Astra Serif" officeooo:paragraph-rsid="004cdf0f"/>
    </style:style>
    <style:style style:name="P28" style:family="paragraph" style:parent-style-name="Text_20_body">
      <style:text-properties style:font-name="PT Astra Serif" officeooo:paragraph-rsid="004cdf0f"/>
    </style:style>
    <style:style style:name="P29" style:family="paragraph" style:parent-style-name="Text_20_body" style:list-style-name="L4">
      <style:text-properties style:font-name="PT Astra Serif" officeooo:rsid="029c9deb" officeooo:paragraph-rsid="004cdf0f"/>
    </style:style>
    <style:style style:name="P30" style:family="paragraph" style:parent-style-name="Text_20_body">
      <style:text-properties style:font-name="PT Astra Serif" officeooo:rsid="02a08bf1" officeooo:paragraph-rsid="004cdf0f"/>
    </style:style>
    <style:style style:name="P31" style:family="paragraph" style:parent-style-name="Heading_20_3">
      <style:text-properties style:font-name="PT Astra Serif" officeooo:paragraph-rsid="004e06f7"/>
    </style:style>
    <style:style style:name="P32" style:family="paragraph" style:parent-style-name="Text_20_body">
      <style:paragraph-properties fo:margin-left="0.25cm" fo:margin-right="0.235cm" fo:margin-top="0cm" fo:margin-bottom="0cm" style:contextual-spacing="false" fo:text-align="justify" style:justify-single-word="false" fo:text-indent="1.251cm" style:auto-text-indent="false"/>
      <style:text-properties style:font-name="PT Astra Serif" officeooo:paragraph-rsid="004e06f7"/>
    </style:style>
    <style:style style:name="P33" style:family="paragraph" style:parent-style-name="Text_20_body">
      <style:paragraph-properties fo:margin-left="0.25cm" fo:margin-right="0.235cm" fo:margin-top="0cm" fo:margin-bottom="0cm" style:contextual-spacing="false" fo:text-align="justify" style:justify-single-word="false" fo:text-indent="0cm" style:auto-text-indent="false"/>
      <style:text-properties style:font-name="PT Astra Serif" fo:letter-spacing="-0.004cm" officeooo:rsid="01dfc8de" officeooo:paragraph-rsid="004e06f7"/>
    </style:style>
    <style:style style:name="P34" style:family="paragraph" style:parent-style-name="Table_20_Contents">
      <style:paragraph-properties fo:text-align="center" style:justify-single-word="false"/>
      <style:text-properties style:font-name="PT Astra Serif" officeooo:paragraph-rsid="004e06f7"/>
    </style:style>
    <style:style style:name="P35" style:family="paragraph" style:parent-style-name="Table_20_Contents">
      <style:paragraph-properties fo:text-align="end" style:justify-single-word="false"/>
      <style:text-properties style:font-name="PT Astra Serif" officeooo:paragraph-rsid="004e06f7"/>
    </style:style>
    <style:style style:name="P36" style:family="paragraph" style:parent-style-name="Standard">
      <style:paragraph-properties fo:margin-left="0.25cm" fo:margin-right="0.235cm" fo:margin-top="0cm" fo:margin-bottom="0cm" style:contextual-spacing="false" fo:text-align="justify" style:justify-single-word="false" fo:text-indent="0cm" style:auto-text-indent="false"/>
      <style:text-properties style:font-name="PT Astra Serif" fo:letter-spacing="-0.004cm" officeooo:rsid="01dfc8de" officeooo:paragraph-rsid="004e06f7"/>
    </style:style>
    <style:style style:name="P37" style:family="paragraph" style:parent-style-name="Text_20_body">
      <style:paragraph-properties fo:margin-left="0.25cm" fo:margin-right="0.235cm" fo:margin-top="0cm" fo:margin-bottom="0cm" style:contextual-spacing="false" fo:text-align="start" style:justify-single-word="false" fo:text-indent="0cm" style:auto-text-indent="false"/>
      <style:text-properties officeooo:paragraph-rsid="004e06f7"/>
    </style:style>
    <style:style style:name="P38" style:family="paragraph" style:parent-style-name="Text_20_body">
      <style:paragraph-properties fo:margin-left="0.25cm" fo:margin-right="0.235cm" fo:margin-top="0cm" fo:margin-bottom="0cm" style:contextual-spacing="false" fo:text-align="start" style:justify-single-word="false" fo:text-indent="0cm" style:auto-text-indent="false"/>
      <style:text-properties fo:letter-spacing="-0.004cm" officeooo:rsid="01dfc8de" officeooo:paragraph-rsid="004e06f7"/>
    </style:style>
    <style:style style:name="P39" style:family="paragraph" style:parent-style-name="Text_20_body">
      <style:paragraph-properties fo:margin-left="0cm" fo:margin-right="0.235cm" fo:margin-top="0cm" fo:margin-bottom="0cm" style:contextual-spacing="false" fo:text-align="justify" style:justify-single-word="false" fo:text-indent="0cm" style:auto-text-indent="false"/>
      <style:text-properties officeooo:paragraph-rsid="004e06f7"/>
    </style:style>
    <style:style style:name="P40" style:family="paragraph" style:parent-style-name="Text_20_body">
      <style:paragraph-properties fo:margin-left="0cm" fo:text-indent="0cm" style:auto-text-indent="false"/>
      <style:text-properties style:font-name="PT Astra Serif" officeooo:paragraph-rsid="004e06f7"/>
    </style:style>
    <style:style style:name="P41" style:family="paragraph" style:parent-style-name="Text_20_body">
      <style:paragraph-properties fo:margin-left="0cm" fo:text-indent="0cm" style:auto-text-indent="false"/>
      <style:text-properties officeooo:paragraph-rsid="004e06f7"/>
    </style:style>
    <style:style style:name="P42" style:family="paragraph" style:parent-style-name="Text_20_body">
      <style:text-properties officeooo:paragraph-rsid="004e06f7"/>
    </style:style>
    <style:style style:name="P43" style:family="paragraph" style:parent-style-name="Table">
      <style:paragraph-properties fo:keep-with-next="always"/>
      <style:text-properties fo:font-weight="normal" officeooo:paragraph-rsid="004e06f7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T Astra Serif" fo:font-size="12pt" officeooo:rsid="01e28a4f" officeooo:paragraph-rsid="004e06f7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1e28a4f" officeooo:paragraph-rsid="004e06f7" style:font-size-asian="12pt" style:font-size-complex="12pt"/>
    </style:style>
    <style:style style:name="P46" style:family="paragraph" style:parent-style-name="Table_20_Contents" style:list-style-name="L5">
      <style:paragraph-properties fo:text-align="start" style:justify-single-word="false"/>
      <style:text-properties style:font-name="PT Astra Serif" fo:font-size="12pt" officeooo:paragraph-rsid="004e06f7" style:font-size-asian="12pt" style:font-size-complex="12pt"/>
    </style:style>
    <style:style style:name="P47" style:family="paragraph" style:parent-style-name="Text_20_body">
      <style:text-properties style:font-name="PT Astra Serif" officeooo:paragraph-rsid="004e06f7"/>
    </style:style>
    <style:style style:name="P48" style:family="paragraph" style:parent-style-name="Table_20_Contents">
      <style:paragraph-properties fo:text-align="center" style:justify-single-word="false"/>
      <style:text-properties style:font-name="PT Astra Serif" fo:font-size="12pt" officeooo:rsid="01e3c667" officeooo:paragraph-rsid="004e06f7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PT Astra Serif" fo:font-size="12pt" officeooo:rsid="01f777d0" officeooo:paragraph-rsid="004e06f7" style:font-size-asian="12pt" style:font-size-complex="12pt"/>
    </style:style>
    <style:style style:name="P50" style:family="paragraph" style:parent-style-name="Text_20_body">
      <style:text-properties style:font-name="PT Astra Serif" fo:font-size="14pt" fo:letter-spacing="-0.004cm" officeooo:rsid="030e1e5d" officeooo:paragraph-rsid="004e06f7" style:font-size-asian="14pt"/>
    </style:style>
    <style:style style:name="P51" style:family="paragraph" style:parent-style-name="Table_20_Contents">
      <style:paragraph-properties fo:text-align="center" style:justify-single-word="false"/>
      <style:text-properties style:font-name="PT Astra Serif" fo:font-size="12pt" officeooo:rsid="01e3957c" officeooo:paragraph-rsid="004e06f7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PT Astra Serif" fo:font-size="12pt" fo:font-weight="bold" officeooo:rsid="01e28a4f" officeooo:paragraph-rsid="004e06f7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PT Astra Serif" fo:font-size="12pt" fo:font-weight="bold" officeooo:paragraph-rsid="004e06f7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PT Astra Serif" fo:font-size="12pt" fo:font-weight="bold" officeooo:rsid="01f777d0" officeooo:paragraph-rsid="004e06f7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margin-left="0cm" fo:margin-right="0.235cm" fo:margin-top="0cm" fo:margin-bottom="0cm" style:contextual-spacing="false" fo:text-align="start" style:justify-single-word="false" fo:text-indent="0cm" style:auto-text-indent="false"/>
      <style:text-properties style:font-name="PT Astra Serif" officeooo:rsid="01e6c657" officeooo:paragraph-rsid="004e06f7"/>
    </style:style>
    <style:style style:name="P56" style:family="paragraph" style:parent-style-name="Text_20_body">
      <style:text-properties style:font-name="PT Astra Serif" officeooo:rsid="01ea6119" officeooo:paragraph-rsid="004e06f7"/>
    </style:style>
    <style:style style:name="P57" style:family="paragraph" style:parent-style-name="Standard">
      <style:text-properties style:font-name="PT Astra Serif" officeooo:rsid="01ecebce" officeooo:paragraph-rsid="004e06f7"/>
    </style:style>
    <style:style style:name="P58" style:family="paragraph" style:parent-style-name="Text_20_body">
      <style:paragraph-properties fo:text-align="justify" style:justify-single-word="false"/>
      <style:text-properties style:font-name="PT Astra Serif" officeooo:rsid="01ecebce" officeooo:paragraph-rsid="004e06f7"/>
    </style:style>
    <style:style style:name="P59" style:family="paragraph" style:parent-style-name="Text_20_body">
      <style:paragraph-properties fo:text-align="justify" style:justify-single-word="false"/>
      <style:text-properties style:font-name="PT Astra Serif" officeooo:rsid="01ed5eca" officeooo:paragraph-rsid="004e06f7"/>
    </style:style>
    <style:style style:name="P60" style:family="paragraph" style:parent-style-name="Text_20_body">
      <style:paragraph-properties fo:text-align="start" style:justify-single-word="false"/>
      <style:text-properties style:font-name="PT Astra Serif" officeooo:rsid="01ecebce" officeooo:paragraph-rsid="004e06f7"/>
    </style:style>
    <style:style style:name="P61" style:family="paragraph" style:parent-style-name="Text_20_body">
      <style:paragraph-properties fo:text-align="start" style:justify-single-word="false"/>
      <style:text-properties style:font-name="PT Astra Serif" officeooo:rsid="01ee3056" officeooo:paragraph-rsid="004e06f7"/>
    </style:style>
    <style:style style:name="P62" style:family="paragraph" style:parent-style-name="Text_20_body">
      <style:paragraph-properties fo:margin-left="0cm" fo:text-indent="0cm" style:auto-text-indent="false"/>
      <style:text-properties officeooo:rsid="01ee3056" officeooo:paragraph-rsid="004e06f7"/>
    </style:style>
    <style:style style:name="P63" style:family="paragraph" style:parent-style-name="Text_20_body">
      <style:paragraph-properties fo:margin-left="0cm" fo:text-align="start" style:justify-single-word="false" fo:text-indent="0cm" style:auto-text-indent="false"/>
      <style:text-properties style:font-name="PT Astra Serif" officeooo:rsid="020920a6" officeooo:paragraph-rsid="004e06f7"/>
    </style:style>
    <style:style style:name="P64" style:family="paragraph" style:parent-style-name="Text_20_body">
      <style:paragraph-properties fo:text-align="start" style:justify-single-word="false"/>
      <style:text-properties style:font-name="PT Astra Serif" fo:language="ru" fo:country="RU" officeooo:rsid="020a2eaf" officeooo:paragraph-rsid="004e06f7"/>
    </style:style>
    <style:style style:name="P65" style:family="paragraph" style:parent-style-name="Text_20_body">
      <style:paragraph-properties fo:margin-left="0cm" fo:text-align="start" style:justify-single-word="false" fo:text-indent="0cm" style:auto-text-indent="false"/>
      <style:text-properties style:font-name="PT Astra Serif" fo:language="ru" fo:country="RU" officeooo:rsid="020a2eaf" officeooo:paragraph-rsid="004e06f7"/>
    </style:style>
    <style:style style:name="P66" style:family="paragraph" style:parent-style-name="Text_20_body">
      <style:paragraph-properties fo:text-align="start" style:justify-single-word="false"/>
      <style:text-properties style:font-name="PT Astra Serif" fo:language="ru" fo:country="RU" officeooo:rsid="020c061c" officeooo:paragraph-rsid="004e06f7"/>
    </style:style>
    <style:style style:name="P67" style:family="paragraph" style:parent-style-name="Text_20_body">
      <style:paragraph-properties fo:margin-left="0cm" fo:text-align="start" style:justify-single-word="false" fo:text-indent="0cm" style:auto-text-indent="false"/>
      <style:text-properties style:font-name="PT Astra Serif" fo:language="ru" fo:country="RU" officeooo:rsid="020c061c" officeooo:paragraph-rsid="004e06f7"/>
    </style:style>
    <style:style style:name="P68" style:family="paragraph" style:parent-style-name="Standard">
      <style:text-properties style:font-name="PT Astra Serif" officeooo:paragraph-rsid="004e06f7"/>
    </style:style>
    <style:style style:name="P69" style:family="paragraph" style:parent-style-name="Text_20_body">
      <style:text-properties style:font-name="PT Astra Serif" officeooo:rsid="008f1409" officeooo:paragraph-rsid="004e06f7"/>
    </style:style>
    <style:style style:name="P70" style:family="paragraph" style:parent-style-name="Table">
      <style:paragraph-properties fo:keep-with-next="always"/>
      <style:text-properties style:font-name="PT Astra Serif" officeooo:paragraph-rsid="004e06f7"/>
    </style:style>
    <style:style style:name="P71" style:family="paragraph" style:parent-style-name="Text_20_body">
      <style:paragraph-properties fo:margin-left="0cm" fo:text-indent="0cm" style:auto-text-indent="false"/>
      <style:text-properties style:font-name="PT Astra Serif" officeooo:rsid="02ff5d15" officeooo:paragraph-rsid="004e06f7"/>
    </style:style>
    <style:style style:name="P72" style:family="paragraph" style:parent-style-name="Heading_20_2">
      <style:text-properties style:font-name="PT Astra Serif" officeooo:rsid="0033b918" officeooo:paragraph-rsid="00533dae"/>
    </style:style>
    <style:style style:name="P73" style:family="paragraph" style:parent-style-name="Text_20_body">
      <style:text-properties style:font-name="PT Astra Serif" officeooo:paragraph-rsid="00533dae"/>
    </style:style>
    <style:style style:name="P74" style:family="paragraph" style:parent-style-name="Text_20_body" style:list-style-name="L6">
      <style:text-properties style:font-name="PT Astra Serif" officeooo:paragraph-rsid="00533dae"/>
    </style:style>
    <style:style style:name="P75" style:family="paragraph" style:parent-style-name="Text_20_body">
      <style:text-properties style:font-name="PT Astra Serif" fo:language="ru" fo:country="RU" officeooo:rsid="020221d2" officeooo:paragraph-rsid="00533dae"/>
    </style:style>
    <style:style style:name="P76" style:family="paragraph" style:parent-style-name="Text_20_body">
      <style:paragraph-properties fo:text-align="justify" style:justify-single-word="false"/>
      <style:text-properties style:font-name="PT Astra Serif" officeooo:paragraph-rsid="00533dae"/>
    </style:style>
    <style:style style:name="P77" style:family="paragraph" style:parent-style-name="Примечание">
      <style:text-properties style:font-name="PT Astra Serif"/>
    </style:style>
    <style:style style:name="P78" style:family="paragraph" style:parent-style-name="Text_20_body">
      <style:text-properties style:font-name="PT Astra Serif" officeooo:paragraph-rsid="00360b9e"/>
    </style:style>
    <style:style style:name="P79" style:family="paragraph" style:parent-style-name="Footnote">
      <style:text-properties officeooo:rsid="001b2a57" officeooo:paragraph-rsid="001b2a57"/>
    </style:style>
    <style:style style:name="P80" style:family="paragraph" style:parent-style-name="Footnote">
      <style:text-properties officeooo:rsid="0023a124" officeooo:paragraph-rsid="0023a124"/>
    </style:style>
    <style:style style:name="P81" style:family="paragraph" style:parent-style-name="Heading_20_3">
      <style:text-properties style:font-name="PT Astra Serif"/>
    </style:style>
    <style:style style:name="P82" style:family="paragraph" style:parent-style-name="Text_20_body">
      <style:text-properties style:font-name="PT Astra Serif" officeooo:rsid="002afe93" officeooo:paragraph-rsid="002afe93"/>
    </style:style>
    <style:style style:name="P83" style:family="paragraph" style:parent-style-name="Text_20_body" style:list-style-name="L7">
      <style:text-properties style:font-name="PT Astra Serif" officeooo:rsid="002afe93" officeooo:paragraph-rsid="002afe93"/>
    </style:style>
    <style:style style:name="P84" style:family="paragraph" style:parent-style-name="Text_20_body" style:list-style-name="L8">
      <style:text-properties style:font-name="PT Astra Serif" officeooo:rsid="002afe93" officeooo:paragraph-rsid="002afe93"/>
    </style:style>
    <style:style style:name="P85" style:family="paragraph" style:parent-style-name="Text_20_body">
      <style:text-properties style:font-name="PT Astra Serif" officeooo:rsid="002b7efc" officeooo:paragraph-rsid="002b7efc"/>
    </style:style>
    <style:style style:name="P86" style:family="paragraph" style:parent-style-name="Text_20_body" style:list-style-name="L9">
      <style:text-properties style:font-name="PT Astra Serif" officeooo:rsid="002b7efc" officeooo:paragraph-rsid="002b7efc"/>
    </style:style>
    <style:style style:name="P87" style:family="paragraph" style:parent-style-name="Text_20_body" style:list-style-name="L10">
      <style:text-properties style:font-name="PT Astra Serif" officeooo:rsid="002b7efc" officeooo:paragraph-rsid="002b7efc"/>
    </style:style>
    <style:style style:name="P88" style:family="paragraph" style:parent-style-name="Text_20_body" style:list-style-name="L11">
      <style:text-properties style:font-name="PT Astra Serif" officeooo:rsid="002b7efc" officeooo:paragraph-rsid="002b7efc"/>
    </style:style>
    <style:style style:name="P89" style:family="paragraph" style:parent-style-name="Text_20_body" style:list-style-name="L12">
      <style:text-properties style:font-name="PT Astra Serif" officeooo:rsid="002b7efc" officeooo:paragraph-rsid="002b7efc"/>
    </style:style>
    <style:style style:name="P90" style:family="paragraph" style:parent-style-name="Text_20_body" style:list-style-name="L12">
      <style:text-properties style:font-name="PT Astra Serif" officeooo:rsid="002b7efc" officeooo:paragraph-rsid="00360b9e"/>
    </style:style>
    <style:style style:name="P91" style:family="paragraph" style:parent-style-name="Text_20_body" style:list-style-name="Нумерация_20_источников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style:font-name="PT Astra Serif" officeooo:paragraph-rsid="00292d7c"/>
    </style:style>
    <style:style style:name="P92" style:family="paragraph" style:parent-style-name="Text_20_body" style:list-style-name="Нумерация_20_источников" style:master-page-name="">
      <loext:graphic-properties draw:fill="none"/>
      <style:paragraph-properties fo:margin-top="0cm" fo:margin-bottom="0cm" style:contextual-spacing="true" fo:line-height="150%" fo:text-align="justify" style:justify-single-word="false" style:page-number="auto" fo:background-color="transparent"/>
      <style:text-properties style:font-name="PT Astra Serif" officeooo:paragraph-rsid="00292d7c"/>
    </style:style>
    <style:style style:name="P93" style:family="paragraph" style:parent-style-name="Text_20_body" style:list-style-name="Нумерация_20_источников">
      <loext:graphic-properties draw:fill="none"/>
      <style:paragraph-properties fo:margin-left="0cm" fo:margin-top="0cm" fo:margin-bottom="0cm" style:contextual-spacing="true" fo:line-height="150%" fo:text-align="justify" style:justify-single-word="false" fo:text-indent="0cm" style:auto-text-indent="false" fo:background-color="transparent"/>
      <style:text-properties style:font-name="PT Astra Serif" officeooo:paragraph-rsid="00292d7c"/>
    </style:style>
    <style:style style:name="P94" style:family="paragraph" style:parent-style-name="Heading_20_1">
      <style:paragraph-properties fo:break-before="page"/>
      <style:text-properties style:font-name="PT Astra Serif" officeooo:paragraph-rsid="00360b9e"/>
    </style:style>
    <style:style style:name="P95" style:family="paragraph" style:parent-style-name="Heading_20_1">
      <style:text-properties style:font-name="PT Astra Serif" officeooo:paragraph-rsid="00360b9e"/>
    </style:style>
    <style:style style:name="P96" style:family="paragraph" style:parent-style-name="Text_20_body">
      <style:paragraph-properties fo:margin-left="0cm" fo:text-indent="0cm" style:auto-text-indent="false"/>
      <style:text-properties style:font-name="PT Astra Serif"/>
    </style:style>
    <style:style style:name="P97" style:family="paragraph" style:parent-style-name="Text_20_body">
      <style:paragraph-properties fo:margin-left="0cm" fo:text-indent="0cm" style:auto-text-indent="false"/>
      <style:text-properties style:font-name="PT Astra Serif" officeooo:paragraph-rsid="00360b9e"/>
    </style:style>
    <style:style style:name="P98" style:family="paragraph" style:parent-style-name="Text_20_body">
      <style:paragraph-properties fo:margin-left="0cm" fo:text-indent="0cm" style:auto-text-indent="false"/>
      <style:text-properties style:font-name="PT Astra Serif" officeooo:rsid="0037dee9" officeooo:paragraph-rsid="00360b9e"/>
    </style:style>
    <style:style style:name="P99" style:family="paragraph" style:parent-style-name="Листинг">
      <style:paragraph-properties fo:keep-with-next="always"/>
      <style:text-properties style:font-name="PT Astra Serif" officeooo:paragraph-rsid="0023a124"/>
    </style:style>
    <style:style style:name="P100" style:family="paragraph" style:parent-style-name="Оформление_20_кода" style:list-style-name="Нумерация_20_строк_20_кода">
      <style:text-properties style:font-name="PT Astra Serif" officeooo:paragraph-rsid="00360b9e"/>
    </style:style>
    <style:style style:name="P101" style:family="paragraph" style:parent-style-name="Листинг">
      <style:paragraph-properties fo:keep-with-next="always"/>
      <style:text-properties style:font-name="PT Astra Serif"/>
    </style:style>
    <style:style style:name="P102" style:family="paragraph" style:parent-style-name="Оформление_20_кода" style:list-style-name="Нумерация_20_строк_20_кода">
      <style:text-properties style:font-name="PT Astra Serif"/>
    </style:style>
    <style:style style:name="P103" style:family="paragraph" style:parent-style-name="Heading_20_1">
      <style:text-properties style:font-name="PT Astra Serif" officeooo:rsid="0033b918" officeooo:paragraph-rsid="00360b9e"/>
    </style:style>
    <style:style style:name="P104" style:family="paragraph" style:parent-style-name="Text_20_body">
      <style:text-properties style:font-name="PT Astra Serif" officeooo:rsid="002a122f" officeooo:paragraph-rsid="002a122f"/>
    </style:style>
    <style:style style:name="P105" style:family="paragraph" style:parent-style-name="Text_20_body" style:list-style-name="L13">
      <style:text-properties style:font-name="PT Astra Serif" officeooo:rsid="002a122f" officeooo:paragraph-rsid="002a122f"/>
    </style:style>
    <style:style style:name="T1" style:family="text">
      <style:text-properties officeooo:rsid="00391c0b"/>
    </style:style>
    <style:style style:name="T2" style:family="text">
      <style:text-properties fo:language="en" fo:country="US" officeooo:rsid="007a4a5b"/>
    </style:style>
    <style:style style:name="T3" style:family="text">
      <style:text-properties officeooo:rsid="007b93bc"/>
    </style:style>
    <style:style style:name="T4" style:family="text">
      <style:text-properties officeooo:rsid="007a4a5b"/>
    </style:style>
    <style:style style:name="T5" style:family="text">
      <style:text-properties fo:language="en" fo:country="US" officeooo:rsid="007da002"/>
    </style:style>
    <style:style style:name="T6" style:family="text">
      <style:text-properties fo:language="ru" fo:country="RU" officeooo:rsid="007da002"/>
    </style:style>
    <style:style style:name="T7" style:family="text">
      <style:text-properties officeooo:rsid="00464171"/>
    </style:style>
    <style:style style:name="T8" style:family="text">
      <style:text-properties officeooo:rsid="006dfe78"/>
    </style:style>
    <style:style style:name="T9" style:family="text">
      <style:text-properties fo:language="en" fo:country="US" officeooo:rsid="008024b6"/>
    </style:style>
    <style:style style:name="T10" style:family="text">
      <style:text-properties officeooo:rsid="0059dd93"/>
    </style:style>
    <style:style style:name="T11" style:family="text">
      <style:text-properties officeooo:rsid="00497d0e"/>
    </style:style>
    <style:style style:name="T12" style:family="text">
      <style:text-properties officeooo:rsid="02432bbe"/>
    </style:style>
    <style:style style:name="T13" style:family="text">
      <style:text-properties fo:language="en" fo:country="US" officeooo:rsid="0074e775"/>
    </style:style>
    <style:style style:name="T14" style:family="text">
      <style:text-properties fo:language="en" fo:country="US" officeooo:rsid="0075ec7d"/>
    </style:style>
    <style:style style:name="T15" style:family="text">
      <style:text-properties officeooo:rsid="0061ab3d"/>
    </style:style>
    <style:style style:name="T16" style:family="text">
      <style:text-properties fo:language="en" fo:country="US" officeooo:rsid="0082b733"/>
    </style:style>
    <style:style style:name="T17" style:family="text">
      <style:text-properties fo:language="ru" fo:country="RU" officeooo:rsid="0082b733"/>
    </style:style>
    <style:style style:name="T18" style:family="text">
      <style:text-properties officeooo:rsid="00638c18"/>
    </style:style>
    <style:style style:name="T19" style:family="text">
      <style:text-properties officeooo:rsid="0053bcae"/>
    </style:style>
    <style:style style:name="T20" style:family="text">
      <style:text-properties officeooo:rsid="0244dbe6"/>
    </style:style>
    <style:style style:name="T21" style:family="text">
      <style:text-properties officeooo:rsid="02ef8be9"/>
    </style:style>
    <style:style style:name="T22" style:family="text">
      <style:text-properties officeooo:rsid="02f187c1"/>
    </style:style>
    <style:style style:name="T23" style:family="text">
      <style:text-properties officeooo:rsid="02f4e288"/>
    </style:style>
    <style:style style:name="T24" style:family="text">
      <style:text-properties officeooo:rsid="02f37159"/>
    </style:style>
    <style:style style:name="T25" style:family="text">
      <style:text-properties officeooo:rsid="02cae8e1"/>
    </style:style>
    <style:style style:name="T26" style:family="text">
      <style:text-properties officeooo:rsid="005d8870"/>
    </style:style>
    <style:style style:name="T27" style:family="text">
      <style:text-properties officeooo:rsid="005eb102"/>
    </style:style>
    <style:style style:name="T28" style:family="text">
      <style:text-properties officeooo:rsid="0246b1bb"/>
    </style:style>
    <style:style style:name="T29" style:family="text">
      <style:text-properties officeooo:rsid="00604796"/>
    </style:style>
    <style:style style:name="T30" style:family="text">
      <style:text-properties officeooo:rsid="024d4fa3"/>
    </style:style>
    <style:style style:name="T31" style:family="text">
      <style:text-properties officeooo:rsid="024fb74d"/>
    </style:style>
    <style:style style:name="T32" style:family="text">
      <style:text-properties officeooo:rsid="0068377b"/>
    </style:style>
    <style:style style:name="T33" style:family="text">
      <style:text-properties officeooo:rsid="006a322a"/>
    </style:style>
    <style:style style:name="T34" style:family="text">
      <style:text-properties fo:language="en" fo:country="US" officeooo:rsid="008a0b59"/>
    </style:style>
    <style:style style:name="T35" style:family="text">
      <style:text-properties fo:language="ru" fo:country="RU" officeooo:rsid="008a0b59"/>
    </style:style>
    <style:style style:name="T36" style:family="text">
      <style:text-properties officeooo:rsid="0062add9"/>
    </style:style>
    <style:style style:name="T37" style:family="text">
      <style:text-properties officeooo:rsid="025118fc"/>
    </style:style>
    <style:style style:name="T38" style:family="text">
      <style:text-properties officeooo:rsid="00630d04"/>
    </style:style>
    <style:style style:name="T39" style:family="text">
      <style:text-properties officeooo:rsid="006b01f9"/>
    </style:style>
    <style:style style:name="T40" style:family="text">
      <style:text-properties officeooo:rsid="0033b918"/>
    </style:style>
    <style:style style:name="T41" style:family="text">
      <style:text-properties officeooo:rsid="007df13b"/>
    </style:style>
    <style:style style:name="T42" style:family="text">
      <style:text-properties officeooo:rsid="01dfb4a2"/>
    </style:style>
    <style:style style:name="T43" style:family="text">
      <style:text-properties fo:letter-spacing="-0.004cm"/>
    </style:style>
    <style:style style:name="T44" style:family="text">
      <style:text-properties fo:language="en" fo:country="US" officeooo:rsid="00719975"/>
    </style:style>
    <style:style style:name="T45" style:family="text">
      <style:text-properties style:font-name="PT Astra Serif" fo:letter-spacing="-0.004cm" officeooo:rsid="01dfc8de"/>
    </style:style>
    <style:style style:name="T46" style:family="text">
      <style:text-properties fo:font-variant="normal" fo:text-transform="none" style:use-window-font-color="true" loext:opacity="0%" style:font-name="PT Astra Serif" fo:letter-spacing="normal"/>
    </style:style>
    <style:style style:name="T47" style:family="text">
      <style:text-properties style:font-name="PT Astra Serif"/>
    </style:style>
    <style:style style:name="T48" style:family="text">
      <style:text-properties fo:font-variant="normal" fo:text-transform="none" style:use-window-font-color="true" loext:opacity="0%" style:font-name="PT Astra Serif" fo:font-weight="normal" style:font-weight-asian="normal" style:font-weight-complex="normal"/>
    </style:style>
    <style:style style:name="T49" style:family="text">
      <style:text-properties fo:font-variant="normal" fo:text-transform="none" style:use-window-font-color="true" loext:opacity="0%" style:text-position="sub 58%" style:font-name="PT Astra Serif" fo:font-weight="normal" style:font-weight-asian="normal" style:font-weight-complex="normal"/>
    </style:style>
    <style:style style:name="T50" style:family="text">
      <style:text-properties fo:font-variant="normal" fo:text-transform="none" style:use-window-font-color="true" loext:opacity="0%" style:text-position="super 58%" style:font-name="PT Astra Serif" fo:font-weight="normal" style:font-weight-asian="normal" style:font-weight-complex="normal"/>
    </style:style>
    <style:style style:name="T51" style:family="text">
      <style:text-properties fo:font-variant="normal" fo:text-transform="none" style:use-window-font-color="true" loext:opacity="0%" style:text-position="0% 100%" style:font-name="PT Astra Serif" fo:font-weight="normal" style:font-weight-asian="normal" style:font-weight-complex="normal"/>
    </style:style>
    <style:style style:name="T52" style:family="text">
      <style:text-properties fo:font-variant="normal" fo:text-transform="none" style:use-window-font-color="true" loext:opacity="0%" style:text-position="0% 100%" style:font-name="PT Astra Serif" fo:letter-spacing="normal"/>
    </style:style>
    <style:style style:name="T53" style:family="text">
      <style:text-properties fo:font-variant="normal" fo:text-transform="none" style:use-window-font-color="true" loext:opacity="0%" style:text-position="0% 100%" style:font-name="PT Astra Serif" fo:font-weight="normal" officeooo:rsid="01e0f486" style:font-weight-asian="normal" style:font-weight-complex="normal"/>
    </style:style>
    <style:style style:name="T54" style:family="text">
      <style:text-properties fo:font-variant="normal" fo:text-transform="none" style:use-window-font-color="true" loext:opacity="0%" style:text-position="0% 100%" style:font-name="PT Astra Serif" fo:letter-spacing="normal" officeooo:rsid="01e0f486"/>
    </style:style>
    <style:style style:name="T55" style:family="text">
      <style:text-properties fo:font-variant="normal" fo:text-transform="none" style:use-window-font-color="true" loext:opacity="0%" style:text-position="0% 100%" style:font-name="PT Astra Serif" fo:letter-spacing="normal" fo:font-weight="normal" officeooo:rsid="01e0f486" style:font-weight-asian="normal" style:font-weight-complex="normal"/>
    </style:style>
    <style:style style:name="T56" style:family="text">
      <style:text-properties fo:font-variant="normal" fo:text-transform="none" style:use-window-font-color="true" loext:opacity="0%" style:text-position="0% 100%" style:font-name="PT Astra Serif" fo:letter-spacing="-0.004cm" fo:font-weight="normal" officeooo:rsid="01dfc8de" style:font-weight-asian="normal" style:font-weight-complex="normal"/>
    </style:style>
    <style:style style:name="T57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07a42fa" style:font-weight-asian="normal" style:font-weight-complex="normal"/>
    </style:style>
    <style:style style:name="T58" style:family="text">
      <style:text-properties officeooo:rsid="00789abd"/>
    </style:style>
    <style:style style:name="T59" style:family="text">
      <style:text-properties officeooo:rsid="01f9d0e1"/>
    </style:style>
    <style:style style:name="T60" style:family="text">
      <style:text-properties officeooo:rsid="0316cf8e"/>
    </style:style>
    <style:style style:name="T61" style:family="text">
      <style:text-properties officeooo:rsid="031c71a4"/>
    </style:style>
    <style:style style:name="T62" style:family="text">
      <style:text-properties officeooo:rsid="032198f1"/>
    </style:style>
    <style:style style:name="T63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221408" style:font-weight-asian="normal" style:font-weight-complex="normal"/>
    </style:style>
    <style:style style:name="T64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24024f" style:font-weight-asian="normal" style:font-weight-complex="normal"/>
    </style:style>
    <style:style style:name="T65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0779137" style:font-weight-asian="normal" style:font-weight-complex="normal"/>
    </style:style>
    <style:style style:name="T66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b658a" style:font-weight-asian="normal" style:font-weight-complex="normal"/>
    </style:style>
    <style:style style:name="T67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9a9dd" style:font-weight-asian="normal" style:font-weight-complex="normal"/>
    </style:style>
    <style:style style:name="T68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ecb74" style:font-weight-asian="normal" style:font-weight-complex="normal"/>
    </style:style>
    <style:style style:name="T69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0f20f2" style:font-weight-asian="normal" style:font-weight-complex="normal"/>
    </style:style>
    <style:style style:name="T70" style:family="text">
      <style:text-properties fo:font-variant="normal" fo:text-transform="none" style:use-window-font-color="true" loext:opacity="0%" style:text-position="0% 100%" style:font-name="PT Astra Serif" fo:font-size="14pt" fo:letter-spacing="normal" fo:language="ru" fo:country="RU" fo:font-weight="normal" officeooo:rsid="03183bcf" style:font-size-asian="14pt" style:font-weight-asian="normal" style:font-weight-complex="normal"/>
    </style:style>
    <style:style style:name="T71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1a7602" style:font-weight-asian="normal" style:font-weight-complex="normal"/>
    </style:style>
    <style:style style:name="T72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1c71a4" style:font-weight-asian="normal" style:font-weight-complex="normal"/>
    </style:style>
    <style:style style:name="T73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1eba94" style:font-weight-asian="normal" style:font-weight-complex="normal"/>
    </style:style>
    <style:style style:name="T74" style:family="text">
      <style:text-properties fo:font-variant="normal" fo:text-transform="none" style:use-window-font-color="true" loext:opacity="0%" style:text-position="0% 100%" style:font-name="PT Astra Serif" fo:letter-spacing="normal" fo:language="ru" fo:country="RU" fo:font-weight="normal" officeooo:rsid="03264420" style:font-weight-asian="normal" style:font-weight-complex="normal"/>
    </style:style>
    <style:style style:name="T75" style:family="text">
      <style:text-properties fo:font-variant="normal" fo:text-transform="none" style:use-window-font-color="true" loext:opacity="0%" style:font-name="PT Astra Serif" fo:letter-spacing="normal" officeooo:rsid="01dfc8de"/>
    </style:style>
    <style:style style:name="T76" style:family="text">
      <style:text-properties fo:font-size="14pt" style:font-size-asian="14pt"/>
    </style:style>
    <style:style style:name="T77" style:family="text">
      <style:text-properties fo:font-size="14pt" fo:letter-spacing="-0.012cm" style:font-size-asian="14pt"/>
    </style:style>
    <style:style style:name="T78" style:family="text">
      <style:text-properties fo:font-size="14pt" fo:letter-spacing="-0.016cm" style:font-size-asian="14pt"/>
    </style:style>
    <style:style style:name="T79" style:family="text">
      <style:text-properties fo:font-size="14pt" fo:letter-spacing="-0.014cm" style:font-size-asian="14pt"/>
    </style:style>
    <style:style style:name="T80" style:family="text">
      <style:text-properties fo:font-size="14pt" fo:letter-spacing="-0.014cm" officeooo:rsid="030c6de9" style:font-size-asian="14pt"/>
    </style:style>
    <style:style style:name="T81" style:family="text">
      <style:text-properties fo:font-size="14pt" fo:letter-spacing="-0.004cm" style:font-size-asian="14pt"/>
    </style:style>
    <style:style style:name="T82" style:family="text">
      <style:text-properties style:text-position="0% 100%" officeooo:rsid="01ea42e7"/>
    </style:style>
    <style:style style:name="T83" style:family="text">
      <style:text-properties officeooo:rsid="01ea6119"/>
    </style:style>
    <style:style style:name="T84" style:family="text">
      <style:text-properties officeooo:rsid="007f467b"/>
    </style:style>
    <style:style style:name="T85" style:family="text">
      <style:text-properties officeooo:rsid="0082e206"/>
    </style:style>
    <style:style style:name="T86" style:family="text">
      <style:text-properties officeooo:rsid="01ee5f0b"/>
    </style:style>
    <style:style style:name="T87" style:family="text">
      <style:text-properties style:text-position="sub 58%"/>
    </style:style>
    <style:style style:name="T88" style:family="text">
      <style:text-properties officeooo:rsid="01ed5eca"/>
    </style:style>
    <style:style style:name="T89" style:family="text">
      <style:text-properties style:text-position="0% 100%"/>
    </style:style>
    <style:style style:name="T90" style:family="text">
      <style:text-properties style:text-position="0% 100%" officeooo:rsid="01ee5f0b"/>
    </style:style>
    <style:style style:name="T91" style:family="text">
      <style:text-properties style:text-position="sub 58%" officeooo:rsid="01ecebce"/>
    </style:style>
    <style:style style:name="T92" style:family="text">
      <style:text-properties style:text-position="0% 100%" officeooo:rsid="01ecebce"/>
    </style:style>
    <style:style style:name="T93" style:family="text">
      <style:text-properties style:text-position="0% 100%" officeooo:rsid="01ed5eca"/>
    </style:style>
    <style:style style:name="T94" style:family="text">
      <style:text-properties style:text-position="0% 100%" officeooo:rsid="00557991"/>
    </style:style>
    <style:style style:name="T95" style:family="text">
      <style:text-properties officeooo:rsid="01f2f670"/>
    </style:style>
    <style:style style:name="T96" style:family="text">
      <style:text-properties officeooo:rsid="008407e0"/>
    </style:style>
    <style:style style:name="T97" style:family="text">
      <style:text-properties officeooo:rsid="032e8980"/>
    </style:style>
    <style:style style:name="T98" style:family="text">
      <style:text-properties officeooo:rsid="01fc38ba"/>
    </style:style>
    <style:style style:name="T99" style:family="text">
      <style:text-properties officeooo:rsid="01ff4ae4"/>
    </style:style>
    <style:style style:name="T100" style:family="text">
      <style:text-properties officeooo:rsid="02043720"/>
    </style:style>
    <style:style style:name="T101" style:family="text">
      <style:text-properties officeooo:rsid="02065111"/>
    </style:style>
    <style:style style:name="T102" style:family="text">
      <style:text-properties officeooo:rsid="01ff4e74"/>
    </style:style>
    <style:style style:name="T103" style:family="text">
      <style:text-properties officeooo:rsid="0201b593"/>
    </style:style>
    <style:style style:name="T104" style:family="text">
      <style:text-properties style:text-position="0% 100%" officeooo:rsid="0202bda4"/>
    </style:style>
    <style:style style:name="T105" style:family="text">
      <style:text-properties style:text-position="0% 100%" fo:font-size="14pt" fo:letter-spacing="-0.004cm" officeooo:rsid="0202bda4" style:font-size-asian="14pt"/>
    </style:style>
    <style:style style:name="T106" style:family="text">
      <style:text-properties officeooo:rsid="0084ac64"/>
    </style:style>
    <style:style style:name="T107" style:family="text">
      <style:text-properties officeooo:rsid="0085e897"/>
    </style:style>
    <style:style style:name="T108" style:family="text">
      <style:text-properties style:text-position="sub 58%" style:font-name="PT Astra Serif"/>
    </style:style>
    <style:style style:name="T109" style:family="text">
      <style:text-properties fo:font-variant="normal" fo:text-transform="none" style:use-window-font-color="true" loext:opacity="0%" style:font-name="PT Astra Serif" fo:font-size="12pt" fo:letter-spacing="normal" officeooo:rsid="01dfc8de" style:font-size-asian="12pt" style:font-size-complex="12pt"/>
    </style:style>
    <style:style style:name="T110" style:family="text">
      <style:text-properties fo:font-variant="normal" fo:text-transform="none" style:use-window-font-color="true" loext:opacity="0%" style:font-name="PT Astra Serif" fo:font-size="14pt" fo:letter-spacing="normal" fo:font-weight="normal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style:use-window-font-color="true" loext:opacity="0%" style:text-position="sub 58%" style:font-name="PT Astra Serif" fo:font-size="14pt" fo:letter-spacing="normal" fo:font-weight="normal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style:use-window-font-color="true" loext:opacity="0%" style:text-position="0% 100%" style:font-name="PT Astra Serif" fo:font-size="14pt" fo:letter-spacing="normal" fo:font-weight="normal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style:use-window-font-color="true" loext:opacity="0%" style:text-position="0% 100%" style:font-name="PT Astra Serif" fo:font-size="12pt" fo:letter-spacing="normal" officeooo:rsid="01dfc8de" style:font-size-asian="12pt" style:font-size-complex="12pt"/>
    </style:style>
    <style:style style:name="T114" style:family="text">
      <style:text-properties officeooo:rsid="020d70ed"/>
    </style:style>
    <style:style style:name="T115" style:family="text">
      <style:text-properties fo:language="ru" fo:country="RU" officeooo:rsid="020a2eaf"/>
    </style:style>
    <style:style style:name="T116" style:family="text">
      <style:text-properties fo:language="ru" fo:country="RU" officeooo:rsid="020d70ed"/>
    </style:style>
    <style:style style:name="T117" style:family="text">
      <style:text-properties fo:language="ru" fo:country="RU" officeooo:rsid="020c061c"/>
    </style:style>
    <style:style style:name="T118" style:family="text">
      <style:text-properties fo:language="ru" fo:country="RU" officeooo:rsid="020e76f4"/>
    </style:style>
    <style:style style:name="T119" style:family="text">
      <style:text-properties fo:font-size="14pt" fo:letter-spacing="-0.021cm" style:font-size-asian="14pt"/>
    </style:style>
    <style:style style:name="T120" style:family="text">
      <style:text-properties fo:font-size="14pt" fo:letter-spacing="-0.018cm" style:font-size-asian="14pt"/>
    </style:style>
    <style:style style:name="T121" style:family="text">
      <style:text-properties fo:font-size="14pt" fo:letter-spacing="-0.03cm" style:font-size-asian="14pt"/>
    </style:style>
    <style:style style:name="T122" style:family="text">
      <style:text-properties fo:font-size="14pt" fo:letter-spacing="-0.023cm" style:font-size-asian="14pt"/>
    </style:style>
    <style:style style:name="T123" style:family="text">
      <style:text-properties fo:font-size="14pt" fo:letter-spacing="-0.026cm" style:font-size-asian="14pt"/>
    </style:style>
    <style:style style:name="T124" style:family="text">
      <style:text-properties fo:font-size="14pt" fo:letter-spacing="-0.028cm" style:font-size-asian="14pt"/>
    </style:style>
    <style:style style:name="T125" style:family="text">
      <style:text-properties fo:font-size="14pt" fo:letter-spacing="-0.007cm" style:font-size-asian="14pt"/>
    </style:style>
    <style:style style:name="T126" style:family="text">
      <style:text-properties fo:font-size="14pt" fo:letter-spacing="-0.011cm" style:font-size-asian="14pt"/>
    </style:style>
    <style:style style:name="T127" style:family="text">
      <style:text-properties fo:font-size="14pt" fo:letter-spacing="-0.005cm" style:font-size-asian="14pt"/>
    </style:style>
    <style:style style:name="T128" style:family="text">
      <style:text-properties fo:font-size="14pt" fo:letter-spacing="0.002cm" style:font-size-asian="14pt"/>
    </style:style>
    <style:style style:name="T129" style:family="text">
      <style:text-properties fo:font-size="14pt" fo:letter-spacing="-0.019cm" style:font-size-asian="14pt"/>
    </style:style>
    <style:style style:name="T130" style:family="text">
      <style:text-properties fo:font-size="14pt" fo:letter-spacing="-0.007cm" officeooo:rsid="020def9a" style:font-size-asian="14pt"/>
    </style:style>
    <style:style style:name="T131" style:family="text">
      <style:text-properties fo:language="en" fo:country="US" officeooo:rsid="020764ef"/>
    </style:style>
    <style:style style:name="T132" style:family="text">
      <style:text-properties fo:language="ru" fo:country="RU" officeooo:rsid="020764ef"/>
    </style:style>
    <style:style style:name="T133" style:family="text">
      <style:text-properties fo:language="ru" fo:country="RU" officeooo:rsid="020b83e4"/>
    </style:style>
    <style:style style:name="T134" style:family="text">
      <style:text-properties fo:language="ru" fo:country="RU" officeooo:rsid="02110fa2"/>
    </style:style>
    <style:style style:name="T135" style:family="text">
      <style:text-properties fo:language="ru" fo:country="RU" officeooo:rsid="01f4930d"/>
    </style:style>
    <style:style style:name="T136" style:family="text">
      <style:text-properties fo:language="ru" fo:country="RU" officeooo:rsid="020a2d5b"/>
    </style:style>
    <style:style style:name="T137" style:family="text">
      <style:text-properties fo:language="ru" fo:country="RU" officeooo:rsid="020221d2"/>
    </style:style>
    <style:style style:name="T138" style:family="text">
      <style:text-properties officeooo:rsid="021b3513"/>
    </style:style>
    <style:style style:name="T139" style:family="text">
      <style:text-properties fo:language="en" fo:country="US" officeooo:rsid="020cf027"/>
    </style:style>
    <style:style style:name="T140" style:family="text">
      <style:text-properties fo:language="ru" fo:country="RU" officeooo:rsid="020cf027"/>
    </style:style>
    <style:style style:name="T141" style:family="text">
      <style:text-properties officeooo:rsid="021f1ebe"/>
    </style:style>
    <style:style style:name="T142" style:family="text">
      <style:text-properties officeooo:rsid="001fb69e"/>
    </style:style>
    <style:style style:name="T143" style:family="text">
      <style:text-properties officeooo:rsid="00339e80"/>
    </style:style>
    <style:style style:name="T144" style:family="text">
      <style:text-properties officeooo:rsid="001c1d0e"/>
    </style:style>
    <style:style style:name="T145" style:family="text">
      <style:text-properties style:text-position="super 58%"/>
    </style:style>
    <style:style style:name="T146" style:family="text">
      <style:text-properties officeooo:rsid="0023a124"/>
    </style:style>
    <style:style style:name="T147" style:family="text">
      <style:text-properties officeooo:rsid="0037368d"/>
    </style:style>
    <style:style style:name="T148" style:family="text">
      <style:text-properties officeooo:rsid="002b7efc"/>
    </style:style>
    <style:style style:name="T149" style:family="text">
      <style:text-properties officeooo:rsid="001ca832"/>
    </style:style>
    <style:style style:name="T150" style:family="text">
      <style:text-properties officeooo:rsid="0037dee9"/>
    </style:style>
    <style:style style:name="T151" style:family="text">
      <style:text-properties officeooo:rsid="0039c802"/>
    </style:style>
    <style:style style:name="T152" style:family="text">
      <style:text-properties officeooo:rsid="0025e476"/>
    </style:style>
    <style:style style:name="T153" style:family="text">
      <style:text-properties officeooo:rsid="00271bda"/>
    </style:style>
    <style:style style:name="T154" style:family="text">
      <style:text-properties officeooo:rsid="0034b12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 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1" text:separation-character="." text:name="Equation"/>
      </text:sequence-decls>
      <text:p text:style-name="P1">Министерство образования и науки</text:p>
      <text:p text:style-name="P2">Краснодарского края</text:p>
      <text:p text:style-name="P2">ГБПОУ КК ЕПК</text:p>
      <text:p text:style-name="P3"/>
      <text:p text:style-name="P3"/>
      <text:p text:style-name="P2">Отделение педагогики</text:p>
      <text:p text:style-name="P2">Специальность 09.02.07 Информационные системы и программирование</text:p>
      <text:p text:style-name="P3"/>
      <text:p text:style-name="P3"/>
      <text:p text:style-name="P3"/>
      <text:p text:style-name="P2">Студент И-42 группы</text:p>
      <text:p text:style-name="P2"><text:tab/>САМСЫКА РОДИОН МИХАЙЛОВИЧ</text:p>
      <text:p text:style-name="P3"/>
      <text:p text:style-name="P4">РАЗРАБОТКА ПРОГРАММЫ ДЛЯ АВТОМАТИЗАЦИИ ОФОРМЛЕНИЯ ЗАКАЗОВ В РЕСТОРАНЕ</text:p>
      <text:p text:style-name="P5"/>
      <text:p text:style-name="P5">Дипломная работа <text:span text:style-name="T1">(Дипломный проект)</text:span></text:p>
      <text:p text:style-name="P3"/>
      <text:p text:style-name="P3"/>
      <text:p text:style-name="P3"/>
      <text:p text:style-name="P3"/>
      <text:p text:style-name="P6">Научный руководитель:</text:p>
      <text:p text:style-name="P6">Фомин Андрей Томасович</text:p>
      <text:p text:style-name="P3"/>
      <text:p text:style-name="P3"/>
      <text:p text:style-name="P3"/>
      <text:p text:style-name="P3"/>
      <text:p text:style-name="P3"/>
      <text:p text:style-name="P2"/>
      <text:p text:style-name="P2">г. Ейск, 202<text:span text:style-name="T1">6</text:span> г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7"><text:a xlink:type="simple" xlink:href="#__RefHeading___Toc8882_1636301399" office:name="ПЕРЕЧЕНЬ СОКРАЩЕНИЙ И ОБОЗНАЧЕНИЙ" text:style-name="Index_20_Link" text:visited-style-name="Index_20_Link">ПЕРЕЧЕНЬ СОКРАЩЕНИЙ И ОБОЗНАЧЕНИЙ<text:tab/>4</text:a></text:p>
          <text:p text:style-name="P7"><text:a xlink:type="simple" xlink:href="#__RefHeading___Toc8884_1636301399" office:name="ВВЕДЕНИЕ" text:style-name="Index_20_Link" text:visited-style-name="Index_20_Link">ВВЕДЕНИЕ<text:tab/>5</text:a></text:p>
          <text:p text:style-name="P7"><text:a xlink:type="simple" xlink:href="#__RefHeading___Toc8886_1636301399" office:name="ГЛАВА 1 ПРОЕКТИРОВАНИЕ ПРИЛОЖЕНИЯ" text:style-name="Index_20_Link" text:visited-style-name="Index_20_Link">ГЛАВА 1 ПРОЕКТИРОВАНИЕ ПРИЛОЖЕНИЯ<text:tab/>6</text:a></text:p>
          <text:p text:style-name="P8"><text:a xlink:type="simple" xlink:href="#__RefHeading___Toc8888_1636301399" office:name="1.1 Модель предметной области" text:style-name="Index_20_Link" text:visited-style-name="Index_20_Link">1.1 Модель предметной области<text:tab/>6</text:a></text:p>
          <text:p text:style-name="P8"><text:a xlink:type="simple" xlink:href="#__RefHeading___Toc3714_962412752" office:name="1.2 Предварительное определение требований" text:style-name="Index_20_Link" text:visited-style-name="Index_20_Link">1.2 Предварительное определение требований<text:tab/>10</text:a></text:p>
          <text:p text:style-name="P9"><text:a xlink:type="simple" xlink:href="#__RefHeading___Toc3716_962412752" office:name="1.2.1 Общее описание" text:style-name="Index_20_Link" text:visited-style-name="Index_20_Link">1.2.1 Общее описание<text:tab/>10</text:a></text:p>
          <text:p text:style-name="P9"><text:a xlink:type="simple" xlink:href="#__RefHeading___Toc11346_567402320" office:name="1.2.2 Функциональные требования" text:style-name="Index_20_Link" text:visited-style-name="Index_20_Link">1.2.2 Функциональные требования<text:tab/>11</text:a></text:p>
          <text:p text:style-name="P9"><text:a xlink:type="simple" xlink:href="#__RefHeading___Toc11348_567402320" office:name="1.2.3 Требования к данным" text:style-name="Index_20_Link" text:visited-style-name="Index_20_Link">1.2.3 Требования к данным<text:tab/>11</text:a></text:p>
          <text:p text:style-name="P9"><text:a xlink:type="simple" xlink:href="#__RefHeading___Toc11356_567402320" office:name="1.2.4 Требования к внешним интерфейсам" text:style-name="Index_20_Link" text:visited-style-name="Index_20_Link">1.2.4 Требования к внешним интерфейсам<text:tab/>13</text:a></text:p>
          <text:p text:style-name="P9"><text:a xlink:type="simple" xlink:href="#__RefHeading___Toc11364_567402320" office:name="1.2.5 Атрибуты качества" text:style-name="Index_20_Link" text:visited-style-name="Index_20_Link">1.2.5 Атрибуты качества<text:tab/>14</text:a></text:p>
          <text:p text:style-name="P8"><text:a xlink:type="simple" xlink:href="#__RefHeading___Toc8892_1636301399" office:name="1.3 Показатели экономической эффективности" text:style-name="Index_20_Link" text:visited-style-name="Index_20_Link">1.3 Показатели экономической эффективности<text:tab/>14</text:a></text:p>
          <text:p text:style-name="P9"><text:a xlink:type="simple" xlink:href="#__RefHeading___Toc2024_2593696514" office:name="1.3.1 Расчет себестоимости программного продукта" text:style-name="Index_20_Link" text:visited-style-name="Index_20_Link">1.3.1 Расчет себестоимости программного продукта<text:tab/>14</text:a></text:p>
          <text:p text:style-name="P9"><text:a xlink:type="simple" xlink:href="#__RefHeading___Toc2026_2593696514" office:name="1.3.2 Расчет экономического эффекта программного продукта" text:style-name="Index_20_Link" text:visited-style-name="Index_20_Link">1.3.2 Расчет экономического эффекта программного продукта<text:tab/>15</text:a></text:p>
          <text:p text:style-name="P7"><text:a xlink:type="simple" xlink:href="#__RefHeading___Toc8894_1636301399" office:name="ГЛАВА 2 РЕАЛИЗАЦИЯ ПРОГРАММНЫХ МОДУЛЕЙ" text:style-name="Index_20_Link" text:visited-style-name="Index_20_Link">ГЛАВА 2 РЕАЛИЗАЦИЯ ПРОГРАММНЫХ МОДУЛЕЙ<text:tab/>18</text:a></text:p>
          <text:p text:style-name="P8"><text:a xlink:type="simple" xlink:href="#__RefHeading___Toc19695_1636301399%20%D0%9A%D0%BE%D0%BF%D0%B8%D1%8F%201" office:name="2.1 Технологии программирования" text:style-name="Index_20_Link" text:visited-style-name="Index_20_Link">2.1 Технологии программирования<text:tab/>18</text:a></text:p>
          <text:p text:style-name="P8"><text:a xlink:type="simple" xlink:href="#__RefHeading___Toc8896_1636301399" office:name="2.2 Описание программных модулей" text:style-name="Index_20_Link" text:visited-style-name="Index_20_Link">2.2 Описание программных модулей<text:tab/>19</text:a></text:p>
          <text:p text:style-name="P8"><text:a xlink:type="simple" xlink:href="#__RefHeading___Toc8898_1636301399" office:name="2.3 Интеграция программных модулей" text:style-name="Index_20_Link" text:visited-style-name="Index_20_Link">2.3 Интеграция программных модулей<text:tab/>19</text:a></text:p>
          <text:p text:style-name="P8"><text:a xlink:type="simple" xlink:href="#__RefHeading___Toc8900_1636301399" office:name="2.4 Описание программного интерфейса" text:style-name="Index_20_Link" text:visited-style-name="Index_20_Link">2.4 Описание программного интерфейса<text:tab/>20</text:a></text:p>
          <text:p text:style-name="P9"><text:a xlink:type="simple" xlink:href="#__RefHeading___Toc11261_1636301399" office:name="2.4.1 Первый пункт" text:style-name="Index_20_Link" text:visited-style-name="Index_20_Link">2.4.1 Первый пункт<text:tab/>20</text:a></text:p>
          <text:p text:style-name="P9"><text:a xlink:type="simple" xlink:href="#__RefHeading___Toc11263_1636301399" office:name="2.4.2 Это второй пункт" text:style-name="Index_20_Link" text:visited-style-name="Index_20_Link">2.4.2 Это второй пункт<text:tab/>20</text:a></text:p>
          <text:p text:style-name="P7"><text:a xlink:type="simple" xlink:href="#__RefHeading___Toc8902_1636301399" office:name="ЗАКЛЮЧЕНИЕ" text:style-name="Index_20_Link" text:visited-style-name="Index_20_Link">ЗАКЛЮЧЕНИЕ<text:tab/>22</text:a></text:p>
          <text:p text:style-name="P7"><text:a xlink:type="simple" xlink:href="#__RefHeading___Toc8904_1636301399" office:name="СПИСОК ИСПОЛЬЗОВАННЫХ ИСТОЧНИКОВ" text:style-name="Index_20_Link" text:visited-style-name="Index_20_Link">СПИСОК ИСПОЛЬЗОВАННЫХ ИСТОЧНИКОВ<text:tab/>23</text:a></text:p>
          <text:p text:style-name="P7"><text:a xlink:type="simple" xlink:href="#__RefHeading___Toc8906_1636301399" office:name="ПРИЛОЖЕНИЕ А" text:style-name="Index_20_Link" text:visited-style-name="Index_20_Link">ПРИЛОЖЕНИЕ А<text:tab/>24</text:a></text:p>
          <text:p text:style-name="P7"><text:a xlink:type="simple" xlink:href="#__RefHeading___Toc1720_2115060514" office:name="Листинги программного кода" text:style-name="Index_20_Link" text:visited-style-name="Index_20_Link">Листинги программного кода<text:tab/>24</text:a></text:p>
          <text:p text:style-name="P7"><text:a xlink:type="simple" xlink:href="#__RefHeading___Toc8908_1636301399%20%D0%9A%D0%BE%D0%BF%D0%B8%D1%8F%201" office:name="ПРИЛОЖЕНИЕ Б" text:style-name="Index_20_Link" text:visited-style-name="Index_20_Link">ПРИЛОЖЕНИЕ Б<text:tab/>26</text:a></text:p>
          <text:p text:style-name="P7"><text:a xlink:type="simple" xlink:href="#__RefHeading___Toc1722_2115060514" office:name="Тест-кейсы и тест-сьюты" text:style-name="Index_20_Link" text:visited-style-name="Index_20_Link">Тест-кейсы и тест-сьюты<text:tab/>26</text:a></text:p>
          <text:p text:style-name="P7"><text:a xlink:type="simple" xlink:href="#__RefHeading___Toc8908_1636301399" office:name="ПРИЛОЖЕНИЕ В" text:style-name="Index_20_Link" text:visited-style-name="Index_20_Link">ПРИЛОЖЕНИЕ В<text:tab/>27</text:a></text:p>
          <text:p text:style-name="P7"><text:a xlink:type="simple" xlink:href="#__RefHeading___Toc1724_2115060514" office:name="Документирование программного кода" text:style-name="Index_20_Link" text:visited-style-name="Index_20_Link"><text:soft-page-break/>Документирование программного кода<text:tab/>27</text:a></text:p>
        </text:index-body>
      </text:table-of-content>
      <text:p text:style-name="P10"/>
      <text:h text:style-name="P11" text:outline-level="1"><text:bookmark-start text:name="__RefHeading___Toc8882_1636301399"/>ПЕРЕЧЕНЬ СОКРАЩЕНИЙ И ОБОЗНАЧЕНИЙ<text:bookmark-end text:name="__RefHeading___Toc8882_1636301399"/></text:h>
      <text:p text:style-name="P3"/>
      <text:p text:style-name="P3">В настоящем курсовом проекте применяются следующие сокращения и обозначения.</text:p>
      <text:p text:style-name="P12">БД — база данных</text:p>
      <text:p text:style-name="P13">ОС (OS) — операционная система</text:p>
      <text:p text:style-name="P13">ПК (PC) — персональный компьютер</text:p>
      <text:p text:style-name="P13">ПО — программное обеспечение</text:p>
      <text:p text:style-name="P14">ПП — программный продукт</text:p>
      <text:p text:style-name="P13">СУБД (DBMS) — система управления базой данных</text:p>
      <text:p text:style-name="P15"/>
      <text:p text:style-name="P3"/>
      <text:h text:style-name="P11" text:outline-level="1"><text:bookmark-start text:name="__RefHeading___Toc8884_1636301399"/>ВВЕДЕНИЕ<text:bookmark-end text:name="__RefHeading___Toc8884_1636301399"/></text:h>
      <text:p text:style-name="P3"/>
      <text:p text:style-name="P3">Тема моего проекта «Разработка программы для автоматизации оформления заказов в ресторане».</text:p>
      <text:p text:style-name="P3">Предмет – автоматизация информационных процессов предметной области «Ресторан».</text:p>
      <text:p text:style-name="P3">Цель работы – разработка автоматизированной системы для оформления заказов в предметной области «Ресторан».</text:p>
      <text:p text:style-name="P3">Объект – предметная область «Ресторан».</text:p>
      <text:p text:style-name="P3">Для достижения поставленной цели курсового проекта необходимо решить следующие задачи:</text:p>
      <text:list text:style-name="L1">
        <text:list-item>
          <text:p text:style-name="P16">проанализировать предметную область и обосновать актуальность проекта. </text:p>
        </text:list-item>
        <text:list-item>
          <text:p text:style-name="P16">выбрать язык программирования и среду разработки;</text:p>
        </text:list-item>
        <text:list-item>
          <text:p text:style-name="P16">спроектировать структуру и модули программного обеспечения;</text:p>
        </text:list-item>
        <text:list-item>
          <text:p text:style-name="P16">разработать программное обеспечение.</text:p>
        </text:list-item>
      </text:list>
      <text:p text:style-name="P3">Структура работы: курсовой проект состоит из введения, двух глав, заключения, списка литературы. Во введении обоснована актуальность темы исследования. В первой главе описано проектирование системы. Вторая глава посвящена описанию процесса разработки программных модулей.</text:p>
      <text:p text:style-name="P3"/>
      <text:h text:style-name="P11" text:outline-level="1"><text:bookmark-start text:name="__RefHeading___Toc8886_1636301399"/>ГЛАВА 1 ПРОЕКТИРОВАНИЕ ПРИЛОЖЕНИЯ<text:bookmark-end text:name="__RefHeading___Toc8886_1636301399"/></text:h>
      <text:h text:style-name="P17" text:outline-level="2"><text:bookmark-start text:name="__RefHeading___Toc8888_1636301399"/>1.1 Модель предметной области<text:bookmark-end text:name="__RefHeading___Toc8888_1636301399"/></text:h>
      <text:p text:style-name="P3">Ресторан — это предприятие общественного питания <text:span text:style-name="T2">[</text:span><text:bookmark-ref text:reference-format="number-no-superior" text:ref-name="__RefNumPara__4995_2159724457">2</text:bookmark-ref>, <text:span text:style-name="T3">с. </text:span><text:span text:style-name="T4">3</text:span><text:span text:style-name="T2">]</text:span>, предоставляющее услуги в сфере кулинарии повышенной категории. Он специализируется на производстве, реализации и организации потребления кулинарной продукции, включая сложные, фирменные блюда и напитки. Основным способом организации потребления является подача блюд в зале ресторана <text:span text:style-name="T5">[</text:span><text:span text:style-name="T5"><text:bookmark-ref text:reference-format="number-no-superior" text:ref-name="__RefNumPara__4997_2159724457">1</text:bookmark-ref></text:span><text:span text:style-name="T5">, </text:span><text:span text:style-name="T6">с. 1</text:span><text:span text:style-name="T5">]</text:span>. </text:p>
      <text:p text:style-name="P3">В отличие от заведений более простого формата, ресторан делает акцент на уникальном меню, высоком уровне сервиса и создании особой атмосферы, что формирует его ценностное предложение для гостей. Несмотря на более высокий ценовой сегмент, ресторан, как и любое предприятие общественного питания, является важной и высококонкурентной сферой деятельности, где борьба за клиента ведется не только за счет качества кухни, но и за счет общего впечатления и уровня обслуживания.</text:p>
      <text:p text:style-name="P3">Предварительное моделирование предметной области позволяет выявить основные бизнес-процессы. К ним относятся приём и обработка заказов от гостей, передача заказов на кухню и в бар, непосредственно процесс приготовления блюд и напитков, обслуживание клиентов, а также учёт и управление складскими запасами. Иногда в ресторанах сохраняются устаревшие, не автоматизированные методы работы: официанты принимают заказы, записывая их в блокноты или на листы бумаги, которые затем вручную переносятся на кухню и в бар. Для обеспечения бесперебойного процесса приготовления необходимы поставки продуктов, что требует постоянного контроля за их наличием на складе, проведения инвентаризации и своевременного формирования заявок для поставщиков. Отсутствие единой автоматизированной системы для управления этими процессами приводит к <text:soft-page-break/>риску человеческих ошибок, замедлению обслуживания и сложностям в оперативном управлении ресурсами.</text:p>
      <text:p text:style-name="P3">Процесс приема заказа в ресторане представляет собой последовательность взаимосвязанных операций, начинающихся с установления контакта с гостем и заканчивающихся передачей сформированного заказа на производство. Изначально официант осуществляет подход к столику с целью приветствия и представления меню, после чего следует этап консультирования по ассортименту блюд и напитков, их особенностям, составу и возможным модификациям, учитывая индивидуальные предпочтения и ограничения гостя, такие как аллергенные компоненты или диетические требования. На этапе фиксации заказа официант детально записывает выбранные позиции на бумажный бланк заказа с указанием точных наименований, количества порций, специфических пожеланий по приготовлению и подаче, включая степень прожарки для мясных блюд или исключение определенных ингредиентов из салатов. После полного формирования перечня заказанных позиций официант повторно озвучивает гостю весь список для окончательного подтверждения и устранения возможных недоразумений, после чего заказ считается принятым и подлежит дальнейшей обработке. Завершающей стадией процесса является передача оформленного заказа на кухню и в бар, где он регистрируется, получает уникальный идентификатор и поступает в работу к соответствующим поварам и барменам, при этом официант отмечает время приема заказа для последующего контроля сроков его выполнения. На рисунках 1 и 2 изображены схемы процесса приёма заказа.</text:p>
      <text:p text:style-name="P3">Процесс управления складом в ресторане представляет собой непрерывный цикл взаимосвязанных операций, начинающихся с планирования потребности в продукции и заканчивающихся списанием использованных ингредиентов. Первоначальным этапом является составление заявки на поставку продуктов на основе анализа текущих остатков и прогнозируемого объема производства, при этом учитываются такие факторы, как сезонность, <text:soft-page-break/>планируемые акции и исторические данные о расходе. После формирования заявки осуществляется процедура приемки поставки, которая включает проверку соответствия количества и качества прибывшей продукции товарной накладной, а также контроль соблюдения температурных режимов и сроков годности. Принятые товары перемещаются в соответствующие зоны хранения с соблюдением принципа товарного соседства и маркировкой даты поступления для обеспечения ротации запасов. В процессе хранения регулярно проводится инвентаризация остатков с фиксацией фактического наличия продуктов и выявлением расхождений с данными системы.</text:p>
      <text:p text:style-name="P3"/>
      <text:p text:style-name="P3"><draw:frame draw:style-name="fr1" draw:name="Врезка1" text:anchor-type="paragraph" svg:width="17cm" style:rel-width="100%" svg:height="13.557cm" style:rel-height="scale-min" draw:z-index="0"><draw:text-box><text:p text:style-name="Drawing"><draw:frame draw:style-name="fr2" draw:name="Image1" text:anchor-type="paragraph" svg:width="17cm" style:rel-width="100%" svg:height="12.989cm" style:rel-height="scale" draw:z-index="1"><draw:image xlink:href="Pictures/1000000000000500000003D2BC888963.jpg" xlink:type="simple" xlink:show="embed" xlink:actuate="onLoad" draw:mime-type="image/jpeg"/></draw:frame>Рисунок <text:sequence text:ref-name="refDrawing0" text:name="Drawing" text:formula="ooow:Drawing+1" style:num-format="1">1</text:sequence><text:s/>— Схема процесса оформления заказа</text:p></draw:text-box></draw:frame></text:p>
      <text:p text:style-name="P3"/>
      <text:h text:style-name="P18" text:outline-level="2"><draw:frame draw:style-name="fr1" draw:name="Врезка3" text:anchor-type="paragraph" svg:width="25.7cm" style:rel-width="100%" svg:height="17.006cm" style:rel-height="scale-min" draw:z-index="2"><draw:text-box><text:p text:style-name="Drawing"><draw:frame draw:style-name="fr2" draw:name="Изображение3" text:anchor-type="paragraph" svg:width="25.7cm" style:rel-width="100%" svg:height="16.438cm" style:rel-height="scale" draw:z-index="3"><draw:image xlink:href="Pictures/10000001000004C50000030D30DFCC14.png" xlink:type="simple" xlink:show="embed" xlink:actuate="onLoad" draw:mime-type="image/png"/></draw:frame>Рисунок <text:sequence text:ref-name="refDrawing1" text:name="Drawing" text:formula="ooow:Drawing+1" style:num-format="1">2</text:sequence><text:s/>— Схема работы с заказом</text:p></draw:text-box></draw:frame><text:bookmark text:name="__RefHeading___Toc8890_1636301399"/></text:h>
      <text:h text:style-name="P19" text:outline-level="2"><text:bookmark-start text:name="__RefHeading___Toc3714_962412752"/>1.2 Предварительное определение требований<text:bookmark-end text:name="__RefHeading___Toc3714_962412752"/></text:h>
      <text:h text:style-name="Heading_20_3" text:outline-level="3"><text:bookmark-start text:name="__RefHeading___Toc3716_962412752"/><text:span text:style-name="T7">1</text:span>.<text:span text:style-name="T7">2.1</text:span> Общее описание <text:bookmark-end text:name="__RefHeading___Toc3716_962412752"/></text:h>
      <text:p text:style-name="P3">Разрабатываемое приложение предназначено для автоматизации ключевых бизнес-процессов ресторана. Основные функции включают приём и обработку заказов, управление складскими запасами в реальном времени <text:span text:style-name="T8">и</text:span> формирование финансовых отчётов <text:span text:style-name="T9">[</text:span><text:span text:style-name="T9"><text:bookmark-ref text:reference-format="number-no-superior" text:ref-name="__RefNumPara__5090_2159724457">5</text:bookmark-ref></text:span><text:span text:style-name="T9">]</text:span>. Система строится на архитектуре с использованием Qt Quick для клиентских приложений на планшетах и TCP-соединения для взаимодействия между устройствами в локальной сети. </text:p>
      <text:p text:style-name="Contents_20_3"><text:bookmark-start text:name="__RefHeading___Toc3718_962412752"/>1.2.1.1 Общий взгляд на продукт<text:bookmark-end text:name="__RefHeading___Toc3718_962412752"/></text:p>
      <text:p text:style-name="P3">Приложение помогает официантам в оформлении заказов, предоставляя функции для более удобной записи. Также оно помогает отслеживать продукт на складе. Приложение новое, создаётся с нуля. </text:p>
      <text:p text:style-name="Contents_20_3"><text:bookmark-start text:name="__RefHeading___Toc3720_962412752"/>1.2.1.2 Классы и характеристики пользователей<text:bookmark-end text:name="__RefHeading___Toc3720_962412752"/></text:p>
      <text:p text:style-name="P3">Приложением пользуются официанты, администрация, аналитики, кладовщики. Официанты оформляют заказы; кладовщики обновляют информацию о продукте на складе; аналитики анализируют продажи; администрация проверяет приложение на соответствие данных, работоспособность.</text:p>
      <text:p text:style-name="Contents_20_3"><text:bookmark-start text:name="__RefHeading___Toc3722_962412752"/>1.2.1.3 Ограничение дизайна и реализации<text:bookmark-end text:name="__RefHeading___Toc3722_962412752"/></text:p>
      <text:p text:style-name="P3">Приложение создаётся с нуля, что позволяет выбрать средства разработки на своё усмотрение. Так как приложение создаётся для планшетов, следует создать крупный интерфейс и использовать кроссплатформенную разработку, такую как Qt quick. </text:p>
      <text:p text:style-name="Contents_20_3"><text:bookmark-start text:name="__RefHeading___Toc3724_962412752"/><text:span text:style-name="T10">1</text:span>.2.1.4 Предположения и зависимости<text:bookmark-end text:name="__RefHeading___Toc3724_962412752"/></text:p>
      <text:p text:style-name="P3">Для функционирования системы требуется корректно работающая локальная сеть. Установка дополнительных программ или приложений не требуется. </text:p>
      <text:p text:style-name="P3"/>
      <text:h text:style-name="Heading_20_3" text:outline-level="3"><text:bookmark-start text:name="__RefHeading___Toc11346_567402320"/><text:soft-page-break/><text:span text:style-name="T11">1</text:span><text:span text:style-name="T12">.2.</text:span><text:span text:style-name="T11">2</text:span><text:span text:style-name="T12"> </text:span>Функциональные требования<text:bookmark-end text:name="__RefHeading___Toc11346_567402320"/></text:h>
      <text:p text:style-name="P20"><text:span text:style-name="T13">FUNC-</text:span><text:span text:style-name="T14">00</text:span><text:span text:style-name="T13">1</text:span><text:span text:style-name="T15"> </text:span>Хранение актуального меню: Приложение должно обеспечивать централизованное хранение и управление меню. Данные включают наименования блюд, категории, цены, состав ингредиентов. Все изменения должны мгновенно синхронизироваться между устройствами. Для управления должна быть предусмотрена административная панель <text:span text:style-name="T16">[</text:span><text:span text:style-name="T16"><text:bookmark-ref text:reference-format="number-no-superior" text:ref-name="__RefNumPara__5190_2159724457">4</text:bookmark-ref></text:span><text:span text:style-name="T16">, </text:span><text:span text:style-name="T17">с. 108</text:span><text:span text:style-name="T16">]</text:span>.</text:p>
      <text:p text:style-name="P21"><text:span text:style-name="T13">FUNC-</text:span><text:span text:style-name="T14">00</text:span><text:span text:style-name="T13">2</text:span><text:span text:style-name="T18"> </text:span>Подключение к общему складу: Система обязана иметь модуль складского учёта, который автоматически отслеживает остатки ингредиентов в реальном времени. Это включает автоматическое списание продуктов при оформлении заказа, контроль минимальных остатков с генерацией уведомлений о необходимости пополнения запасов <text:span text:style-name="T16">[</text:span><text:span text:style-name="T16"><text:bookmark-ref text:reference-format="number-no-superior" text:ref-name="__RefNumPara__5190_2159724457">4</text:bookmark-ref></text:span><text:span text:style-name="T16">, </text:span><text:span text:style-name="T17">с. 108</text:span><text:span text:style-name="T16">]</text:span>.</text:p>
      <text:p text:style-name="P21"><text:span text:style-name="T13">FUNC-</text:span><text:span text:style-name="T14">00</text:span><text:span text:style-name="T13">3</text:span> Оформление заказов: Функционал должен позволять создавать новые заказы, привязывая их к конкретному столику и официанту. Должна быть возможность добавлять в заказ блюда из актуального меню <text:span text:style-name="T16">[</text:span><text:span text:style-name="T16"><text:bookmark-ref text:reference-format="number-no-superior" text:ref-name="__RefNumPara__5190_2159724457">4</text:bookmark-ref></text:span><text:span text:style-name="T16">, </text:span><text:span text:style-name="T17">с. 108</text:span><text:span text:style-name="T16">]</text:span>.</text:p>
      <text:p text:style-name="P21"><text:span text:style-name="T13">FUNC-</text:span><text:span text:style-name="T14">00</text:span><text:span text:style-name="T13">4</text:span><text:span text:style-name="T18"> </text:span>Формирование списка продуктов на складе, которых осталось немного: На основе данных складского учёта приложение должно автоматически генерировать отчёт или список товаров, остаток которых достиг установленного минимального порога. Это позволяет своевременно инициировать процедуру закупки и предотвращать ситуации отсутствия необходимых ингредиентов <text:span text:style-name="T16">[</text:span><text:span text:style-name="T16"><text:bookmark-ref text:reference-format="number-no-superior" text:ref-name="__RefNumPara__5190_2159724457">4</text:bookmark-ref></text:span><text:span text:style-name="T16">, </text:span><text:span text:style-name="T17">с. 108</text:span><text:span text:style-name="T16">]</text:span>.</text:p>
      <text:p text:style-name="P20"/>
      <text:h text:style-name="Heading_20_3" text:outline-level="3"><text:bookmark-start text:name="__RefHeading___Toc11348_567402320"/><text:span text:style-name="T19">1.2</text:span><text:span text:style-name="T12">.</text:span><text:span text:style-name="T20">3</text:span><text:span text:style-name="T12"> Требования к данным</text:span><text:bookmark-end text:name="__RefHeading___Toc11348_567402320"/></text:h>
      <text:p text:style-name="Contents_20_3"><text:bookmark-start text:name="__RefHeading___Toc3726_962412752"/>1.2.3.1 Логическая модель данных<text:bookmark-end text:name="__RefHeading___Toc3726_962412752"/></text:p>
      <text:p text:style-name="P20">Основные сущности которые отразятся в базе данных:</text:p>
      <text:list text:style-name="L2">
        <text:list-item>
          <text:p text:style-name="P22">Официант — тот, кто составляет заказ;</text:p>
        </text:list-item>
        <text:list-item>
          <text:p text:style-name="P22">Заказ — то, что записывается в базу данных. Хранит информацию о заказанных блюдах;</text:p>
        </text:list-item>
        <text:list-item>
          <text:p text:style-name="P22">Заказанное блюдо — блюдо которое запишется в заказ, его количество и просьба от клиента;</text:p>
        </text:list-item>
        <text:list-item>
          <text:p text:style-name="P23"><text:soft-page-break/>Блюдо — экземпляр блюда который указан в меню, ссылается на состав<text:span text:style-name="T21">;</text:span></text:p>
        </text:list-item>
        <text:list-item>
          <text:p text:style-name="P23">Состав <text:span text:style-name="T22">— список продуктов для приготовления блюда;</text:span></text:p>
        </text:list-item>
        <text:list-item>
          <text:p text:style-name="P24">Продукт в составе — <text:span text:style-name="T23">продукт который входит в состав блюда;</text:span></text:p>
        </text:list-item>
        <text:list-item>
          <text:p text:style-name="P25">Продукт <text:span text:style-name="T24"><text:s/>— </text:span>продукт для приготовления блюда.</text:p>
        </text:list-item>
      </text:list>
      <text:p text:style-name="P20">На рисунке 3 представлена логическая модель данных, описывающая основные сущности в выбранном бизнес процессе. </text:p>
      <text:p text:style-name="P20"/>
      <text:p text:style-name="P20"><draw:frame draw:style-name="fr1" draw:name="Врезка2" text:anchor-type="paragraph" svg:width="17cm" style:rel-width="100%" svg:height="11.363cm" style:rel-height="scale-min" draw:z-index="4"><draw:text-box><text:p text:style-name="Drawing"><draw:frame draw:style-name="fr2" draw:name="Изображение2" text:anchor-type="paragraph" svg:width="17cm" style:rel-width="100%" svg:height="10.795cm" style:rel-height="scale" draw:z-index="5"><draw:image xlink:href="Pictures/100000000000025800000187062973CC.png" xlink:type="simple" xlink:show="embed" xlink:actuate="onLoad" draw:mime-type="image/png"/></draw:frame>Рисунок <text:sequence text:ref-name="refDrawing2" text:name="Drawing" text:formula="ooow:Drawing+1" style:num-format="1">3</text:sequence><text:s/>— Модель данных</text:p></draw:text-box></draw:frame></text:p>
      <text:p text:style-name="Contents_20_3"><text:bookmark-start text:name="__RefHeading___Toc3728_962412752"/>1.2.3.2 Отчёты<text:bookmark-end text:name="__RefHeading___Toc3728_962412752"/></text:p>
      <text:p text:style-name="P26">Система должна формировать комплекс отчётных документов, обеспечивающих оперативный контроль и стратегическое управление рестораном. </text:p>
      <text:p text:style-name="P26">Для анализа эффективности работы система должна предоставлять отчёт о выручке за период с детализацией по продукту, столику, официанту и <text:soft-page-break/>временным промежуткам, позволяя отслеживать такие ключевые показатели, как общая выручка, количество гостей и динамика среднего чека.</text:p>
      <text:p text:style-name="P3">На основе данных складского учёта должен автоматически формироваться отчёт о продуктах с низкими остатками, в котором отображаются продукты, количество которых достигло установленного минимального порога, для своевременного пополнения запасов.</text:p>
      <text:p text:style-name="P3"/>
      <text:p text:style-name="Contents_20_3"><text:bookmark-start text:name="__RefHeading___Toc3730_962412752"/>1.2.3.3 Получение, целостность, хранение и утилизация данных<text:bookmark-end text:name="__RefHeading___Toc3730_962412752"/></text:p>
      <text:p text:style-name="P3">Данные поступают из следующих источников:</text:p>
      <text:list text:style-name="L3">
        <text:list-item>
          <text:p text:style-name="P27">Административная панель: внесение и корректировка данных о меню.</text:p>
        </text:list-item>
        <text:list-item>
          <text:p text:style-name="P27">Планшеты официантов: данные о заказах в реальном времени.</text:p>
        </text:list-item>
        <text:list-item>
          <text:p text:style-name="P27">Планшеты <text:span text:style-name="T25">кладовщиков</text:span>: данные об остатках и операциях с ингредиентами.</text:p>
        </text:list-item>
      </text:list>
      <text:p text:style-name="P28">Все данные хранятся централизованно, обеспечивая мгновенную синхронизацию между устройствами в локальной сети. </text:p>
      <text:p text:style-name="P28"/>
      <text:h text:style-name="Heading_20_3" text:outline-level="3"><text:bookmark-start text:name="__RefHeading___Toc11356_567402320"/><text:span text:style-name="T26">1.2.</text:span><text:span text:style-name="T27">4</text:span><text:span text:style-name="T28"> </text:span>Требования к внешним интерфейсам<text:bookmark-end text:name="__RefHeading___Toc11356_567402320"/></text:h>
      <text:p text:style-name="Contents_20_3"><text:bookmark-start text:name="__RefHeading___Toc11358_567402320"/><text:span text:style-name="T29">1.2.4</text:span><text:span text:style-name="T30">.1</text:span> Пользовательские интерфе<text:span text:style-name="T31">й</text:span>сы<text:bookmark-end text:name="__RefHeading___Toc11358_567402320"/></text:p>
      <text:p text:style-name="P3">Интерфейс системы должен быть интуитивно понятным и удобным для пользователей. Основные требования:</text:p>
      <text:list text:style-name="L4">
        <text:list-item>
          <text:p text:style-name="P29">Отсутствие отвлекающих элементов.</text:p>
        </text:list-item>
        <text:list-item>
          <text:p text:style-name="P29">Использование крупного шрифта и четкой цветовой гаммы.</text:p>
        </text:list-item>
        <text:list-item>
          <text:p text:style-name="P29">Минимизация текста для быстрого восприятия информации.</text:p>
        </text:list-item>
      </text:list>
      <text:p text:style-name="Contents_20_3"><text:bookmark-start text:name="__RefHeading___Toc11360_567402320"/><text:span text:style-name="T29">1.2.4</text:span><text:span text:style-name="T30">.2</text:span> Интерфейсы ПО<text:bookmark-end text:name="__RefHeading___Toc11360_567402320"/></text:p>
      <text:p text:style-name="P28">Система работает на базе операционной системы Android версии не ниже 9. Для взаимодействия с базой данных используется <text:span text:style-name="T32">СУБД PostgreSQL </text:span><text:s/>с использованием языка SQL, <text:span text:style-name="T33">так как он обеспечивает корректную работу в системе «Клиент-Сервер» </text:span><text:span text:style-name="T34">[</text:span><text:span text:style-name="T34"><text:bookmark-ref text:reference-format="number-no-superior" text:ref-name="__RefNumPara__5637_2159724457">7</text:bookmark-ref></text:span><text:span text:style-name="T34">, </text:span><text:span text:style-name="T35">с. 34</text:span><text:span text:style-name="T34">]</text:span>. </text:p>
      <text:p text:style-name="Contents_20_3"><text:bookmark-start text:name="__RefHeading___Toc11362_567402320"/><text:span text:style-name="T29">1.2.4</text:span><text:span text:style-name="T30">.3</text:span> Интерфейсы оборудования<text:bookmark-end text:name="__RefHeading___Toc11362_567402320"/></text:p>
      <text:p text:style-name="P28"><text:soft-page-break/>Планшеты связываются между собой по беспроводной сети интернет, обеспечивая обмен данными в реальном времени. </text:p>
      <text:p text:style-name="P28"/>
      <text:h text:style-name="Heading_20_3" text:outline-level="3"><text:bookmark-start text:name="__RefHeading___Toc11364_567402320"/><text:span text:style-name="T36">1.2.5</text:span><text:span text:style-name="T37"> </text:span>Атрибуты качества<text:bookmark-end text:name="__RefHeading___Toc11364_567402320"/></text:h>
      <text:p text:style-name="Contents_20_3"><text:bookmark-start text:name="__RefHeading___Toc11366_567402320"/><text:span text:style-name="T38">1.2.5</text:span><text:span text:style-name="T30">.1</text:span> Удобство использования<text:bookmark-end text:name="__RefHeading___Toc11366_567402320"/></text:p>
      <text:p text:style-name="P28">Самое главное, чтобы было удобно использовать приложение. Обучение использованию должно быть простым, чтобы изучить работу можно было в одиночку не более 15 минут. </text:p>
      <text:p text:style-name="Contents_20_3"><text:bookmark-start text:name="__RefHeading___Toc11368_567402320"/><text:span text:style-name="T38">1.2.5</text:span><text:span text:style-name="T30">.2</text:span> Производительность<text:bookmark-end text:name="__RefHeading___Toc11368_567402320"/></text:p>
      <text:p text:style-name="P28">Производительность системы должна обеспечивать стабильную работу при высокой нагрузке. Время обновления данных должно быть минимальным. </text:p>
      <text:p text:style-name="Contents_20_3"><text:bookmark-start text:name="__RefHeading___Toc11370_567402320"/><text:span text:style-name="T38">1.2.5</text:span><text:span text:style-name="T30">.3</text:span> Безопасность<text:bookmark-end text:name="__RefHeading___Toc11370_567402320"/></text:p>
      <text:p text:style-name="P30"><text:span text:style-name="T39">Приложению потребуются только фамилия и имя работника. Для защиты данных будет использоваться система авторизации через логин и пароль</text:span>. Физическая безопасность зависит только от используемого устройства.</text:p>
      <text:p text:style-name="Contents_20_3"><text:bookmark-start text:name="__RefHeading___Toc11372_567402320"/><text:span text:style-name="T38">1.2.5</text:span><text:span text:style-name="T30">.4</text:span> Техника безопасности<text:bookmark-end text:name="__RefHeading___Toc11372_567402320"/></text:p>
      <text:p text:style-name="P28">Для предотвращения потери данных рекомендуется периодическое резервное копирование информации на внешние устройства. </text:p>
      <text:p text:style-name="P3"/>
      <text:h text:style-name="P17" text:outline-level="2"><text:bookmark-start text:name="__RefHeading___Toc8892_1636301399"/>1.3 <text:span text:style-name="T40">Показатели экономической эффективности</text:span><text:bookmark-end text:name="__RefHeading___Toc8892_1636301399"/></text:h>
      <text:h text:style-name="P31" text:outline-level="3"><text:bookmark-start text:name="__RefHeading___Toc2024_2593696514"/>1.<text:span text:style-name="T41">3.</text:span>1 Расчет себестоимости программного продукта<text:bookmark-end text:name="__RefHeading___Toc2024_2593696514"/></text:h>
      <text:p text:style-name="P32"><text:span text:style-name="T42">О</text:span>сновной задачей технико-экономического обоснования является определение технического и экономического эффекта от его <text:span text:style-name="T43">использования.</text:span></text:p>
      <text:p text:style-name="P33"><text:tab/>Выполним расчет себестоимости программного продукта по формуле <text:span text:style-name="T44">1.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4"><draw:frame draw:style-name="fr3" draw:name="Объект1" text:anchor-type="as-char" svg:y="-0.439cm" svg:width="4.958cm" svg:height="0.594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3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6"/>
      <text:p text:style-name="P37"><text:span text:style-name="T45"><text:tab/>где Мвс — затраты на вспомогательные материалы, </text:span><text:span text:style-name="Strong_20_Emphasis"><text:span text:style-name="T46">₽</text:span></text:span><text:span text:style-name="T45">.</text:span></text:p>
      <text:p text:style-name="P38"><text:span text:style-name="T47">Э — затраты на электроэнергию и технологические цели, </text:span><text:span text:style-name="Strong_20_Emphasis"><text:span text:style-name="T46">₽</text:span></text:span></text:p>
      <text:p text:style-name="P38"><text:span text:style-name="Strong_20_Emphasis"><text:span text:style-name="T48">З</text:span></text:span><text:span text:style-name="Strong_20_Emphasis"><text:span text:style-name="T49">зп</text:span></text:span><text:span text:style-name="Strong_20_Emphasis"><text:span text:style-name="T50">о</text:span></text:span><text:span text:style-name="Strong_20_Emphasis"><text:span text:style-name="T51"> — основная зарплата работника, </text:span></text:span><text:span text:style-name="Strong_20_Emphasis"><text:span text:style-name="T52">₽</text:span></text:span></text:p>
      <text:p text:style-name="P38"><text:soft-page-break/><text:span text:style-name="Strong_20_Emphasis"><text:span text:style-name="T51">З</text:span></text:span><text:span text:style-name="Strong_20_Emphasis"><text:span text:style-name="T49">зп</text:span></text:span><text:span text:style-name="Strong_20_Emphasis"><text:span text:style-name="T50">д</text:span></text:span><text:span text:style-name="Strong_20_Emphasis"><text:span text:style-name="T51"> — </text:span></text:span><text:span text:style-name="Strong_20_Emphasis"><text:span text:style-name="T53">дополнительная зарплата разработчика,</text:span></text:span><text:span text:style-name="Strong_20_Emphasis"><text:span text:style-name="T51"> </text:span></text:span><text:span text:style-name="Strong_20_Emphasis"><text:span text:style-name="T54">₽</text:span></text:span></text:p>
      <text:p text:style-name="P38"><text:span text:style-name="Strong_20_Emphasis"><text:span text:style-name="T51">З</text:span></text:span><text:span text:style-name="Strong_20_Emphasis"><text:span text:style-name="T49">сн —</text:span></text:span><text:span text:style-name="Strong_20_Emphasis"><text:span text:style-name="T51"> </text:span></text:span><text:span text:style-name="Strong_20_Emphasis"><text:span text:style-name="T53">отчисления на соц. нужды,</text:span></text:span><text:span text:style-name="Strong_20_Emphasis"><text:span text:style-name="T51"> </text:span></text:span><text:span text:style-name="Strong_20_Emphasis"><text:span text:style-name="T54">₽</text:span></text:span></text:p>
      <text:p text:style-name="P37"><text:span text:style-name="Strong_20_Emphasis"><text:span text:style-name="T55">Н — накладные расходы,</text:span></text:span><text:span text:style-name="Strong_20_Emphasis"><text:span text:style-name="T56"> </text:span></text:span><text:span text:style-name="Strong_20_Emphasis"><text:span text:style-name="T54">₽</text:span></text:span></text:p>
      <text:p text:style-name="P39"><text:span text:style-name="Strong_20_Emphasis"><text:span text:style-name="T57"><text:tab/>Можно произвести расчёты для каждой переменной.</text:span></text:span></text:p>
      <text:p text:style-name="P40"><text:tab/>Вспомогательные материалы:</text:p>
      <text:p text:style-name="P40">Из таблицы 1 видно, что вспомогательные материалы <text:span text:style-name="T58">в сумме</text:span> стоят <text:span text:style-name="T59">300 р.</text:span></text:p>
      <text:p text:style-name="P40"><text:tab/>Затраты на электроэнергию:</text:p>
      <text:p text:style-name="P40">180 дней по 8 часов.</text:p>
      <text:p text:style-name="P40">Э = 0.5 * 7.5 * 1 440 * <text:span text:style-name="T60">0.6</text:span></text:p>
      <text:p text:style-name="P40">Э = 3 240</text:p>
      <text:p text:style-name="P40"><text:tab/>Общая зарплата:</text:p>
      <text:p text:style-name="P40">270 000 р.</text:p>
      <text:p text:style-name="P40"><text:tab/>Дополнительная зарплата:</text:p>
      <text:p text:style-name="P40"><text:span text:style-name="T61">27 000 </text:span><text:span text:style-name="T62">р.</text:span></text:p>
      <text:p text:style-name="P40"><text:tab/>Отчисления на социальные нужды:</text:p>
      <text:p text:style-name="P40">(270000 + 27000) * 0.3 = 89 100 р.</text:p>
      <text:p text:style-name="P40"><text:tab/>Накладные расходы:</text:p>
      <text:p text:style-name="P41"><text:span text:style-name="Strong_20_Emphasis"><text:span text:style-name="T63">(270000 + 27000) * 0.</text:span></text:span><text:span text:style-name="Strong_20_Emphasis"><text:span text:style-name="T64">1</text:span></text:span><text:span text:style-name="Strong_20_Emphasis"><text:span text:style-name="T63"> = 29 700 р.</text:span></text:span></text:p>
      <text:p text:style-name="P41"><text:span text:style-name="Strong_20_Emphasis"><text:span text:style-name="T63"><text:tab/></text:span></text:span><text:span text:style-name="Strong_20_Emphasis"><text:span text:style-name="T65">Таким образом: </text:span></text:span><text:span text:style-name="Strong_20_Emphasis"><text:span text:style-name="T66">C</text:span></text:span><text:span text:style-name="Strong_20_Emphasis"><text:span text:style-name="T67"> = </text:span></text:span><text:span text:style-name="Strong_20_Emphasis"><text:span text:style-name="T68">300 </text:span></text:span><text:span text:style-name="Strong_20_Emphasis"><text:span text:style-name="T69">+ </text:span></text:span><text:span text:style-name="Strong_20_Emphasis"><text:span text:style-name="T70">3 240</text:span></text:span><text:span text:style-name="Strong_20_Emphasis"><text:span text:style-name="T71"> </text:span></text:span><text:span text:style-name="Strong_20_Emphasis"><text:span text:style-name="T72">+ 270000 </text:span></text:span><text:span text:style-name="Strong_20_Emphasis"><text:span text:style-name="T73">+ </text:span></text:span><text:span text:style-name="Strong_20_Emphasis"><text:span text:style-name="T72">27000 </text:span></text:span><text:span text:style-name="Strong_20_Emphasis"><text:span text:style-name="T63">+ <text:s/>89 100 </text:span></text:span><text:span text:style-name="Strong_20_Emphasis"><text:span text:style-name="T74">+ <text:s/></text:span></text:span><text:span text:style-name="Strong_20_Emphasis"><text:span text:style-name="T63">29 700</text:span></text:span></text:p>
      <text:p text:style-name="P41"><text:span text:style-name="Strong_20_Emphasis"><text:span text:style-name="T63">С = 419 340 р.</text:span></text:span></text:p>
      <text:p text:style-name="P42"><text:span text:style-name="Strong_20_Emphasis"><text:span text:style-name="T47"/></text:span></text:p>
      <text:p text:style-name="P43"><text:span text:style-name="T47">Таблица </text:span><text:span text:style-name="T47"><text:sequence text:ref-name="refTable0" text:name="Table" text:formula="ooow:Table+1" style:num-format="1">1</text:sequence></text:span><text:span text:style-name="T47"><text:s/></text:span><text:span text:style-name="Strong_20_Emphasis"><text:span text:style-name="T56">—</text:span></text:span><text:span text:style-name="T47"> Затраты на вспомогательные материал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4">Наименование затрат</text:p>
          </table:table-cell>
          <table:table-cell table:style-name="Таблица1.A1" office:value-type="string">
            <text:p text:style-name="P44">Кол-во, шт.</text:p>
          </table:table-cell>
          <table:table-cell table:style-name="Таблица1.D1" office:value-type="string">
            <text:p text:style-name="P45"><text:span text:style-name="T47">Сумма</text:span><text:span text:style-name="T45">, </text:span><text:span text:style-name="Strong_20_Emphasis"><text:span text:style-name="T75">₽</text:span></text:span><text:span text:style-name="T47">.</text:span></text:p>
          </table:table-cell>
        </table:table-row>
        <table:table-row>
          <table:table-cell table:style-name="Таблица1.A2" office:value-type="string">
            <text:list text:style-name="L5">
              <text:list-header>
                <text:p text:style-name="P46"/>
              </text:list-header>
            </text:list>
          </table:table-cell>
          <table:table-cell table:style-name="Таблица1.A2" office:value-type="string">
            <text:p text:style-name="P47"><text:span text:style-name="T76">Память</text:span><text:span text:style-name="T77"> </text:span><text:span text:style-name="T76">USB</text:span><text:span text:style-name="T78"> </text:span><text:span text:style-name="T76">FLASH</text:span><text:span text:style-name="T79"> </text:span><text:span text:style-name="T76">DRIVE</text:span><text:span text:style-name="T79"> </text:span><text:span text:style-name="T80">2G</text:span><text:span text:style-name="T81">b</text:span></text:p>
          </table:table-cell>
          <table:table-cell table:style-name="Таблица1.A2" office:value-type="string">
            <text:p text:style-name="P48">1</text:p>
          </table:table-cell>
          <table:table-cell table:style-name="Таблица1.D2" office:value-type="string">
            <text:p text:style-name="P49">200</text:p>
          </table:table-cell>
        </table:table-row>
        <table:table-row>
          <table:table-cell table:style-name="Таблица1.A2" office:value-type="string">
            <text:list text:continue-numbering="true" text:style-name="L5">
              <text:list-header>
                <text:p text:style-name="P46"/>
              </text:list-header>
            </text:list>
          </table:table-cell>
          <table:table-cell table:style-name="Таблица1.A2" office:value-type="string">
            <text:p text:style-name="P50">Переходник USB-A USB-C</text:p>
          </table:table-cell>
          <table:table-cell table:style-name="Таблица1.A2" office:value-type="string">
            <text:p text:style-name="P51">1</text:p>
          </table:table-cell>
          <table:table-cell table:style-name="Таблица1.D2" office:value-type="string">
            <text:p text:style-name="P49">100</text:p>
          </table:table-cell>
        </table:table-row>
        <table:table-row>
          <table:table-cell table:style-name="Таблица1.A2" office:value-type="string">
            <text:p text:style-name="P52"/>
          </table:table-cell>
          <table:table-cell table:style-name="Таблица1.A2" office:value-type="string">
            <text:p text:style-name="P52">Итого</text:p>
          </table:table-cell>
          <table:table-cell table:style-name="Таблица1.A2" office:value-type="string">
            <text:p text:style-name="P53"/>
          </table:table-cell>
          <table:table-cell table:style-name="Таблица1.D4" office:value-type="float" office:value="300">
            <text:p text:style-name="P54">300</text:p>
          </table:table-cell>
        </table:table-row>
      </table:table>
      <text:p text:style-name="P55"><text:span text:style-name="T82"/></text:p>
      <text:h text:style-name="P31" text:outline-level="3"><text:bookmark-start text:name="__RefHeading___Toc2026_2593696514"/><text:span text:style-name="T83">1.</text:span><text:span text:style-name="T84">3.</text:span><text:span text:style-name="T83">2 </text:span>Расчет экономического эффекта программного продукта<text:bookmark-end text:name="__RefHeading___Toc2026_2593696514"/></text:h>
      <text:p text:style-name="P56">Экономический эффект от внедрения ПО рассчитывается по формуле <text:span text:style-name="T85">2</text:span></text:p>
      <table:table table:name="Таблица6" table:style-name="Таблица6">
        <table:table-column table:style-name="Таблица6.A"/>
        <table:table-column table:style-name="Таблица6.B"/>
        <table:table-header-rows>
          <text:soft-page-break/>
          <table:table-row>
            <table:table-cell table:style-name="Таблица6.A1" office:value-type="string">
              <text:p text:style-name="P34"><draw:frame draw:style-name="fr3" draw:name="Объект3" text:anchor-type="as-char" svg:y="-0.388cm" svg:width="7.05cm" svg:height="0.543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3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7"/>
      <text:p text:style-name="P58">где</text:p>
      <text:p text:style-name="P58">N — количество обрабатываемых документов <text:span text:style-name="T86">(взять N = 6000)</text:span>;</text:p>
      <text:p text:style-name="P58">t<text:span text:style-name="T87">1</text:span>, t<text:span text:style-name="T87">2</text:span> — трудоемкость обработки документов до и после внедрения <text:span text:style-name="T88">программы:</text:span></text:p>
      <text:p text:style-name="P58">t<text:span text:style-name="T87">1</text:span><text:span text:style-name="T89"> </text:span><text:span text:style-name="T90">= 15, </text:span><text:span text:style-name="T89"><text:s/>t</text:span><text:span text:style-name="T87">2</text:span><text:span text:style-name="T89"> </text:span><text:span text:style-name="T90">= 7</text:span></text:p>
      <text:p text:style-name="P59">С<text:span text:style-name="T91">чтс </text:span><text:span text:style-name="T92">— </text:span><text:span text:style-name="T89">часовая тарифная тавка пользователя, р./час;</text:span></text:p>
      <text:p text:style-name="P59">К<text:span text:style-name="T87">доп</text:span> — коэффициент отчислений на дополнительную заработную плату, К<text:span text:style-name="T87">доп</text:span> = 0,1;</text:p>
      <text:p text:style-name="P60">К<text:span text:style-name="T87">сн</text:span><text:span text:style-name="T89"> — </text:span><text:span text:style-name="T93">коэффициент отчислений на соц. нужды, <text:s/></text:span><text:span text:style-name="T89">К</text:span><text:span text:style-name="T87">сн </text:span><text:span text:style-name="T93">= 0,3;</text:span></text:p>
      <text:p text:style-name="P60">Е<text:span text:style-name="T87">н</text:span><text:span text:style-name="T89"> — </text:span><text:span text:style-name="T93">нормативный коэффициент </text:span><text:span text:style-name="T94">о</text:span><text:span text:style-name="T93">купаемости капитальных вложений, <text:s/></text:span><text:span text:style-name="T89">Е</text:span><text:span text:style-name="T87">н </text:span><text:span text:style-name="T93">= 0,39;</text:span></text:p>
      <text:p text:style-name="P61">К — доп. капиталовложения, связанные с разработкой программного продукта <text:span text:style-name="T95">(здесь полная себестоимость рассчитанная выше)</text:span>.</text:p>
      <text:p text:style-name="P61">Используя ранее рассчитанные значения и подставляя в формулу выше, <text:span text:style-name="T96">можно выяснить что: </text:span><text:span text:style-name="T97">Э = </text:span><text:span text:style-name="T98">6000</text:span><text:span text:style-name="T97"> * (</text:span><text:span text:style-name="T99">15</text:span><text:span text:style-name="T97"> - </text:span><text:span text:style-name="T99">7</text:span><text:span text:style-name="T97">) * </text:span><text:span text:style-name="T100">16</text:span><text:span text:style-name="T101">5</text:span><text:span text:style-name="T97"> * </text:span><text:span text:style-name="T102">0.1</text:span><text:span text:style-name="T97"> * </text:span><text:span text:style-name="T93">0.3</text:span><text:span text:style-name="T97"> - </text:span><text:span text:style-name="T103">0.39</text:span><text:span text:style-name="T97"> *</text:span><text:span text:style-name="T93"> </text:span><text:span text:style-name="T104">4</text:span><text:span text:style-name="T105">19 340</text:span></text:p>
      <text:p text:style-name="P61">Срок окупаемости программного продукта, <text:span text:style-name="T106">ра</text:span><text:span text:style-name="T107">сс</text:span><text:span text:style-name="T106">читанный по формуле 3</text:span>:</text:p>
      <text:p text:style-name="P62"><text:span text:style-name="T47">где C</text:span><text:span text:style-name="T108">пр</text:span><text:span text:style-name="T47"> — себестоимость программного продукта, </text:span><text:span text:style-name="Strong_20_Emphasis"><text:span text:style-name="T109">₽</text:span></text:span></text:p>
      <text:p text:style-name="P62"><text:span text:style-name="Strong_20_Emphasis"><text:span text:style-name="T110">С</text:span></text:span><text:span text:style-name="Strong_20_Emphasis"><text:span text:style-name="T111">1</text:span></text:span><text:span text:style-name="Strong_20_Emphasis"><text:span text:style-name="T112"> — стоимостные затраты при использовании ручного труда, </text:span></text:span><text:span text:style-name="Strong_20_Emphasis"><text:span text:style-name="T113">₽</text:span></text:span></text:p>
      <text:p text:style-name="P62"><text:span text:style-name="Strong_20_Emphasis"><text:span text:style-name="T112">С</text:span></text:span><text:span text:style-name="Strong_20_Emphasis"><text:span text:style-name="T111">2 —</text:span></text:span><text:span text:style-name="Strong_20_Emphasis"><text:span text:style-name="T112"> стоимостные затраты при использовании программы, </text:span></text:span><text:span text:style-name="Strong_20_Emphasis"><text:span text:style-name="T113">₽</text:span></text:span></text:p>
      <text:p text:style-name="P63">419340/<text:span text:style-name="T114">(</text:span><text:span text:style-name="T115">281 957,4 -</text:span><text:span text:style-name="T116"> </text:span><text:span text:style-name="T117">44 357,4</text:span><text:span text:style-name="T116">) = </text:span><text:span text:style-name="T118">1.8 лет</text:span></text:p>
      <text:p text:style-name="P64">Ручной труд:</text:p>
      <text:p text:style-name="P65">281 957,4</text:p>
      <text:p text:style-name="P66">Использование программы:</text:p>
      <text:p text:style-name="P67">44 357,4</text:p>
      <text:p text:style-name="P67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34"><draw:frame draw:style-name="fr3" draw:name="Объект2" text:anchor-type="as-char" svg:y="-0.684cm" svg:width="2.231cm" svg:height="1.131cm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3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68"/>
      <text:p text:style-name="P69"><text:soft-page-break/>В таблице 2 выведены результаты произведённых вычислений.</text:p>
      <text:p text:style-name="P70">Таблица <text:sequence text:ref-name="refTable1" text:name="Table" text:formula="ooow:Table+1" style:num-format="1">2</text:sequence><text:s/>— Итоговые значения показателей экономической эффективности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47">Наименование показателя</text:p>
          </table:table-cell>
          <table:table-cell table:style-name="Таблица7.A1" office:value-type="string">
            <text:p text:style-name="P71">Ед. Изм.</text:p>
          </table:table-cell>
          <table:table-cell table:style-name="Таблица7.C1" office:value-type="string">
            <text:p text:style-name="P40">Затраты, р.</text:p>
          </table:table-cell>
        </table:table-row>
        <table:table-row>
          <table:table-cell table:style-name="Таблица7.A2" office:value-type="string">
            <text:p text:style-name="P40"><text:span text:style-name="T76">1.</text:span><text:span text:style-name="T119"> </text:span><text:span text:style-name="T76">Основная</text:span><text:span text:style-name="T120"> </text:span><text:span text:style-name="T76">заработная</text:span><text:span text:style-name="T78"> </text:span><text:span text:style-name="T76">плата</text:span><text:span text:style-name="T78"> </text:span><text:span text:style-name="T81">разработчика</text:span></text:p>
          </table:table-cell>
          <table:table-cell table:style-name="Таблица7.A2" office:value-type="string">
            <text:p text:style-name="P40">р.</text:p>
          </table:table-cell>
          <table:table-cell table:style-name="Таблица7.C2" office:value-type="string">
            <text:p text:style-name="P40">270 000</text:p>
          </table:table-cell>
        </table:table-row>
        <table:table-row>
          <table:table-cell table:style-name="Таблица7.A2" office:value-type="string">
            <text:p text:style-name="P40"><text:span text:style-name="T76">2.</text:span><text:span text:style-name="T121"> </text:span><text:span text:style-name="T76">Дополнительная</text:span><text:span text:style-name="T122"> </text:span><text:span text:style-name="T76">заработная</text:span><text:span text:style-name="T123"> </text:span><text:span text:style-name="T76">плата</text:span><text:span text:style-name="T124"> </text:span><text:span text:style-name="T81">разработчика</text:span></text:p>
          </table:table-cell>
          <table:table-cell table:style-name="Таблица7.A2" office:value-type="string">
            <text:p text:style-name="P40">р.</text:p>
          </table:table-cell>
          <table:table-cell table:style-name="Таблица7.C2" office:value-type="string">
            <text:p text:style-name="P40">27 000</text:p>
          </table:table-cell>
        </table:table-row>
        <table:table-row>
          <table:table-cell table:style-name="Таблица7.A2" office:value-type="string">
            <text:p text:style-name="P40"><text:span text:style-name="T125">3.</text:span><text:span text:style-name="T79"> </text:span><text:span text:style-name="T125">Отчисления</text:span><text:span text:style-name="T77"> </text:span><text:span text:style-name="T125">на</text:span><text:span text:style-name="T77"> </text:span><text:span text:style-name="T125">социальные</text:span><text:span text:style-name="T126"> </text:span><text:span text:style-name="T125">нужды</text:span></text:p>
          </table:table-cell>
          <table:table-cell table:style-name="Таблица7.A2" office:value-type="string">
            <text:p text:style-name="P40">р.</text:p>
          </table:table-cell>
          <table:table-cell table:style-name="Таблица7.C2" office:value-type="string">
            <text:p text:style-name="P40">89 100</text:p>
          </table:table-cell>
        </table:table-row>
        <table:table-row>
          <table:table-cell table:style-name="Таблица7.A2" office:value-type="string">
            <text:p text:style-name="P40"><text:span text:style-name="T76">4.</text:span><text:span text:style-name="T78"> </text:span><text:span text:style-name="T76">Накладные</text:span><text:span text:style-name="T79"> </text:span><text:span text:style-name="T81">расходы</text:span></text:p>
          </table:table-cell>
          <table:table-cell table:style-name="Таблица7.A2" office:value-type="string">
            <text:p text:style-name="P40">р.</text:p>
          </table:table-cell>
          <table:table-cell table:style-name="Таблица7.C2" office:value-type="string">
            <text:p text:style-name="P40">29 700</text:p>
          </table:table-cell>
        </table:table-row>
        <table:table-row>
          <table:table-cell table:style-name="Таблица7.A2" office:value-type="string">
            <text:p text:style-name="P40"><text:span text:style-name="T76">5.</text:span><text:span text:style-name="T126"> </text:span><text:span text:style-name="T76">Затраты</text:span><text:span text:style-name="T125"> </text:span><text:span text:style-name="T76">на</text:span><text:span text:style-name="T126"> </text:span><text:span text:style-name="T81">электроэнергию</text:span></text:p>
          </table:table-cell>
          <table:table-cell table:style-name="Таблица7.A2" office:value-type="string">
            <text:p text:style-name="P40">р.</text:p>
          </table:table-cell>
          <table:table-cell table:style-name="Таблица7.C2" office:value-type="string">
            <text:p text:style-name="P40">3 240</text:p>
          </table:table-cell>
        </table:table-row>
        <table:table-row>
          <table:table-cell table:style-name="Таблица7.A2" office:value-type="string">
            <text:p text:style-name="P40"><text:span text:style-name="T81">6.</text:span><text:span text:style-name="T127"> </text:span><text:span text:style-name="T81">Вспомогательные</text:span><text:span text:style-name="T128"> </text:span><text:span text:style-name="T81">материалы</text:span></text:p>
          </table:table-cell>
          <table:table-cell table:style-name="Таблица7.A2" office:value-type="string">
            <text:p text:style-name="P40">р.</text:p>
          </table:table-cell>
          <table:table-cell table:style-name="Таблица7.C2" office:value-type="string">
            <text:p text:style-name="P40">300</text:p>
          </table:table-cell>
        </table:table-row>
        <table:table-row>
          <table:table-cell table:style-name="Таблица7.A2" office:value-type="string">
            <text:p text:style-name="P40"><text:span text:style-name="T76">7.</text:span><text:span text:style-name="T123"> </text:span><text:span text:style-name="T76">Полная</text:span><text:span text:style-name="T119"> </text:span><text:span text:style-name="T76">себестоимость</text:span><text:span text:style-name="T122"> </text:span><text:span text:style-name="T76">программного</text:span><text:span text:style-name="T122"> </text:span><text:span text:style-name="T81">продукта</text:span></text:p>
          </table:table-cell>
          <table:table-cell table:style-name="Таблица7.A2" office:value-type="string">
            <text:p text:style-name="P40">р.</text:p>
          </table:table-cell>
          <table:table-cell table:style-name="Таблица7.C2" office:value-type="string">
            <text:p text:style-name="P40">419 340</text:p>
          </table:table-cell>
        </table:table-row>
        <table:table-row>
          <table:table-cell table:style-name="Таблица7.A2" office:value-type="string">
            <text:p text:style-name="P40"><text:span text:style-name="T76">8.</text:span><text:span text:style-name="T119"> </text:span><text:span text:style-name="T76">Экономический</text:span><text:span text:style-name="T129"> </text:span><text:span text:style-name="T81">эффект</text:span></text:p>
          </table:table-cell>
          <table:table-cell table:style-name="Таблица7.A2" office:value-type="string">
            <text:p text:style-name="P40">р.</text:p>
          </table:table-cell>
          <table:table-cell table:style-name="Таблица7.C2" office:value-type="string">
            <text:p text:style-name="P40">74 057.4</text:p>
          </table:table-cell>
        </table:table-row>
        <table:table-row>
          <table:table-cell table:style-name="Таблица7.A2" office:value-type="string">
            <text:p text:style-name="P40"><text:span text:style-name="T76">9.</text:span><text:span text:style-name="T119"> </text:span><text:span text:style-name="T76">Срок</text:span><text:span text:style-name="T119"> </text:span><text:span text:style-name="T76">окупаемости</text:span><text:span text:style-name="T120"> </text:span><text:span text:style-name="T76">программного</text:span><text:span text:style-name="T120"> </text:span><text:span text:style-name="T81">продукта</text:span></text:p>
          </table:table-cell>
          <table:table-cell table:style-name="Таблица7.A2" office:value-type="string">
            <text:p text:style-name="P40">лет</text:p>
          </table:table-cell>
          <table:table-cell table:style-name="Таблица7.C2" office:value-type="string">
            <text:p text:style-name="P40"><text:span text:style-name="T125">1,</text:span><text:span text:style-name="T130">8</text:span></text:p>
          </table:table-cell>
        </table:table-row>
      </table:table>
      <text:p text:style-name="P57"/>
      <text:h text:style-name="P11" text:outline-level="1"><text:bookmark-start text:name="__RefHeading___Toc8894_1636301399"/>ГЛАВА 2 РЕАЛИЗАЦИЯ ПРОГРАММНЫХ МОДУЛЕЙ<text:bookmark-end text:name="__RefHeading___Toc8894_1636301399"/></text:h>
      <text:h text:style-name="P72" text:outline-level="2"><text:bookmark-start text:name="__RefHeading___Toc19695_1636301399 Копия 1"/>2.1 Технологии программирования<text:bookmark-end text:name="__RefHeading___Toc19695_1636301399 Копия 1"/></text:h>
      <text:p text:style-name="P73">Разработка программного продукта потребовала тщательного выбора технологий и методов программирования для достижения поставленных целей. Ниже перечислены используемые технологии и инструменты, их характеристики и обоснование выбора. </text:p>
      <text:p text:style-name="P73"/>
      <text:p text:style-name="Contents_20_3"><text:bookmark-start text:name="__RefHeading___Toc6583_2272482351"/>Методы разработки<text:bookmark-end text:name="__RefHeading___Toc6583_2272482351"/></text:p>
      <text:p text:style-name="P73">При выборе методов разработки необходимо учитывать следующие критерии: </text:p>
      <text:list text:style-name="L6">
        <text:list-item>
          <text:p text:style-name="P74">возможность клиента изменить требование;</text:p>
        </text:list-item>
        <text:list-item>
          <text:p text:style-name="P74">отслеживание прогресса;</text:p>
        </text:list-item>
        <text:list-item>
          <text:p text:style-name="P74">обратная связь с клиентом.</text:p>
        </text:list-item>
      </text:list>
      <text:p text:style-name="P73">С учетом данных критериев предпочтение отдается гибким методам разработки (Agile). Среди различных Agile-методологий наиболее подходящей является Scrum<text:span text:style-name="T131">.</text:span><text:span text:style-name="T132"> </text:span><text:span text:style-name="T133">Он предпол</text:span><text:span text:style-name="T134">а</text:span><text:span text:style-name="T133">гает деление разработки на спринты длительностью около 2-х недель.</text:span><text:span text:style-name="T132"> </text:span><text:span text:style-name="T133">По окончанию спринта предлагается</text:span><text:span text:style-name="T135"> демонстрировать заказчику результаты шагов разработки, для преждевременного выявления несоответствий ожидания и </text:span><text:span text:style-name="T133">фактических результатов</text:span><text:span text:style-name="T135">. </text:span><text:span text:style-name="T136">Также в</text:span><text:span text:style-name="T137"> виду отсутствия команды использовать выбранный метод будет не проблематично, </text:span><text:span text:style-name="T133">так как не требуется чёткое разделение ролей и дисциплины команды</text:span><text:span text:style-name="T137">. С данным методом будет проще отслеживать прогресс и изменять дальнейший план если потребуется.</text:span></text:p>
      <text:p text:style-name="P75"/>
      <text:p text:style-name="Contents_20_3"><text:bookmark-start text:name="__RefHeading___Toc6585_2272482351"/>Язык программирования<text:bookmark-end text:name="__RefHeading___Toc6585_2272482351"/></text:p>
      <text:p text:style-name="P76">В качестве языка программирования для разработки выбран C+<text:span text:style-name="T138">+</text:span><text:span text:style-name="T139">. </text:span><text:span text:style-name="T140">Это обусловлено его высокой производительностью и кроссплатформенностью. </text:span><text:span text:style-name="T139">C++ </text:span><text:soft-page-break/><text:span text:style-name="T140">используется в </text:span><text:span text:style-name="T139">Qt Creator </text:span><text:span text:style-name="T140">для написания функциональной части как десктопных так и для мобильных приложений.</text:span></text:p>
      <text:p text:style-name="P76">Для взаимодействия с базами данных используется структурированный язык запросов SQL, который характеризуется простотой и многофункциональностью, обеспечивая эффективное управление данными. </text:p>
      <text:p text:style-name="P76"/>
      <text:p text:style-name="Contents_20_3"><text:bookmark-start text:name="__RefHeading___Toc6587_2272482351"/>Инструменты и среды разработки<text:bookmark-end text:name="__RefHeading___Toc6587_2272482351"/></text:p>
      <text:p text:style-name="P73">В качестве инструмента для разработки выбрана интегрированная среда разработки Qt Creator, которая предоставляет возможности для создания кроссплатформенных приложений. Для конфигурации и сборки проекта используется система сборки CMake. </text:p>
      <text:p text:style-name="P73"><text:bookmark-start text:name="__RefHeading___Toc19695_1636301399"/><text:span text:style-name="T40">Процесс разработки основан на объектно-ориентированном подходе, где каждый компонент программы представляется в виде отдельного объекта или класса. Этот подход соответствует требованиям и спецификациям разрабатываем</text:span><text:span text:style-name="T141">ой</text:span><text:span text:style-name="T40"> программ</text:span><text:span text:style-name="T141">ы</text:span><text:span text:style-name="T40">. </text:span><text:bookmark-end text:name="__RefHeading___Toc19695_1636301399"/></text:p>
      <text:p text:style-name="P3"/>
      <text:h text:style-name="P17" text:outline-level="2"><text:bookmark-start text:name="__RefHeading___Toc8896_1636301399"/>2.<text:span text:style-name="T40">2</text:span> Описание программных модулей<text:bookmark-end text:name="__RefHeading___Toc8896_1636301399"/></text:h>
      <text:p text:style-name="P3"/>
      <text:p text:style-name="P3">&lt;Каждый раздел начинается с новой страницы&gt;</text:p>
      <text:p text:style-name="P3"/>
      <text:h text:style-name="P17" text:outline-level="2"><text:bookmark-start text:name="__RefHeading___Toc8898_1636301399"/>2.<text:span text:style-name="T40">3</text:span> Интеграция программных модулей<text:bookmark-end text:name="__RefHeading___Toc8898_1636301399"/></text:h>
      <text:p text:style-name="P3"/>
      <text:p text:style-name="P77">Примечание — Далее следует текст примечания. <text:span text:style-name="T142">Или..</text:span></text:p>
      <text:p text:style-name="P77">Примечание</text:p>
      <text:p text:style-name="P77">1 Несколько примечаний</text:p>
      <text:p text:style-name="P77">2 Нумеруют арабскими цифрами</text:p>
      <text:p text:style-name="P3"/>
      <text:p text:style-name="P3">&lt;Примечания можно оформлять в виде сносок. См. ниже&gt;</text:p>
      <text:p text:style-name="P3"><text:soft-page-break/></text:p>
      <text:p text:style-name="P3">&lt;Оформление сносок&gt;</text:p>
      <text:p text:style-name="P78">Можно символом<text:note text:id="ftn1" text:note-class="footnote"><text:note-citation text:label="*">*</text:note-citation><text:note-body><text:p text:style-name="P79">Символ «звездочка» можно использовать до трех раз</text:p></text:note-body></text:note>. <text:span text:style-name="T143">Для этого выполнить: Вставка → Сноска → Вставить специальную сноску → Символ: *</text:span></text:p>
      <text:p text:style-name="P78">С нумерацией <text:span text:style-name="T144">должен соблюдаться формат</text:span><text:note text:id="ftn2" text:note-class="footnote"><text:note-citation>1</text:note-citation><text:note-body><text:p text:style-name="P80">Разработчики постоянно меняют настройки программы</text:p></text:note-body></text:note><text:span text:style-name="T145">)</text:span>. <text:span text:style-name="T144">В этом случае, после установки сноски, из контекста над сноской выбираем: «Параметры сносок» → Автонумерация → Afte</text:span><text:span text:style-name="T146">r</text:span><text:span text:style-name="T144">: )</text:span></text:p>
      <text:p text:style-name="P3"/>
      <text:h text:style-name="P17" text:outline-level="2"><text:bookmark-start text:name="__RefHeading___Toc8900_1636301399"/>2.<text:span text:style-name="T40">4</text:span> Описание программного интерфейса<text:bookmark-end text:name="__RefHeading___Toc8900_1636301399"/></text:h>
      <text:p text:style-name="P3"/>
      <text:h text:style-name="P81" text:outline-level="3"><text:bookmark-start text:name="__RefHeading___Toc11261_1636301399"/>2.<text:span text:style-name="T147">4</text:span>.1 Первый пункт<text:bookmark-end text:name="__RefHeading___Toc11261_1636301399"/></text:h>
      <text:p text:style-name="P3"/>
      <text:p text:style-name="P3">Содержание первого пункта. Этот пункт содержит заголовок. Текст заголовка не выделяется полужирным начертанием</text:p>
      <text:p text:style-name="P3">2.<text:span text:style-name="T147">4</text:span>.1.1 Это подпункт не содержащий заголовка. Если он не содержит заголовка, то и в оглавление он не попадает. В оглавление попадают только те заголовки пунктов и подпунктов, которые имеют <text:span text:style-name="T144">эти заголовки</text:span>. <text:span text:style-name="T144">В этом случае, о</text:span>формляется как стиль основного текста.</text:p>
      <text:p text:style-name="P3"/>
      <text:h text:style-name="P81" text:outline-level="3"><text:bookmark-start text:name="__RefHeading___Toc11263_1636301399"/>2.<text:span text:style-name="T147">4</text:span>.2 Это второй пункт<text:bookmark-end text:name="__RefHeading___Toc11263_1636301399"/></text:h>
      <text:p text:style-name="P3"/>
      <text:p text:style-name="P3">Это первое предложение второго пункта с новой строки. А это второе предложение.</text:p>
      <text:p text:style-name="P82">&lt;Списки оформляются либо так:</text:p>
      <text:list text:style-name="L7">
        <text:list-item>
          <text:p text:style-name="P83">Первый пункт;</text:p>
        </text:list-item>
        <text:list-item>
          <text:p text:style-name="P83">Второй пункт;</text:p>
        </text:list-item>
        <text:list-item>
          <text:p text:style-name="P83">Третий пункт.</text:p>
          <text:p text:style-name="P83"><text:soft-page-break/>либо так:</text:p>
        </text:list-item>
      </text:list>
      <text:list text:style-name="L8">
        <text:list-item>
          <text:p text:style-name="P84">Первый пункт;</text:p>
        </text:list-item>
        <text:list-item>
          <text:p text:style-name="P84">Второй пункт;</text:p>
        </text:list-item>
        <text:list-item text:start-value="1">
          <text:p text:style-name="P84">Третий пункт.</text:p>
        </text:list-item>
      </text:list>
      <text:p text:style-name="P82"><text:span text:style-name="T148">Кружки и квадраты использовать не разрешается</text:span>&gt;</text:p>
      <text:p text:style-name="P85">&lt;Пример&gt;</text:p>
      <text:p text:style-name="P85">Разрабатываемое сверхмощное устройство можно будет применять в различных отраслях реального сектора экономики:</text:p>
      <text:list text:style-name="L9">
        <text:list-item>
          <text:p text:style-name="P86">в машиностроении:</text:p>
        </text:list-item>
      </text:list>
      <text:list text:style-name="L10">
        <text:list-item>
          <text:p text:style-name="P87">для очистки отливок от формовочной смеси;</text:p>
        </text:list-item>
        <text:list-item>
          <text:p text:style-name="P87">для очистки лопаток турбин авиационных двигателей;</text:p>
        </text:list-item>
        <text:list-item>
          <text:p text:style-name="P87">для холодной штамповки из листа;</text:p>
        </text:list-item>
      </text:list>
      <text:list text:style-name="L11">
        <text:list-item>
          <text:p text:style-name="P88">в ремонте техники:</text:p>
        </text:list-item>
      </text:list>
      <text:list text:style-name="L12">
        <text:list-item>
          <text:p text:style-name="P89">устранение наслоений на внутренних стенках труб;</text:p>
        </text:list-item>
        <text:list-item>
          <text:p text:style-name="P90">очистка каналов и отверстий небольшого диаметра от грязи.</text:p>
        </text:list-item>
      </text:list>
      <text:h text:style-name="P11" text:outline-level="1"><text:bookmark-start text:name="__RefHeading___Toc8902_1636301399"/>ЗАКЛЮЧЕНИЕ<text:bookmark-end text:name="__RefHeading___Toc8902_1636301399"/></text:h>
      <text:p text:style-name="P3"/>
      <text:h text:style-name="P11" text:outline-level="1"><text:bookmark-start text:name="__RefHeading___Toc8904_1636301399"/>СПИСОК ИСПОЛЬЗОВАННЫХ ИСТОЧНИКОВ<text:bookmark-end text:name="__RefHeading___Toc8904_1636301399"/></text:h>
      <text:p text:style-name="P3"/>
      <text:list text:style-name="Нумерация_20_источников">
        <text:list-item>
          <text:p text:style-name="P91"><text:bookmark-start text:name="__RefNumPara__4997_2159724457"/>ГОСТ 30389-2013. Услуги общественного питания. Предприятия общественного питания. Классификация и общие требования. — М.: Стандартинформ, 2014. — 16 с.<text:bookmark-end text:name="__RefNumPara__4997_2159724457"/></text:p>
        </text:list-item>
        <text:list-item>
          <text:p text:style-name="P91"><text:bookmark-start text:name="__RefNumPara__4995_2159724457"/>ГОСТ 31985-2013. Услуги общественного питания. Термины и определения. — М.: Стандартинформ, 2014. — 12 с.<text:bookmark-end text:name="__RefNumPara__4995_2159724457"/></text:p>
        </text:list-item>
        <text:list-item>
          <text:p text:style-name="P92">ГОСТ Р 7.0.96-2016 Система стандартов по информации, библиотечному и издательскому делу. Электронные библиотеки. Основные виды.Структура. Технология формирования. – М.: Стандартинформ, 2016. – 16 с.</text:p>
        </text:list-item>
        <text:list-item>
          <text:p text:style-name="P91"><text:bookmark-start text:name="__RefNumPara__5190_2159724457"/>Инженерия программного обеспечения, 6-е издание. : Пер. с англ. — М. : Издательский дом "Вильяме", 2002 — 624 с. : ил. — Парал. тит. англ.<text:bookmark-end text:name="__RefNumPara__5190_2159724457"/></text:p>
        </text:list-item>
        <text:list-item>
          <text:p text:style-name="P91"><text:bookmark-start text:name="__RefNumPara__5090_2159724457"/>Лебедев Е. Технологии помогают избежать штрафов: об осознанной автоматизации ресторана. — М.: Tochka.com, 2024. — URL: https://allo.tochka.com/restaurant-automatization<text:bookmark-end text:name="__RefNumPara__5090_2159724457"/></text:p>
        </text:list-item>
        <text:list-item>
          <text:p text:style-name="P91">Приказ Минобразования РФ от 19 декабря 2013 г. N 1367 "Об утверждении Порядка организации и осуществления образовательной деятельности по образовательным программам высшего образования – программам бакалавриата, программам специалитета, программам магистратуры".– URL: http://www.consultant.ru/document/cons_doc_LAW_159671/ (дата обращения: 04.08.2016).</text:p>
        </text:list-item>
        <text:list-item>
          <text:p text:style-name="P91"><text:bookmark-start text:name="__RefNumPara__5637_2159724457"/>Стоунз Р., Мэтью Н. PostgreSQL. Основы. – Пер. с англ. – СПб: Символ Плюс, 2002 – 640 с., ил. ISBN 5 93286 043 X<text:bookmark-end text:name="__RefNumPara__5637_2159724457"/></text:p>
        </text:list-item>
        <text:list-item>
          <text:p text:style-name="P91">ISO 25964-1:2011. Information and documentation – Thesauri and interoperability with other vocabularies – Part 1: Thesauri for information retrieval. – URL: http://www.iso.org/iso/catalogue_detail.htm?csnumber 53657 (дата обращения: 20.10.2016).</text:p>
          <text:p text:style-name="P93"/>
        </text:list-item>
      </text:list>
      <text:h text:style-name="P94" text:outline-level="1"><text:bookmark-start text:name="__RefHeading___Toc8906_1636301399"/>П<text:span text:style-name="T149">РИЛОЖЕНИЕ</text:span> А<text:bookmark-end text:name="__RefHeading___Toc8906_1636301399"/></text:h>
      <text:h text:style-name="P95" text:outline-level="1"/>
      <text:h text:style-name="P95" text:outline-level="1"><text:bookmark-start text:name="__RefHeading___Toc1720_2115060514"/>Листинги программного кода<text:bookmark-end text:name="__RefHeading___Toc1720_2115060514"/></text:h>
      <text:p text:style-name="P96"><text:tab/></text:p>
      <text:p text:style-name="P97"><text:tab/>&lt;<text:span text:style-name="T150">В Содержании должно быть так:</text:span></text:p>
      <text:p text:style-name="P98">ПРИЛОЖЕНИЕ А Листинги программного кода……………………………...N</text:p>
      <text:p text:style-name="P97"><text:span text:style-name="T150">Чтобы это сделать нужно включить правку Содержания: Из контекста → Edit Огдавление → Снять флажок: «Защищено от изменения в ручную» и выполнить правку </text:span><text:span text:style-name="T151">Содержания</text:span><text:span text:style-name="T150"> вручную. Поскольку Содержание будет постоянно меняться, необходимо редактирование Содержания произвести в самую последнюю очередь</text:span>&gt;</text:p>
      <text:p text:style-name="P99">Листинг <text:sequence text:ref-name="refЛистинг0" text:name="Листинг" text:formula="ooow:Листинг+1" style:num-format="1">1</text:sequence><text:s/>— Образец оформления Листинга программного кода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list text:style-name="Нумерация_20_строк_20_кода">
              <text:list-item>
                <text:p text:style-name="P100">&lt;Внутри таблицы без видимой границы находится программный код с нумерацией&gt;</text:p>
              </text:list-item>
            </text:list>
          </table:table-cell>
        </table:table-row>
      </table:table>
      <text:p text:style-name="P3">&lt;Как сделать:&gt;</text:p>
      <text:p text:style-name="P3">&lt;Таблица → Вставить таблицу; столбцов 1, строк 1&gt;</text:p>
      <text:p text:style-name="P3">&lt;Убираем видимость границ. Контекстное меню → Свойство таблицы → Обрамление, снимаем. Другие свойства не изменяем!&gt;</text:p>
      <text:p text:style-name="P3">&lt;Вставка → Название → Категория: Листинг. Счетчик меняет значения автоматически&gt;</text:p>
      <text:p text:style-name="P3">&lt;Например&gt;</text:p>
      <text:p text:style-name="P101">Листинг <text:sequence text:ref-name="refЛистинг1" text:name="Листинг" text:formula="ooow:Листинг+1" style:num-format="1">2</text:sequence><text:s/>— Файл logger.cpp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list text:continue-numbering="true" text:style-name="Нумерация_20_строк_20_кода">
              <text:list-item text:start-value="1">
                <text:p text:style-name="P102">#include "logger.h"</text:p>
              </text:list-item>
              <text:list-item>
                <text:p text:style-name="P102"/>
              </text:list-item>
              <text:list-item>
                <text:p text:style-name="P102">Logger::Logger(const QString&amp; filename) : logFile(filename) {</text:p>
              </text:list-item>
              <text:list-item>
                <text:p text:style-name="P102"><text:s text:c="4"/>if (!logFile.open(QIODevice::WriteOnly | QIODevice::Append | QIODevice::Text)) {</text:p>
              </text:list-item>
              <text:list-item>
                <text:p text:style-name="P102"><text:s text:c="8"/>qWarning() &lt;&lt; "Could not open log file:" &lt;&lt; filename;</text:p>
              </text:list-item>
              <text:list-item>
                <text:p text:style-name="P102"><text:s text:c="4"/>}</text:p>
              </text:list-item>
              <text:list-item>
                <text:p text:style-name="P102"><text:soft-page-break/><text:s text:c="4"/>logStream.setDevice(&amp;logFile);</text:p>
              </text:list-item>
              <text:list-item>
                <text:p text:style-name="P102">}</text:p>
              </text:list-item>
              <text:list-item>
                <text:p text:style-name="P102"/>
              </text:list-item>
              <text:list-item>
                <text:p text:style-name="P102">void Logger::log(Severity severity, const QString&amp; message) {</text:p>
              </text:list-item>
              <text:list-item>
                <text:p text:style-name="P102"><text:s text:c="4"/>QString severityString;</text:p>
              </text:list-item>
              <text:list-item>
                <text:p text:style-name="P102"><text:s text:c="4"/>switch (severity) {</text:p>
              </text:list-item>
              <text:list-item>
                <text:p text:style-name="P102"><text:s text:c="8"/>case Debug: <text:s text:c="2"/>severityString = "Debug"; <text:s text:c="2"/>break;</text:p>
              </text:list-item>
              <text:list-item>
                <text:p text:style-name="P102"><text:s text:c="8"/>case Info: <text:s text:c="3"/>severityString = "Info"; <text:s text:c="3"/>break;</text:p>
              </text:list-item>
              <text:list-item>
                <text:p text:style-name="P102"><text:s text:c="8"/>case Warning: severityString = "Warning"; break;</text:p>
              </text:list-item>
              <text:list-item>
                <text:p text:style-name="P102"><text:s text:c="8"/>case Error: <text:s text:c="2"/>severityString = "Error"; <text:s text:c="2"/>break;</text:p>
              </text:list-item>
              <text:list-item>
                <text:p text:style-name="P102"><text:s text:c="8"/>case Fatal: <text:s text:c="2"/>severityString = "Fatal"; <text:s text:c="2"/>break;</text:p>
              </text:list-item>
              <text:list-item>
                <text:p text:style-name="P102"><text:s text:c="4"/>}</text:p>
              </text:list-item>
              <text:list-item>
                <text:p text:style-name="P102"/>
              </text:list-item>
              <text:list-item>
                <text:p text:style-name="P102"><text:s text:c="4"/>logStream &lt;&lt; QDateTime::currentDateTime().toString("yyyy-MM-dd hh:mm:ss.zzz ")</text:p>
              </text:list-item>
              <text:list-item>
                <text:p text:style-name="P102"><text:s text:c="14"/>&lt;&lt; "[" &lt;&lt; severityString &lt;&lt; "] "</text:p>
              </text:list-item>
              <text:list-item>
                <text:p text:style-name="P102"><text:s text:c="14"/>&lt;&lt; message &lt;&lt; Qt::endl;</text:p>
              </text:list-item>
              <text:list-item>
                <text:p text:style-name="P102"><text:s text:c="4"/>logStream.flush();</text:p>
              </text:list-item>
              <text:list-item>
                <text:p text:style-name="P102">}</text:p>
              </text:list-item>
              <text:list-item>
                <text:p text:style-name="P102"/>
              </text:list-item>
              <text:list-item>
                <text:p text:style-name="P102">Logger::~Logger() {</text:p>
              </text:list-item>
              <text:list-item>
                <text:p text:style-name="P102"><text:s text:c="4"/>logFile.close();</text:p>
              </text:list-item>
              <text:list-item>
                <text:p text:style-name="P102">}</text:p>
              </text:list-item>
            </text:list>
          </table:table-cell>
        </table:table-row>
      </table:table>
      <text:p text:style-name="P3"/>
      <text:p text:style-name="P78">&lt;Листинги оформляются созданным стилем «Оформление кода» и «Нумерация <text:span text:style-name="T152">строк </text:span>кода». Изменять эти стили (это категория «Стили пользователя») - не разрешается!&gt;</text:p>
      <text:p text:style-name="P78">&lt;Подсветка (колоризация) синтаксиса не допускается!&gt;</text:p>
      <text:p text:style-name="P78">&lt;Параметры кода: Шрифт - Source Code Pro (<text:span text:style-name="T153">точно!</text:span> не Source Code Pro Semibold), Кегль — 1<text:span text:style-name="T154">1</text:span> pt&gt;</text:p>
      <text:p text:style-name="P3"/>
      <text:h text:style-name="P94" text:outline-level="1"><text:bookmark-start text:name="__RefHeading___Toc8908_1636301399 Копия 1"/>П<text:span text:style-name="T149">РИЛОЖЕНИЕ</text:span> <text:span text:style-name="T40">Б</text:span><text:bookmark-end text:name="__RefHeading___Toc8908_1636301399 Копия 1"/></text:h>
      <text:h text:style-name="P103" text:outline-level="1"/>
      <text:h text:style-name="P103" text:outline-level="1"><text:bookmark-start text:name="__RefHeading___Toc1722_2115060514"/>Тест-кейсы и тест-сьюты<text:bookmark-end text:name="__RefHeading___Toc1722_2115060514"/></text:h>
      <text:p text:style-name="P78"/>
      <text:p text:style-name="P78"/>
      <text:h text:style-name="P94" text:outline-level="1"><text:bookmark-start text:name="__RefHeading___Toc8908_1636301399"/>П<text:span text:style-name="T149">РИЛОЖЕНИЕ</text:span> <text:span text:style-name="T40">В</text:span><text:bookmark-end text:name="__RefHeading___Toc8908_1636301399"/></text:h>
      <text:h text:style-name="P95" text:outline-level="1"/>
      <text:h text:style-name="P95" text:outline-level="1"><text:bookmark-start text:name="__RefHeading___Toc1724_2115060514"/>Документирование программного кода<text:bookmark-end text:name="__RefHeading___Toc1724_2115060514"/></text:h>
      <text:p text:style-name="P3"/>
      <text:p text:style-name="P104">&lt;Созданы следующие стили:</text:p>
      <text:list text:style-name="L13">
        <text:list-item>
          <text:p text:style-name="P105">Блок научного руководителя</text:p>
        </text:list-item>
        <text:list-item>
          <text:p text:style-name="P105">Заголовок на титульной</text:p>
        </text:list-item>
        <text:list-item>
          <text:p text:style-name="P105">Листинг</text:p>
        </text:list-item>
        <text:list-item>
          <text:p text:style-name="P105">Основной текст на титульной</text:p>
        </text:list-item>
        <text:list-item>
          <text:p text:style-name="P105">Оформление кода</text:p>
        </text:list-item>
        <text:list-item>
          <text:p text:style-name="P105">Примечание</text:p>
        </text:list-item>
        <text:list-item>
          <text:p text:style-name="P105">Нумерация источников</text:p>
        </text:list-item>
        <text:list-item>
          <text:p text:style-name="P105">Нумерация строк в таблице</text:p>
        </text:list-item>
        <text:list-item>
          <text:p text:style-name="P105">Нумерация строк кода&gt;</text:p>
          <text:p text:style-name="P105">&lt;Остальные измененные стили — это встроенные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50%" fo:text-align="justify" style:justify-single-word="false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PT Astra Serif2" fo:font-family="'PT Astra Serif'" style:font-style-name="Обычный" style:font-family-generic="roman" style:font-pitch="variable" fo:font-size="10pt" style:font-size-asian="10pt" style:font-size-complex="10pt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 fo:padding="0cm" fo:border="none">
        <style:tab-stops/>
      </style:paragraph-properties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сновной_20_текст_20_на_20_титульной" style:display-name="Основной текст на титульной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Заголовок_20_на_20_титульной" style:display-name="Заголовок на титульной" style:family="paragraph" style:parent-style-name="Text_20_body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Блок_20_научного_20_руководителя" style:display-name="Блок научного руководителя" style:family="paragraph" style:parent-style-name="Text_20_body">
      <loext:graphic-properties draw:fill="none" draw:fill-color="#729fcf"/>
      <style:paragraph-properties fo:margin-left="11.299cm" fo:margin-right="0cm" fo:margin-top="0cm" fo:margin-bottom="0.247cm" style:contextual-spacing="false" fo:line-height="115%" fo:text-indent="0cm" style:auto-text-indent="false" fo:background-color="transparent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.499cm" style:contextual-spacing="false" fo:line-height="150%" fo:text-align="center" style:justify-single-word="false" style:page-number="auto"/>
      <style:text-properties style:font-name="PT Astra Serif1" fo:font-family="'PT Astra Serif'" style:font-style-name="Жирный" style:font-family-generic="roman" style:font-pitch="variable" fo:font-size="14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99cm" fo:margin-bottom="0.199cm" style:contextual-spacing="false" fo:line-height="150%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/>
      <style:text-properties style:font-name="PT Astra Serif2" fo:font-family="'PT Astra Serif'" style:font-style-name="Обычный" style:font-family-generic="roman" style:font-pitch="variable" fo:font-size="12pt"/>
    </style:style>
    <style:style style:name="Table" style:family="paragraph" style:parent-style-name="Caption" style:class="extra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чание" style:family="paragraph" style:parent-style-name="Text_20_body">
      <style:text-properties fo:font-size="12pt" style:font-size-asian="12pt" style:font-size-complex="12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1cm" style:contextual-spacing="true" fo:line-height="150%" fo:text-align="center" style:justify-single-word="false" fo:text-indent="0cm" style:auto-text-indent="false" style:page-number="auto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1.251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2pt"/>
    </style:style>
    <style:style style:name="Contents_20_3" style:display-name="Contents 3" style:family="paragraph" style:parent-style-name="Index" style:class="index">
      <style:paragraph-properties fo:margin-left="2.499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Листинг" style:family="paragraph" style:parent-style-name="Caption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формление_20_кода" style:display-name="Оформление кода" style:family="paragraph" style:parent-style-name="Table_20_Contents" style:master-page-name="">
      <style:paragraph-properties fo:line-height="150%" fo:text-align="start" style:justify-single-word="false" style:page-number="auto"/>
      <style:text-properties style:font-name="Source Code Pro" fo:font-family="'Source Code Pro'" style:font-style-name="Обычный" style:font-pitch="fixed" fo:font-size="11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умерация_20_строк_20_в_20_таблице" style:display-name="Нумерация строк в таблице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55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строк_20_кода" style:display-name="Нумерация строк кода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источников" style:display-name="Нумерация источников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31T11:48:38.263020263</meta:creation-date>
    <meta:editing-duration>PT3H52M52S</meta:editing-duration>
    <meta:editing-cycles>71</meta:editing-cycles>
    <meta:generator>LibreOffice/25.8.3.2$Windows_X86_64 LibreOffice_project/8ca8d55c161d602844f5428fa4b58097424e324e</meta:generator>
    <dc:date>2026-02-03T00:33:08.649585600</dc:date>
    <meta:print-date>2026-02-02T17:25:22.143627000</meta:print-date>
    <meta:printed-by>Файлы PDF</meta:printed-by>
    <meta:document-statistic meta:table-count="7" meta:image-count="3" meta:object-count="3" meta:page-count="27" meta:paragraph-count="347" meta:word-count="3014" meta:character-count="23332" meta:non-whitespace-character-count="20506"/>
  </office:meta>
</office:document-meta>
</file>

<file path=Object 1/content.xml><?xml version="1.0" encoding="utf-8"?>
<math xmlns="http://www.w3.org/1998/Math/MathML" display="block">
  <semantics>
    <mrow>
      <mi>С</mi>
      <mo stretchy="false">=</mo>
      <mrow>
        <msub>
          <mi>М</mi>
          <mi mathvariant="italic">вс</mi>
        </msub>
        <mo stretchy="false">+</mo>
        <mi>Э</mi>
        <mo stretchy="false">+</mo>
        <msubsup>
          <mi>З</mi>
          <mi mathvariant="italic">зп</mi>
          <mi>о</mi>
        </msubsup>
        <mo stretchy="false">+</mo>
        <msubsup>
          <mi>З</mi>
          <mi mathvariant="italic">зп</mi>
          <mi>д</mi>
        </msubsup>
        <mo stretchy="false">+</mo>
        <msub>
          <mi>З</mi>
          <mi mathvariant="italic">сн</mi>
        </msub>
        <mo stretchy="false">+</mo>
        <mi>Н</mi>
      </mrow>
    </mrow>
    <annotation encoding="StarMath 5.0">С = М_вс + Э + З_зп^о + З_зп^д + З_сн + Н
</annotation>
  </semantics>
</math>
</file>

<file path=Object 2/content.xml><?xml version="1.0" encoding="utf-8"?>
<math xmlns="http://www.w3.org/1998/Math/MathML" display="block">
  <semantics>
    <mrow>
      <mrow>
        <msub>
          <mi>Э</mi>
          <mi mathvariant="italic">эф</mi>
        </msub>
        <mo stretchy="false">=</mo>
        <mi>N</mi>
      </mrow>
      <mi>·</mi>
      <mrow>
        <mo fence="true" form="prefix" stretchy="false">(</mo>
        <mrow>
          <mrow>
            <msub>
              <mi>t</mi>
              <mn>1</mn>
            </msub>
            <mi>—</mi>
            <msub>
              <mi>t</mi>
              <mn>2</mn>
            </msub>
          </mrow>
        </mrow>
        <mo fence="true" form="postfix" stretchy="false">)</mo>
      </mrow>
      <mi>·</mi>
      <msub>
        <mi>C</mi>
        <mi mathvariant="italic">чтс</mi>
      </msub>
      <mi>·</mi>
      <msub>
        <mi>К</mi>
        <mi mathvariant="italic">доп</mi>
      </msub>
      <mi>·</mi>
      <msub>
        <mi>К</mi>
        <mi mathvariant="italic">сн</mi>
      </msub>
      <mi>—</mi>
      <msub>
        <mi>Е</mi>
        <mi>н</mi>
      </msub>
      <mi>·</mi>
      <mi>К</mi>
    </mrow>
    <annotation encoding="StarMath 5.0">Э_эф = N · (t_1 — t_2) · C_чтс · К_доп · К_сн — Е_н · К</annotation>
  </semantics>
</math>
</file>

<file path=Object 3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sub>
          <mi>С</mi>
          <mi mathvariant="italic">пр</mi>
        </msub>
        <mrow>
          <msub>
            <mi>С</mi>
            <mn>1</mn>
          </msub>
          <mo stretchy="false">−</mo>
          <msub>
            <mi>С</mi>
            <mn>2</mn>
          </msub>
        </mrow>
      </mfrac>
    </mrow>
    <annotation encoding="StarMath 5.0">Т_ок = frac {С_пр} {С_1 - С_2} 
</annotation>
  </semantics>
</math>
</file>