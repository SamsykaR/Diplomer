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content.xml" manifest:media-type="text/xml"/>
  <manifest:file-entry manifest:full-path="Pictures/1000AADE00007D2900003D15809160B2.svg" manifest:media-type="image/svg+xml"/>
  <manifest:file-entry manifest:full-path="Pictures/10000001000003F4000001EEDDF70A51.png" manifest:media-type="image/png"/>
  <manifest:file-entry manifest:full-path="Pictures/100000000000025800000187062973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rsid="01d46334" officeooo:paragraph-rsid="01d46334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d3765" officeooo:paragraph-rsid="01dd3765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3">
      <style:paragraph-properties fo:break-before="page"/>
      <style:text-properties officeooo:paragraph-rsid="01dc3105"/>
    </style:style>
    <style:style style:name="P21" style:family="paragraph" style:parent-style-name="Text_20_body" style:list-style-name="L1">
      <style:text-properties officeooo:paragraph-rsid="01d7e9c5"/>
    </style:style>
    <style:style style:name="P22" style:family="paragraph" style:parent-style-name="Text_20_body" style:list-style-name="L2">
      <style:text-properties officeooo:paragraph-rsid="01d7e9c5"/>
    </style:style>
    <style:style style:name="P23" style:family="paragraph" style:parent-style-name="Heading_20_3">
      <style:text-properties officeooo:paragraph-rsid="01dc3105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Heading_20_2">
      <style:text-properties officeooo:paragraph-rsid="01d0afb8"/>
    </style:style>
    <style:style style:name="P27" style:family="paragraph" style:parent-style-name="Text_20_body" style:list-style-name="L3">
      <style:text-properties officeooo:rsid="01dc3105" officeooo:paragraph-rsid="01dc3105"/>
    </style:style>
    <style:style style:name="P28" style:family="paragraph" style:parent-style-name="Text_20_body" style:list-style-name="L3">
      <style:text-properties officeooo:rsid="01dc3c95" officeooo:paragraph-rsid="01dc3c95"/>
    </style:style>
    <style:style style:name="P29" style:family="paragraph" style:parent-style-name="Heading_20_2">
      <style:text-properties officeooo:paragraph-rsid="01e3b48b"/>
    </style:style>
    <style:style style:name="P30" style:family="paragraph" style:parent-style-name="Text_20_body">
      <style:text-properties officeooo:paragraph-rsid="01e3b48b"/>
    </style:style>
    <style:style style:name="P31" style:family="paragraph" style:parent-style-name="Heading_20_3">
      <style:text-properties officeooo:paragraph-rsid="01e3b48b"/>
    </style:style>
    <style:style style:name="P32" style:family="paragraph" style:parent-style-name="Text_20_body">
      <style:text-properties officeooo:paragraph-rsid="01e58747"/>
    </style:style>
    <style:style style:name="P33" style:family="paragraph" style:parent-style-name="Text_20_body" style:master-page-name="Landscape">
      <style:paragraph-properties style:page-number="auto"/>
      <style:text-properties officeooo:paragraph-rsid="01e3b48b"/>
    </style:style>
    <style:style style:name="P34" style:family="paragraph" style:parent-style-name="Рис.">
      <style:text-properties officeooo:paragraph-rsid="02e6bd3c"/>
    </style:style>
    <style:style style:name="P35" style:family="paragraph" style:parent-style-name="Heading_20_3" style:master-page-name="Standard">
      <style:paragraph-properties style:page-number="auto"/>
      <style:text-properties officeooo:paragraph-rsid="01e3b48b"/>
    </style:style>
    <style:style style:name="P36" style:family="paragraph" style:parent-style-name="Heading_20_3">
      <style:text-properties officeooo:rsid="0290247e" officeooo:paragraph-rsid="01e3b48b"/>
    </style:style>
    <style:style style:name="P37" style:family="paragraph" style:parent-style-name="Text_20_body">
      <style:text-properties officeooo:rsid="02ef8be9" officeooo:paragraph-rsid="01e3b48b"/>
    </style:style>
    <style:style style:name="P38" style:family="paragraph" style:parent-style-name="Text_20_body" style:list-style-name="L4">
      <style:text-properties officeooo:rsid="02ef8be9" officeooo:paragraph-rsid="01e3b48b"/>
    </style:style>
    <style:style style:name="P39" style:family="paragraph" style:parent-style-name="Text_20_body" style:list-style-name="L4">
      <style:text-properties officeooo:rsid="02f02dfa" officeooo:paragraph-rsid="01e3b48b"/>
    </style:style>
    <style:style style:name="P40" style:family="paragraph" style:parent-style-name="Text_20_body" style:list-style-name="L4">
      <style:text-properties officeooo:rsid="02f37159" officeooo:paragraph-rsid="01e3b48b"/>
    </style:style>
    <style:style style:name="P41" style:family="paragraph" style:parent-style-name="Text_20_body" style:list-style-name="L4">
      <style:text-properties officeooo:rsid="02f677de" officeooo:paragraph-rsid="01e3b48b"/>
    </style:style>
    <style:style style:name="P42" style:family="paragraph" style:parent-style-name="Text_20_body">
      <style:text-properties officeooo:rsid="02d80c27" officeooo:paragraph-rsid="01e3b48b"/>
    </style:style>
    <style:style style:name="P43" style:family="paragraph" style:parent-style-name="Standard">
      <style:text-properties officeooo:paragraph-rsid="01e3b48b"/>
    </style:style>
    <style:style style:name="P44" style:family="paragraph" style:parent-style-name="Text_20_body" style:list-style-name="L5">
      <style:text-properties officeooo:paragraph-rsid="01e3b48b"/>
    </style:style>
    <style:style style:name="P45" style:family="paragraph" style:parent-style-name="Text_20_body">
      <style:text-properties officeooo:rsid="029c9deb" officeooo:paragraph-rsid="01e3b48b"/>
    </style:style>
    <style:style style:name="P46" style:family="paragraph" style:parent-style-name="Text_20_body" style:list-style-name="L6">
      <style:text-properties officeooo:rsid="029c9deb" officeooo:paragraph-rsid="01e3b48b"/>
    </style:style>
    <style:style style:name="P47" style:family="paragraph" style:parent-style-name="Heading_20_2">
      <style:text-properties officeooo:rsid="01eb84ff" officeooo:paragraph-rsid="01eb84ff"/>
    </style:style>
    <style:style style:name="P48" style:family="paragraph" style:parent-style-name="Text_20_body">
      <style:text-properties officeooo:rsid="01ed1c8e" officeooo:paragraph-rsid="01ed1c8e"/>
    </style:style>
    <style:style style:name="P4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50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51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2" style:family="paragraph" style:parent-style-name="Text_20_body">
      <style:paragraph-properties fo:margin-left="0.035cm" fo:margin-right="0cm" fo:margin-top="0.018cm" fo:margin-bottom="0cm" style:contextual-spacing="false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46334"/>
    </style:style>
    <style:style style:name="T3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d3765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fo:letter-spacing="-0.002cm"/>
    </style:style>
    <style:style style:name="T17" style:family="text">
      <style:text-properties fo:letter-spacing="-0.004cm"/>
    </style:style>
    <style:style style:name="T18" style:family="text">
      <style:text-properties officeooo:rsid="01c285a9"/>
    </style:style>
    <style:style style:name="T19" style:family="text">
      <style:text-properties officeooo:rsid="01a77d50"/>
    </style:style>
    <style:style style:name="T20" style:family="text">
      <style:text-properties officeooo:rsid="01dc3105"/>
    </style:style>
    <style:style style:name="T21" style:family="text">
      <style:text-properties officeooo:rsid="01dc7fb1"/>
    </style:style>
    <style:style style:name="T22" style:family="text">
      <style:text-properties officeooo:rsid="01e053b4"/>
    </style:style>
    <style:style style:name="T23" style:family="text">
      <style:text-properties officeooo:rsid="01e09774"/>
    </style:style>
    <style:style style:name="T24" style:family="text">
      <style:text-properties officeooo:rsid="01ea4df9"/>
    </style:style>
    <style:style style:name="T25" style:family="text">
      <style:text-properties officeooo:rsid="023fb1e6"/>
    </style:style>
    <style:style style:name="T26" style:family="text">
      <style:text-properties officeooo:rsid="02a52996"/>
    </style:style>
    <style:style style:name="T27" style:family="text">
      <style:text-properties officeooo:rsid="01e661d1"/>
    </style:style>
    <style:style style:name="T28" style:family="text">
      <style:text-properties officeooo:rsid="02400d9b"/>
    </style:style>
    <style:style style:name="T29" style:family="text">
      <style:text-properties officeooo:rsid="025fb159"/>
    </style:style>
    <style:style style:name="T30" style:family="text">
      <style:text-properties officeooo:rsid="02a2bc36"/>
    </style:style>
    <style:style style:name="T31" style:family="text">
      <style:text-properties officeooo:rsid="0241e581"/>
    </style:style>
    <style:style style:name="T32" style:family="text">
      <style:text-properties officeooo:rsid="02432bb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244dbe6"/>
    </style:style>
    <style:style style:name="T35" style:family="text">
      <style:text-properties officeooo:rsid="02ef8be9"/>
    </style:style>
    <style:style style:name="T36" style:family="text">
      <style:text-properties officeooo:rsid="02f187c1"/>
    </style:style>
    <style:style style:name="T37" style:family="text">
      <style:text-properties officeooo:rsid="02f4e288"/>
    </style:style>
    <style:style style:name="T38" style:family="text">
      <style:text-properties officeooo:rsid="02f37159"/>
    </style:style>
    <style:style style:name="T39" style:family="text">
      <style:text-properties officeooo:rsid="01e91736"/>
    </style:style>
    <style:style style:name="T40" style:family="text">
      <style:text-properties officeooo:rsid="02487156"/>
    </style:style>
    <style:style style:name="T41" style:family="text">
      <style:text-properties officeooo:rsid="0290247e"/>
    </style:style>
    <style:style style:name="T42" style:family="text">
      <style:text-properties officeooo:rsid="02cae8e1"/>
    </style:style>
    <style:style style:name="T43" style:family="text">
      <style:text-properties officeooo:rsid="0246b1bb"/>
    </style:style>
    <style:style style:name="T44" style:family="text">
      <style:text-properties officeooo:rsid="024d4fa3"/>
    </style:style>
    <style:style style:name="T45" style:family="text">
      <style:text-properties officeooo:rsid="024fb74d"/>
    </style:style>
    <style:style style:name="T46" style:family="text">
      <style:text-properties officeooo:rsid="025118fc"/>
    </style:style>
    <style:style style:name="T47" style:family="text">
      <style:text-properties officeooo:rsid="0252777b"/>
    </style:style>
    <style:style style:name="T48" style:family="text">
      <style:text-properties officeooo:rsid="02a08bf1"/>
    </style:style>
    <style:style style:name="T49" style:family="text">
      <style:text-properties fo:font-size="10pt" style:font-size-asian="10pt"/>
    </style:style>
    <style:style style:name="T50" style:family="text">
      <style:text-properties fo:font-size="10pt" fo:letter-spacing="-0.009cm" style:font-size-asian="10pt"/>
    </style:style>
    <style:style style:name="T51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2</text:span></text:p>
      <text:p text:style-name="P10">по теме:</text:p>
      <text:h text:style-name="P11" text:outline-level="1"><text:span text:style-name="T3">П</text:span><text:span text:style-name="T4">редварительное определение требований</text:span></text:h>
      <text:p text:style-name="Заголовок_20_2_20_титул"/>
      <text:p text:style-name="Заголовок_20_2_20_титул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9">И-42 группы</text:span> </text:p>
      <text:p text:style-name="P13">Самсыка Р. М.</text:p>
      <text:p text:style-name="P14"/>
      <text:p text:style-name="P15"><text:span text:style-name="T8">Проверил</text:span>:</text:p>
      <text:p text:style-name="P16"><text:span text:style-name="T8">преподаватель</text:span><text:span text:style-name="T10"> </text:span><text:span text:style-name="T11">спец</text:span><text:span text:style-name="T12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20" text:outline-level="3" text:is-list-header="true">Цель<text:span text:style-name="T16"> </text:span><text:span text:style-name="T17">работы</text:span></text:h>
      <text:p text:style-name="Text_20_body"><text:tab/>Научиться формулировать предварительные требования к разрабатываемому программному продукту.</text:p>
      <text:h text:style-name="Heading_20_2" text:outline-level="2"><text:span text:style-name="T18">1 </text:span>Теоретические с<text:span text:style-name="T19">в</text:span>едения</text:h>
      <text:list text:style-name="L1">
        <text:list-item>
          <text:p text:style-name="P21">Требования создаются в процессе разработки требований к программному обеспечению, в результате анализа требований.</text:p>
        </text:list-item>
        <text:list-item>
          <text:p text:style-name="P21">Требования могут выражаться в виде текстовых утверждений и графических моделей.</text:p>
        </text:list-item>
        <text:list-item>
          <text:p text:style-name="P21">В классическом техническом подходе совокупность требований используется на стадии проектирования ПО.</text:p>
        </text:list-item>
        <text:list-item>
          <text:p text:style-name="P21">Требования также используются в процессе проверки ПО, так как тесты основываются на определённых требованиях.</text:p>
        </text:list-item>
        <text:list-item>
          <text:p text:style-name="P21">Фаза разработки требований может быть разбита на выявление требований (сбор, понимание, рассмотрение и выяснение потребностей заинтересованных лиц), анализ (проверка целостности и законченности), спецификация (документирование требований) и проверка правильности.</text:p>
        </text:list-item>
      </text:list>
      <text:h text:style-name="Heading_20_3" text:outline-level="3"><text:span text:style-name="T20">1.</text:span><text:span text:style-name="T21">1</text:span><text:span text:style-name="T20"> </text:span>Характеристики качественных требований </text:h>
      <text:list text:style-name="L2">
        <text:list-item>
          <text:p text:style-name="P22"><text:span text:style-name="T5">Атомарность</text:span> Требование «атомарно». То есть оно не может быть разбито на ряд более детальных требований без потери завершённости.</text:p>
        </text:list-item>
        <text:list-item>
          <text:p text:style-name="P22"><text:span text:style-name="T5">Отслеживаемость</text:span> Требование полностью или частично соответствует деловым нуждам как заявлено заинтересованными лицами и документировано. </text:p>
        </text:list-item>
        <text:list-item>
          <text:p text:style-name="P22"><text:span text:style-name="T5">Актуальность</text:span> Требование не стало устаревшим с течением времени. Выполнимость Требование может быть реализовано в пределах проекта.</text:p>
        </text:list-item>
        <text:list-item>
          <text:p text:style-name="P22"><text:span text:style-name="T5">Недвусмысленность</text:span> Требование кратко определено без обращения к техническому жаргону, акронимам и другим скрытым формулировка. Оно выражает объективные факты, не субъективные мнения. Возможна одна и только одна интерпретация. Определение не содержит нечётких фраз. Использование отрицательных утверждений и составных утверждений запрещено.</text:p>
        </text:list-item>
        <text:list-item>
          <text:p text:style-name="P22"><text:soft-page-break/><text:span text:style-name="T5">Обязательность</text:span> Требование представляет определённую заинтересованным лицом характеристику, отсутствие которой приведёт к неполноценности решения, которая не может быть проигнорирована.</text:p>
        </text:list-item>
        <text:list-item>
          <text:p text:style-name="P22"><text:span text:style-name="T5">Проверяемость</text:span> Реализованость требования может быть определена через один из четырёх возможных методов: осмотр, демонстрация, тест или анализ. </text:p>
        </text:list-item>
      </text:list>
      <text:h text:style-name="P23" text:outline-level="3"><text:span text:style-name="T20">1.</text:span><text:span text:style-name="T21">2</text:span><text:span text:style-name="T20"> </text:span>Рекомендуемый список разделов для разработки <text:line-break/> <text:s text:c="5"/>предварительных требований</text:h>
      <text:p text:style-name="Text_20_body"/>
      <text:p text:style-name="P24">П.2. Предварительное определение требований</text:p>
      <text:p text:style-name="P25">2.1 Общее описание</text:p>
      <text:p text:style-name="Text_20_body">--- Общий взгляд на продукт</text:p>
      <text:p text:style-name="Text_20_body">--- Классы и характеристики пользователей</text:p>
      <text:p text:style-name="Text_20_body">--- Ограничение дизайна и реализации</text:p>
      <text:p text:style-name="Text_20_body">--- Предположения и зависимости</text:p>
      <text:p text:style-name="P25">2.2 Функциональные требования</text:p>
      <text:p text:style-name="P25">2.3 Требования к данным</text:p>
      <text:p text:style-name="Text_20_body">--- Логическая модель данных (здесь диаграмма UML "сущность -связь", ER-диаграмма)</text:p>
      <text:p text:style-name="Text_20_body">--- Отчеты</text:p>
      <text:p text:style-name="Text_20_body">--- Получение, целостность, хранение и утилизация данных</text:p>
      <text:p text:style-name="P25">2.4 Требования к внешним интерфейсам</text:p>
      <text:p text:style-name="Text_20_body">--- Пользовательские интерфесы (только зарисовки прототипов, не скриншоты!!!)</text:p>
      <text:p text:style-name="Text_20_body">--- Интерфейсы ПО (системные требования здесь)</text:p>
      <text:p text:style-name="Text_20_body">--- Интерфейсы оборудования</text:p>
      <text:p text:style-name="Text_20_body">--- Коммуникационные интерфейсы</text:p>
      <text:p text:style-name="P25">2.5 Атрибуты качества</text:p>
      <text:p text:style-name="Text_20_body">--- Удобство использования</text:p>
      <text:p text:style-name="Text_20_body">--- Производительность</text:p>
      <text:p text:style-name="Text_20_body">--- Безопасность</text:p>
      <text:p text:style-name="Text_20_body">--- Техника безопасности</text:p>
      <text:p text:style-name="Text_20_body"/>
      <text:h text:style-name="P26" text:outline-level="2"><text:soft-page-break/><text:span text:style-name="T22">2</text:span> Постановка задачи</text:h>
      <text:list text:style-name="L3">
        <text:list-item>
          <text:p text:style-name="P27">Выполнить предварительное определение требований к создаваемому программному продукту / системе.</text:p>
        </text:list-item>
        <text:list-item>
          <text:p text:style-name="P28">Оформить список требований согласно п. 1.<text:span text:style-name="T21">2</text:span> предложенных методических материалов <text:span text:style-name="T21">к</text:span> <text:span text:style-name="T21">лабораторной работе</text:span>.</text:p>
        </text:list-item>
      </text:list>
      <text:h text:style-name="Heading_20_2" text:outline-level="2"><text:span text:style-name="T22">3</text:span><text:span text:style-name="T18"> </text:span><text:span text:style-name="T23">Предварительное определение требований</text:span></text:h>
      <text:h text:style-name="P29" text:outline-level="2"><text:span text:style-name="T24">3</text:span>.1 Общее описание </text:h>
      <text:p text:style-name="P30"><text:tab/>Разрабатываемое приложение предназначено для автоматизации ключевых бизнес-процессов ресторана. Основные функции включают приём и обработку заказов, управление складскими запасами в реальном времени, формирование финансовых отчётов и автоматизированное генерирование чеков. Система строится на архитектуре с использованием Qt Quick для клиентских приложений на планшетах и TCP-соединения для взаимодействия между устройствами в локальной сети. </text:p>
      <text:h text:style-name="P31" text:outline-level="3"><text:span text:style-name="T24">3</text:span><text:span text:style-name="T25">.1.1 </text:span>Общий взгляд на продукт</text:h>
      <text:p text:style-name="P32"><text:tab/>Приложение помогает официантам в оформлении заказов, предоставляя функции для более удобной записи. Также оно помогает отслеживать продукт на складе. Приложение новое, создаётся с нуля. <text:span text:style-name="T26">На рисунке </text:span><text:span text:style-name="T27">1</text:span><text:span text:style-name="T26"> изображена схема работы с заказом используя приложение.</text:span></text:p>
      <text:h text:style-name="Heading_20_3" text:outline-level="3"><text:span text:style-name="T24">3</text:span><text:span text:style-name="T25">.1.</text:span><text:span text:style-name="T28">2</text:span><text:span text:style-name="T25"> Классы и характеристики пользователей</text:span></text:h>
      <text:p text:style-name="P32"><text:span text:style-name="T29"><text:tab/></text:span>Приложением пользуются официанты, администрация, аналитики, кладовщики. Официанты оформляют заказы; кладовщики обновляют информацию о продукте на складе; аналитики анализируют продажи; администрация проверяет приложение на соответствие данных, работоспособность.</text:p>
      <text:p text:style-name="P30"/>
      <text:p text:style-name="P30"/>
      <text:p text:style-name="P30"/>
      <text:p text:style-name="P30"/>
      <text:p text:style-name="P30"/>
      <text:p text:style-name="P33"/>
      <text:p text:style-name="P30"><draw:frame draw:style-name="fr1" draw:name="Врезка26" text:anchor-type="char" svg:width="26.573cm" draw:z-index="15"><draw:text-box fo:min-height="14.351cm"><text:p text:style-name="P34"><draw:frame draw:style-name="fr2" draw:name="Изображение1" text:anchor-type="paragraph" svg:width="25.7cm" style:rel-width="100%" svg:height="12.539cm" style:rel-height="scale" draw:z-index="16"><draw:image xlink:href="Pictures/1000AADE00007D2900003D15809160B2.svg" xlink:type="simple" xlink:show="embed" xlink:actuate="onLoad" draw:mime-type="image/svg+xml"/><draw:image xlink:href="Pictures/10000001000003F4000001EEDDF70A51.png" xlink:type="simple" xlink:show="embed" xlink:actuate="onLoad" draw:mime-type="image/png"/></draw:frame>Рис. <text:sequence text:ref-name="refРис.1" text:name="Рис." text:formula="ooow:Рис.+1" style:num-format="1">1</text:sequence>— <text:span text:style-name="T30">Схема работы с заказом</text:span></text:p></draw:text-box></draw:frame></text:p>
      <text:h text:style-name="P35" text:outline-level="3"><text:span text:style-name="T24">3</text:span><text:span text:style-name="T25">.1.</text:span><text:span text:style-name="T28">3</text:span><text:span text:style-name="T25"> Ограничение дизайна и реализации</text:span></text:h>
      <text:p text:style-name="P30"><text:tab/>Приложение создаётся с нуля, что позволяет выбрать средства разработки на своё усмотрение. Так как приложение создаётся для планшетов, следует создать крупный интерфейс и использовать кроссплатформенную разработку, такую как Qt quick. </text:p>
      <text:h text:style-name="P31" text:outline-level="3"><text:span text:style-name="T24">3</text:span><text:span text:style-name="T25">.1.</text:span><text:span text:style-name="T31">4</text:span><text:span text:style-name="T25"> Предположения и зависимости</text:span></text:h>
      <text:p text:style-name="P30"><text:tab/>Для функционирования системы требуется корректно работающая локальная сеть. Установка дополнительных программ или приложений не требуется. </text:p>
      <text:h text:style-name="P29" text:outline-level="2"><text:span text:style-name="T24">3</text:span><text:span text:style-name="T32">.2 </text:span>Функциональные требования</text:h>
      <text:p text:style-name="P30"><text:span text:style-name="Strong_20_Emphasis"><text:tab/></text:span><text:span text:style-name="Strong_20_Emphasis"><text:span text:style-name="T33">Хранение актуального меню: Приложение должно обеспечивать централизованное хранение и управление меню. Данные включают наименования блюд, категории, цены, состав ингредиентов. Все изменения должны мгновенно синхронизироваться между устройствами. Для управления должна быть предусмотрена административная панель.</text:span></text:span></text:p>
      <text:p text:style-name="P30"><text:span text:style-name="Strong_20_Emphasis"><text:span text:style-name="T33"><text:tab/>Подключение к общему складу</text:span></text:span><text:span text:style-name="T33">: Система обязана иметь модуль складского учёта, который автоматически отслеживает остатки ингредиентов в реальном времени. Это включает автоматическое списание продуктов при оформлении заказа, контроль минимальных остатков с генерацией уведомлений о необходимости пополнения запасов.</text:span></text:p>
      <text:p text:style-name="P30"><text:span text:style-name="Strong_20_Emphasis"><text:span text:style-name="T33"><text:tab/>Оформление заказов</text:span></text:span><text:span text:style-name="T33">: Функционал должен позволять создавать новые заказы, привязывая их к конкретному столику и официанту. Должна быть возможность добавлять в заказ блюда из актуального меню.</text:span></text:p>
      <text:p text:style-name="P30"><text:span text:style-name="Strong_20_Emphasis"><text:span text:style-name="T33"><text:tab/>Сохранение чеков</text:span></text:span><text:span text:style-name="T33">: Приложение должно сохранять электронные копии фискальных чеков по каждому закрытому заказу. Данные чеков должны содержать все обязательные реквизиты в соответствии с законодательством</text:span></text:p>
      <text:p text:style-name="P30">и быть доступными для последующего поиска, просмотра и формирования отчётов.</text:p>
      <text:p text:style-name="P30"><text:span text:style-name="Strong_20_Emphasis"><text:span text:style-name="T33"><text:tab/>Формирование списка продуктов на складе, которых осталось немного</text:span></text:span><text:span text:style-name="T33">: На основе данных складского учёта приложение должно автоматически генерировать отчёт или список товаров, остаток которых достиг установленного минимального порога. Это позволяет своевременно инициировать процедуру закупки и предотвращать ситуации отсутствия необходимых ингредиентов.</text:span></text:p>
      <text:h text:style-name="P29" text:outline-level="2"><text:soft-page-break/><text:span text:style-name="T24">3</text:span><text:span text:style-name="T32">.</text:span><text:span text:style-name="T34">3</text:span><text:span text:style-name="T32"> Требования к данным</text:span></text:h>
      <text:h text:style-name="P36" text:outline-level="3"><text:span text:style-name="T24">3</text:span>.3.1 Логическая модель данных</text:h>
      <text:p text:style-name="P37">Основные сущности которые отразятся в базе данных:</text:p>
      <text:list text:style-name="L4">
        <text:list-item>
          <text:p text:style-name="P38">Официант — тот, кто составляет заказ;</text:p>
        </text:list-item>
        <text:list-item>
          <text:p text:style-name="P38">Заказ — то, что записывается в базу данных. Хранит информацию о заказанных блюдах;</text:p>
        </text:list-item>
        <text:list-item>
          <text:p text:style-name="P38">Заказанное блюдо — блюдо которое запишется в заказ, его количество и просьба от клиента;</text:p>
        </text:list-item>
        <text:list-item>
          <text:p text:style-name="P39">Блюдо — экземпляр блюда который указан в меню, ссылается на состав<text:span text:style-name="T35">;</text:span></text:p>
        </text:list-item>
        <text:list-item>
          <text:p text:style-name="P39">Состав <text:span text:style-name="T36">— список продуктов для приготовления блюда;</text:span></text:p>
        </text:list-item>
        <text:list-item>
          <text:p text:style-name="P40">Продукт в составе — <text:span text:style-name="T37">продукт который входит в состав блюда;</text:span></text:p>
        </text:list-item>
        <text:list-item>
          <text:p text:style-name="P41">Продукт <text:span text:style-name="T38"><text:s/>— </text:span>продукт для приготовления блюда.</text:p>
        </text:list-item>
      </text:list>
      <text:p text:style-name="P42">На рисунке <text:span text:style-name="T39">2</text:span> представлена логическая модель данных, описывающая основные сущности в выбранном бизнес процессе. </text:p>
      <text:p text:style-name="P42"/>
      <text:p text:style-name="P30"><draw:frame draw:style-name="fr3" draw:name="Врезка27" text:anchor-type="char" svg:width="15.877cm" draw:z-index="17"><draw:text-box fo:min-height="10.082cm"><text:p text:style-name="Рис."><draw:frame draw:style-name="fr2" draw:name="Изображение2" text:anchor-type="paragraph" svg:width="15.877cm" style:rel-width="100%" svg:height="10.082cm" style:rel-height="scale" draw:z-index="18"><draw:image xlink:href="Pictures/100000000000025800000187062973CC.png" xlink:type="simple" xlink:show="embed" xlink:actuate="onLoad" draw:mime-type="image/png"/></draw:frame>Рис. <text:sequence text:ref-name="refРис.2" text:name="Рис." text:formula="ooow:Рис.+1" style:num-format="1">2</text:sequence><text:s/>— Модель данных</text:p></draw:text-box></draw:frame></text:p>
      <text:h text:style-name="P31" text:outline-level="3"><text:soft-page-break/><text:span text:style-name="T24">3</text:span><text:span text:style-name="T40">.3.</text:span><text:span text:style-name="T41">2</text:span><text:span text:style-name="T40"> Отчёты</text:span></text:h>
      <text:p text:style-name="P30"><text:tab/>Система должна формировать комплекс отчётных документов, обеспечивающих оперативный контроль и стратегическое управление рестораном. Формирование фискальных чеков является базовой функцией. Все чеки должны содержать все обязательные реквизиты в соответствии с законодательством.</text:p>
      <text:p text:style-name="P30"><text:tab/>Для анализа эффективности работы система должна предоставлять отчёт о выручке за период с детализацией по продукту, столику, официанту и временным промежуткам, позволяя отслеживать такие ключевые показатели, как общая выручка, количество гостей и динамика среднего чека.</text:p>
      <text:p text:style-name="P30"><text:tab/>На основе данных складского учёта должен автоматически формироваться отчёт о продуктах с низкими остатками, в котором отображаются продукты, количество которых достигло установленного минимального порога, для своевременного пополнения запасов.</text:p>
      <text:p text:style-name="P43"/>
      <text:h text:style-name="P31" text:outline-level="3"><text:span text:style-name="T24">3</text:span><text:span text:style-name="T40">.3.</text:span><text:span text:style-name="T41">3</text:span><text:span text:style-name="T40"> Получение, целостность, хранение и утилизация данных</text:span></text:h>
      <text:p text:style-name="P30"><text:tab/>Данные поступают из следующих источников:</text:p>
      <text:list text:style-name="L5">
        <text:list-item>
          <text:p text:style-name="P44">Административная панель: внесение и корректировка данных о меню.</text:p>
        </text:list-item>
        <text:list-item>
          <text:p text:style-name="P44">Планшеты официантов: данные о заказах в реальном времени.</text:p>
        </text:list-item>
        <text:list-item>
          <text:p text:style-name="P44">Планшеты <text:span text:style-name="T42">кладовщиков</text:span>: данные об остатках и операциях с ингредиентами.</text:p>
        </text:list-item>
      </text:list>
      <text:p text:style-name="P30">Все данные хранятся централизованно, обеспечивая мгновенную синхронизацию между устройствами в локальной сети. Срок хранения фискальных чеков составляет не менее 3 лет, по истечении которого данные подлежат утилизации.</text:p>
      <text:p text:style-name="P43"/>
      <text:h text:style-name="P29" text:outline-level="2"><text:span text:style-name="T24">3</text:span><text:span text:style-name="T43">.4 </text:span>Требования к внешним интерфейсам</text:h>
      <text:h text:style-name="P31" text:outline-level="3"><text:span text:style-name="T24">3</text:span><text:span text:style-name="T44">.4.1</text:span> Пользовательские интерфе<text:span text:style-name="T45">й</text:span>сы</text:h>
      <text:p text:style-name="P45"><text:tab/>Интерфейс системы должен быть интуитивно понятным и удобным для пользователей. Основные требования:</text:p>
      <text:list text:style-name="L6">
        <text:list-item>
          <text:p text:style-name="P46">Отсутствие отвлекающих элементов.</text:p>
        </text:list-item>
        <text:list-item>
          <text:p text:style-name="P46">Использование крупного шрифта и четкой цветовой гаммы.</text:p>
        </text:list-item>
        <text:list-item>
          <text:p text:style-name="P46">Минимизация текста для быстрого восприятия информации.</text:p>
        </text:list-item>
      </text:list>
      <text:h text:style-name="P31" text:outline-level="3"><text:soft-page-break/><text:span text:style-name="T24">3</text:span><text:span text:style-name="T44">.4.2</text:span> Интерфейсы ПО</text:h>
      <text:p text:style-name="P30"><text:tab/>Система работает на базе операционной системы Android версии не ниже 9. Для взаимодействия с базой данных используется SQLite с использованием языка SQL. </text:p>
      <text:h text:style-name="P31" text:outline-level="3"><text:span text:style-name="T24">3</text:span><text:span text:style-name="T44">.4.3</text:span> Интерфейсы оборудования</text:h>
      <text:p text:style-name="P30"><text:tab/>Планшеты связываются между собой по беспроводной сети интернет, обеспечивая обмен данными в реальном времени. </text:p>
      <text:h text:style-name="P29" text:outline-level="2"><text:span text:style-name="T24">3</text:span><text:span text:style-name="T46">.5 </text:span>Атрибуты качества</text:h>
      <text:h text:style-name="P31" text:outline-level="3"><text:span text:style-name="T24">3</text:span><text:span text:style-name="T44">.</text:span><text:span text:style-name="T47">5</text:span><text:span text:style-name="T44">.1</text:span> Удобство использования</text:h>
      <text:p text:style-name="P30"><text:tab/>Самое главное, чтобы было удобно использовать приложение. Обучение использованию должно быть простым, чтобы изучить работу можно было в одиночку не более 15 минут. </text:p>
      <text:h text:style-name="P31" text:outline-level="3"><text:span text:style-name="T24">3</text:span><text:span text:style-name="T44">.</text:span><text:span text:style-name="T47">5</text:span><text:span text:style-name="T44">.2</text:span> Производительность</text:h>
      <text:p text:style-name="P30"><text:tab/>Производительность системы должна обеспечивать стабильную работу при высокой нагрузке. Время обновления данных должно быть минимальным. </text:p>
      <text:h text:style-name="P31" text:outline-level="3"><text:span text:style-name="T24">3</text:span><text:span text:style-name="T44">.</text:span><text:span text:style-name="T47">5</text:span><text:span text:style-name="T44">.3</text:span> Безопасность</text:h>
      <text:p text:style-name="P30"><text:tab/><text:span text:style-name="T48">Приложение не требует персональных данных кроме фамилии и имени. Поэтому защита конфиденциальности гарантируется. Физическая безопасность зависит только от используемого устройства.</text:span></text:p>
      <text:h text:style-name="P31" text:outline-level="3"><text:span text:style-name="T24">3</text:span><text:span text:style-name="T44">.</text:span><text:span text:style-name="T47">5</text:span><text:span text:style-name="T44">.4</text:span> Техника безопасности</text:h>
      <text:p text:style-name="P30"><text:tab/>Для предотвращения потери данных рекомендуется периодическое резервное копирование информации на внешние устройства. </text:p>
      <text:p text:style-name="P30"/>
      <text:p text:style-name="Text_20_body"/>
      <text:h text:style-name="P47" text:outline-level="2">Вывод</text:h>
      <text:p text:style-name="P48">В ходе выполнения работы были сформированы предварительные требования к разрабатываемому программному продукту. Сформированы требования как к самой программе, так и к клиентам для правильной работы программ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3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1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5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6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7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8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9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0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1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2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2M29S</meta:editing-duration>
    <meta:editing-cycles>221</meta:editing-cycles>
    <meta:generator>LibreOffice/25.8.2.1$Windows_X86_64 LibreOffice_project/345526217a4027cb1b9ab39bd7153c8c141a1d64</meta:generator>
    <dc:title>Реферат ГОСТ</dc:title>
    <dc:date>2025-10-27T20:25:16.337504700</dc:date>
    <meta:print-date>2025-03-27T21:49:41.572929170</meta:print-date>
    <meta:printed-by>Файлы PDF</meta:printed-by>
    <meta:document-statistic meta:table-count="0" meta:image-count="2" meta:object-count="0" meta:page-count="9" meta:paragraph-count="266" meta:word-count="1360" meta:character-count="10105" meta:non-whitespace-character-count="8983"/>
  </office:meta>
</office:document-meta>
</file>