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25800000187062973CC.png" manifest:media-type="image/png"/>
  <manifest:file-entry manifest:full-path="Pictures/10000001000004C50000030D30DFCC14.png" manifest:media-type="image/png"/>
  <manifest:file-entry manifest:full-path="Pictures/1000000000000500000003D2BC888963.jpg" manifest:media-type="image/jpeg"/>
  <manifest:file-entry manifest:full-path="styles.xml" manifest:media-type="text/xml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0.997cm"/>
    </style:style>
    <style:style style:name="Таблица1.B" style:family="table-column">
      <style:table-column-properties style:column-width="8.59cm"/>
    </style:style>
    <style:style style:name="Таблица1.C" style:family="table-column">
      <style:table-column-properties style:column-width="2.616cm"/>
    </style:style>
    <style:style style:name="Таблица1.D" style:family="table-column">
      <style:table-column-properties style:column-width="4.79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4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1.984cm" style:rel-column-width="46196*"/>
    </style:style>
    <style:style style:name="Таблица7.B" style:family="table-column">
      <style:table-column-properties style:column-width="2.304cm" style:rel-column-width="8880*"/>
    </style:style>
    <style:style style:name="Таблица7.C" style:family="table-column">
      <style:table-column-properties style:column-width="2.713cm" style:rel-column-width="1045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fo:margin-top="0cm" fo:margin-bottom="0.3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199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</style:style>
    <style:style style:name="P2" style:family="paragraph" style:parent-style-name="Основной_20_текст_20_на_20_титульной">
      <style:text-properties officeooo:rsid="0033b918" officeooo:paragraph-rsid="0033b918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ff272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</style:style>
    <style:style style:name="P10" style:family="paragraph" style:parent-style-name="Text_20_body">
      <style:text-properties officeooo:rsid="001438f3" officeooo:paragraph-rsid="001438f3"/>
    </style:style>
    <style:style style:name="P11" style:family="paragraph" style:parent-style-name="Text_20_body">
      <style:text-properties officeooo:paragraph-rsid="003ca4e2"/>
    </style:style>
    <style:style style:name="P12" style:family="paragraph" style:parent-style-name="Text_20_body" style:list-style-name="L1"/>
    <style:style style:name="P13" style:family="paragraph" style:parent-style-name="Text_20_body" style:master-page-name="Landscape">
      <style:paragraph-properties style:page-number="auto"/>
    </style:style>
    <style:style style:name="P14" style:family="paragraph" style:parent-style-name="Heading_20_2" style:master-page-name="Standard">
      <style:paragraph-properties style:page-number="auto"/>
    </style:style>
    <style:style style:name="P15" style:family="paragraph" style:parent-style-name="Text_20_body">
      <style:text-properties officeooo:paragraph-rsid="00464171"/>
    </style:style>
    <style:style style:name="P16" style:family="paragraph" style:parent-style-name="Heading_20_3">
      <style:text-properties officeooo:paragraph-rsid="00464171"/>
    </style:style>
    <style:style style:name="P17" style:family="paragraph" style:parent-style-name="Text_20_body">
      <style:text-properties officeooo:paragraph-rsid="00472813"/>
    </style:style>
    <style:style style:name="P18" style:family="paragraph" style:parent-style-name="Text_20_body">
      <style:text-properties officeooo:paragraph-rsid="00911514"/>
    </style:style>
    <style:style style:name="P19" style:family="paragraph" style:parent-style-name="Text_20_body">
      <style:text-properties officeooo:paragraph-rsid="00470108"/>
    </style:style>
    <style:style style:name="P20" style:family="paragraph" style:parent-style-name="Heading_20_2">
      <style:text-properties officeooo:paragraph-rsid="00497d0e"/>
    </style:style>
    <style:style style:name="P21" style:family="paragraph" style:parent-style-name="Heading_20_2">
      <style:text-properties officeooo:paragraph-rsid="0053bcae"/>
    </style:style>
    <style:style style:name="P22" style:family="paragraph" style:parent-style-name="Text_20_body">
      <style:text-properties officeooo:paragraph-rsid="0053bcae"/>
    </style:style>
    <style:style style:name="P23" style:family="paragraph" style:parent-style-name="Heading_20_3">
      <style:text-properties officeooo:rsid="0290247e" officeooo:paragraph-rsid="005527ad"/>
    </style:style>
    <style:style style:name="P24" style:family="paragraph" style:parent-style-name="Text_20_body">
      <style:text-properties officeooo:rsid="02ef8be9" officeooo:paragraph-rsid="005527ad"/>
    </style:style>
    <style:style style:name="P25" style:family="paragraph" style:parent-style-name="Text_20_body" style:list-style-name="L2">
      <style:text-properties officeooo:rsid="02ef8be9" officeooo:paragraph-rsid="005527ad"/>
    </style:style>
    <style:style style:name="P26" style:family="paragraph" style:parent-style-name="Text_20_body" style:list-style-name="L2">
      <style:text-properties officeooo:rsid="02f02dfa" officeooo:paragraph-rsid="005527ad"/>
    </style:style>
    <style:style style:name="P27" style:family="paragraph" style:parent-style-name="Text_20_body" style:list-style-name="L2">
      <style:text-properties officeooo:rsid="02f37159" officeooo:paragraph-rsid="005527ad"/>
    </style:style>
    <style:style style:name="P28" style:family="paragraph" style:parent-style-name="Text_20_body" style:list-style-name="L2">
      <style:text-properties officeooo:rsid="02f677de" officeooo:paragraph-rsid="005527ad"/>
    </style:style>
    <style:style style:name="P29" style:family="paragraph" style:parent-style-name="Text_20_body">
      <style:text-properties officeooo:rsid="02d80c27" officeooo:paragraph-rsid="005527ad"/>
    </style:style>
    <style:style style:name="P30" style:family="paragraph" style:parent-style-name="Heading_20_3">
      <style:text-properties officeooo:paragraph-rsid="00599268"/>
    </style:style>
    <style:style style:name="P31" style:family="paragraph" style:parent-style-name="Text_20_body">
      <style:text-properties officeooo:paragraph-rsid="00599268"/>
    </style:style>
    <style:style style:name="P32" style:family="paragraph" style:parent-style-name="Standard">
      <style:text-properties officeooo:paragraph-rsid="00599268"/>
    </style:style>
    <style:style style:name="P33" style:family="paragraph" style:parent-style-name="Text_20_body" style:list-style-name="L3">
      <style:text-properties officeooo:paragraph-rsid="00599268"/>
    </style:style>
    <style:style style:name="P34" style:family="paragraph" style:parent-style-name="Heading_20_2">
      <style:text-properties officeooo:paragraph-rsid="00599268"/>
    </style:style>
    <style:style style:name="P35" style:family="paragraph" style:parent-style-name="Text_20_body">
      <style:text-properties officeooo:rsid="029c9deb" officeooo:paragraph-rsid="00599268"/>
    </style:style>
    <style:style style:name="P36" style:family="paragraph" style:parent-style-name="Text_20_body" style:list-style-name="L4">
      <style:text-properties officeooo:rsid="029c9deb" officeooo:paragraph-rsid="00599268"/>
    </style:style>
    <style:style style:name="P37" style:family="paragraph" style:parent-style-name="Heading_20_3">
      <style:text-properties officeooo:paragraph-rsid="00606a36"/>
    </style:style>
    <style:style style:name="P38" style:family="paragraph" style:parent-style-name="Heading_20_3">
      <style:text-properties officeooo:paragraph-rsid="0060aa98"/>
    </style:style>
    <style:style style:name="P39" style:family="paragraph" style:parent-style-name="Heading_20_3">
      <style:text-properties officeooo:paragraph-rsid="00630d04"/>
    </style:style>
    <style:style style:name="P40" style:family="paragraph" style:parent-style-name="Heading_20_3">
      <style:text-properties officeooo:paragraph-rsid="00632b7a"/>
    </style:style>
    <style:style style:name="P41" style:family="paragraph" style:parent-style-name="Heading_20_3">
      <style:text-properties officeooo:paragraph-rsid="0071960d"/>
    </style:style>
    <style:style style:name="P42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1.251cm" style:auto-text-indent="false"/>
      <style:text-properties officeooo:paragraph-rsid="0071960d"/>
    </style:style>
    <style:style style:name="P43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fo:letter-spacing="-0.004cm" officeooo:rsid="01dfc8de" officeooo:paragraph-rsid="0071960d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Standard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fo:letter-spacing="-0.004cm" officeooo:rsid="01dfc8de" officeooo:paragraph-rsid="00719975"/>
    </style:style>
    <style:style style:name="P47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officeooo:paragraph-rsid="0071960d"/>
    </style:style>
    <style:style style:name="P48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071960d"/>
    </style:style>
    <style:style style:name="P49" style:family="paragraph" style:parent-style-name="Text_20_body">
      <style:paragraph-properties fo:margin-left="0cm" fo:margin-right="0.235cm" fo:margin-top="0cm" fo:margin-bottom="0cm" style:contextual-spacing="false" fo:text-align="justify" style:justify-single-word="false" fo:text-indent="0cm" style:auto-text-indent="false"/>
      <style:text-properties officeooo:paragraph-rsid="007a42fa"/>
    </style:style>
    <style:style style:name="P50" style:family="paragraph" style:parent-style-name="Text_20_body">
      <style:paragraph-properties fo:margin-left="0cm" fo:text-indent="0cm" style:auto-text-indent="false"/>
    </style:style>
    <style:style style:name="P51" style:family="paragraph" style:parent-style-name="Text_20_body">
      <style:paragraph-properties fo:margin-left="0cm" fo:text-indent="0cm" style:auto-text-indent="false"/>
      <style:text-properties officeooo:paragraph-rsid="007ca781"/>
    </style:style>
    <style:style style:name="P52" style:family="paragraph" style:parent-style-name="Table">
      <style:paragraph-properties fo:keep-with-next="always"/>
      <style:text-properties fo:font-weight="normal" officeooo:paragraph-rsid="0071960d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1e28a4f" officeooo:paragraph-rsid="0071960d" style:font-size-asian="12pt" style:font-size-complex="12pt"/>
    </style:style>
    <style:style style:name="P54" style:family="paragraph" style:parent-style-name="Table_20_Contents" style:list-style-name="L5">
      <style:paragraph-properties fo:text-align="start" style:justify-single-word="false"/>
      <style:text-properties fo:font-size="12pt" officeooo:paragraph-rsid="0071960d" style:font-size-asian="12pt" style:font-size-complex="12pt"/>
    </style:style>
    <style:style style:name="P55" style:family="paragraph" style:parent-style-name="Text_20_body">
      <style:text-properties officeooo:paragraph-rsid="0071960d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1e3c667" officeooo:paragraph-rsid="0071960d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1f777d0" officeooo:paragraph-rsid="0071960d" style:font-size-asian="12pt" style:font-size-complex="12pt"/>
    </style:style>
    <style:style style:name="P58" style:family="paragraph" style:parent-style-name="Text_20_body">
      <style:text-properties fo:font-size="14pt" fo:letter-spacing="-0.004cm" officeooo:rsid="030e1e5d" officeooo:paragraph-rsid="0071960d" style:font-size-asian="14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1e3957c" officeooo:paragraph-rsid="0071960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font-weight="bold" officeooo:rsid="01e28a4f" officeooo:paragraph-rsid="0071960d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bold" officeooo:paragraph-rsid="0071960d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1f777d0" officeooo:paragraph-rsid="0071960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officeooo:rsid="01e6c657" officeooo:paragraph-rsid="0071960d"/>
    </style:style>
    <style:style style:name="P64" style:family="paragraph" style:parent-style-name="Text_20_body">
      <style:text-properties officeooo:rsid="01ea6119" officeooo:paragraph-rsid="0071960d"/>
    </style:style>
    <style:style style:name="P65" style:family="paragraph" style:parent-style-name="Standard">
      <style:text-properties officeooo:rsid="01ecebce" officeooo:paragraph-rsid="00810cfc"/>
    </style:style>
    <style:style style:name="P66" style:family="paragraph" style:parent-style-name="Text_20_body">
      <style:paragraph-properties fo:text-align="justify" style:justify-single-word="false"/>
      <style:text-properties officeooo:rsid="01ecebce" officeooo:paragraph-rsid="0071960d"/>
    </style:style>
    <style:style style:name="P67" style:family="paragraph" style:parent-style-name="Text_20_body">
      <style:paragraph-properties fo:text-align="justify" style:justify-single-word="false"/>
      <style:text-properties officeooo:rsid="01ed5eca" officeooo:paragraph-rsid="0071960d"/>
    </style:style>
    <style:style style:name="P68" style:family="paragraph" style:parent-style-name="Text_20_body">
      <style:paragraph-properties fo:text-align="start" style:justify-single-word="false"/>
      <style:text-properties officeooo:rsid="01ecebce" officeooo:paragraph-rsid="0071960d"/>
    </style:style>
    <style:style style:name="P69" style:family="paragraph" style:parent-style-name="Text_20_body">
      <style:paragraph-properties fo:text-align="start" style:justify-single-word="false"/>
      <style:text-properties officeooo:rsid="01ee3056" officeooo:paragraph-rsid="0071960d"/>
    </style:style>
    <style:style style:name="P70" style:family="paragraph" style:parent-style-name="Text_20_body">
      <style:paragraph-properties fo:text-align="start" style:justify-single-word="false"/>
      <style:text-properties officeooo:rsid="01ee3056" officeooo:paragraph-rsid="008407e0"/>
    </style:style>
    <style:style style:name="P71" style:family="paragraph" style:parent-style-name="Text_20_body">
      <style:paragraph-properties fo:margin-left="0cm" fo:text-indent="0cm" style:auto-text-indent="false"/>
      <style:text-properties officeooo:rsid="01ee3056" officeooo:paragraph-rsid="00897b61"/>
    </style:style>
    <style:style style:name="P72" style:family="paragraph" style:parent-style-name="Text_20_body">
      <style:paragraph-properties fo:margin-left="0cm" fo:text-align="start" style:justify-single-word="false" fo:text-indent="0cm" style:auto-text-indent="false"/>
      <style:text-properties officeooo:rsid="020920a6" officeooo:paragraph-rsid="008407e0"/>
    </style:style>
    <style:style style:name="P73" style:family="paragraph" style:parent-style-name="Text_20_body">
      <style:paragraph-properties fo:text-align="start" style:justify-single-word="false"/>
      <style:text-properties fo:language="ru" fo:country="RU" officeooo:rsid="020a2eaf" officeooo:paragraph-rsid="008407e0"/>
    </style:style>
    <style:style style:name="P74" style:family="paragraph" style:parent-style-name="Text_20_body">
      <style:paragraph-properties fo:margin-left="0cm" fo:text-align="start" style:justify-single-word="false" fo:text-indent="0cm" style:auto-text-indent="false"/>
      <style:text-properties fo:language="ru" fo:country="RU" officeooo:rsid="020a2eaf" officeooo:paragraph-rsid="008407e0"/>
    </style:style>
    <style:style style:name="P75" style:family="paragraph" style:parent-style-name="Text_20_body">
      <style:paragraph-properties fo:text-align="start" style:justify-single-word="false"/>
      <style:text-properties fo:language="ru" fo:country="RU" officeooo:rsid="020c061c" officeooo:paragraph-rsid="008407e0"/>
    </style:style>
    <style:style style:name="P76" style:family="paragraph" style:parent-style-name="Text_20_body">
      <style:paragraph-properties fo:margin-left="0cm" fo:text-align="start" style:justify-single-word="false" fo:text-indent="0cm" style:auto-text-indent="false"/>
      <style:text-properties fo:language="ru" fo:country="RU" officeooo:rsid="020c061c" officeooo:paragraph-rsid="008407e0"/>
    </style:style>
    <style:style style:name="P77" style:family="paragraph" style:parent-style-name="Standard">
      <style:text-properties officeooo:paragraph-rsid="00719975"/>
    </style:style>
    <style:style style:name="P78" style:family="paragraph" style:parent-style-name="Text_20_body">
      <style:text-properties officeooo:rsid="008f1409" officeooo:paragraph-rsid="008f1409"/>
    </style:style>
    <style:style style:name="P79" style:family="paragraph" style:parent-style-name="Table">
      <style:paragraph-properties fo:keep-with-next="always"/>
    </style:style>
    <style:style style:name="P80" style:family="paragraph" style:parent-style-name="Text_20_body">
      <style:paragraph-properties fo:margin-left="0cm" fo:text-indent="0cm" style:auto-text-indent="false"/>
      <style:text-properties officeooo:rsid="02ff5d15"/>
    </style:style>
    <style:style style:name="P81" style:family="paragraph" style:parent-style-name="Standard">
      <style:text-properties officeooo:rsid="01ecebce" officeooo:paragraph-rsid="008b3bf0"/>
    </style:style>
    <style:style style:name="P82" style:family="paragraph" style:parent-style-name="Text_20_body">
      <style:paragraph-properties fo:text-align="justify" style:justify-single-word="false"/>
      <style:text-properties officeooo:rsid="01ee5f0b" officeooo:paragraph-rsid="0071960d"/>
    </style:style>
    <style:style style:name="P83" style:family="paragraph" style:parent-style-name="Heading_20_2">
      <style:text-properties officeooo:rsid="0033b918" officeooo:paragraph-rsid="0033b918"/>
    </style:style>
    <style:style style:name="P84" style:family="paragraph" style:parent-style-name="Text_20_body" style:list-style-name="L6"/>
    <style:style style:name="P85" style:family="paragraph" style:parent-style-name="Text_20_body">
      <style:text-properties fo:language="ru" fo:country="RU" officeooo:rsid="020221d2"/>
    </style:style>
    <style:style style:name="P86" style:family="paragraph" style:parent-style-name="Text_20_body">
      <style:paragraph-properties fo:text-align="justify" style:justify-single-word="false"/>
      <style:text-properties officeooo:paragraph-rsid="003fa193"/>
    </style:style>
    <style:style style:name="P87" style:family="paragraph" style:parent-style-name="Text_20_body">
      <style:text-properties officeooo:paragraph-rsid="003fa193"/>
    </style:style>
    <style:style style:name="P88" style:family="paragraph" style:parent-style-name="Text_20_body">
      <style:text-properties officeooo:paragraph-rsid="00360b9e"/>
    </style:style>
    <style:style style:name="P89" style:family="paragraph" style:parent-style-name="Footnote">
      <style:text-properties officeooo:rsid="001b2a57" officeooo:paragraph-rsid="001b2a57"/>
    </style:style>
    <style:style style:name="P90" style:family="paragraph" style:parent-style-name="Footnote">
      <style:text-properties officeooo:rsid="0023a124" officeooo:paragraph-rsid="0023a124"/>
    </style:style>
    <style:style style:name="P91" style:family="paragraph" style:parent-style-name="Text_20_body">
      <style:text-properties officeooo:rsid="002afe93" officeooo:paragraph-rsid="002afe93"/>
    </style:style>
    <style:style style:name="P92" style:family="paragraph" style:parent-style-name="Text_20_body" style:list-style-name="L7">
      <style:text-properties officeooo:rsid="002afe93" officeooo:paragraph-rsid="002afe93"/>
    </style:style>
    <style:style style:name="P93" style:family="paragraph" style:parent-style-name="Text_20_body" style:list-style-name="L8">
      <style:text-properties officeooo:rsid="002afe93" officeooo:paragraph-rsid="002afe93"/>
    </style:style>
    <style:style style:name="P94" style:family="paragraph" style:parent-style-name="Text_20_body">
      <style:text-properties officeooo:rsid="002b7efc" officeooo:paragraph-rsid="002b7efc"/>
    </style:style>
    <style:style style:name="P95" style:family="paragraph" style:parent-style-name="Text_20_body" style:list-style-name="L9">
      <style:text-properties officeooo:rsid="002b7efc" officeooo:paragraph-rsid="002b7efc"/>
    </style:style>
    <style:style style:name="P96" style:family="paragraph" style:parent-style-name="Text_20_body" style:list-style-name="L10">
      <style:text-properties officeooo:rsid="002b7efc" officeooo:paragraph-rsid="002b7efc"/>
    </style:style>
    <style:style style:name="P97" style:family="paragraph" style:parent-style-name="Text_20_body" style:list-style-name="L11">
      <style:text-properties officeooo:rsid="002b7efc" officeooo:paragraph-rsid="002b7efc"/>
    </style:style>
    <style:style style:name="P98" style:family="paragraph" style:parent-style-name="Text_20_body" style:list-style-name="L12">
      <style:text-properties officeooo:rsid="002b7efc" officeooo:paragraph-rsid="002b7efc"/>
    </style:style>
    <style:style style:name="P99" style:family="paragraph" style:parent-style-name="Text_20_body" style:list-style-name="L12">
      <style:text-properties officeooo:rsid="002b7efc" officeooo:paragraph-rsid="00360b9e"/>
    </style:style>
    <style:style style:name="P100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officeooo:paragraph-rsid="00292d7c"/>
    </style:style>
    <style:style style:name="P101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officeooo:paragraph-rsid="00292d7c"/>
    </style:style>
    <style:style style:name="P102" style:family="paragraph" style:parent-style-name="Heading_20_1">
      <style:paragraph-properties fo:break-before="page"/>
      <style:text-properties officeooo:paragraph-rsid="00360b9e"/>
    </style:style>
    <style:style style:name="P103" style:family="paragraph" style:parent-style-name="Heading_20_1">
      <style:text-properties officeooo:paragraph-rsid="00360b9e"/>
    </style:style>
    <style:style style:name="P104" style:family="paragraph" style:parent-style-name="Text_20_body">
      <style:paragraph-properties fo:margin-left="0cm" fo:text-indent="0cm" style:auto-text-indent="false"/>
      <style:text-properties officeooo:paragraph-rsid="00360b9e"/>
    </style:style>
    <style:style style:name="P105" style:family="paragraph" style:parent-style-name="Text_20_body">
      <style:paragraph-properties fo:margin-left="0cm" fo:text-indent="0cm" style:auto-text-indent="false"/>
      <style:text-properties officeooo:rsid="0037dee9" officeooo:paragraph-rsid="00360b9e"/>
    </style:style>
    <style:style style:name="P106" style:family="paragraph" style:parent-style-name="Листинг">
      <style:paragraph-properties fo:keep-with-next="always"/>
      <style:text-properties officeooo:paragraph-rsid="0023a124"/>
    </style:style>
    <style:style style:name="P107" style:family="paragraph" style:parent-style-name="Оформление_20_кода" style:list-style-name="Нумерация_20_строк_20_кода">
      <style:text-properties officeooo:paragraph-rsid="00360b9e"/>
    </style:style>
    <style:style style:name="P108" style:family="paragraph" style:parent-style-name="Листинг">
      <style:paragraph-properties fo:keep-with-next="always"/>
    </style:style>
    <style:style style:name="P109" style:family="paragraph" style:parent-style-name="Оформление_20_кода" style:list-style-name="Нумерация_20_строк_20_кода"/>
    <style:style style:name="P110" style:family="paragraph" style:parent-style-name="Heading_20_1">
      <style:text-properties officeooo:rsid="0033b918" officeooo:paragraph-rsid="00360b9e"/>
    </style:style>
    <style:style style:name="P111" style:family="paragraph" style:parent-style-name="Text_20_body">
      <style:text-properties officeooo:rsid="002a122f" officeooo:paragraph-rsid="002a122f"/>
    </style:style>
    <style:style style:name="P112" style:family="paragraph" style:parent-style-name="Text_20_body" style:list-style-name="L13">
      <style:text-properties officeooo:rsid="002a122f" officeooo:paragraph-rsid="002a122f"/>
    </style:style>
    <style:style style:name="T1" style:family="text">
      <style:text-properties officeooo:rsid="00449f0e"/>
    </style:style>
    <style:style style:name="T2" style:family="text">
      <style:text-properties officeooo:rsid="004551bf"/>
    </style:style>
    <style:style style:name="T3" style:family="text">
      <style:text-properties officeooo:rsid="003ad4ca"/>
    </style:style>
    <style:style style:name="T4" style:family="text">
      <style:text-properties officeooo:rsid="008f899e"/>
    </style:style>
    <style:style style:name="T5" style:family="text">
      <style:text-properties officeooo:rsid="00926825"/>
    </style:style>
    <style:style style:name="T6" style:family="text">
      <style:text-properties officeooo:rsid="00464171"/>
    </style:style>
    <style:style style:name="T7" style:family="text">
      <style:text-properties officeooo:rsid="023fb1e6"/>
    </style:style>
    <style:style style:name="T8" style:family="text">
      <style:text-properties officeooo:rsid="02400d9b"/>
    </style:style>
    <style:style style:name="T9" style:family="text">
      <style:text-properties officeooo:rsid="025fb159"/>
    </style:style>
    <style:style style:name="T10" style:family="text">
      <style:text-properties officeooo:rsid="0241e581"/>
    </style:style>
    <style:style style:name="T11" style:family="text">
      <style:text-properties officeooo:rsid="00497d0e"/>
    </style:style>
    <style:style style:name="T12" style:family="text">
      <style:text-properties officeooo:rsid="02432bb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3bcae"/>
    </style:style>
    <style:style style:name="T15" style:family="text">
      <style:text-properties officeooo:rsid="0244dbe6"/>
    </style:style>
    <style:style style:name="T16" style:family="text">
      <style:text-properties officeooo:rsid="0056cf05"/>
    </style:style>
    <style:style style:name="T17" style:family="text">
      <style:text-properties officeooo:rsid="02ef8be9"/>
    </style:style>
    <style:style style:name="T18" style:family="text">
      <style:text-properties officeooo:rsid="02f187c1"/>
    </style:style>
    <style:style style:name="T19" style:family="text">
      <style:text-properties officeooo:rsid="02f4e288"/>
    </style:style>
    <style:style style:name="T20" style:family="text">
      <style:text-properties officeooo:rsid="02f37159"/>
    </style:style>
    <style:style style:name="T21" style:family="text">
      <style:text-properties officeooo:rsid="006c3cec"/>
    </style:style>
    <style:style style:name="T22" style:family="text">
      <style:text-properties officeooo:rsid="005a0ff5"/>
    </style:style>
    <style:style style:name="T23" style:family="text">
      <style:text-properties officeooo:rsid="02487156"/>
    </style:style>
    <style:style style:name="T24" style:family="text">
      <style:text-properties officeooo:rsid="005ba78f"/>
    </style:style>
    <style:style style:name="T25" style:family="text">
      <style:text-properties officeooo:rsid="02cae8e1"/>
    </style:style>
    <style:style style:name="T26" style:family="text">
      <style:text-properties officeooo:rsid="005d8870"/>
    </style:style>
    <style:style style:name="T27" style:family="text">
      <style:text-properties officeooo:rsid="005eb102"/>
    </style:style>
    <style:style style:name="T28" style:family="text">
      <style:text-properties officeooo:rsid="0246b1bb"/>
    </style:style>
    <style:style style:name="T29" style:family="text">
      <style:text-properties officeooo:rsid="00604796"/>
    </style:style>
    <style:style style:name="T30" style:family="text">
      <style:text-properties officeooo:rsid="024d4fa3"/>
    </style:style>
    <style:style style:name="T31" style:family="text">
      <style:text-properties officeooo:rsid="024fb74d"/>
    </style:style>
    <style:style style:name="T32" style:family="text">
      <style:text-properties officeooo:rsid="0062add9"/>
    </style:style>
    <style:style style:name="T33" style:family="text">
      <style:text-properties officeooo:rsid="025118fc"/>
    </style:style>
    <style:style style:name="T34" style:family="text">
      <style:text-properties officeooo:rsid="00630d04"/>
    </style:style>
    <style:style style:name="T35" style:family="text">
      <style:text-properties officeooo:rsid="02a08bf1"/>
    </style:style>
    <style:style style:name="T36" style:family="text">
      <style:text-properties officeooo:rsid="0033b918"/>
    </style:style>
    <style:style style:name="T37" style:family="text">
      <style:text-properties officeooo:rsid="007df13b"/>
    </style:style>
    <style:style style:name="T38" style:family="text">
      <style:text-properties officeooo:rsid="01dfb4a2"/>
    </style:style>
    <style:style style:name="T39" style:family="text">
      <style:text-properties fo:letter-spacing="-0.004cm"/>
    </style:style>
    <style:style style:name="T40" style:family="text">
      <style:text-properties fo:language="en" fo:country="US" officeooo:rsid="00719975"/>
    </style:style>
    <style:style style:name="T41" style:family="text">
      <style:text-properties fo:letter-spacing="-0.004cm" officeooo:rsid="01dfc8de"/>
    </style:style>
    <style:style style:name="T42" style:family="text">
      <style:text-properties fo:font-variant="normal" fo:text-transform="none" style:use-window-font-color="true" loext:opacity="0%" fo:letter-spacing="normal"/>
    </style:style>
    <style:style style:name="T43" style:family="text">
      <style:text-properties fo:font-variant="normal" fo:text-transform="none" style:use-window-font-color="true" loext:opacity="0%" fo:font-weight="normal" style:font-weight-asian="normal" style:font-weight-complex="normal"/>
    </style:style>
    <style:style style:name="T44" style:family="text">
      <style:text-properties fo:font-variant="normal" fo:text-transform="none" style:use-window-font-color="true" loext:opacity="0%" style:text-position="sub 58%" fo:font-weight="normal" style:font-weight-asian="normal" style:font-weight-complex="normal"/>
    </style:style>
    <style:style style:name="T45" style:family="text">
      <style:text-properties fo:font-variant="normal" fo:text-transform="none" style:use-window-font-color="true" loext:opacity="0%" style:text-position="super 58%" fo:font-weight="normal" style:font-weight-asian="normal" style:font-weight-complex="normal"/>
    </style:style>
    <style:style style:name="T46" style:family="text">
      <style:text-properties fo:font-variant="normal" fo:text-transform="none" style:use-window-font-color="true" loext:opacity="0%" style:text-position="0% 100%" fo:font-weight="normal" style:font-weight-asian="normal" style:font-weight-complex="normal"/>
    </style:style>
    <style:style style:name="T47" style:family="text">
      <style:text-properties fo:font-variant="normal" fo:text-transform="none" style:use-window-font-color="true" loext:opacity="0%" style:text-position="0% 100%" fo:letter-spacing="normal"/>
    </style:style>
    <style:style style:name="T48" style:family="text">
      <style:text-properties fo:font-variant="normal" fo:text-transform="none" style:use-window-font-color="true" loext:opacity="0%" style:text-position="0% 100%" fo:font-weight="normal" officeooo:rsid="01e0f486" style:font-weight-asian="normal" style:font-weight-complex="normal"/>
    </style:style>
    <style:style style:name="T49" style:family="text">
      <style:text-properties fo:font-variant="normal" fo:text-transform="none" style:use-window-font-color="true" loext:opacity="0%" style:text-position="0% 100%" fo:letter-spacing="normal" officeooo:rsid="01e0f486"/>
    </style:style>
    <style:style style:name="T50" style:family="text">
      <style:text-properties fo:font-variant="normal" fo:text-transform="none" style:use-window-font-color="true" loext:opacity="0%" style:text-position="0% 100%" fo:letter-spacing="normal" fo:font-weight="normal" officeooo:rsid="01e0f486" style:font-weight-asian="normal" style:font-weight-complex="normal"/>
    </style:style>
    <style:style style:name="T51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221408" style:font-weight-asian="normal" style:font-weight-complex="normal"/>
    </style:style>
    <style:style style:name="T52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07a42fa" style:font-weight-asian="normal" style:font-weight-complex="normal"/>
    </style:style>
    <style:style style:name="T53" style:family="text">
      <style:text-properties officeooo:rsid="00789abd"/>
    </style:style>
    <style:style style:name="T54" style:family="text">
      <style:text-properties officeooo:rsid="01f9d0e1"/>
    </style:style>
    <style:style style:name="T55" style:family="text">
      <style:text-properties officeooo:rsid="0316cf8e"/>
    </style:style>
    <style:style style:name="T56" style:family="text">
      <style:text-properties officeooo:rsid="031c71a4"/>
    </style:style>
    <style:style style:name="T57" style:family="text">
      <style:text-properties officeooo:rsid="032198f1"/>
    </style:style>
    <style:style style:name="T58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24024f" style:font-weight-asian="normal" style:font-weight-complex="normal"/>
    </style:style>
    <style:style style:name="T59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0779137" style:font-weight-asian="normal" style:font-weight-complex="normal"/>
    </style:style>
    <style:style style:name="T60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0b658a" style:font-weight-asian="normal" style:font-weight-complex="normal"/>
    </style:style>
    <style:style style:name="T61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09a9dd" style:font-weight-asian="normal" style:font-weight-complex="normal"/>
    </style:style>
    <style:style style:name="T62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0ecb74" style:font-weight-asian="normal" style:font-weight-complex="normal"/>
    </style:style>
    <style:style style:name="T63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0f20f2" style:font-weight-asian="normal" style:font-weight-complex="normal"/>
    </style:style>
    <style:style style:name="T64" style:family="text">
      <style:text-properties fo:font-variant="normal" fo:text-transform="none" style:use-window-font-color="true" loext:opacity="0%" style:text-position="0% 100%" fo:font-size="14pt" fo:letter-spacing="normal" fo:language="ru" fo:country="RU" fo:font-weight="normal" officeooo:rsid="03183bcf" style:font-size-asian="14pt" style:font-weight-asian="normal" style:font-weight-complex="normal"/>
    </style:style>
    <style:style style:name="T65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1a7602" style:font-weight-asian="normal" style:font-weight-complex="normal"/>
    </style:style>
    <style:style style:name="T66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1c71a4" style:font-weight-asian="normal" style:font-weight-complex="normal"/>
    </style:style>
    <style:style style:name="T67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1eba94" style:font-weight-asian="normal" style:font-weight-complex="normal"/>
    </style:style>
    <style:style style:name="T68" style:family="text">
      <style:text-properties fo:font-variant="normal" fo:text-transform="none" style:use-window-font-color="true" loext:opacity="0%" style:text-position="0% 100%" fo:letter-spacing="normal" fo:language="ru" fo:country="RU" fo:font-weight="normal" officeooo:rsid="03264420" style:font-weight-asian="normal" style:font-weight-complex="normal"/>
    </style:style>
    <style:style style:name="T69" style:family="text">
      <style:text-properties fo:font-variant="normal" fo:text-transform="none" style:use-window-font-color="true" loext:opacity="0%" style:text-position="0% 100%" fo:letter-spacing="-0.004cm" fo:font-weight="normal" officeooo:rsid="01dfc8de" style:font-weight-asian="normal" style:font-weight-complex="normal"/>
    </style:style>
    <style:style style:name="T70" style:family="text">
      <style:text-properties fo:font-variant="normal" fo:text-transform="none" style:use-window-font-color="true" loext:opacity="0%" fo:letter-spacing="normal" officeooo:rsid="01dfc8de"/>
    </style:style>
    <style:style style:name="T71" style:family="text">
      <style:text-properties fo:font-size="14pt" style:font-size-asian="14pt"/>
    </style:style>
    <style:style style:name="T72" style:family="text">
      <style:text-properties fo:font-size="14pt" fo:letter-spacing="-0.012cm" style:font-size-asian="14pt"/>
    </style:style>
    <style:style style:name="T73" style:family="text">
      <style:text-properties fo:font-size="14pt" fo:letter-spacing="-0.016cm" style:font-size-asian="14pt"/>
    </style:style>
    <style:style style:name="T74" style:family="text">
      <style:text-properties fo:font-size="14pt" fo:letter-spacing="-0.014cm" style:font-size-asian="14pt"/>
    </style:style>
    <style:style style:name="T75" style:family="text">
      <style:text-properties fo:font-size="14pt" fo:letter-spacing="-0.014cm" officeooo:rsid="030c6de9" style:font-size-asian="14pt"/>
    </style:style>
    <style:style style:name="T76" style:family="text">
      <style:text-properties fo:font-size="14pt" fo:letter-spacing="-0.004cm" style:font-size-asian="14pt"/>
    </style:style>
    <style:style style:name="T77" style:family="text">
      <style:text-properties style:text-position="0% 100%" officeooo:rsid="01ea42e7"/>
    </style:style>
    <style:style style:name="T78" style:family="text">
      <style:text-properties officeooo:rsid="01ea6119"/>
    </style:style>
    <style:style style:name="T79" style:family="text">
      <style:text-properties officeooo:rsid="007f467b"/>
    </style:style>
    <style:style style:name="T80" style:family="text">
      <style:text-properties officeooo:rsid="0082e206"/>
    </style:style>
    <style:style style:name="T81" style:family="text">
      <style:text-properties officeooo:rsid="01ee5f0b"/>
    </style:style>
    <style:style style:name="T82" style:family="text">
      <style:text-properties style:text-position="sub 58%"/>
    </style:style>
    <style:style style:name="T83" style:family="text">
      <style:text-properties officeooo:rsid="01ed5eca"/>
    </style:style>
    <style:style style:name="T84" style:family="text">
      <style:text-properties style:text-position="0% 100%"/>
    </style:style>
    <style:style style:name="T85" style:family="text">
      <style:text-properties style:text-position="0% 100%" officeooo:rsid="01ee5f0b"/>
    </style:style>
    <style:style style:name="T86" style:family="text">
      <style:text-properties style:text-position="sub 58%" officeooo:rsid="01ecebce"/>
    </style:style>
    <style:style style:name="T87" style:family="text">
      <style:text-properties style:text-position="0% 100%" officeooo:rsid="01ecebce"/>
    </style:style>
    <style:style style:name="T88" style:family="text">
      <style:text-properties style:text-position="0% 100%" officeooo:rsid="01ed5eca"/>
    </style:style>
    <style:style style:name="T89" style:family="text">
      <style:text-properties officeooo:rsid="01f2f670"/>
    </style:style>
    <style:style style:name="T90" style:family="text">
      <style:text-properties officeooo:rsid="008407e0"/>
    </style:style>
    <style:style style:name="T91" style:family="text">
      <style:text-properties officeooo:rsid="032e8980"/>
    </style:style>
    <style:style style:name="T92" style:family="text">
      <style:text-properties officeooo:rsid="01fc38ba"/>
    </style:style>
    <style:style style:name="T93" style:family="text">
      <style:text-properties officeooo:rsid="01ff4ae4"/>
    </style:style>
    <style:style style:name="T94" style:family="text">
      <style:text-properties officeooo:rsid="02043720"/>
    </style:style>
    <style:style style:name="T95" style:family="text">
      <style:text-properties officeooo:rsid="02065111"/>
    </style:style>
    <style:style style:name="T96" style:family="text">
      <style:text-properties officeooo:rsid="01ff4e74"/>
    </style:style>
    <style:style style:name="T97" style:family="text">
      <style:text-properties officeooo:rsid="0201b593"/>
    </style:style>
    <style:style style:name="T98" style:family="text">
      <style:text-properties style:text-position="0% 100%" officeooo:rsid="0202bda4"/>
    </style:style>
    <style:style style:name="T99" style:family="text">
      <style:text-properties style:text-position="0% 100%" fo:font-size="14pt" fo:letter-spacing="-0.004cm" officeooo:rsid="0202bda4" style:font-size-asian="14pt"/>
    </style:style>
    <style:style style:name="T100" style:family="text">
      <style:text-properties officeooo:rsid="0084ac64"/>
    </style:style>
    <style:style style:name="T101" style:family="text">
      <style:text-properties officeooo:rsid="0085e897"/>
    </style:style>
    <style:style style:name="T102" style:family="text">
      <style:text-properties fo:font-variant="normal" fo:text-transform="none" style:use-window-font-color="true" loext:opacity="0%" fo:font-size="12pt" fo:letter-spacing="normal" officeooo:rsid="01dfc8de" style:font-size-asian="12pt" style:font-size-complex="12pt"/>
    </style:style>
    <style:style style:name="T103" style:family="text">
      <style:text-properties fo:font-variant="normal" fo:text-transform="none" style:use-window-font-color="true" loext:opacity="0%" fo:font-size="14pt" fo:letter-spacing="normal" fo:font-weight="normal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style:use-window-font-color="true" loext:opacity="0%" style:text-position="sub 58%" fo:font-size="14pt" fo:letter-spacing="normal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style:use-window-font-color="true" loext:opacity="0%" style:text-position="0% 100%" fo:font-size="14pt" fo:letter-spacing="normal" fo:font-weight="normal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style:use-window-font-color="true" loext:opacity="0%" style:text-position="0% 100%" fo:font-size="12pt" fo:letter-spacing="normal" officeooo:rsid="01dfc8de" style:font-size-asian="12pt" style:font-size-complex="12pt"/>
    </style:style>
    <style:style style:name="T107" style:family="text">
      <style:text-properties officeooo:rsid="020d70ed"/>
    </style:style>
    <style:style style:name="T108" style:family="text">
      <style:text-properties fo:language="ru" fo:country="RU" officeooo:rsid="020a2eaf"/>
    </style:style>
    <style:style style:name="T109" style:family="text">
      <style:text-properties fo:language="ru" fo:country="RU" officeooo:rsid="020d70ed"/>
    </style:style>
    <style:style style:name="T110" style:family="text">
      <style:text-properties fo:language="ru" fo:country="RU" officeooo:rsid="020c061c"/>
    </style:style>
    <style:style style:name="T111" style:family="text">
      <style:text-properties fo:language="ru" fo:country="RU" officeooo:rsid="020e76f4"/>
    </style:style>
    <style:style style:name="T112" style:family="text">
      <style:text-properties fo:font-size="14pt" fo:letter-spacing="-0.021cm" style:font-size-asian="14pt"/>
    </style:style>
    <style:style style:name="T113" style:family="text">
      <style:text-properties fo:font-size="14pt" fo:letter-spacing="-0.018cm" style:font-size-asian="14pt"/>
    </style:style>
    <style:style style:name="T114" style:family="text">
      <style:text-properties fo:font-size="14pt" fo:letter-spacing="-0.03cm" style:font-size-asian="14pt"/>
    </style:style>
    <style:style style:name="T115" style:family="text">
      <style:text-properties fo:font-size="14pt" fo:letter-spacing="-0.023cm" style:font-size-asian="14pt"/>
    </style:style>
    <style:style style:name="T116" style:family="text">
      <style:text-properties fo:font-size="14pt" fo:letter-spacing="-0.026cm" style:font-size-asian="14pt"/>
    </style:style>
    <style:style style:name="T117" style:family="text">
      <style:text-properties fo:font-size="14pt" fo:letter-spacing="-0.028cm" style:font-size-asian="14pt"/>
    </style:style>
    <style:style style:name="T118" style:family="text">
      <style:text-properties fo:font-size="14pt" fo:letter-spacing="-0.007cm" style:font-size-asian="14pt"/>
    </style:style>
    <style:style style:name="T119" style:family="text">
      <style:text-properties fo:font-size="14pt" fo:letter-spacing="-0.011cm" style:font-size-asian="14pt"/>
    </style:style>
    <style:style style:name="T120" style:family="text">
      <style:text-properties fo:font-size="14pt" fo:letter-spacing="-0.005cm" style:font-size-asian="14pt"/>
    </style:style>
    <style:style style:name="T121" style:family="text">
      <style:text-properties fo:font-size="14pt" fo:letter-spacing="0.002cm" style:font-size-asian="14pt"/>
    </style:style>
    <style:style style:name="T122" style:family="text">
      <style:text-properties fo:font-size="14pt" fo:letter-spacing="-0.019cm" style:font-size-asian="14pt"/>
    </style:style>
    <style:style style:name="T123" style:family="text">
      <style:text-properties fo:font-size="14pt" fo:letter-spacing="-0.007cm" officeooo:rsid="020def9a" style:font-size-asian="14pt"/>
    </style:style>
    <style:style style:name="T124" style:family="text">
      <style:text-properties fo:language="en" fo:country="US" officeooo:rsid="020764ef"/>
    </style:style>
    <style:style style:name="T125" style:family="text">
      <style:text-properties fo:language="ru" fo:country="RU" officeooo:rsid="020764ef"/>
    </style:style>
    <style:style style:name="T126" style:family="text">
      <style:text-properties fo:language="ru" fo:country="RU" officeooo:rsid="020b83e4"/>
    </style:style>
    <style:style style:name="T127" style:family="text">
      <style:text-properties fo:language="ru" fo:country="RU" officeooo:rsid="02110fa2"/>
    </style:style>
    <style:style style:name="T128" style:family="text">
      <style:text-properties fo:language="ru" fo:country="RU" officeooo:rsid="01f4930d"/>
    </style:style>
    <style:style style:name="T129" style:family="text">
      <style:text-properties fo:language="ru" fo:country="RU" officeooo:rsid="020a2d5b"/>
    </style:style>
    <style:style style:name="T130" style:family="text">
      <style:text-properties fo:language="ru" fo:country="RU" officeooo:rsid="020221d2"/>
    </style:style>
    <style:style style:name="T131" style:family="text">
      <style:text-properties officeooo:rsid="021b3513"/>
    </style:style>
    <style:style style:name="T132" style:family="text">
      <style:text-properties fo:language="en" fo:country="US" officeooo:rsid="020cf027"/>
    </style:style>
    <style:style style:name="T133" style:family="text">
      <style:text-properties fo:language="ru" fo:country="RU" officeooo:rsid="020cf027"/>
    </style:style>
    <style:style style:name="T134" style:family="text">
      <style:text-properties officeooo:rsid="021f1ebe"/>
    </style:style>
    <style:style style:name="T135" style:family="text">
      <style:text-properties officeooo:rsid="001fb69e"/>
    </style:style>
    <style:style style:name="T136" style:family="text">
      <style:text-properties officeooo:rsid="00339e80"/>
    </style:style>
    <style:style style:name="T137" style:family="text">
      <style:text-properties officeooo:rsid="001c1d0e"/>
    </style:style>
    <style:style style:name="T138" style:family="text">
      <style:text-properties style:text-position="super 58%"/>
    </style:style>
    <style:style style:name="T139" style:family="text">
      <style:text-properties officeooo:rsid="0023a124"/>
    </style:style>
    <style:style style:name="T140" style:family="text">
      <style:text-properties officeooo:rsid="0037368d"/>
    </style:style>
    <style:style style:name="T141" style:family="text">
      <style:text-properties officeooo:rsid="002b7efc"/>
    </style:style>
    <style:style style:name="T142" style:family="text">
      <style:text-properties officeooo:rsid="001ca832"/>
    </style:style>
    <style:style style:name="T143" style:family="text">
      <style:text-properties officeooo:rsid="0037dee9"/>
    </style:style>
    <style:style style:name="T144" style:family="text">
      <style:text-properties officeooo:rsid="0039c802"/>
    </style:style>
    <style:style style:name="T145" style:family="text">
      <style:text-properties officeooo:rsid="0025e476"/>
    </style:style>
    <style:style style:name="T146" style:family="text">
      <style:text-properties officeooo:rsid="00271bda"/>
    </style:style>
    <style:style style:name="T147" style:family="text">
      <style:text-properties officeooo:rsid="0034b12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Основной_20_текст_20_на_20_титульной">Краснодарского края</text:p>
      <text:p text:style-name="Основной_20_текст_20_на_20_титульной">ГБПОУ КК ЕПК</text:p>
      <text:p text:style-name="Text_20_body"/>
      <text:p text:style-name="Text_20_body"/>
      <text:p text:style-name="Основной_20_текст_20_на_20_титульной">Отделение педагогики</text:p>
      <text:p text:style-name="Основной_20_текст_20_на_20_титульной">Специальность 09.02.07 Информационные системы и программирование</text:p>
      <text:p text:style-name="Text_20_body"/>
      <text:p text:style-name="Text_20_body"/>
      <text:p text:style-name="Text_20_body"/>
      <text:p text:style-name="Основной_20_текст_20_на_20_титульной">Студент И-4<text:span text:style-name="T1">2</text:span> группы</text:p>
      <text:p text:style-name="Основной_20_текст_20_на_20_титульной"><text:tab/><text:span text:style-name="T1">САМСЫКА РОДИОН МИХАЙЛОВИЧ</text:span></text:p>
      <text:p text:style-name="Text_20_body"/>
      <text:p text:style-name="Заголовок_20_на_20_титульной">РАЗРАБОТКА ПРОГРАММЫ ДЛЯ АВТОМАТИЗАЦИИ ОФОРМЛЕНИЯ ЗАКАЗОВ В РЕСТОРАНЕ</text:p>
      <text:p text:style-name="P2">Дипломная работа</text:p>
      <text:p text:style-name="Text_20_body"/>
      <text:p text:style-name="Text_20_body"/>
      <text:p text:style-name="Text_20_body"/>
      <text:p text:style-name="Text_20_body"/>
      <text:p text:style-name="Блок_20_научного_20_руководителя">Научный руководитель:</text:p>
      <text:p text:style-name="Блок_20_научного_20_руководителя">Фомин Андрей Томасович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/>
      <text:p text:style-name="Основной_20_текст_20_на_20_титульной">г. Ейск, 202<text:span text:style-name="T2">6</text:span>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3"><text:a xlink:type="simple" xlink:href="#__RefHeading___Toc8882_1636301399" office:name="ПЕРЕЧЕНЬ СОКРАЩЕНИЙ И ОБОЗНАЧЕНИЙ" text:style-name="Index_20_Link" text:visited-style-name="Index_20_Link">ПЕРЕЧЕНЬ СОКРАЩЕНИЙ И ОБОЗНАЧЕНИЙ<text:tab/>4</text:a></text:p>
          <text:p text:style-name="P3"><text:a xlink:type="simple" xlink:href="#__RefHeading___Toc8884_1636301399" office:name="ВВЕДЕНИЕ" text:style-name="Index_20_Link" text:visited-style-name="Index_20_Link">ВВЕДЕНИЕ<text:tab/>5</text:a></text:p>
          <text:p text:style-name="P3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6</text:a></text:p>
          <text:p text:style-name="P4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6</text:a></text:p>
          <text:p text:style-name="P4"><text:a xlink:type="simple" xlink:href="#__RefHeading___Toc8890_1636301399" office:name="1.2 Предварительное определение требований" text:style-name="Index_20_Link" text:visited-style-name="Index_20_Link">1.2 Предварительное определение требований<text:tab/>10</text:a></text:p>
          <text:p text:style-name="P4"><text:a xlink:type="simple" xlink:href="#__RefHeading___Toc11336_567402320" office:name="1.2.1 Общее описание" text:style-name="Index_20_Link" text:visited-style-name="Index_20_Link">1.2.1 Общее описание<text:tab/>10</text:a></text:p>
          <text:p text:style-name="P5"><text:a xlink:type="simple" xlink:href="#__RefHeading___Toc11338_567402320" office:name="1.2.1.1 Общий взгляд на продукт" text:style-name="Index_20_Link" text:visited-style-name="Index_20_Link">1.2.1.1 Общий взгляд на продукт<text:tab/>10</text:a></text:p>
          <text:p text:style-name="P5"><text:a xlink:type="simple" xlink:href="#__RefHeading___Toc11340_567402320" office:name="1.2.1.2 Классы и характеристики пользователей" text:style-name="Index_20_Link" text:visited-style-name="Index_20_Link">1.2.1.2 Классы и характеристики пользователей<text:tab/>10</text:a></text:p>
          <text:p text:style-name="P5"><text:a xlink:type="simple" xlink:href="#__RefHeading___Toc11342_567402320" office:name="1.2.1.3 Ограничение дизайна и реализации" text:style-name="Index_20_Link" text:visited-style-name="Index_20_Link">1.2.1.3 Ограничение дизайна и реализации<text:tab/>10</text:a></text:p>
          <text:p text:style-name="P5"><text:a xlink:type="simple" xlink:href="#__RefHeading___Toc2473_2593696514" office:name="1.2.1.4 Предположения и зависимости" text:style-name="Index_20_Link" text:visited-style-name="Index_20_Link">1.2.1.4 Предположения и зависимости<text:tab/>11</text:a></text:p>
          <text:p text:style-name="P4"><text:a xlink:type="simple" xlink:href="#__RefHeading___Toc11346_567402320" office:name="1.2.2 Функциональные требования" text:style-name="Index_20_Link" text:visited-style-name="Index_20_Link">1.2.2 Функциональные требования<text:tab/>11</text:a></text:p>
          <text:p text:style-name="P4"><text:a xlink:type="simple" xlink:href="#__RefHeading___Toc11348_567402320" office:name="1.2.3 Требования к данным" text:style-name="Index_20_Link" text:visited-style-name="Index_20_Link">1.2.3 Требования к данным<text:tab/>12</text:a></text:p>
          <text:p text:style-name="P5"><text:a xlink:type="simple" xlink:href="#__RefHeading___Toc11350_567402320" office:name="1.2.3.1 Логическая модель данных" text:style-name="Index_20_Link" text:visited-style-name="Index_20_Link">1.2.3.1 Логическая модель данных<text:tab/>12</text:a></text:p>
          <text:p text:style-name="P5"><text:a xlink:type="simple" xlink:href="#__RefHeading___Toc11352_567402320" office:name="1.2.3.2 Отчёты" text:style-name="Index_20_Link" text:visited-style-name="Index_20_Link">1.2.3.2 Отчёты<text:tab/>13</text:a></text:p>
          <text:p text:style-name="P5"><text:a xlink:type="simple" xlink:href="#__RefHeading___Toc11354_567402320" office:name="1.2.3.3 Получение, целостность, хранение и утилизация данных" text:style-name="Index_20_Link" text:visited-style-name="Index_20_Link">1.2.3.3 Получение, целостность, хранение и утилизация данных<text:tab/>14</text:a></text:p>
          <text:p text:style-name="P4"><text:a xlink:type="simple" xlink:href="#__RefHeading___Toc11356_567402320" office:name="1.2.4 Требования к внешним интерфейсам" text:style-name="Index_20_Link" text:visited-style-name="Index_20_Link">1.2.4 Требования к внешним интерфейсам<text:tab/>14</text:a></text:p>
          <text:p text:style-name="P5"><text:a xlink:type="simple" xlink:href="#__RefHeading___Toc11358_567402320" office:name="1.2.4.1 Пользовательские интерфейсы" text:style-name="Index_20_Link" text:visited-style-name="Index_20_Link">1.2.4.1 Пользовательские интерфейсы<text:tab/>14</text:a></text:p>
          <text:p text:style-name="P5"><text:a xlink:type="simple" xlink:href="#__RefHeading___Toc11360_567402320" office:name="1.2.4.2 Интерфейсы ПО" text:style-name="Index_20_Link" text:visited-style-name="Index_20_Link">1.2.4.2 Интерфейсы ПО<text:tab/>14</text:a></text:p>
          <text:p text:style-name="P5"><text:a xlink:type="simple" xlink:href="#__RefHeading___Toc11362_567402320" office:name="1.2.4.3 Интерфейсы оборудования" text:style-name="Index_20_Link" text:visited-style-name="Index_20_Link">1.2.4.3 Интерфейсы оборудования<text:tab/>14</text:a></text:p>
          <text:p text:style-name="P4"><text:a xlink:type="simple" xlink:href="#__RefHeading___Toc11364_567402320" office:name="1.2.5 Атрибуты качества" text:style-name="Index_20_Link" text:visited-style-name="Index_20_Link">1.2.5 Атрибуты качества<text:tab/>15</text:a></text:p>
          <text:p text:style-name="P5"><text:a xlink:type="simple" xlink:href="#__RefHeading___Toc11366_567402320" office:name="1.2.5.1 Удобство использования" text:style-name="Index_20_Link" text:visited-style-name="Index_20_Link">1.2.5.1 Удобство использования<text:tab/>15</text:a></text:p>
          <text:p text:style-name="P5"><text:a xlink:type="simple" xlink:href="#__RefHeading___Toc11368_567402320" office:name="1.2.5.2 Производительность" text:style-name="Index_20_Link" text:visited-style-name="Index_20_Link">1.2.5.2 Производительность<text:tab/>15</text:a></text:p>
          <text:p text:style-name="P5"><text:a xlink:type="simple" xlink:href="#__RefHeading___Toc11370_567402320" office:name="1.2.5.3 Безопасность" text:style-name="Index_20_Link" text:visited-style-name="Index_20_Link">1.2.5.3 Безопасность<text:tab/>15</text:a></text:p>
          <text:p text:style-name="P5"><text:a xlink:type="simple" xlink:href="#__RefHeading___Toc11372_567402320" office:name="1.2.5.4 Техника безопасности" text:style-name="Index_20_Link" text:visited-style-name="Index_20_Link">1.2.5.4 Техника безопасности<text:tab/>15</text:a></text:p>
          <text:p text:style-name="P4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15</text:a></text:p>
          <text:p text:style-name="P5"><text:a xlink:type="simple" xlink:href="#__RefHeading___Toc2024_2593696514" office:name="1.3.1 Расчет себестоимости программного продукта" text:style-name="Index_20_Link" text:visited-style-name="Index_20_Link">1.3.1 Расчет себестоимости программного продукта<text:tab/>15</text:a></text:p>
          <text:p text:style-name="P5"><text:a xlink:type="simple" xlink:href="#__RefHeading___Toc2026_2593696514" office:name="1.3.2 Расчет экономического эффекта программного продукта" text:style-name="Index_20_Link" text:visited-style-name="Index_20_Link">1.3.2 Расчет экономического эффекта программного продукта<text:tab/>17</text:a></text:p>
          <text:p text:style-name="P3"><text:a xlink:type="simple" xlink:href="#__RefHeading___Toc8894_1636301399" office:name="ГЛАВА 2 РЕАЛИЗАЦИЯ ПРОГРАММНЫХ МОДУЛЕЙ" text:style-name="Index_20_Link" text:visited-style-name="Index_20_Link"><text:soft-page-break/>ГЛАВА 2 РЕАЛИЗАЦИЯ ПРОГРАММНЫХ МОДУЛЕЙ<text:tab/>19</text:a></text:p>
          <text:p text:style-name="P4"><text:a xlink:type="simple" xlink:href="#__RefHeading___Toc19695_1636301399" office:name="2.1 Технологии программирования" text:style-name="Index_20_Link" text:visited-style-name="Index_20_Link">2.1 Технологии программирования<text:tab/>19</text:a></text:p>
          <text:p text:style-name="P5"><text:a xlink:type="simple" xlink:href="#__RefHeading___Toc6583_2272482351" office:name="Методы разработки" text:style-name="Index_20_Link" text:visited-style-name="Index_20_Link">Методы разработки<text:tab/>19</text:a></text:p>
          <text:p text:style-name="P5"><text:a xlink:type="simple" xlink:href="#__RefHeading___Toc6585_2272482351" office:name="Язык программирования" text:style-name="Index_20_Link" text:visited-style-name="Index_20_Link">Язык программирования<text:tab/>19</text:a></text:p>
          <text:p text:style-name="P5"><text:a xlink:type="simple" xlink:href="#__RefHeading___Toc6587_2272482351" office:name="Инструменты и среды разработки" text:style-name="Index_20_Link" text:visited-style-name="Index_20_Link">Инструменты и среды разработки<text:tab/>20</text:a></text:p>
          <text:p text:style-name="P4"><text:a xlink:type="simple" xlink:href="#__RefHeading___Toc8896_1636301399" office:name="2.2 Описание программных модулей" text:style-name="Index_20_Link" text:visited-style-name="Index_20_Link">2.2 Описание программных модулей<text:tab/>20</text:a></text:p>
          <text:p text:style-name="P4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20</text:a></text:p>
          <text:p text:style-name="P4"><text:a xlink:type="simple" xlink:href="#__RefHeading___Toc8900_1636301399" office:name="2.4 Описание программного интерфейса" text:style-name="Index_20_Link" text:visited-style-name="Index_20_Link">2.4 Описание программного интерфейса<text:tab/>21</text:a></text:p>
          <text:p text:style-name="P5"><text:a xlink:type="simple" xlink:href="#__RefHeading___Toc11261_1636301399" office:name="2.4.1 Первый пункт" text:style-name="Index_20_Link" text:visited-style-name="Index_20_Link">2.4.1 Первый пункт<text:tab/>21</text:a></text:p>
          <text:p text:style-name="P5"><text:a xlink:type="simple" xlink:href="#__RefHeading___Toc11263_1636301399" office:name="2.4.2 Это второй пункт" text:style-name="Index_20_Link" text:visited-style-name="Index_20_Link">2.4.2 Это второй пункт<text:tab/>21</text:a></text:p>
          <text:p text:style-name="P3"><text:a xlink:type="simple" xlink:href="#__RefHeading___Toc8902_1636301399" office:name="ЗАКЛЮЧЕНИЕ" text:style-name="Index_20_Link" text:visited-style-name="Index_20_Link">ЗАКЛЮЧЕНИЕ<text:tab/>23</text:a></text:p>
          <text:p text:style-name="P3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24</text:a></text:p>
          <text:p text:style-name="P3"><text:a xlink:type="simple" xlink:href="#__RefHeading___Toc8906_1636301399" office:name="ПРИЛОЖЕНИЕ А" text:style-name="Index_20_Link" text:visited-style-name="Index_20_Link">ПРИЛОЖЕНИЕ А<text:tab/>25</text:a></text:p>
          <text:p text:style-name="P3"><text:a xlink:type="simple" xlink:href="#__RefHeading___Toc1720_2115060514" office:name="Листинги программного кода" text:style-name="Index_20_Link" text:visited-style-name="Index_20_Link">Листинги программного кода<text:tab/>25</text:a></text:p>
          <text:p text:style-name="P3"><text:a xlink:type="simple" xlink:href="#__RefHeading___Toc8908_1636301399%20%D0%9A%D0%BE%D0%BF%D0%B8%D1%8F%201" office:name="ПРИЛОЖЕНИЕ Б" text:style-name="Index_20_Link" text:visited-style-name="Index_20_Link">ПРИЛОЖЕНИЕ Б<text:tab/>27</text:a></text:p>
          <text:p text:style-name="P3"><text:a xlink:type="simple" xlink:href="#__RefHeading___Toc1722_2115060514" office:name="Тест-кейсы и тест-сьюты" text:style-name="Index_20_Link" text:visited-style-name="Index_20_Link">Тест-кейсы и тест-сьюты<text:tab/>27</text:a></text:p>
          <text:p text:style-name="P3"><text:a xlink:type="simple" xlink:href="#__RefHeading___Toc8908_1636301399" office:name="ПРИЛОЖЕНИЕ В" text:style-name="Index_20_Link" text:visited-style-name="Index_20_Link">ПРИЛОЖЕНИЕ В<text:tab/>28</text:a></text:p>
          <text:p text:style-name="P3"><text:a xlink:type="simple" xlink:href="#__RefHeading___Toc1724_2115060514" office:name="Документирование программного кода" text:style-name="Index_20_Link" text:visited-style-name="Index_20_Link">Документирование программного кода<text:tab/>28</text:a></text:p>
        </text:index-body>
      </text:table-of-content>
      <text:p text:style-name="P6"/>
      <text:h text:style-name="P7" text:outline-level="1"><text:bookmark-start text:name="__RefHeading___Toc8882_1636301399"/>ПЕРЕЧЕНЬ СОКРАЩЕНИЙ И ОБОЗНАЧЕНИЙ<text:bookmark-end text:name="__RefHeading___Toc8882_1636301399"/></text:h>
      <text:p text:style-name="Text_20_body"/>
      <text:p text:style-name="Text_20_body">В настоящем курсовом проекте применяются следующие сокращения и обозначения.</text:p>
      <text:p text:style-name="P8">АРМ — автоматизированное рабочее место</text:p>
      <text:p text:style-name="P9">БД — база данных</text:p>
      <text:p text:style-name="P9">ИИ — искусственный интеллект</text:p>
      <text:p text:style-name="P9">ИТ — информационные технологии</text:p>
      <text:p text:style-name="P9">ОС (OS) — операционная система</text:p>
      <text:p text:style-name="P9">ПК (PC) — персональный компьютер</text:p>
      <text:p text:style-name="P9">ПО — программное обеспечение</text:p>
      <text:p text:style-name="P9">СУБД (DBMS) — система управления базой данных</text:p>
      <text:p text:style-name="Text_20_body"><text:s/>&lt;Здесь пишем только те, которые используются в работе. Если условных обозначений в отчете приведено менее трех, отдельный перечень не составляют, а необходимые сведения указывают в тексте отчета или в подстрочном примечании при первом упоминании.&gt;</text:p>
      <text:p text:style-name="P10">&lt;Список оформляется без абзацного отступа, в алфавитном порядке, без знаков препинания в конце.&gt;</text:p>
      <text:p text:style-name="Text_20_body"/>
      <text:h text:style-name="P7" text:outline-level="1"><text:bookmark-start text:name="__RefHeading___Toc8884_1636301399"/>ВВЕДЕНИЕ<text:bookmark-end text:name="__RefHeading___Toc8884_1636301399"/></text:h>
      <text:p text:style-name="Text_20_body"/>
      <text:p text:style-name="Text_20_body">Тема моего проекта «Разработка программы для автоматизации оформления заказов в ресторане».</text:p>
      <text:p text:style-name="Text_20_body">Предмет – автоматизация информационных процессов предметной области «<text:span text:style-name="T3">Ресторан</text:span>».</text:p>
      <text:p text:style-name="Text_20_body"><text:tab/>Цель работы – разработка автоматизированной системы для оформления заказов в предметной области «Ресторан».</text:p>
      <text:p text:style-name="P11"><text:tab/>Объект – предметная область «<text:span text:style-name="T3">Ресторан</text:span>».</text:p>
      <text:p text:style-name="Text_20_body">Для достижения поставленной цели курсового проекта необходимо решить следующие задачи:</text:p>
      <text:list text:style-name="L1">
        <text:list-item>
          <text:p text:style-name="P12">проанализировать предметную область и обосновать актуальность проекта. </text:p>
        </text:list-item>
        <text:list-item>
          <text:p text:style-name="P12">выбрать язык программирования и среду разработки;</text:p>
        </text:list-item>
        <text:list-item>
          <text:p text:style-name="P12">спроектировать структуру и модули программного обеспечения;</text:p>
        </text:list-item>
        <text:list-item>
          <text:p text:style-name="P12">разработать программное обеспечение.</text:p>
        </text:list-item>
      </text:list>
      <text:p text:style-name="Text_20_body">Структура работы: курсовой проект состоит из введения, двух глав, заключения, списка литературы. Во введении обоснована актуальность темы исследования. В первой главе описано проектирование системы. Вторая глава посвящена описанию процесса разработки программных модулей.</text:p>
      <text:p text:style-name="Text_20_body"/>
      <text:h text:style-name="P7" text:outline-level="1"><text:bookmark-start text:name="__RefHeading___Toc8886_1636301399"/>ГЛАВА 1 ПРОЕКТИРОВАНИЕ ПРИЛОЖЕНИЯ<text:bookmark-end text:name="__RefHeading___Toc8886_1636301399"/></text:h>
      <text:p text:style-name="Text_20_body"/>
      <text:h text:style-name="Heading_20_2" text:outline-level="2"><text:bookmark-start text:name="__RefHeading___Toc8888_1636301399"/>1.1 Модель предметной области<text:bookmark-end text:name="__RefHeading___Toc8888_1636301399"/></text:h>
      <text:p text:style-name="Text_20_body"/>
      <text:p text:style-name="Text_20_body">Ресторан — это предприятие общественного питания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включая сложные, фирменные блюда и напитки. Основным способом организации потребления является подача блюд в зале ресторана. </text:p>
      <text:p text:style-name="Text_20_body"><text:tab/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Text_20_body"><text:tab/>Предварительное моделирование предметной области позволяет выявить основные бизнес-процессы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Иногда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контроля за их наличием на складе, проведения инвентаризации и своевременного формирования заявок для поставщиков. Отсутствие единой автоматизированной системы для управления этими процессами приводит к <text:soft-page-break/>риску человеческих ошибок, замедлению обслуживания и сложностям в оперативном управлении ресурсами.</text:p>
      <text:p text:style-name="Text_20_body"><text:tab/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на бумажный бланк заказа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На рисунк<text:span text:style-name="T4">ах</text:span> 1 <text:span text:style-name="T4">и 2</text:span> изображен<text:span text:style-name="T5">ы</text:span> схем<text:span text:style-name="T5">ы</text:span> процесса приёма заказа.</text:p>
      <text:p text:style-name="Text_20_body"><text:tab/>Процесс управления складом в ресторане представляет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<text:soft-page-break/>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накладной, а также контроль соблюдения температурных режимов и сроков 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 </text:p>
      <text:p text:style-name="Text_20_body"><draw:frame draw:style-name="fr1" draw:name="Врезка1" text:anchor-type="paragraph" svg:width="17cm" style:rel-width="100%" svg:height="13.557cm" style:rel-height="scale-min" draw:z-index="2"><draw:text-box><text:p text:style-name="Drawing"><draw:frame draw:style-name="fr2" draw:name="Image1" text:anchor-type="paragraph" svg:width="17cm" style:rel-width="100%" svg:height="12.989cm" style:rel-height="scale" draw:z-index="3"><draw:image xlink:href="Pictures/1000000000000500000003D2BC888963.jpg" xlink:type="simple" xlink:show="embed" xlink:actuate="onLoad" draw:mime-type="image/jpeg"/></draw:frame>Рисунок <text:sequence text:ref-name="refDrawing0" text:name="Drawing" text:formula="ooow:Drawing+1" style:num-format="1">1</text:sequence><text:s/>— Схема процесса оформления заказа</text:p></draw:text-box></draw:frame></text:p>
      <text:p text:style-name="Text_20_body"/>
      <text:p text:style-name="P13"><draw:frame draw:style-name="fr3" draw:name="Врезка2" text:anchor-type="char" svg:width="25.7cm" draw:z-index="5"><draw:text-box fo:min-height="16.438cm"><text:p text:style-name="Drawing"><draw:frame draw:style-name="fr2" draw:name="Изображение3" text:anchor-type="paragraph" svg:width="25.7cm" style:rel-width="100%" svg:height="16.438cm" style:rel-height="scale" draw:z-index="8"><draw:image xlink:href="Pictures/10000001000004C50000030D30DFCC14.png" xlink:type="simple" xlink:show="embed" xlink:actuate="onLoad" draw:mime-type="image/png"/></draw:frame>Рисунок <text:sequence text:ref-name="refDrawing1" text:name="Drawing" text:formula="ooow:Drawing+1" style:num-format="1">2</text:sequence><text:s/>— Схема работы с заказом</text:p></draw:text-box></draw:frame></text:p>
      <text:h text:style-name="P14" text:outline-level="2"><text:bookmark-start text:name="__RefHeading___Toc8890_1636301399"/>1.2 Предварительное определение требований<text:bookmark-end text:name="__RefHeading___Toc8890_1636301399"/></text:h>
      <text:p text:style-name="Text_20_body"/>
      <text:h text:style-name="Heading_20_2" text:outline-level="2"><text:bookmark-start text:name="__RefHeading___Toc11336_567402320"/><text:span text:style-name="T6">1</text:span>.<text:span text:style-name="T6">2.1</text:span> Общее описание <text:bookmark-end text:name="__RefHeading___Toc11336_567402320"/></text:h>
      <text:p text:style-name="P15"/>
      <text:p text:style-name="P15"><text:tab/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, формирование финансовых отчётов и автоматизированное генерирование чеков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h text:style-name="P16" text:outline-level="3"><text:bookmark-start text:name="__RefHeading___Toc11338_567402320"/><text:span text:style-name="T6">1</text:span><text:span text:style-name="T7">.</text:span><text:span text:style-name="T6">2.1.</text:span><text:span text:style-name="T7">1 </text:span>Общий взгляд на продукт<text:bookmark-end text:name="__RefHeading___Toc11338_567402320"/></text:h>
      <text:p text:style-name="P15"><text:tab/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</text:p>
      <text:h text:style-name="P16" text:outline-level="3"><text:bookmark-start text:name="__RefHeading___Toc11340_567402320"/><text:span text:style-name="T6">1</text:span><text:span text:style-name="T7">.</text:span><text:span text:style-name="T6">2.1.</text:span><text:span text:style-name="T8">2</text:span><text:span text:style-name="T7"> Классы и характеристики пользователей</text:span><text:bookmark-end text:name="__RefHeading___Toc11340_567402320"/></text:h>
      <text:p text:style-name="P17"><text:span text:style-name="T9"><text:tab/></text:span>Приложением пользуются официанты, администрация, аналитики, кладовщики. Официанты оформляют заказы; кладовщики обновляют информацию о продукте на складе; аналитики анализируют продажи; администрация проверяет приложение на соответствие данных, работоспособность.</text:p>
      <text:h text:style-name="Heading_20_3" text:outline-level="3"><text:bookmark-start text:name="__RefHeading___Toc11342_567402320"/><text:span text:style-name="T6">1</text:span><text:span text:style-name="T7">.</text:span><text:span text:style-name="T6">2.1.</text:span><text:span text:style-name="T8">3</text:span><text:span text:style-name="T7"> Ограничение дизайна и реализации</text:span><text:bookmark-end text:name="__RefHeading___Toc11342_567402320"/></text:h>
      <text:p text:style-name="P18"><text:tab/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h text:style-name="Heading_20_3" text:outline-level="3"><text:bookmark-start text:name="__RefHeading___Toc2473_2593696514"/><text:soft-page-break/><text:span text:style-name="T6">1</text:span><text:span text:style-name="T7">.</text:span><text:span text:style-name="T6">2.1.</text:span><text:span text:style-name="T10">4</text:span><text:span text:style-name="T7"> Предположения и зависимости</text:span><text:bookmark-end text:name="__RefHeading___Toc2473_2593696514"/></text:h>
      <text:p text:style-name="P19"><text:tab/>Для функционирования системы требуется корректно работающая локальная сеть. Установка дополнительных программ или приложений не требуется. </text:p>
      <text:p text:style-name="P19"/>
      <text:h text:style-name="P20" text:outline-level="2"><text:bookmark-start text:name="__RefHeading___Toc11346_567402320"/><text:span text:style-name="T11">1</text:span><text:span text:style-name="T12">.2.</text:span><text:span text:style-name="T11">2</text:span><text:span text:style-name="T12"> </text:span>Функциональные требования<text:bookmark-end text:name="__RefHeading___Toc11346_567402320"/></text:h>
      <text:p text:style-name="Text_20_body"/>
      <text:p text:style-name="Text_20_body"><text:span text:style-name="Strong_20_Emphasis"><text:span text:style-name="T13">Хранение актуального меню: Приложение должно обеспечивать централизованное хранение и управление меню. Данные включают наименования блюд, категории, цены, состав ингредиентов. Все изменения должны мгновенно синхронизироваться между устройствами. Для управления должна быть предусмотрена административная панель.</text:span></text:span></text:p>
      <text:p text:style-name="Text_20_body"><text:span text:style-name="Strong_20_Emphasis"><text:span text:style-name="T13">Подключение к общему складу</text:span></text:span><text:span text:style-name="T13">: Система обязана иметь модуль складского учёта, который автоматически отслеживает остатки ингредиентов в реальном времени. Это включает автоматическое списание продуктов при оформлении заказа, контроль минимальных остатков с генерацией уведомлений о необходимости пополнения запасов.</text:span></text:p>
      <text:p text:style-name="Text_20_body"><text:span text:style-name="Strong_20_Emphasis"><text:span text:style-name="T13">Оформление заказов</text:span></text:span><text:span text:style-name="T13">: Функционал должен позволять создавать новые заказы, привязывая их к конкретному столику и официанту. Должна быть возможность добавлять в заказ блюда из актуального меню.</text:span></text:p>
      <text:p text:style-name="Text_20_body"><text:span text:style-name="Strong_20_Emphasis"><text:span text:style-name="T13">Сохранение чеков</text:span></text:span><text:span text:style-name="T13">: Приложение должно сохранять электронные копии фискальных чеков по каждому закрытому заказу. Данные чеков должны содержать все обязательные реквизиты в соответствии с законодательством и быть доступными для последующего поиска, просмотра и формирования отчётов.</text:span></text:p>
      <text:p text:style-name="Text_20_body"><text:span text:style-name="Strong_20_Emphasis"><text:span text:style-name="T13">Формирование списка продуктов на складе, которых осталось немного</text:span></text:span><text:span text:style-name="T13">: На основе данных складского учёта приложение должно автоматически генерировать отчёт или список товаров, остаток которых достиг установленного </text:span><text:soft-page-break/><text:span text:style-name="T13">минимального порога. Это позволяет своевременно инициировать процедуру закупки и предотвращать ситуации отсутствия необходимых ингредиентов.</text:span></text:p>
      <text:p text:style-name="Text_20_body"/>
      <text:h text:style-name="P21" text:outline-level="2"><text:bookmark-start text:name="__RefHeading___Toc11348_567402320"/><text:span text:style-name="T14">1.2</text:span><text:span text:style-name="T12">.</text:span><text:span text:style-name="T15">3</text:span><text:span text:style-name="T12"> Требования к данным</text:span><text:bookmark-end text:name="__RefHeading___Toc11348_567402320"/></text:h>
      <text:p text:style-name="P22"/>
      <text:h text:style-name="P23" text:outline-level="3"><text:bookmark-start text:name="__RefHeading___Toc11350_567402320"/><text:span text:style-name="T16">1.2</text:span>.3.1 Логическая модель данных<text:bookmark-end text:name="__RefHeading___Toc11350_567402320"/></text:h>
      <text:p text:style-name="P24">Основные сущности которые отразятся в базе данных:</text:p>
      <text:list text:style-name="L2">
        <text:list-item>
          <text:p text:style-name="P25">Официант — тот, кто составляет заказ;</text:p>
        </text:list-item>
        <text:list-item>
          <text:p text:style-name="P25">Заказ — то, что записывается в базу данных. Хранит информацию о заказанных блюдах;</text:p>
        </text:list-item>
        <text:list-item>
          <text:p text:style-name="P25">Заказанное блюдо — блюдо которое запишется в заказ, его количество и просьба от клиента;</text:p>
        </text:list-item>
        <text:list-item>
          <text:p text:style-name="P26">Блюдо — экземпляр блюда который указан в меню, ссылается на состав<text:span text:style-name="T17">;</text:span></text:p>
        </text:list-item>
        <text:list-item>
          <text:p text:style-name="P26">Состав <text:span text:style-name="T18">— список продуктов для приготовления блюда;</text:span></text:p>
        </text:list-item>
        <text:list-item>
          <text:p text:style-name="P27">Продукт в составе — <text:span text:style-name="T19">продукт который входит в состав блюда;</text:span></text:p>
        </text:list-item>
        <text:list-item>
          <text:p text:style-name="P28">Продукт <text:span text:style-name="T20"><text:s/>— </text:span>продукт для приготовления блюда.</text:p>
        </text:list-item>
      </text:list>
      <text:p text:style-name="P29">На рисунке <text:span text:style-name="T21">3</text:span> представлена логическая модель данных, описывающая основные сущности в выбранном бизнес процессе. </text:p>
      <text:p text:style-name="Text_20_body"><draw:frame draw:style-name="fr1" draw:name="Врезка3" text:anchor-type="paragraph" svg:width="17cm" style:rel-width="100%" svg:height="11.363cm" style:rel-height="scale-min" draw:z-index="0"><draw:text-box><text:p text:style-name="Drawing"><draw:frame draw:style-name="fr2" draw:name="Изображение2" text:anchor-type="paragraph" svg:width="17cm" style:rel-width="100%" svg:height="10.795cm" style:rel-height="scale" draw:z-index="1"><draw:image xlink:href="Pictures/100000000000025800000187062973CC.png" xlink:type="simple" xlink:show="embed" xlink:actuate="onLoad" draw:mime-type="image/png"/></draw:frame>Рисунок <text:sequence text:ref-name="refDrawing2" text:name="Drawing" text:formula="ooow:Drawing+1" style:num-format="1">3</text:sequence><text:s/>— Модель данных</text:p></draw:text-box></draw:frame><text:soft-page-break/></text:p>
      <text:h text:style-name="P30" text:outline-level="3"><text:bookmark-start text:name="__RefHeading___Toc11352_567402320"/><text:span text:style-name="T22">1.2.3.2</text:span><text:span text:style-name="T23"> Отчёты</text:span><text:bookmark-end text:name="__RefHeading___Toc11352_567402320"/></text:h>
      <text:p text:style-name="P31">Система должна формировать комплекс отчётных документов, обеспечивающих оперативный контроль и стратегическое управление рестораном. Формирование фискальных чеков является базовой функцией. Все чеки должны содержать все обязательные реквизиты в соответствии с законодательством.</text:p>
      <text:p text:style-name="P31">Для анализа эффективности работы система должна предоставлять отчёт о выручке за период с детализацией по продукту, столику, официанту и временным промежуткам, позволяя отслеживать такие ключевые показатели, как общая выручка, количество гостей и динамика среднего чека.</text:p>
      <text:p text:style-name="P31">На основе данных складского учёта должен автоматически формироваться отчёт о продуктах с низкими остатками, в котором отображаются продукты, количество которых достигло установленного минимального порога, для своевременного пополнения запасов.</text:p>
      <text:p text:style-name="P32"><text:soft-page-break/></text:p>
      <text:h text:style-name="P30" text:outline-level="3"><text:bookmark-start text:name="__RefHeading___Toc11354_567402320"/><text:span text:style-name="T24">1.2.3.3</text:span><text:span text:style-name="T23"> Получение, целостность, хранение и утилизация данных</text:span><text:bookmark-end text:name="__RefHeading___Toc11354_567402320"/></text:h>
      <text:p text:style-name="P31">Данные поступают из следующих источников:</text:p>
      <text:list text:style-name="L3">
        <text:list-item>
          <text:p text:style-name="P33">Административная панель: внесение и корректировка данных о меню.</text:p>
        </text:list-item>
        <text:list-item>
          <text:p text:style-name="P33">Планшеты официантов: данные о заказах в реальном времени.</text:p>
        </text:list-item>
        <text:list-item>
          <text:p text:style-name="P33">Планшеты <text:span text:style-name="T25">кладовщиков</text:span>: данные об остатках и операциях с ингредиентами.</text:p>
        </text:list-item>
      </text:list>
      <text:p text:style-name="P31">Все данные хранятся централизованно, обеспечивая мгновенную синхронизацию между устройствами в локальной сети. Срок хранения фискальных чеков составляет не менее 3 лет, по истечении которого данные подлежат утилизации.</text:p>
      <text:p text:style-name="Text_20_body"/>
      <text:h text:style-name="P34" text:outline-level="2"><text:bookmark-start text:name="__RefHeading___Toc11356_567402320"/><text:span text:style-name="T26">1.2.</text:span><text:span text:style-name="T27">4</text:span><text:span text:style-name="T28"> </text:span>Требования к внешним интерфейсам<text:bookmark-end text:name="__RefHeading___Toc11356_567402320"/></text:h>
      <text:p text:style-name="P31"/>
      <text:h text:style-name="P30" text:outline-level="3"><text:bookmark-start text:name="__RefHeading___Toc11358_567402320"/><text:span text:style-name="T29">1.2.4</text:span><text:span text:style-name="T30">.1</text:span> Пользовательские интерфе<text:span text:style-name="T31">й</text:span>сы<text:bookmark-end text:name="__RefHeading___Toc11358_567402320"/></text:h>
      <text:p text:style-name="P35">Интерфейс системы должен быть интуитивно понятным и удобным для пользователей. Основные требования:</text:p>
      <text:list text:style-name="L4">
        <text:list-item>
          <text:p text:style-name="P36">Отсутствие отвлекающих элементов.</text:p>
        </text:list-item>
        <text:list-item>
          <text:p text:style-name="P36">Использование крупного шрифта и четкой цветовой гаммы.</text:p>
        </text:list-item>
        <text:list-item>
          <text:p text:style-name="P36">Минимизация текста для быстрого восприятия информации.</text:p>
        </text:list-item>
      </text:list>
      <text:h text:style-name="P37" text:outline-level="3"><text:bookmark-start text:name="__RefHeading___Toc11360_567402320"/><text:span text:style-name="T29">1.2.4</text:span><text:span text:style-name="T30">.2</text:span> Интерфейсы ПО<text:bookmark-end text:name="__RefHeading___Toc11360_567402320"/></text:h>
      <text:p text:style-name="P31">Система работает на базе операционной системы Android версии не ниже 9. Для взаимодействия с базой данных используется SQLite с использованием языка SQL. </text:p>
      <text:h text:style-name="P38" text:outline-level="3"><text:bookmark-start text:name="__RefHeading___Toc11362_567402320"/><text:span text:style-name="T29">1.2.4</text:span><text:span text:style-name="T30">.3</text:span> Интерфейсы оборудования<text:bookmark-end text:name="__RefHeading___Toc11362_567402320"/></text:h>
      <text:p text:style-name="P31">Планшеты связываются между собой по беспроводной сети интернет, обеспечивая обмен данными в реальном времени. </text:p>
      <text:h text:style-name="P34" text:outline-level="2"><text:bookmark-start text:name="__RefHeading___Toc11364_567402320"/><text:soft-page-break/><text:span text:style-name="T32">1.2.5</text:span><text:span text:style-name="T33"> </text:span>Атрибуты качества<text:bookmark-end text:name="__RefHeading___Toc11364_567402320"/></text:h>
      <text:h text:style-name="P30" text:outline-level="3"><text:bookmark-start text:name="__RefHeading___Toc11366_567402320"/><text:span text:style-name="T34">1.2.5</text:span><text:span text:style-name="T30">.1</text:span> Удобство использования<text:bookmark-end text:name="__RefHeading___Toc11366_567402320"/></text:h>
      <text:p text:style-name="P31"><text:tab/>Самое главное, чтобы было удобно использовать приложение. Обучение использованию должно быть простым, чтобы изучить работу можно было в одиночку не более 15 минут. </text:p>
      <text:h text:style-name="P39" text:outline-level="3"><text:bookmark-start text:name="__RefHeading___Toc11368_567402320"/><text:span text:style-name="T34">1.2.5</text:span><text:span text:style-name="T30">.2</text:span> Производительность<text:bookmark-end text:name="__RefHeading___Toc11368_567402320"/></text:h>
      <text:p text:style-name="P31"><text:tab/>Производительность системы должна обеспечивать стабильную работу при высокой нагрузке. Время обновления данных должно быть минимальным. </text:p>
      <text:h text:style-name="P39" text:outline-level="3"><text:bookmark-start text:name="__RefHeading___Toc11370_567402320"/><text:span text:style-name="T34">1.2.5</text:span><text:span text:style-name="T30">.3</text:span> Безопасность<text:bookmark-end text:name="__RefHeading___Toc11370_567402320"/></text:h>
      <text:p text:style-name="P31"><text:tab/><text:span text:style-name="T35">Приложение не требует персональных данных кроме фамилии и имени. Поэтому защита конфиденциальности гарантируется. Физическая безопасность зависит только от используемого устройства.</text:span></text:p>
      <text:h text:style-name="P40" text:outline-level="3"><text:bookmark-start text:name="__RefHeading___Toc11372_567402320"/><text:span text:style-name="T34">1.2.5</text:span><text:span text:style-name="T30">.4</text:span> Техника безопасности<text:bookmark-end text:name="__RefHeading___Toc11372_567402320"/></text:h>
      <text:p text:style-name="P31"><text:tab/>Для предотвращения потери данных рекомендуется периодическое резервное копирование информации на внешние устройства. </text:p>
      <text:p text:style-name="Text_20_body"/>
      <text:h text:style-name="Heading_20_2" text:outline-level="2"><text:bookmark-start text:name="__RefHeading___Toc8892_1636301399"/>1.3 <text:span text:style-name="T36">Показатели экономической эффективности</text:span><text:bookmark-end text:name="__RefHeading___Toc8892_1636301399"/></text:h>
      <text:p text:style-name="Text_20_body"/>
      <text:h text:style-name="P41" text:outline-level="3"><text:bookmark-start text:name="__RefHeading___Toc2024_2593696514"/>1.<text:span text:style-name="T37">3.</text:span>1 Расчет себестоимости программного продукта<text:bookmark-end text:name="__RefHeading___Toc2024_2593696514"/></text:h>
      <text:p text:style-name="P42"><text:span text:style-name="T38">О</text:span>сновной задачей технико-экономического обоснования является определение технического и экономического эффекта от его <text:span text:style-name="T39">использования.</text:span></text:p>
      <text:p text:style-name="P43">Выполним расчет себестоимости программного продукта по формуле <text:span text:style-name="T40">1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4"><draw:frame draw:style-name="fr4" draw:name="Объект1" text:anchor-type="as-char" svg:y="-0.439cm" svg:width="4.958cm" svg:height="0.594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4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6"/>
      <text:p text:style-name="P47"><text:span text:style-name="T41">где Мвс — затраты на вспомогательные материалы, </text:span><text:span text:style-name="Strong_20_Emphasis"><text:span text:style-name="T42">₽</text:span></text:span><text:span text:style-name="T41">.</text:span></text:p>
      <text:p text:style-name="P48">Э — затраты на электроэнергию и технологические цели, <text:span text:style-name="Strong_20_Emphasis"><text:span text:style-name="T42">₽</text:span></text:span></text:p>
      <text:p text:style-name="P48"><text:span text:style-name="Strong_20_Emphasis"><text:span text:style-name="T43">З</text:span></text:span><text:span text:style-name="Strong_20_Emphasis"><text:span text:style-name="T44">зп</text:span></text:span><text:span text:style-name="Strong_20_Emphasis"><text:span text:style-name="T45">о</text:span></text:span><text:span text:style-name="Strong_20_Emphasis"><text:span text:style-name="T46"> — основная зарплата работника, </text:span></text:span><text:span text:style-name="Strong_20_Emphasis"><text:span text:style-name="T47">₽</text:span></text:span></text:p>
      <text:p text:style-name="P48"><text:span text:style-name="Strong_20_Emphasis"><text:span text:style-name="T46">З</text:span></text:span><text:span text:style-name="Strong_20_Emphasis"><text:span text:style-name="T44">зп</text:span></text:span><text:span text:style-name="Strong_20_Emphasis"><text:span text:style-name="T45">д</text:span></text:span><text:span text:style-name="Strong_20_Emphasis"><text:span text:style-name="T46"> — </text:span></text:span><text:span text:style-name="Strong_20_Emphasis"><text:span text:style-name="T48">дополнительная зарплата разработчика,</text:span></text:span><text:span text:style-name="Strong_20_Emphasis"><text:span text:style-name="T46"> </text:span></text:span><text:span text:style-name="Strong_20_Emphasis"><text:span text:style-name="T49">₽</text:span></text:span></text:p>
      <text:p text:style-name="P48"><text:soft-page-break/><text:span text:style-name="Strong_20_Emphasis"><text:span text:style-name="T46">З</text:span></text:span><text:span text:style-name="Strong_20_Emphasis"><text:span text:style-name="T44">сн —</text:span></text:span><text:span text:style-name="Strong_20_Emphasis"><text:span text:style-name="T46"> </text:span></text:span><text:span text:style-name="Strong_20_Emphasis"><text:span text:style-name="T48">отчисления на соц. нужды,</text:span></text:span><text:span text:style-name="Strong_20_Emphasis"><text:span text:style-name="T46"> </text:span></text:span><text:span text:style-name="Strong_20_Emphasis"><text:span text:style-name="T49">₽</text:span></text:span></text:p>
      <text:p text:style-name="P48"><text:span text:style-name="Strong_20_Emphasis"><text:span text:style-name="T50">Н — накладные расходы,</text:span></text:span><text:span text:style-name="Strong_20_Emphasis"><text:span text:style-name="T46"> </text:span></text:span><text:span text:style-name="Strong_20_Emphasis"><text:span text:style-name="T49">₽</text:span></text:span></text:p>
      <text:p text:style-name="P49"><text:span text:style-name="Strong_20_Emphasis"><text:span text:style-name="T51"/></text:span></text:p>
      <text:p text:style-name="P49"><text:span text:style-name="Strong_20_Emphasis"><text:span text:style-name="T52"><text:tab/>Можно произвести расчёты для каждой переменной.</text:span></text:span></text:p>
      <text:p text:style-name="P50"><text:tab/>Вспомогательные материалы:</text:p>
      <text:p text:style-name="P50">Из таблицы 1 видно, что вспомогательные материалы <text:span text:style-name="T53">в сумме</text:span> стоят <text:span text:style-name="T54">300 р.</text:span></text:p>
      <text:p text:style-name="P50"><text:tab/>Затраты на электроэнергию:</text:p>
      <text:p text:style-name="P50">180 дней по 8 часов.</text:p>
      <text:p text:style-name="P50">Э = 0.5 * 7.5 * 1 440 * <text:span text:style-name="T55">0.6</text:span></text:p>
      <text:p text:style-name="P50">Э = 3 240</text:p>
      <text:p text:style-name="P50"><text:tab/>Общая зарплата:</text:p>
      <text:p text:style-name="P50">270 000 р.</text:p>
      <text:p text:style-name="P50"><text:tab/>Дополнительная зарплата:</text:p>
      <text:p text:style-name="P50"><text:span text:style-name="T56">27 000 </text:span><text:span text:style-name="T57">р.</text:span></text:p>
      <text:p text:style-name="P50"><text:tab/>Отчисления на социальные нужды:</text:p>
      <text:p text:style-name="P50">(270000 + 27000) * 0.3 = 89 100 р.</text:p>
      <text:p text:style-name="P50"><text:tab/>Накладные расходы:</text:p>
      <text:p text:style-name="P50"><text:span text:style-name="Strong_20_Emphasis"><text:span text:style-name="T51">(270000 + 27000) * 0.</text:span></text:span><text:span text:style-name="Strong_20_Emphasis"><text:span text:style-name="T58">1</text:span></text:span><text:span text:style-name="Strong_20_Emphasis"><text:span text:style-name="T51"> = 29 700 р.</text:span></text:span></text:p>
      <text:p text:style-name="P51"><text:span text:style-name="Strong_20_Emphasis"><text:span text:style-name="T51"><text:tab/></text:span></text:span><text:span text:style-name="Strong_20_Emphasis"><text:span text:style-name="T59">Таким образом: </text:span></text:span><text:span text:style-name="Strong_20_Emphasis"><text:span text:style-name="T60">C</text:span></text:span><text:span text:style-name="Strong_20_Emphasis"><text:span text:style-name="T61"> = </text:span></text:span><text:span text:style-name="Strong_20_Emphasis"><text:span text:style-name="T62">300 </text:span></text:span><text:span text:style-name="Strong_20_Emphasis"><text:span text:style-name="T63">+ </text:span></text:span><text:span text:style-name="Strong_20_Emphasis"><text:span text:style-name="T64">3 240</text:span></text:span><text:span text:style-name="Strong_20_Emphasis"><text:span text:style-name="T65"> </text:span></text:span><text:span text:style-name="Strong_20_Emphasis"><text:span text:style-name="T66">+ 270000 </text:span></text:span><text:span text:style-name="Strong_20_Emphasis"><text:span text:style-name="T67">+ </text:span></text:span><text:span text:style-name="Strong_20_Emphasis"><text:span text:style-name="T66">27000 </text:span></text:span><text:span text:style-name="Strong_20_Emphasis"><text:span text:style-name="T51">+ <text:s/>89 100 </text:span></text:span><text:span text:style-name="Strong_20_Emphasis"><text:span text:style-name="T68">+ <text:s/></text:span></text:span><text:span text:style-name="Strong_20_Emphasis"><text:span text:style-name="T51">29 700</text:span></text:span></text:p>
      <text:p text:style-name="P51"><text:span text:style-name="Strong_20_Emphasis"><text:span text:style-name="T51">С = 419 340 р.</text:span></text:span></text:p>
      <text:p text:style-name="Text_20_body"><text:span text:style-name="Strong_20_Emphasis"/></text:p>
      <text:p text:style-name="P52">Таблица <text:sequence text:ref-name="refTable0" text:name="Table" text:formula="ooow:Table+1" style:num-format="1">1</text:sequence><text:s/><text:span text:style-name="Strong_20_Emphasis"><text:span text:style-name="T69">—</text:span></text:span> Затраты на вспомогательные материал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3"/>
          </table:table-cell>
          <table:table-cell table:style-name="Таблица1.A1" office:value-type="string">
            <text:p text:style-name="P53">Наименование затрат</text:p>
          </table:table-cell>
          <table:table-cell table:style-name="Таблица1.A1" office:value-type="string">
            <text:p text:style-name="P53">Кол-во, шт.</text:p>
          </table:table-cell>
          <table:table-cell table:style-name="Таблица1.D1" office:value-type="string">
            <text:p text:style-name="P53">Сумма<text:span text:style-name="T41">, </text:span><text:span text:style-name="Strong_20_Emphasis"><text:span text:style-name="T70">₽</text:span></text:span>.</text:p>
          </table:table-cell>
        </table:table-row>
        <table:table-row>
          <table:table-cell table:style-name="Таблица1.A2" office:value-type="string">
            <text:list text:style-name="L5">
              <text:list-item>
                <text:p text:style-name="P54"/>
              </text:list-item>
            </text:list>
          </table:table-cell>
          <table:table-cell table:style-name="Таблица1.A2" office:value-type="string">
            <text:p text:style-name="P55"><text:span text:style-name="T71">Память</text:span><text:span text:style-name="T72"> </text:span><text:span text:style-name="T71">USB</text:span><text:span text:style-name="T73"> </text:span><text:span text:style-name="T71">FLASH</text:span><text:span text:style-name="T74"> </text:span><text:span text:style-name="T71">DRIVE</text:span><text:span text:style-name="T74"> </text:span><text:span text:style-name="T75">2G</text:span><text:span text:style-name="T76">b</text:span></text:p>
          </table:table-cell>
          <table:table-cell table:style-name="Таблица1.A2" office:value-type="string">
            <text:p text:style-name="P56">1</text:p>
          </table:table-cell>
          <table:table-cell table:style-name="Таблица1.D2" office:value-type="string">
            <text:p text:style-name="P57">200</text:p>
          </table:table-cell>
        </table:table-row>
        <table:table-row>
          <table:table-cell table:style-name="Таблица1.A2" office:value-type="string">
            <text:list text:continue-numbering="true" text:style-name="L5">
              <text:list-item>
                <text:p text:style-name="P54"/>
              </text:list-item>
            </text:list>
          </table:table-cell>
          <table:table-cell table:style-name="Таблица1.A2" office:value-type="string">
            <text:p text:style-name="P58">Переходник USB-A USB-C</text:p>
          </table:table-cell>
          <table:table-cell table:style-name="Таблица1.A2" office:value-type="string">
            <text:p text:style-name="P59">1</text:p>
          </table:table-cell>
          <table:table-cell table:style-name="Таблица1.D2" office:value-type="string">
            <text:p text:style-name="P57">100</text:p>
          </table:table-cell>
        </table:table-row>
        <table:table-row>
          <table:table-cell table:style-name="Таблица1.A2" office:value-type="string">
            <text:p text:style-name="P60"/>
          </table:table-cell>
          <table:table-cell table:style-name="Таблица1.A2" office:value-type="string">
            <text:p text:style-name="P60">Итого</text:p>
          </table:table-cell>
          <table:table-cell table:style-name="Таблица1.A2" office:value-type="string">
            <text:p text:style-name="P61"/>
          </table:table-cell>
          <table:table-cell table:style-name="Таблица1.D4" office:value-type="float" office:value="300">
            <text:p text:style-name="P62">300</text:p>
          </table:table-cell>
        </table:table-row>
      </table:table>
      <text:p text:style-name="P63"><text:span text:style-name="T77"/></text:p>
      <text:h text:style-name="P41" text:outline-level="3"><text:bookmark-start text:name="__RefHeading___Toc2026_2593696514"/><text:soft-page-break/><text:span text:style-name="T78">1.</text:span><text:span text:style-name="T79">3.</text:span><text:span text:style-name="T78">2 </text:span>Расчет экономического эффекта программного продукта<text:bookmark-end text:name="__RefHeading___Toc2026_2593696514"/></text:h>
      <text:p text:style-name="P64">Экономический эффект от внедрения ПО рассчитывается по формуле <text:span text:style-name="T80">2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4"><draw:frame draw:style-name="fr4" draw:name="Объект3" text:anchor-type="as-char" svg:y="-0.388cm" svg:width="7.05cm" svg:height="0.543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4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5"/>
      <text:p text:style-name="P66">где</text:p>
      <text:p text:style-name="P66">N — количество обрабатываемых документов <text:span text:style-name="T81">(взять N = 6000)</text:span>;</text:p>
      <text:p text:style-name="P66">t<text:span text:style-name="T82">1</text:span>, t<text:span text:style-name="T82">2</text:span> — трудоемкость обработки документов до и после внедрения <text:span text:style-name="T83">программы:</text:span></text:p>
      <text:p text:style-name="P66">t<text:span text:style-name="T82">1</text:span><text:span text:style-name="T84"> </text:span><text:span text:style-name="T85">= 15, </text:span><text:span text:style-name="T84"><text:s/>t</text:span><text:span text:style-name="T82">2</text:span><text:span text:style-name="T84"> </text:span><text:span text:style-name="T85">= 7</text:span></text:p>
      <text:p text:style-name="P67">С<text:span text:style-name="T86">чтс </text:span><text:span text:style-name="T87">— </text:span><text:span text:style-name="T84">часовая тарифная тавка пользователя, р./час;</text:span></text:p>
      <text:p text:style-name="P67">К<text:span text:style-name="T82">доп</text:span> — коэффициент отчислений на дополнительную заработную плату, К<text:span text:style-name="T82">доп</text:span> = 0,1;</text:p>
      <text:p text:style-name="P68">К<text:span text:style-name="T82">сн</text:span><text:span text:style-name="T84"> — </text:span><text:span text:style-name="T88">коэффициент отчислений на соц. нужды, <text:s/></text:span><text:span text:style-name="T84">К</text:span><text:span text:style-name="T82">сн </text:span><text:span text:style-name="T88">= 0,3;</text:span></text:p>
      <text:p text:style-name="P68">Е<text:span text:style-name="T82">н</text:span><text:span text:style-name="T84"> — </text:span><text:span text:style-name="T88">нормативный коэффициенткупаемости капитальных вложений, <text:s/></text:span><text:span text:style-name="T84">Е</text:span><text:span text:style-name="T82">н </text:span><text:span text:style-name="T88">= 0,39;</text:span></text:p>
      <text:p text:style-name="P69">К — доп. капиталовложения, связанные с разработкой программного продукта <text:span text:style-name="T89">(здесь полная себестоимость рассчитанная выше)</text:span>.</text:p>
      <text:p text:style-name="P70">Используя ранее рассчитанные значения и подставляя в формулу выше, <text:span text:style-name="T90">можно выяснить что: </text:span><text:span text:style-name="T91">Э = </text:span><text:span text:style-name="T92">6000</text:span><text:span text:style-name="T91"> * (</text:span><text:span text:style-name="T93">15</text:span><text:span text:style-name="T91"> - </text:span><text:span text:style-name="T93">7</text:span><text:span text:style-name="T91">) * </text:span><text:span text:style-name="T94">16</text:span><text:span text:style-name="T95">5</text:span><text:span text:style-name="T91"> * </text:span><text:span text:style-name="T96">0.1</text:span><text:span text:style-name="T91"> * </text:span><text:span text:style-name="T88">0.3</text:span><text:span text:style-name="T91"> - </text:span><text:span text:style-name="T97">0.39</text:span><text:span text:style-name="T91"> *</text:span><text:span text:style-name="T88"> </text:span><text:span text:style-name="T98">4</text:span><text:span text:style-name="T99">19 340</text:span></text:p>
      <text:p text:style-name="P70">Срок окупаемости программного продукта, <text:span text:style-name="T100">ра</text:span><text:span text:style-name="T101">сс</text:span><text:span text:style-name="T100">читанный по формуле 3</text:span>:</text:p>
      <text:p text:style-name="P71">где C<text:span text:style-name="T82">пр</text:span> — себестоимость программного продукта, <text:span text:style-name="Strong_20_Emphasis"><text:span text:style-name="T102">₽</text:span></text:span></text:p>
      <text:p text:style-name="P71"><text:span text:style-name="Strong_20_Emphasis"><text:span text:style-name="T103">С</text:span></text:span><text:span text:style-name="Strong_20_Emphasis"><text:span text:style-name="T104">1</text:span></text:span><text:span text:style-name="Strong_20_Emphasis"><text:span text:style-name="T105"> — стоимостные затраты при использовании ручного труда, </text:span></text:span><text:span text:style-name="Strong_20_Emphasis"><text:span text:style-name="T106">₽</text:span></text:span></text:p>
      <text:p text:style-name="P71"><text:span text:style-name="Strong_20_Emphasis"><text:span text:style-name="T105">С</text:span></text:span><text:span text:style-name="Strong_20_Emphasis"><text:span text:style-name="T104">2 —</text:span></text:span><text:span text:style-name="Strong_20_Emphasis"><text:span text:style-name="T105"> стоимостные затраты при использовании программы, </text:span></text:span><text:span text:style-name="Strong_20_Emphasis"><text:span text:style-name="T106">₽</text:span></text:span></text:p>
      <text:p text:style-name="P72">419340/<text:span text:style-name="T107">(</text:span><text:span text:style-name="T108">281 957,4 -</text:span><text:span text:style-name="T109"> </text:span><text:span text:style-name="T110">44 357,4</text:span><text:span text:style-name="T109">) = </text:span><text:span text:style-name="T111">1.8 лет</text:span></text:p>
      <text:p text:style-name="P73">Ручной труд:</text:p>
      <text:p text:style-name="P74">281 957,4</text:p>
      <text:p text:style-name="P75">Использование программы:</text:p>
      <text:p text:style-name="P76">44 357,4</text:p>
      <text:p text:style-name="P76"/>
      <table:table table:name="Таблица2" table:style-name="Таблица2">
        <table:table-column table:style-name="Таблица2.A"/>
        <table:table-column table:style-name="Таблица2.B"/>
        <table:table-header-rows>
          <text:soft-page-break/>
          <table:table-row>
            <table:table-cell table:style-name="Таблица2.A1" office:value-type="string">
              <text:p text:style-name="P44"><draw:frame draw:style-name="fr4" draw:name="Объект2" text:anchor-type="as-char" svg:y="-0.684cm" svg:width="2.231cm" svg:height="1.13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4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7"/>
      <text:p text:style-name="P78">В таблице 2 выведены результаты произведённых вычислений.</text:p>
      <text:p text:style-name="P79">Таблица <text:sequence text:ref-name="refTable1" text:name="Table" text:formula="ooow:Table+1" style:num-format="1">2</text:sequence><text:s/>— Итоговые значения показателей экономической эффективност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Text_20_body">Наименование показателя</text:p>
          </table:table-cell>
          <table:table-cell table:style-name="Таблица7.A1" office:value-type="string">
            <text:p text:style-name="P80">Ед. Изм.</text:p>
          </table:table-cell>
          <table:table-cell table:style-name="Таблица7.C1" office:value-type="string">
            <text:p text:style-name="P50">Затраты, р.</text:p>
          </table:table-cell>
        </table:table-row>
        <table:table-row>
          <table:table-cell table:style-name="Таблица7.A2" office:value-type="string">
            <text:p text:style-name="P50"><text:span text:style-name="T71">1.</text:span><text:span text:style-name="T112"> </text:span><text:span text:style-name="T71">Основная</text:span><text:span text:style-name="T113"> </text:span><text:span text:style-name="T71">заработная</text:span><text:span text:style-name="T73"> </text:span><text:span text:style-name="T71">плата</text:span><text:span text:style-name="T73"> </text:span><text:span text:style-name="T76">разработчика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270 000</text:p>
          </table:table-cell>
        </table:table-row>
        <table:table-row>
          <table:table-cell table:style-name="Таблица7.A2" office:value-type="string">
            <text:p text:style-name="P50"><text:span text:style-name="T71">2.</text:span><text:span text:style-name="T114"> </text:span><text:span text:style-name="T71">Дополнительная</text:span><text:span text:style-name="T115"> </text:span><text:span text:style-name="T71">заработная</text:span><text:span text:style-name="T116"> </text:span><text:span text:style-name="T71">плата</text:span><text:span text:style-name="T117"> </text:span><text:span text:style-name="T76">разработчика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27 000</text:p>
          </table:table-cell>
        </table:table-row>
        <table:table-row>
          <table:table-cell table:style-name="Таблица7.A2" office:value-type="string">
            <text:p text:style-name="P50"><text:span text:style-name="T118">3.</text:span><text:span text:style-name="T74"> </text:span><text:span text:style-name="T118">Отчисления</text:span><text:span text:style-name="T72"> </text:span><text:span text:style-name="T118">на</text:span><text:span text:style-name="T72"> </text:span><text:span text:style-name="T118">социальные</text:span><text:span text:style-name="T119"> </text:span><text:span text:style-name="T118">нужды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89 100</text:p>
          </table:table-cell>
        </table:table-row>
        <table:table-row>
          <table:table-cell table:style-name="Таблица7.A2" office:value-type="string">
            <text:p text:style-name="P50"><text:span text:style-name="T71">4.</text:span><text:span text:style-name="T73"> </text:span><text:span text:style-name="T71">Накладные</text:span><text:span text:style-name="T74"> </text:span><text:span text:style-name="T76">расходы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29 700</text:p>
          </table:table-cell>
        </table:table-row>
        <table:table-row>
          <table:table-cell table:style-name="Таблица7.A2" office:value-type="string">
            <text:p text:style-name="P50"><text:span text:style-name="T71">5.</text:span><text:span text:style-name="T119"> </text:span><text:span text:style-name="T71">Затраты</text:span><text:span text:style-name="T118"> </text:span><text:span text:style-name="T71">на</text:span><text:span text:style-name="T119"> </text:span><text:span text:style-name="T76">электроэнергию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3 240</text:p>
          </table:table-cell>
        </table:table-row>
        <table:table-row>
          <table:table-cell table:style-name="Таблица7.A2" office:value-type="string">
            <text:p text:style-name="P50"><text:span text:style-name="T76">6.</text:span><text:span text:style-name="T120"> </text:span><text:span text:style-name="T76">Вспомогательные</text:span><text:span text:style-name="T121"> </text:span><text:span text:style-name="T76">материалы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300</text:p>
          </table:table-cell>
        </table:table-row>
        <table:table-row>
          <table:table-cell table:style-name="Таблица7.A2" office:value-type="string">
            <text:p text:style-name="P50"><text:span text:style-name="T71">7.</text:span><text:span text:style-name="T116"> </text:span><text:span text:style-name="T71">Полная</text:span><text:span text:style-name="T112"> </text:span><text:span text:style-name="T71">себестоимость</text:span><text:span text:style-name="T115"> </text:span><text:span text:style-name="T71">программного</text:span><text:span text:style-name="T115"> </text:span><text:span text:style-name="T76">продукта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419 340</text:p>
          </table:table-cell>
        </table:table-row>
        <table:table-row>
          <table:table-cell table:style-name="Таблица7.A2" office:value-type="string">
            <text:p text:style-name="P50"><text:span text:style-name="T71">8.</text:span><text:span text:style-name="T112"> </text:span><text:span text:style-name="T71">Экономический</text:span><text:span text:style-name="T122"> </text:span><text:span text:style-name="T76">эффект</text:span></text:p>
          </table:table-cell>
          <table:table-cell table:style-name="Таблица7.A2" office:value-type="string">
            <text:p text:style-name="P50">р.</text:p>
          </table:table-cell>
          <table:table-cell table:style-name="Таблица7.C2" office:value-type="string">
            <text:p text:style-name="P50">74 057.4</text:p>
          </table:table-cell>
        </table:table-row>
        <table:table-row>
          <table:table-cell table:style-name="Таблица7.A2" office:value-type="string">
            <text:p text:style-name="P50"><text:span text:style-name="T71">9.</text:span><text:span text:style-name="T112"> </text:span><text:span text:style-name="T71">Срок</text:span><text:span text:style-name="T112"> </text:span><text:span text:style-name="T71">окупаемости</text:span><text:span text:style-name="T113"> </text:span><text:span text:style-name="T71">программного</text:span><text:span text:style-name="T113"> </text:span><text:span text:style-name="T76">продукта</text:span></text:p>
          </table:table-cell>
          <table:table-cell table:style-name="Таблица7.A2" office:value-type="string">
            <text:p text:style-name="P50">лет</text:p>
          </table:table-cell>
          <table:table-cell table:style-name="Таблица7.C2" office:value-type="string">
            <text:p text:style-name="P50"><text:span text:style-name="T118">1,</text:span><text:span text:style-name="T123">8</text:span></text:p>
          </table:table-cell>
        </table:table-row>
      </table:table>
      <text:p text:style-name="P81"><text:span text:style-name="Strong_20_Emphasis"><text:span text:style-name="T102"/></text:span></text:p>
      <text:p text:style-name="P82"/>
      <text:h text:style-name="P7" text:outline-level="1"><text:bookmark-start text:name="__RefHeading___Toc8894_1636301399"/>ГЛАВА 2 РЕАЛИЗАЦИЯ ПРОГРАММНЫХ МОДУЛЕЙ<text:bookmark-end text:name="__RefHeading___Toc8894_1636301399"/></text:h>
      <text:h text:style-name="Heading_20_2" text:outline-level="2"/>
      <text:h text:style-name="P83" text:outline-level="2"><text:bookmark-start text:name="__RefHeading___Toc19695_1636301399"/>2.1 Технологии программирования<text:bookmark-end text:name="__RefHeading___Toc19695_1636301399"/></text:h>
      <text:p text:style-name="Text_20_body">Разработка программного продукта потребовала тщательного выбора технологий и методов программирования для достижения поставленных целей. Ниже перечислены используемые технологии и инструменты, их характеристики и обоснование выбора. </text:p>
      <text:p text:style-name="Text_20_body"/>
      <text:h text:style-name="Heading_20_3" text:outline-level="3"><text:bookmark-start text:name="__RefHeading___Toc6583_2272482351"/>Методы разработки<text:bookmark-end text:name="__RefHeading___Toc6583_2272482351"/></text:h>
      <text:p text:style-name="Text_20_body"/>
      <text:p text:style-name="Text_20_body">При выборе методов разработки необходимо учитывать следующие критерии: </text:p>
      <text:list text:style-name="L6">
        <text:list-item>
          <text:p text:style-name="P84">возможность клиента изменить требование;</text:p>
        </text:list-item>
        <text:list-item>
          <text:p text:style-name="P84">отслеживание прогресса;</text:p>
        </text:list-item>
        <text:list-item>
          <text:p text:style-name="P84">обратная связь с клиентом.</text:p>
        </text:list-item>
      </text:list>
      <text:p text:style-name="Text_20_body">С учетом данных критериев предпочтение отдается гибким методам разработки (Agile). Среди различных Agile-методологий наиболее подходящей является Scrum<text:span text:style-name="T124">.</text:span><text:span text:style-name="T125"> </text:span><text:span text:style-name="T126">Он предпол</text:span><text:span text:style-name="T127">а</text:span><text:span text:style-name="T126">гает деление разработки на спринты длительностью около 2-х недель.</text:span><text:span text:style-name="T125"> </text:span><text:span text:style-name="T126">По окончанию спринта предлагается</text:span><text:span text:style-name="T128"> демонстрировать заказчику результаты шагов разработки, для преждевременного выявления несоответствий ожидания и </text:span><text:span text:style-name="T126">фактических результатов</text:span><text:span text:style-name="T128">. </text:span><text:span text:style-name="T129">Также в</text:span><text:span text:style-name="T130"> виду отсутствия команды использовать выбранный метод будет не проблематично, </text:span><text:span text:style-name="T126">так как не требуется чёткое разделение ролей и дисциплины команды</text:span><text:span text:style-name="T130">. С данным методом будет проще отслеживать прогресс и изменять дальнейший план если потребуется.</text:span></text:p>
      <text:p text:style-name="P85"/>
      <text:h text:style-name="Heading_20_3" text:outline-level="3"><text:bookmark-start text:name="__RefHeading___Toc6585_2272482351"/>Язык программирования<text:bookmark-end text:name="__RefHeading___Toc6585_2272482351"/></text:h>
      <text:p text:style-name="Text_20_body"/>
      <text:p text:style-name="P86"><text:soft-page-break/>В качестве языка программирования для разработки выбран C+<text:span text:style-name="T131">+</text:span><text:span text:style-name="T132">. </text:span><text:span text:style-name="T133">Это обусловлено его высокой производительностью и кроссплатформенностью. </text:span><text:span text:style-name="T132">C++ </text:span><text:span text:style-name="T133">используется в </text:span><text:span text:style-name="T132">Qt Creator </text:span><text:span text:style-name="T133">для написания функциональной части как десктопных так и для мобильных приложений.</text:span></text:p>
      <text:p text:style-name="P86">Для взаимодействия с базами данных используется структурированный язык запросов SQL, который характеризуется простотой и многофункциональностью, обеспечивая эффективное управление данными. </text:p>
      <text:p text:style-name="P86"/>
      <text:h text:style-name="Heading_20_3" text:outline-level="3"><text:bookmark-start text:name="__RefHeading___Toc6587_2272482351"/>Инструменты и среды разработки<text:bookmark-end text:name="__RefHeading___Toc6587_2272482351"/></text:h>
      <text:p text:style-name="Text_20_body"/>
      <text:p text:style-name="P87">В качестве инструмента для разработки выбрана интегрированная среда разработки Qt Creator, которая предоставляет возможности для создания кроссплатформенных приложений. Для конфигурации и сборки проекта используется система сборки CMake. </text:p>
      <text:p text:style-name="P87">Процесс разработки основан на объектно-ориентированном подходе, где каждый компонент программы представляется в виде отдельного объекта или класса. Этот подход соответствует требованиям и спецификациям разрабатываем<text:span text:style-name="T134">ой</text:span> программ<text:span text:style-name="T134">ы</text:span>. </text:p>
      <text:h text:style-name="Heading_20_2" text:outline-level="2"><text:bookmark-start text:name="__RefHeading___Toc8896_1636301399"/>2.<text:span text:style-name="T36">2</text:span> Описание программных модулей<text:bookmark-end text:name="__RefHeading___Toc8896_1636301399"/></text:h>
      <text:p text:style-name="Text_20_body"/>
      <text:p text:style-name="Text_20_body">&lt;Каждый раздел начинается с новой страницы&gt;</text:p>
      <text:p text:style-name="Text_20_body"/>
      <text:h text:style-name="Heading_20_2" text:outline-level="2"><text:bookmark-start text:name="__RefHeading___Toc8898_1636301399"/>2.<text:span text:style-name="T36">3</text:span> Интеграция программных модулей<text:bookmark-end text:name="__RefHeading___Toc8898_1636301399"/></text:h>
      <text:p text:style-name="Text_20_body"/>
      <text:p text:style-name="Примечание">Примечание — Далее следует текст примечания. <text:span text:style-name="T135">Или..</text:span></text:p>
      <text:p text:style-name="Примечание">Примечание</text:p>
      <text:p text:style-name="Примечание">1 Несколько примечаний</text:p>
      <text:p text:style-name="Примечание">2 Нумеруют арабскими цифрами</text:p>
      <text:p text:style-name="Text_20_body"/>
      <text:p text:style-name="Text_20_body"><text:soft-page-break/>&lt;Примечания можно оформлять в виде сносок. См. ниже&gt;</text:p>
      <text:p text:style-name="Text_20_body"/>
      <text:p text:style-name="Text_20_body">&lt;Оформление сносок&gt;</text:p>
      <text:p text:style-name="P88">Можно символом<text:note text:id="ftn1" text:note-class="footnote"><text:note-citation text:label="*">*</text:note-citation><text:note-body><text:p text:style-name="P89">Символ «звездочка» можно использовать до трех раз</text:p></text:note-body></text:note>. <text:span text:style-name="T136">Для этого выполнить: Вставка → Сноска → Вставить специальную сноску → Символ: *</text:span></text:p>
      <text:p text:style-name="P88">С нумерацией <text:span text:style-name="T137">должен соблюдаться формат</text:span><text:note text:id="ftn2" text:note-class="footnote"><text:note-citation>1</text:note-citation><text:note-body><text:p text:style-name="P90">Разработчики постоянно меняют настройки программы</text:p></text:note-body></text:note><text:span text:style-name="T138">)</text:span>. <text:span text:style-name="T137">В этом случае, после установки сноски, из контекста над сноской выбираем: «Параметры сносок» → Автонумерация → Afte</text:span><text:span text:style-name="T139">r</text:span><text:span text:style-name="T137">: )</text:span></text:p>
      <text:p text:style-name="Text_20_body"/>
      <text:h text:style-name="Heading_20_2" text:outline-level="2"><text:bookmark-start text:name="__RefHeading___Toc8900_1636301399"/>2.<text:span text:style-name="T36">4</text:span> Описание программного интерфейса<text:bookmark-end text:name="__RefHeading___Toc8900_1636301399"/></text:h>
      <text:p text:style-name="Text_20_body"/>
      <text:h text:style-name="Heading_20_3" text:outline-level="3"><text:bookmark-start text:name="__RefHeading___Toc11261_1636301399"/>2.<text:span text:style-name="T140">4</text:span>.1 Первый пункт<text:bookmark-end text:name="__RefHeading___Toc11261_1636301399"/></text:h>
      <text:p text:style-name="Text_20_body"/>
      <text:p text:style-name="Text_20_body">Содержание первого пункта. Этот пункт содержит заголовок. Текст заголовка не выделяется полужирным начертанием</text:p>
      <text:p text:style-name="Text_20_body">2.<text:span text:style-name="T140">4</text:span>.1.1 Это подпункт не содержащий заголовка. Если он не содержит заголовка, то и в оглавление он не попадает. В оглавление попадают только те заголовки пунктов и подпунктов, которые имеют <text:span text:style-name="T137">эти заголовки</text:span>. <text:span text:style-name="T137">В этом случае, о</text:span>формляется как стиль основного текста.</text:p>
      <text:p text:style-name="Text_20_body"/>
      <text:h text:style-name="Heading_20_3" text:outline-level="3"><text:bookmark-start text:name="__RefHeading___Toc11263_1636301399"/>2.<text:span text:style-name="T140">4</text:span>.2 Это второй пункт<text:bookmark-end text:name="__RefHeading___Toc11263_1636301399"/></text:h>
      <text:p text:style-name="Text_20_body"/>
      <text:p text:style-name="Text_20_body">Это первое предложение второго пункта с новой строки. А это второе предложение.</text:p>
      <text:p text:style-name="P91">&lt;Списки оформляются либо так:</text:p>
      <text:list text:style-name="L7">
        <text:list-item>
          <text:p text:style-name="P92">Первый пункт;</text:p>
        </text:list-item>
        <text:list-item>
          <text:p text:style-name="P92">Второй пункт;</text:p>
        </text:list-item>
        <text:list-item>
          <text:p text:style-name="P92">Третий пункт.</text:p>
          <text:p text:style-name="P92"><text:soft-page-break/>либо так:</text:p>
        </text:list-item>
      </text:list>
      <text:list text:style-name="L8">
        <text:list-item>
          <text:p text:style-name="P93">Первый пункт;</text:p>
        </text:list-item>
        <text:list-item>
          <text:p text:style-name="P93">Второй пункт;</text:p>
        </text:list-item>
        <text:list-item text:start-value="1">
          <text:p text:style-name="P93">Третий пункт.</text:p>
        </text:list-item>
      </text:list>
      <text:p text:style-name="P91"><text:span text:style-name="T141">Кружки и квадраты использовать не разрешается</text:span>&gt;</text:p>
      <text:p text:style-name="P94">&lt;Пример&gt;</text:p>
      <text:p text:style-name="P94">Разрабатываемое сверхмощное устройство можно будет применять в различных отраслях реального сектора экономики:</text:p>
      <text:list text:style-name="L9">
        <text:list-item>
          <text:p text:style-name="P95">в машиностроении:</text:p>
        </text:list-item>
      </text:list>
      <text:list text:style-name="L10">
        <text:list-item>
          <text:p text:style-name="P96">для очистки отливок от формовочной смеси;</text:p>
        </text:list-item>
        <text:list-item>
          <text:p text:style-name="P96">для очистки лопаток турбин авиационных двигателей;</text:p>
        </text:list-item>
        <text:list-item>
          <text:p text:style-name="P96">для холодной штамповки из листа;</text:p>
        </text:list-item>
      </text:list>
      <text:list text:style-name="L11">
        <text:list-item>
          <text:p text:style-name="P97">в ремонте техники:</text:p>
        </text:list-item>
      </text:list>
      <text:list text:style-name="L12">
        <text:list-item>
          <text:p text:style-name="P98">устранение наслоений на внутренних стенках труб;</text:p>
        </text:list-item>
        <text:list-item>
          <text:p text:style-name="P99">очистка каналов и отверстий небольшого диаметра от грязи.</text:p>
        </text:list-item>
      </text:list>
      <text:h text:style-name="P7" text:outline-level="1"><text:bookmark-start text:name="__RefHeading___Toc8902_1636301399"/>ЗАКЛЮЧЕНИЕ<text:bookmark-end text:name="__RefHeading___Toc8902_1636301399"/></text:h>
      <text:p text:style-name="Text_20_body"/>
      <text:h text:style-name="P7" text:outline-level="1"><text:bookmark-start text:name="__RefHeading___Toc8904_1636301399"/>СПИСОК ИСПОЛЬЗОВАННЫХ ИСТОЧНИКОВ<text:bookmark-end text:name="__RefHeading___Toc8904_1636301399"/></text:h>
      <text:p text:style-name="Text_20_body"/>
      <text:list text:style-name="Нумерация_20_источников">
        <text:list-item>
          <text:p text:style-name="P100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101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101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</text:list-item>
      </text:list>
      <text:h text:style-name="P102" text:outline-level="1"><text:bookmark-start text:name="__RefHeading___Toc8906_1636301399"/>П<text:span text:style-name="T142">РИЛОЖЕНИЕ</text:span> А<text:bookmark-end text:name="__RefHeading___Toc8906_1636301399"/></text:h>
      <text:h text:style-name="P103" text:outline-level="1"/>
      <text:h text:style-name="P103" text:outline-level="1"><text:bookmark-start text:name="__RefHeading___Toc1720_2115060514"/>Листинги программного кода<text:bookmark-end text:name="__RefHeading___Toc1720_2115060514"/></text:h>
      <text:p text:style-name="P50"><text:tab/></text:p>
      <text:p text:style-name="P104"><text:tab/>&lt;<text:span text:style-name="T143">В Содержании должно быть так:</text:span></text:p>
      <text:p text:style-name="P105">ПРИЛОЖЕНИЕ А Листинги программного кода……………………………...N</text:p>
      <text:p text:style-name="P104"><text:span text:style-name="T143">Чтобы это сделать нужно включить правку Содержания: Из контекста → Edit Огдавление → Снять флажок: «Защищено от изменения в ручную» и выполнить правку </text:span><text:span text:style-name="T144">Содержания</text:span><text:span text:style-name="T143"> вручную. Поскольку Содержание будет постоянно меняться, необходимо редактирование Содержания произвести в самую последнюю очередь</text:span>&gt;</text:p>
      <text:p text:style-name="P106">Листинг <text:sequence text:ref-name="refЛистинг0" text:name="Листинг" text:formula="ooow:Листинг+1" style:num-format="1">1</text:sequence><text:s/>— Образец оформления Листинга программного кода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list text:style-name="Нумерация_20_строк_20_кода">
              <text:list-item>
                <text:p text:style-name="P107">&lt;Внутри таблицы без видимой границы находится программный код с нумерацией&gt;</text:p>
              </text:list-item>
            </text:list>
          </table:table-cell>
        </table:table-row>
      </table:table>
      <text:p text:style-name="Text_20_body">&lt;Как сделать:&gt;</text:p>
      <text:p text:style-name="Text_20_body">&lt;Таблица → Вставить таблицу; столбцов 1, строк 1&gt;</text:p>
      <text:p text:style-name="Text_20_body">&lt;Убираем видимость границ. Контекстное меню → Свойство таблицы → Обрамление, снимаем. Другие свойства не изменяем!&gt;</text:p>
      <text:p text:style-name="Text_20_body">&lt;Вставка → Название → Категория: Листинг. Счетчик меняет значения автоматически&gt;</text:p>
      <text:p text:style-name="Text_20_body">&lt;Например&gt;</text:p>
      <text:p text:style-name="P108">Листинг <text:sequence text:ref-name="refЛистинг1" text:name="Листинг" text:formula="ooow:Листинг+1" style:num-format="1">2</text:sequence><text:s/>— Файл logger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continue-numbering="true" text:style-name="Нумерация_20_строк_20_кода">
              <text:list-item text:start-value="1">
                <text:p text:style-name="P109">#include "logger.h"</text:p>
              </text:list-item>
              <text:list-item>
                <text:p text:style-name="P109"/>
              </text:list-item>
              <text:list-item>
                <text:p text:style-name="P109">Logger::Logger(const QString&amp; filename) : logFile(filename) {</text:p>
              </text:list-item>
              <text:list-item>
                <text:p text:style-name="P109"><text:s text:c="4"/>if (!logFile.open(QIODevice::WriteOnly | QIODevice::Append | QIODevice::Text)) {</text:p>
              </text:list-item>
              <text:list-item>
                <text:p text:style-name="P109"><text:s text:c="8"/>qWarning() &lt;&lt; "Could not open log file:" &lt;&lt; filename;</text:p>
              </text:list-item>
              <text:list-item>
                <text:p text:style-name="P109"><text:s text:c="4"/>}</text:p>
              </text:list-item>
              <text:list-item>
                <text:p text:style-name="P109"><text:soft-page-break/><text:s text:c="4"/>logStream.setDevice(&amp;logFile);</text:p>
              </text:list-item>
              <text:list-item>
                <text:p text:style-name="P109">}</text:p>
              </text:list-item>
              <text:list-item>
                <text:p text:style-name="P109"/>
              </text:list-item>
              <text:list-item>
                <text:p text:style-name="P109">void Logger::log(Severity severity, const QString&amp; message) {</text:p>
              </text:list-item>
              <text:list-item>
                <text:p text:style-name="P109"><text:s text:c="4"/>QString severityString;</text:p>
              </text:list-item>
              <text:list-item>
                <text:p text:style-name="P109"><text:s text:c="4"/>switch (severity) {</text:p>
              </text:list-item>
              <text:list-item>
                <text:p text:style-name="P109"><text:s text:c="8"/>case Debug: <text:s text:c="2"/>severityString = "Debug"; <text:s text:c="2"/>break;</text:p>
              </text:list-item>
              <text:list-item>
                <text:p text:style-name="P109"><text:s text:c="8"/>case Info: <text:s text:c="3"/>severityString = "Info"; <text:s text:c="3"/>break;</text:p>
              </text:list-item>
              <text:list-item>
                <text:p text:style-name="P109"><text:s text:c="8"/>case Warning: severityString = "Warning"; break;</text:p>
              </text:list-item>
              <text:list-item>
                <text:p text:style-name="P109"><text:s text:c="8"/>case Error: <text:s text:c="2"/>severityString = "Error"; <text:s text:c="2"/>break;</text:p>
              </text:list-item>
              <text:list-item>
                <text:p text:style-name="P109"><text:s text:c="8"/>case Fatal: <text:s text:c="2"/>severityString = "Fatal"; <text:s text:c="2"/>break;</text:p>
              </text:list-item>
              <text:list-item>
                <text:p text:style-name="P109"><text:s text:c="4"/>}</text:p>
              </text:list-item>
              <text:list-item>
                <text:p text:style-name="P109"/>
              </text:list-item>
              <text:list-item>
                <text:p text:style-name="P109"><text:s text:c="4"/>logStream &lt;&lt; QDateTime::currentDateTime().toString("yyyy-MM-dd hh:mm:ss.zzz ")</text:p>
              </text:list-item>
              <text:list-item>
                <text:p text:style-name="P109"><text:s text:c="14"/>&lt;&lt; "[" &lt;&lt; severityString &lt;&lt; "] "</text:p>
              </text:list-item>
              <text:list-item>
                <text:p text:style-name="P109"><text:s text:c="14"/>&lt;&lt; message &lt;&lt; Qt::endl;</text:p>
              </text:list-item>
              <text:list-item>
                <text:p text:style-name="P109"><text:s text:c="4"/>logStream.flush();</text:p>
              </text:list-item>
              <text:list-item>
                <text:p text:style-name="P109">}</text:p>
              </text:list-item>
              <text:list-item>
                <text:p text:style-name="P109"/>
              </text:list-item>
              <text:list-item>
                <text:p text:style-name="P109">Logger::~Logger() {</text:p>
              </text:list-item>
              <text:list-item>
                <text:p text:style-name="P109"><text:s text:c="4"/>logFile.close();</text:p>
              </text:list-item>
              <text:list-item>
                <text:p text:style-name="P109">}</text:p>
              </text:list-item>
            </text:list>
          </table:table-cell>
        </table:table-row>
      </table:table>
      <text:p text:style-name="Text_20_body"/>
      <text:p text:style-name="P88">&lt;Листинги оформляются созданным стилем «Оформление кода» и «Нумерация <text:span text:style-name="T145">строк </text:span>кода». Изменять эти стили (это категория «Стили пользователя») - не разрешается!&gt;</text:p>
      <text:p text:style-name="P88">&lt;Подсветка (колоризация) синтаксиса не допускается!&gt;</text:p>
      <text:p text:style-name="P88">&lt;Параметры кода: Шрифт - Source Code Pro (<text:span text:style-name="T146">точно!</text:span> не Source Code Pro Semibold), Кегль — 1<text:span text:style-name="T147">1</text:span> pt&gt;</text:p>
      <text:p text:style-name="Text_20_body"/>
      <text:h text:style-name="P102" text:outline-level="1"><text:bookmark-start text:name="__RefHeading___Toc8908_1636301399 Копия 1"/>П<text:span text:style-name="T142">РИЛОЖЕНИЕ</text:span> <text:span text:style-name="T36">Б</text:span><text:bookmark-end text:name="__RefHeading___Toc8908_1636301399 Копия 1"/></text:h>
      <text:h text:style-name="P110" text:outline-level="1"/>
      <text:h text:style-name="P110" text:outline-level="1"><text:bookmark-start text:name="__RefHeading___Toc1722_2115060514"/>Тест-кейсы и тест-сьюты<text:bookmark-end text:name="__RefHeading___Toc1722_2115060514"/></text:h>
      <text:p text:style-name="P88"/>
      <text:p text:style-name="P88"/>
      <text:h text:style-name="P102" text:outline-level="1"><text:bookmark-start text:name="__RefHeading___Toc8908_1636301399"/>П<text:span text:style-name="T142">РИЛОЖЕНИЕ</text:span> <text:span text:style-name="T36">В</text:span><text:bookmark-end text:name="__RefHeading___Toc8908_1636301399"/></text:h>
      <text:h text:style-name="P103" text:outline-level="1"/>
      <text:h text:style-name="P103" text:outline-level="1"><text:bookmark-start text:name="__RefHeading___Toc1724_2115060514"/>Документирование программного кода<text:bookmark-end text:name="__RefHeading___Toc1724_2115060514"/></text:h>
      <text:p text:style-name="Text_20_body"/>
      <text:p text:style-name="P111">&lt;Созданы следующие стили:</text:p>
      <text:list text:style-name="L13">
        <text:list-item>
          <text:p text:style-name="P112">Блок научного руководителя</text:p>
        </text:list-item>
        <text:list-item>
          <text:p text:style-name="P112">Заголовок на титульной</text:p>
        </text:list-item>
        <text:list-item>
          <text:p text:style-name="P112">Листинг</text:p>
        </text:list-item>
        <text:list-item>
          <text:p text:style-name="P112">Основной текст на титульной</text:p>
        </text:list-item>
        <text:list-item>
          <text:p text:style-name="P112">Оформление кода</text:p>
        </text:list-item>
        <text:list-item>
          <text:p text:style-name="P112">Примечание</text:p>
        </text:list-item>
        <text:list-item>
          <text:p text:style-name="P112">Нумерация источников</text:p>
        </text:list-item>
        <text:list-item>
          <text:p text:style-name="P112">Нумерация строк в таблице</text:p>
        </text:list-item>
        <text:list-item>
          <text:p text:style-name="P112">Нумерация строк кода&gt;</text:p>
          <text:p text:style-name="P112">&lt;Остальные измененные стили — это встроенные&gt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Landscap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0:20:27.928967447</meta:creation-date>
    <dc:date>2026-02-02T10:49:19.424236180</dc:date>
    <meta:editing-duration>PT3H34M50S</meta:editing-duration>
    <meta:editing-cycles>108</meta:editing-cycles>
    <meta:generator>LibreOffice/25.8.2.2$Linux_X86_64 LibreOffice_project/580$Build-2</meta:generator>
    <meta:print-date>2026-02-02T10:30:40.621059897</meta:print-date>
    <meta:printed-by>Файлы PDF</meta:printed-by>
    <meta:document-statistic meta:table-count="7" meta:image-count="3" meta:object-count="3" meta:page-count="28" meta:paragraph-count="366" meta:word-count="3078" meta:character-count="23978" meta:non-whitespace-character-count="21100"/>
  </office:meta>
</office:document-meta>
</file>

<file path=Object 1/content.xml><?xml version="1.0" encoding="utf-8"?>
<math xmlns="http://www.w3.org/1998/Math/MathML" display="block">
  <semantics>
    <mrow>
      <mi>С</mi>
      <mo stretchy="false">=</mo>
      <mrow>
        <msub>
          <mi>М</mi>
          <mi mathvariant="italic">вс</mi>
        </msub>
        <mo stretchy="false">+</mo>
        <mi>Э</mi>
        <mo stretchy="false">+</mo>
        <msubsup>
          <mi>З</mi>
          <mi mathvariant="italic">зп</mi>
          <mi>о</mi>
        </msubsup>
        <mo stretchy="false">+</mo>
        <msubsup>
          <mi>З</mi>
          <mi mathvariant="italic">зп</mi>
          <mi>д</mi>
        </msubsup>
        <mo stretchy="false">+</mo>
        <msub>
          <mi>З</mi>
          <mi mathvariant="italic">сн</mi>
        </msub>
        <mo stretchy="false">+</mo>
        <mi>Н</mi>
      </mrow>
    </mrow>
    <annotation encoding="StarMath 5.0">С = М_вс + Э + З_зп^о + З_зп^д + З_сн + Н
</annotation>
  </semantics>
</math>
</file>

<file path=Object 2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sub>
          <mi>С</mi>
          <mi mathvariant="italic">пр</mi>
        </msub>
        <mrow>
          <msub>
            <mi>С</mi>
            <mn>1</mn>
          </msub>
          <mo stretchy="false">−</mo>
          <msub>
            <mi>С</mi>
            <mn>2</mn>
          </msub>
        </mrow>
      </mfrac>
    </mrow>
    <annotation encoding="StarMath 5.0">Т_ок = frac {С_пр} {С_1 - С_2} 
</annotation>
  </semantics>
</math>
</file>

<file path=Object 3/content.xml><?xml version="1.0" encoding="utf-8"?>
<math xmlns="http://www.w3.org/1998/Math/MathML" display="block">
  <semantics>
    <mrow>
      <mrow>
        <msub>
          <mi>Э</mi>
          <mi mathvariant="italic">эф</mi>
        </msub>
        <mo stretchy="false">=</mo>
        <mi>N</mi>
      </mrow>
      <mi>·</mi>
      <mrow>
        <mo fence="true" form="prefix" stretchy="false">(</mo>
        <mrow>
          <mrow>
            <msub>
              <mi>t</mi>
              <mn>1</mn>
            </msub>
            <mi>—</mi>
            <msub>
              <mi>t</mi>
              <mn>2</mn>
            </msub>
          </mrow>
        </mrow>
        <mo fence="true" form="postfix" stretchy="false">)</mo>
      </mrow>
      <mi>·</mi>
      <msub>
        <mi>C</mi>
        <mi mathvariant="italic">чтс</mi>
      </msub>
      <mi>·</mi>
      <msub>
        <mi>К</mi>
        <mi mathvariant="italic">доп</mi>
      </msub>
      <mi>·</mi>
      <msub>
        <mi>К</mi>
        <mi mathvariant="italic">сн</mi>
      </msub>
      <mi>—</mi>
      <msub>
        <mi>Е</mi>
        <mi>н</mi>
      </msub>
      <mi>·</mi>
      <mi>К</mi>
    </mrow>
    <annotation encoding="StarMath 5.0">Э_эф = N · (t_1 — t_2) · C_чтс · К_доп · К_сн — Е_н · К</annotation>
  </semantics>
</math>
</file>