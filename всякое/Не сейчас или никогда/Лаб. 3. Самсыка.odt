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Fonts/Font_PT_Astra_Serif_2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PT_Astra_Serif_1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PT_Astra_Sans_2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Times_New_Roman_4.ttf" manifest:media-type="application/x-font-ttf"/>
  <manifest:file-entry manifest:full-path="Fonts/Font_PT_Astra_Serif_3.ttf" manifest:media-type="application/x-font-ttf"/>
  <manifest:file-entry manifest:full-path="Fonts/Font_Times_New_Roman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imes_New_Roman_1.ttf" manifest:media-type="application/x-font-ttf"/>
  <manifest:file-entry manifest:full-path="Fonts/Font_Times_New_Roman_2.ttf" manifest:media-type="application/x-font-ttf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363cm"/>
    </style:style>
    <style:style style:name="Таблица1.B" style:family="table-column">
      <style:table-column-properties style:column-width="7.135cm"/>
    </style:style>
    <style:style style:name="Таблица1.C" style:family="table-column">
      <style:table-column-properties style:column-width="4.251cm"/>
    </style:style>
    <style:style style:name="Таблица1.D" style:family="table-column">
      <style:table-column-properties style:column-width="4.24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D4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0.901cm" style:rel-column-width="42021*"/>
    </style:style>
    <style:style style:name="Таблица2.B" style:family="table-column">
      <style:table-column-properties style:column-width="2.822cm" style:rel-column-width="10879*"/>
    </style:style>
    <style:style style:name="Таблица2.C" style:family="table-column">
      <style:table-column-properties style:column-width="3.277cm" style:rel-column-width="1263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style:font-name="PT Astra Serif2" fo:font-size="20.7999992370605pt" fo:language="en" fo:country="US" fo:font-weight="bold" officeooo:rsid="01d46334" officeooo:paragraph-rsid="01d46334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1f68ab7" officeooo:paragraph-rsid="01f68ab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0" style:family="paragraph" style:parent-style-name="Heading_20_3">
      <style:paragraph-properties fo:break-before="page"/>
      <style:text-properties officeooo:paragraph-rsid="01dc3105"/>
    </style:style>
    <style:style style:name="P21" style:family="paragraph" style:parent-style-name="Heading_20_2">
      <style:text-properties officeooo:rsid="01f19926" officeooo:paragraph-rsid="01f19926"/>
    </style:style>
    <style:style style:name="P22" style:family="paragraph" style:parent-style-name="Text_20_body" style:list-style-name="L1">
      <style:text-properties officeooo:rsid="01f19926" officeooo:paragraph-rsid="01f19926"/>
    </style:style>
    <style:style style:name="P23" style:family="paragraph" style:parent-style-name="Text_20_body" style:list-style-name="L2">
      <style:text-properties officeooo:rsid="02105229" officeooo:paragraph-rsid="02105229"/>
    </style:style>
    <style:style style:name="P24" style:family="paragraph" style:parent-style-name="Text_20_body" style:list-style-name="L3">
      <style:text-properties officeooo:rsid="0213821e" officeooo:paragraph-rsid="0213821e"/>
    </style:style>
    <style:style style:name="P25" style:family="paragraph" style:parent-style-name="Text_20_body" style:list-style-name="L3">
      <style:text-properties officeooo:rsid="02140d03" officeooo:paragraph-rsid="02140d03"/>
    </style:style>
    <style:style style:name="P26" style:family="paragraph" style:parent-style-name="Text_20_body" style:list-style-name="L1">
      <style:text-properties officeooo:rsid="01f19926" officeooo:paragraph-rsid="0214d31d"/>
    </style:style>
    <style:style style:name="P27" style:family="paragraph" style:parent-style-name="Text_20_body" style:list-style-name="L4">
      <style:text-properties officeooo:rsid="02166412" officeooo:paragraph-rsid="02166412"/>
    </style:style>
    <style:style style:name="P28" style:family="paragraph" style:parent-style-name="Text_20_body">
      <style:text-properties officeooo:rsid="01f19926" officeooo:paragraph-rsid="0214d31d"/>
    </style:style>
    <style:style style:name="P29" style:family="paragraph" style:parent-style-name="Text_20_body" style:list-style-name="L1">
      <style:text-properties fo:language="ru" fo:country="RU" officeooo:rsid="021ff86b" officeooo:paragraph-rsid="021ff86b"/>
    </style:style>
    <style:style style:name="P30" style:family="paragraph" style:parent-style-name="Text_20_body" style:list-style-name="L1">
      <style:text-properties fo:language="ru" fo:country="RU" officeooo:rsid="0221798c" officeooo:paragraph-rsid="0221798c"/>
    </style:style>
    <style:style style:name="P31" style:family="paragraph" style:parent-style-name="Text_20_body">
      <style:paragraph-properties fo:margin-left="0.25cm" fo:margin-right="0.235cm" fo:margin-top="0cm" fo:margin-bottom="0cm" style:contextual-spacing="false" fo:text-align="justify" style:justify-single-word="false" fo:text-indent="1.251cm" style:auto-text-indent="false"/>
      <style:text-properties officeooo:paragraph-rsid="01dfb4a2"/>
    </style:style>
    <style:style style:name="P32" style:family="paragraph" style:parent-style-name="Text_20_body">
      <style:paragraph-properties fo:margin-left="0.25cm" fo:margin-right="0.235cm" fo:margin-top="0cm" fo:margin-bottom="0cm" style:contextual-spacing="false" fo:text-align="justify" style:justify-single-word="false" fo:text-indent="0cm" style:auto-text-indent="false"/>
      <style:text-properties fo:letter-spacing="-0.004cm" officeooo:rsid="01dfc8de" officeooo:paragraph-rsid="01dfc8de"/>
    </style:style>
    <style:style style:name="P33" style:family="paragraph" style:parent-style-name="Text_20_body">
      <style:paragraph-properties fo:margin-left="0.25cm" fo:margin-right="0.235cm" fo:margin-top="0cm" fo:margin-bottom="0cm" style:contextual-spacing="false" fo:text-align="center" style:justify-single-word="false" fo:text-indent="0cm" style:auto-text-indent="false"/>
      <style:text-properties fo:letter-spacing="-0.004cm" officeooo:rsid="01dfc8de" officeooo:paragraph-rsid="01dfc8de"/>
    </style:style>
    <style:style style:name="P34" style:family="paragraph" style:parent-style-name="Text_20_body">
      <style:paragraph-properties fo:margin-left="0.25cm" fo:margin-right="0.235cm" fo:margin-top="0cm" fo:margin-bottom="0cm" style:contextual-spacing="false" fo:text-align="start" style:justify-single-word="false" fo:text-indent="0cm" style:auto-text-indent="false"/>
      <style:text-properties officeooo:paragraph-rsid="01dfc8de"/>
    </style:style>
    <style:style style:name="P35" style:family="paragraph" style:parent-style-name="Text_20_body">
      <style:paragraph-properties fo:margin-left="0.25cm" fo:margin-right="0.235cm" fo:margin-top="0cm" fo:margin-bottom="0cm" style:contextual-spacing="false" fo:text-align="start" style:justify-single-word="false" fo:text-indent="0cm" style:auto-text-indent="false"/>
      <style:text-properties fo:letter-spacing="-0.004cm" officeooo:rsid="01dfc8de" officeooo:paragraph-rsid="01dfc8de"/>
    </style:style>
    <style:style style:name="P36" style:family="paragraph" style:parent-style-name="Text_20_body">
      <style:paragraph-properties fo:margin-left="0.25cm" fo:margin-right="0.235cm" fo:margin-top="0cm" fo:margin-bottom="0cm" style:contextual-spacing="false" fo:text-align="start" style:justify-single-word="false" fo:text-indent="0cm" style:auto-text-indent="false"/>
      <style:text-properties fo:letter-spacing="-0.004cm" officeooo:rsid="01dfc8de" officeooo:paragraph-rsid="01e0f486"/>
    </style:style>
    <style:style style:name="P37" style:family="paragraph" style:parent-style-name="Table">
      <style:paragraph-properties fo:keep-with-next="always"/>
      <style:text-properties fo:font-weight="normal" officeooo:paragraph-rsid="01e28a4f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1e28a4f" officeooo:paragraph-rsid="01e28a4f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1e28a4f" officeooo:paragraph-rsid="01e84971" style:font-size-asian="12pt" style:font-size-complex="12pt"/>
    </style:style>
    <style:style style:name="P40" style:family="paragraph" style:parent-style-name="Table_20_Contents" style:list-style-name="L5">
      <style:paragraph-properties fo:text-align="start" style:justify-single-word="false"/>
      <style:text-properties fo:font-size="12pt" style:font-size-asian="12pt" style:font-size-complex="12pt"/>
    </style:style>
    <style:style style:name="P41" style:family="paragraph" style:parent-style-name="Text_20_body">
      <style:text-properties officeooo:paragraph-rsid="01f777d0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1e3c667" officeooo:paragraph-rsid="01e3c667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1f777d0" officeooo:paragraph-rsid="01f777d0" style:font-size-asian="12pt" style:font-size-complex="12pt"/>
    </style:style>
    <style:style style:name="P44" style:family="paragraph" style:parent-style-name="Text_20_body">
      <style:text-properties fo:font-size="14pt" fo:letter-spacing="-0.004cm" officeooo:rsid="030e1e5d" officeooo:paragraph-rsid="01f777d0" style:font-size-asian="14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1e3957c" officeooo:paragraph-rsid="01e3957c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fo:font-weight="bold" officeooo:rsid="01e28a4f" officeooo:paragraph-rsid="01e28a4f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officeooo:rsid="01f777d0" officeooo:paragraph-rsid="01f777d0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left="0cm" fo:margin-right="0.235cm" fo:margin-top="0cm" fo:margin-bottom="0cm" style:contextual-spacing="false" fo:text-align="start" style:justify-single-word="false" fo:text-indent="0cm" style:auto-text-indent="false"/>
      <style:text-properties fo:letter-spacing="-0.004cm" officeooo:rsid="01e3c667" officeooo:paragraph-rsid="01e0f486"/>
    </style:style>
    <style:style style:name="P50" style:family="paragraph" style:parent-style-name="Text_20_body">
      <style:paragraph-properties fo:margin-left="0cm" fo:margin-right="0.235cm" fo:margin-top="0cm" fo:margin-bottom="0cm" style:contextual-spacing="false" fo:text-align="start" style:justify-single-word="false" fo:text-indent="0cm" style:auto-text-indent="false"/>
      <style:text-properties fo:letter-spacing="-0.004cm" officeooo:rsid="01e3c667" officeooo:paragraph-rsid="01e3c667"/>
    </style:style>
    <style:style style:name="P51" style:family="paragraph" style:parent-style-name="Text_20_body">
      <style:paragraph-properties fo:margin-left="0cm" fo:margin-right="0.235cm" fo:margin-top="0cm" fo:margin-bottom="0cm" style:contextual-spacing="false" fo:text-align="center" style:justify-single-word="false" fo:text-indent="0cm" style:auto-text-indent="false"/>
      <style:text-properties fo:letter-spacing="-0.004cm" officeooo:rsid="01e3c667" officeooo:paragraph-rsid="01e3c667"/>
    </style:style>
    <style:style style:name="P52" style:family="paragraph" style:parent-style-name="Text_20_body">
      <style:paragraph-properties fo:margin-left="0cm" fo:margin-right="0.235cm" fo:margin-top="0cm" fo:margin-bottom="0cm" style:contextual-spacing="false" fo:text-align="justify" style:justify-single-word="false" fo:text-indent="0cm" style:auto-text-indent="false"/>
      <style:text-properties style:font-name="PT Astra Serif" fo:letter-spacing="-0.004cm" officeooo:rsid="01e3c667" officeooo:paragraph-rsid="01e3c667"/>
    </style:style>
    <style:style style:name="P53" style:family="paragraph" style:parent-style-name="Text_20_body">
      <style:text-properties officeooo:rsid="01e46f4a" officeooo:paragraph-rsid="01e46f4a"/>
    </style:style>
    <style:style style:name="P54" style:family="paragraph" style:parent-style-name="Примечание">
      <style:text-properties officeooo:paragraph-rsid="01e6c657"/>
    </style:style>
    <style:style style:name="P55" style:family="paragraph" style:parent-style-name="Text_20_body">
      <style:paragraph-properties fo:margin-left="0cm" fo:margin-right="0.235cm" fo:margin-top="0cm" fo:margin-bottom="0cm" style:contextual-spacing="false" fo:text-align="start" style:justify-single-word="false" fo:text-indent="0cm" style:auto-text-indent="false"/>
      <style:text-properties fo:letter-spacing="-0.004cm" officeooo:rsid="01e3c667" officeooo:paragraph-rsid="01e46f4a"/>
    </style:style>
    <style:style style:name="P56" style:family="paragraph" style:parent-style-name="Text_20_body">
      <style:text-properties officeooo:paragraph-rsid="01e6c657"/>
    </style:style>
    <style:style style:name="P57" style:family="paragraph" style:parent-style-name="Text_20_body">
      <style:paragraph-properties fo:text-align="center" style:justify-single-word="false"/>
      <style:text-properties officeooo:rsid="01e6c657" officeooo:paragraph-rsid="01e6c657"/>
    </style:style>
    <style:style style:name="P58" style:family="paragraph" style:parent-style-name="Text_20_body">
      <style:paragraph-properties fo:text-align="justify" style:justify-single-word="false"/>
      <style:text-properties officeooo:rsid="01e6c657" officeooo:paragraph-rsid="01e6c657"/>
    </style:style>
    <style:style style:name="P59" style:family="paragraph" style:parent-style-name="Text_20_body">
      <style:paragraph-properties fo:text-align="start" style:justify-single-word="false"/>
      <style:text-properties officeooo:rsid="01e6c657" officeooo:paragraph-rsid="01e6c657"/>
    </style:style>
    <style:style style:name="P60" style:family="paragraph" style:parent-style-name="Примечание">
      <style:text-properties style:font-name="PT Astra Serif4" fo:font-size="12pt" fo:font-style="italic" style:font-name-asian="Noto Sans Mono CJK SC" style:font-size-asian="10pt" style:font-name-complex="Liberation Mono" style:font-size-complex="10pt"/>
    </style:style>
    <style:style style:name="P61" style:family="paragraph" style:parent-style-name="Примечание" style:list-style-name="L6">
      <style:text-properties style:font-name="PT Astra Serif4" fo:font-size="12pt" fo:font-style="italic" style:font-name-asian="Noto Sans Mono CJK SC" style:font-size-asian="10pt" style:font-name-complex="Liberation Mono" style:font-size-complex="10pt"/>
    </style:style>
    <style:style style:name="P62" style:family="paragraph" style:parent-style-name="Text_20_body">
      <style:paragraph-properties fo:text-align="start" style:justify-single-word="false"/>
      <style:text-properties officeooo:rsid="01e6c657" officeooo:paragraph-rsid="01e76a95"/>
    </style:style>
    <style:style style:name="P63" style:family="paragraph" style:parent-style-name="Text_20_body">
      <style:paragraph-properties fo:text-align="start" style:justify-single-word="false"/>
      <style:text-properties officeooo:rsid="01e76a95" officeooo:paragraph-rsid="01e76a95"/>
    </style:style>
    <style:style style:name="P64" style:family="paragraph" style:parent-style-name="Text_20_body">
      <style:paragraph-properties fo:margin-left="0.25cm" fo:margin-right="0.235cm" fo:margin-top="0cm" fo:margin-bottom="0cm" style:contextual-spacing="false" fo:text-align="center" style:justify-single-word="false" fo:text-indent="0cm" style:auto-text-indent="false"/>
      <style:text-properties fo:letter-spacing="-0.004cm" officeooo:rsid="01dfc8de" officeooo:paragraph-rsid="01e76a95"/>
    </style:style>
    <style:style style:name="P65" style:family="paragraph" style:parent-style-name="Text_20_body">
      <style:paragraph-properties fo:margin-left="0cm" fo:margin-right="0.235cm" fo:margin-top="0cm" fo:margin-bottom="0cm" style:contextual-spacing="false" fo:text-align="start" style:justify-single-word="false" fo:text-indent="0cm" style:auto-text-indent="false"/>
      <style:text-properties fo:letter-spacing="-0.004cm" officeooo:rsid="01e76a95" officeooo:paragraph-rsid="01e76a95"/>
    </style:style>
    <style:style style:name="P66" style:family="paragraph" style:parent-style-name="Text_20_body">
      <style:text-properties officeooo:rsid="01ea42e7" officeooo:paragraph-rsid="01ea42e7"/>
    </style:style>
    <style:style style:name="P67" style:family="paragraph" style:parent-style-name="Text_20_body">
      <style:paragraph-properties fo:text-align="center" style:justify-single-word="false"/>
      <style:text-properties officeooo:rsid="01ea42e7" officeooo:paragraph-rsid="01ea42e7"/>
    </style:style>
    <style:style style:name="P68" style:family="paragraph" style:parent-style-name="Text_20_body">
      <style:paragraph-properties fo:text-align="justify" style:justify-single-word="false"/>
      <style:text-properties fo:letter-spacing="-0.004cm" officeooo:rsid="01ea42e7" officeooo:paragraph-rsid="01ea42e7"/>
    </style:style>
    <style:style style:name="P69" style:family="paragraph" style:parent-style-name="Text_20_body">
      <style:paragraph-properties fo:text-align="start" style:justify-single-word="false"/>
      <style:text-properties officeooo:rsid="01e6c657" officeooo:paragraph-rsid="01ea42e7"/>
    </style:style>
    <style:style style:name="P70" style:family="paragraph" style:parent-style-name="Text_20_body">
      <style:text-properties officeooo:rsid="01ea6119" officeooo:paragraph-rsid="01ea6119"/>
    </style:style>
    <style:style style:name="P71" style:family="paragraph" style:parent-style-name="Text_20_body">
      <style:paragraph-properties fo:text-align="center" style:justify-single-word="false"/>
      <style:text-properties officeooo:rsid="01ecebce" officeooo:paragraph-rsid="01ecebce"/>
    </style:style>
    <style:style style:name="P72" style:family="paragraph" style:parent-style-name="Text_20_body">
      <style:paragraph-properties fo:text-align="justify" style:justify-single-word="false"/>
      <style:text-properties officeooo:rsid="01ecebce" officeooo:paragraph-rsid="01ecebce"/>
    </style:style>
    <style:style style:name="P73" style:family="paragraph" style:parent-style-name="Text_20_body">
      <style:paragraph-properties fo:text-align="justify" style:justify-single-word="false"/>
      <style:text-properties officeooo:rsid="01ecebce" officeooo:paragraph-rsid="01ee5f0b"/>
    </style:style>
    <style:style style:name="P74" style:family="paragraph" style:parent-style-name="Text_20_body">
      <style:paragraph-properties fo:text-align="justify" style:justify-single-word="false"/>
      <style:text-properties officeooo:rsid="01ed5eca" officeooo:paragraph-rsid="01ed5eca"/>
    </style:style>
    <style:style style:name="P75" style:family="paragraph" style:parent-style-name="Text_20_body">
      <style:paragraph-properties fo:text-align="start" style:justify-single-word="false"/>
      <style:text-properties officeooo:rsid="01ecebce" officeooo:paragraph-rsid="01ed5eca"/>
    </style:style>
    <style:style style:name="P76" style:family="paragraph" style:parent-style-name="Text_20_body">
      <style:paragraph-properties fo:text-align="start" style:justify-single-word="false"/>
      <style:text-properties officeooo:rsid="01ee3056" officeooo:paragraph-rsid="01ee3056"/>
    </style:style>
    <style:style style:name="P77" style:family="paragraph" style:parent-style-name="Text_20_body">
      <style:paragraph-properties fo:text-align="start" style:justify-single-word="false"/>
    </style:style>
    <style:style style:name="P78" style:family="paragraph" style:parent-style-name="Text_20_body">
      <style:text-properties officeooo:rsid="01ee3056" officeooo:paragraph-rsid="01ee3056"/>
    </style:style>
    <style:style style:name="P79" style:family="paragraph" style:parent-style-name="Text_20_body">
      <style:text-properties officeooo:paragraph-rsid="01ee5f0b"/>
    </style:style>
    <style:style style:name="P80" style:family="paragraph" style:parent-style-name="Text_20_body">
      <style:paragraph-properties fo:text-align="center" style:justify-single-word="false"/>
      <style:text-properties officeooo:rsid="01ecebce" officeooo:paragraph-rsid="01ee5f0b"/>
    </style:style>
    <style:style style:name="P81" style:family="paragraph" style:parent-style-name="Text_20_body">
      <style:paragraph-properties fo:text-align="justify" style:justify-single-word="false"/>
      <style:text-properties officeooo:rsid="01ee5f0b" officeooo:paragraph-rsid="01ee5f0b"/>
    </style:style>
    <style:style style:name="P82" style:family="paragraph" style:parent-style-name="Heading_20_2">
      <style:text-properties officeooo:paragraph-rsid="01d0afb8"/>
    </style:style>
    <style:style style:name="P83" style:family="paragraph" style:parent-style-name="Text_20_body" style:list-style-name="L7">
      <style:text-properties officeooo:rsid="01f197ec" officeooo:paragraph-rsid="01dc3105"/>
    </style:style>
    <style:style style:name="P84" style:family="paragraph" style:parent-style-name="Text_20_body" style:list-style-name="L7">
      <style:text-properties officeooo:rsid="01f197ec" officeooo:paragraph-rsid="01f197ec"/>
    </style:style>
    <style:style style:name="P85" style:family="paragraph" style:parent-style-name="Heading_20_3">
      <style:text-properties officeooo:rsid="032cf8b2" officeooo:paragraph-rsid="01f9d0e1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officeooo:rsid="0309a9dd" officeooo:paragraph-rsid="01f9d0e1"/>
    </style:style>
    <style:style style:name="P87" style:family="paragraph" style:parent-style-name="Text_20_body">
      <style:text-properties officeooo:rsid="03275a09" officeooo:paragraph-rsid="01f9d0e1"/>
    </style:style>
    <style:style style:name="P88" style:family="paragraph" style:parent-style-name="Text_20_body">
      <style:text-properties officeooo:rsid="030c6de9" officeooo:paragraph-rsid="01f9d0e1"/>
    </style:style>
    <style:style style:name="P89" style:family="paragraph" style:parent-style-name="Text_20_body">
      <style:text-properties fo:font-size="14pt" fo:letter-spacing="-0.004cm" officeooo:rsid="01f9d0e1" officeooo:paragraph-rsid="01f9d0e1" style:font-size-asian="14pt"/>
    </style:style>
    <style:style style:name="P90" style:family="paragraph" style:parent-style-name="Table_20_Paragraph">
      <style:paragraph-properties fo:margin-left="0.069cm" fo:margin-right="0cm" fo:line-height="0.531cm" fo:text-align="start" style:justify-single-word="false"/>
      <style:text-properties fo:font-size="14pt" fo:letter-spacing="-0.004cm" officeooo:rsid="030e1e5d" officeooo:paragraph-rsid="01f9d0e1" style:font-size-asian="14pt"/>
    </style:style>
    <style:style style:name="P91" style:family="paragraph" style:parent-style-name="Table_20_Paragraph">
      <style:paragraph-properties fo:margin-left="0.069cm" fo:margin-right="0cm" fo:line-height="0.531cm" fo:text-align="start" style:justify-single-word="false"/>
      <style:text-properties fo:font-size="14pt" fo:letter-spacing="-0.004cm" officeooo:rsid="03117c0b" officeooo:paragraph-rsid="01f9d0e1" style:font-size-asian="14pt"/>
    </style:style>
    <style:style style:name="P92" style:family="paragraph" style:parent-style-name="Table_20_Paragraph">
      <style:paragraph-properties fo:margin-left="0.069cm" fo:margin-right="0cm" fo:line-height="0.531cm" fo:text-align="start" style:justify-single-word="false"/>
      <style:text-properties fo:font-size="14pt" fo:letter-spacing="-0.004cm" officeooo:rsid="01fe2bfd" officeooo:paragraph-rsid="01fe2bfd" style:font-size-asian="14pt"/>
    </style:style>
    <style:style style:name="P93" style:family="paragraph" style:parent-style-name="Table_20_Paragraph">
      <style:paragraph-properties fo:margin-left="0.069cm" fo:margin-right="0cm" fo:line-height="0.531cm" fo:text-align="start" style:justify-single-word="false"/>
      <style:text-properties fo:font-size="14pt" fo:letter-spacing="-0.004cm" officeooo:rsid="0315c300" officeooo:paragraph-rsid="01f9d0e1" style:font-size-asian="14pt"/>
    </style:style>
    <style:style style:name="P94" style:family="paragraph" style:parent-style-name="Table_20_Paragraph">
      <style:paragraph-properties fo:margin-left="0.069cm" fo:margin-right="0cm" fo:line-height="0.531cm" fo:text-align="start" style:justify-single-word="false"/>
      <style:text-properties fo:font-size="14pt" fo:letter-spacing="-0.004cm" officeooo:rsid="03183bcf" officeooo:paragraph-rsid="01f9d0e1" style:font-size-asian="14pt"/>
    </style:style>
    <style:style style:name="P95" style:family="paragraph" style:parent-style-name="Table_20_Paragraph">
      <style:paragraph-properties fo:margin-left="0.069cm" fo:margin-right="0cm" fo:line-height="0.531cm" fo:text-align="start" style:justify-single-word="false"/>
      <style:text-properties fo:font-size="14pt" fo:letter-spacing="-0.004cm" officeooo:rsid="031c71a4" officeooo:paragraph-rsid="01f9d0e1" style:font-size-asian="14pt"/>
    </style:style>
    <style:style style:name="P96" style:family="paragraph" style:parent-style-name="Table_20_Paragraph">
      <style:paragraph-properties fo:margin-left="0.069cm" fo:margin-right="0cm" fo:line-height="0.531cm" fo:text-align="start" style:justify-single-word="false"/>
      <style:text-properties fo:font-size="14pt" fo:letter-spacing="-0.004cm" officeooo:rsid="031e0335" officeooo:paragraph-rsid="01f9d0e1" style:font-size-asian="14pt"/>
    </style:style>
    <style:style style:name="P97" style:family="paragraph" style:parent-style-name="Text_20_body">
      <style:paragraph-properties fo:margin-left="0cm" fo:margin-right="0cm" fo:text-indent="0cm" style:auto-text-indent="false"/>
      <style:text-properties officeooo:rsid="03221408" officeooo:paragraph-rsid="01f9d0e1"/>
    </style:style>
    <style:style style:name="P98" style:family="paragraph" style:parent-style-name="Text_20_body">
      <style:paragraph-properties fo:margin-left="0cm" fo:margin-right="0cm" fo:text-indent="0cm" style:auto-text-indent="false"/>
      <style:text-properties officeooo:rsid="0322c4fa" officeooo:paragraph-rsid="01f9d0e1"/>
    </style:style>
    <style:style style:name="P99" style:family="paragraph" style:parent-style-name="Text_20_body">
      <style:text-properties officeooo:rsid="01dc3c95"/>
    </style:style>
    <style:style style:name="P100" style:family="paragraph" style:parent-style-name="Heading_20_3">
      <style:text-properties officeooo:paragraph-rsid="01fbc993"/>
    </style:style>
    <style:style style:name="P101" style:family="paragraph" style:parent-style-name="Text_20_body">
      <style:text-properties officeooo:rsid="032e8980" officeooo:paragraph-rsid="0202bda4"/>
    </style:style>
    <style:style style:name="P102" style:family="paragraph" style:parent-style-name="Text_20_body">
      <style:text-properties fo:font-size="14pt" fo:letter-spacing="-0.004cm" officeooo:rsid="0202bda4" officeooo:paragraph-rsid="0202bda4" style:font-size-asian="14pt"/>
    </style:style>
    <style:style style:name="P103" style:family="paragraph" style:parent-style-name="Text_20_body">
      <style:paragraph-properties fo:text-align="start" style:justify-single-word="false"/>
      <style:text-properties officeooo:rsid="01ee3056" officeooo:paragraph-rsid="020764d1"/>
    </style:style>
    <style:style style:name="P104" style:family="paragraph" style:parent-style-name="Text_20_body">
      <style:paragraph-properties fo:text-align="start" style:justify-single-word="false"/>
      <style:text-properties officeooo:rsid="020920a6" officeooo:paragraph-rsid="020d70ed"/>
    </style:style>
    <style:style style:name="P105" style:family="paragraph" style:parent-style-name="Text_20_body">
      <style:paragraph-properties fo:text-align="start" style:justify-single-word="false"/>
      <style:text-properties officeooo:rsid="020920a6" officeooo:paragraph-rsid="020920a6"/>
    </style:style>
    <style:style style:name="P106" style:family="paragraph" style:parent-style-name="Text_20_body">
      <style:paragraph-properties fo:text-align="start" style:justify-single-word="false"/>
      <style:text-properties fo:language="ru" fo:country="RU" officeooo:rsid="020a2eaf" officeooo:paragraph-rsid="020a2eaf"/>
    </style:style>
    <style:style style:name="P107" style:family="paragraph" style:parent-style-name="Text_20_body">
      <style:paragraph-properties fo:text-align="start" style:justify-single-word="false"/>
      <style:text-properties fo:language="ru" fo:country="RU" officeooo:rsid="020c061c" officeooo:paragraph-rsid="020c061c"/>
    </style:style>
    <style:style style:name="P108" style:family="paragraph" style:parent-style-name="Text_20_body">
      <style:text-properties fo:language="en" fo:country="US" officeooo:rsid="020a2eaf" officeooo:paragraph-rsid="020a2eaf"/>
    </style:style>
    <style:style style:name="P109" style:family="paragraph" style:parent-style-name="Table_20_Contents">
      <style:paragraph-properties fo:text-align="center" style:justify-single-word="false"/>
      <style:text-properties style:font-name="PT Astra Serif2" fo:font-size="16.1499996185303pt" officeooo:rsid="02ff5d15" officeooo:paragraph-rsid="01f95a5c" style:font-name-asian="Tahoma" style:font-size-asian="14.1000003814697pt" style:font-name-complex="Lohit Devanagari1" style:font-size-complex="14.1000003814697pt"/>
    </style:style>
    <style:style style:name="P110" style:family="paragraph" style:parent-style-name="Table_20_Contents">
      <style:paragraph-properties fo:text-align="center" style:justify-single-word="false"/>
      <style:text-properties style:font-name="PT Astra Serif2" fo:font-size="16.1499996185303pt" officeooo:paragraph-rsid="01f95a5c" style:font-name-asian="Tahoma" style:font-size-asian="14.1000003814697pt" style:font-name-complex="Lohit Devanagari1" style:font-size-complex="14.1000003814697pt"/>
    </style:style>
    <style:style style:name="P111" style:family="paragraph" style:parent-style-name="Table_20_Paragraph">
      <style:paragraph-properties fo:margin-left="0.069cm" fo:margin-right="0cm" fo:line-height="0.563cm" fo:text-align="start" style:justify-single-word="false"/>
      <style:text-properties officeooo:paragraph-rsid="01f95a5c"/>
    </style:style>
    <style:style style:name="P112" style:family="paragraph" style:parent-style-name="Table_20_Paragraph">
      <style:paragraph-properties fo:margin-left="0.018cm" fo:margin-right="0cm" fo:line-height="0.563cm" fo:text-align="center" style:justify-single-word="false"/>
      <style:text-properties officeooo:paragraph-rsid="01f95a5c"/>
    </style:style>
    <style:style style:name="P113" style:family="paragraph" style:parent-style-name="Table_20_Paragraph">
      <style:paragraph-properties fo:margin-left="0.026cm" fo:margin-right="0.002cm" fo:line-height="0.563cm" fo:text-align="center" style:justify-single-word="false"/>
      <style:text-properties officeooo:rsid="032a7107" officeooo:paragraph-rsid="01f95a5c"/>
    </style:style>
    <style:style style:name="P114" style:family="paragraph" style:parent-style-name="Table_20_Paragraph">
      <style:paragraph-properties fo:margin-left="0.026cm" fo:margin-right="0cm" fo:line-height="0.563cm" fo:text-align="center" style:justify-single-word="false"/>
      <style:text-properties officeooo:rsid="032a7107" officeooo:paragraph-rsid="01f95a5c"/>
    </style:style>
    <style:style style:name="P115" style:family="paragraph" style:parent-style-name="Table_20_Paragraph">
      <style:paragraph-properties fo:margin-left="0.026cm" fo:margin-right="0.002cm" fo:line-height="0.563cm" fo:text-align="center" style:justify-single-word="false"/>
      <style:text-properties officeooo:paragraph-rsid="01f95a5c"/>
    </style:style>
    <style:style style:name="P116" style:family="paragraph" style:parent-style-name="Table_20_Paragraph">
      <style:paragraph-properties fo:margin-left="0.026cm" fo:margin-right="0cm" fo:line-height="0.563cm" fo:text-align="center" style:justify-single-word="false"/>
      <style:text-properties officeooo:paragraph-rsid="01f95a5c"/>
    </style:style>
    <style:style style:name="P117" style:family="paragraph" style:parent-style-name="Standard">
      <style:text-properties officeooo:rsid="01dc3c95" officeooo:paragraph-rsid="01f95a5c"/>
    </style:style>
    <style:style style:name="P118" style:family="paragraph" style:parent-style-name="Text_20_body">
      <style:text-properties officeooo:rsid="01dc3c95" officeooo:paragraph-rsid="01dc3c95"/>
    </style:style>
    <style:style style:name="P119" style:family="paragraph" style:parent-style-name="Text_20_body" style:list-style-name="L8"/>
    <style:style style:name="P120" style:family="paragraph" style:parent-style-name="Text_20_body" style:list-style-name="L8">
      <style:text-properties officeooo:rsid="01f2484d" officeooo:paragraph-rsid="01f2484d"/>
    </style:style>
    <style:style style:name="P121" style:family="paragraph" style:parent-style-name="Text_20_body">
      <style:text-properties officeooo:rsid="01f2484d" officeooo:paragraph-rsid="01f2484d"/>
    </style:style>
    <style:style style:name="P122" style:family="paragraph" style:parent-style-name="Heading_20_2">
      <style:text-properties officeooo:rsid="0222713b" officeooo:paragraph-rsid="0222713b"/>
    </style:style>
    <style:style style:name="P123" style:family="paragraph" style:parent-style-name="Text_20_body">
      <style:text-properties officeooo:rsid="0222713b" officeooo:paragraph-rsid="0222713b"/>
    </style:style>
    <style:style style:name="P124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125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126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127" style:family="paragraph" style:parent-style-name="Text_20_body">
      <style:paragraph-properties fo:margin-left="0.035cm" fo:margin-right="0cm" fo:margin-top="0.016cm" fo:margin-bottom="0cm" style:contextual-spacing="false"/>
    </style:style>
    <style:style style:name="P128" style:family="paragraph">
      <loext:graphic-properties draw:fill="none"/>
      <style:paragraph-properties fo:text-align="start"/>
      <style:text-properties fo:font-size="18pt"/>
    </style:style>
    <style:style style:name="P129" style:family="paragraph" style:parent-style-name="Text_20_body">
      <style:paragraph-properties fo:margin-left="0.035cm" fo:margin-right="0cm" fo:margin-top="0.018cm" fo:margin-bottom="0cm" style:contextual-spacing="false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de548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8e42" style:font-weight-asian="bold" style:font-weight-complex="bold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officeooo:rsid="01f68ab7"/>
    </style:style>
    <style:style style:name="T8" style:family="text">
      <style:text-properties officeooo:rsid="00160dc7"/>
    </style:style>
    <style:style style:name="T9" style:family="text">
      <style:text-properties officeooo:rsid="011b053c"/>
    </style:style>
    <style:style style:name="T10" style:family="text">
      <style:text-properties fo:language="ru" fo:country="RU" officeooo:rsid="005e1027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9bf97" style:font-style-asian="normal" style:font-style-complex="normal"/>
    </style:style>
    <style:style style:name="T13" style:family="text">
      <style:text-properties fo:font-style="normal" officeooo:rsid="00e01459" style:font-style-asian="normal" style:font-style-complex="normal"/>
    </style:style>
    <style:style style:name="T14" style:family="text">
      <style:text-properties fo:letter-spacing="-0.002cm"/>
    </style:style>
    <style:style style:name="T15" style:family="text">
      <style:text-properties fo:letter-spacing="-0.004cm"/>
    </style:style>
    <style:style style:name="T16" style:family="text">
      <style:text-properties officeooo:rsid="02105229"/>
    </style:style>
    <style:style style:name="T17" style:family="text">
      <style:text-properties officeooo:rsid="02118ea6"/>
    </style:style>
    <style:style style:name="T18" style:family="text">
      <style:text-properties officeooo:rsid="0214d31d"/>
    </style:style>
    <style:style style:name="T19" style:family="text">
      <style:text-properties officeooo:rsid="021794a9"/>
    </style:style>
    <style:style style:name="T20" style:family="text">
      <style:text-properties officeooo:rsid="0218e81d"/>
    </style:style>
    <style:style style:name="T21" style:family="text">
      <style:text-properties officeooo:rsid="021bd60a"/>
    </style:style>
    <style:style style:name="T22" style:family="text">
      <style:text-properties officeooo:rsid="021d8a00"/>
    </style:style>
    <style:style style:name="T23" style:family="text">
      <style:text-properties officeooo:rsid="021ff86b"/>
    </style:style>
    <style:style style:name="T24" style:family="text">
      <style:text-properties fo:language="en" fo:country="US" officeooo:rsid="021ff86b"/>
    </style:style>
    <style:style style:name="T25" style:family="text">
      <style:text-properties fo:language="ru" fo:country="RU" officeooo:rsid="021ff86b"/>
    </style:style>
    <style:style style:name="T26" style:family="text">
      <style:text-properties style:text-position="sub 58%" fo:language="ru" fo:country="RU" officeooo:rsid="021ff86b"/>
    </style:style>
    <style:style style:name="T27" style:family="text">
      <style:text-properties officeooo:rsid="01c285a9"/>
    </style:style>
    <style:style style:name="T28" style:family="text">
      <style:text-properties officeooo:rsid="01a77d50"/>
    </style:style>
    <style:style style:name="T29" style:family="text">
      <style:text-properties officeooo:rsid="01dfb4a2"/>
    </style:style>
    <style:style style:name="T30" style:family="text">
      <style:text-properties style:text-position="sub 58%"/>
    </style:style>
    <style:style style:name="T31" style:family="text">
      <style:text-properties style:text-position="super 58%"/>
    </style:style>
    <style:style style:name="T32" style:family="text">
      <style:text-properties fo:letter-spacing="-0.004cm" officeooo:rsid="01dfc8de"/>
    </style:style>
    <style:style style:name="T33" style:family="text">
      <style:text-properties fo:font-variant="normal" fo:text-transform="none" style:use-window-font-color="true" loext:opacity="0%" fo:letter-spacing="normal"/>
    </style:style>
    <style:style style:name="T34" style:family="text">
      <style:text-properties fo:font-variant="normal" fo:text-transform="none" style:use-window-font-color="true" loext:opacity="0%" fo:font-weight="normal" style:font-weight-asian="normal" style:font-weight-complex="normal"/>
    </style:style>
    <style:style style:name="T35" style:family="text">
      <style:text-properties fo:font-variant="normal" fo:text-transform="none" style:use-window-font-color="true" loext:opacity="0%" style:text-position="sub 58%" fo:font-weight="normal" style:font-weight-asian="normal" style:font-weight-complex="normal"/>
    </style:style>
    <style:style style:name="T36" style:family="text">
      <style:text-properties fo:font-variant="normal" fo:text-transform="none" style:use-window-font-color="true" loext:opacity="0%" style:text-position="super 58%" fo:font-weight="normal" style:font-weight-asian="normal" style:font-weight-complex="normal"/>
    </style:style>
    <style:style style:name="T37" style:family="text">
      <style:text-properties fo:font-variant="normal" fo:text-transform="none" style:use-window-font-color="true" loext:opacity="0%" style:text-position="0% 100%" fo:font-weight="normal" style:font-weight-asian="normal" style:font-weight-complex="normal"/>
    </style:style>
    <style:style style:name="T38" style:family="text">
      <style:text-properties fo:font-variant="normal" fo:text-transform="none" style:use-window-font-color="true" loext:opacity="0%" style:text-position="0% 100%" fo:letter-spacing="normal"/>
    </style:style>
    <style:style style:name="T39" style:family="text">
      <style:text-properties fo:font-variant="normal" fo:text-transform="none" style:use-window-font-color="true" loext:opacity="0%" style:text-position="0% 100%" fo:font-weight="normal" officeooo:rsid="01e0f486" style:font-weight-asian="normal" style:font-weight-complex="normal"/>
    </style:style>
    <style:style style:name="T40" style:family="text">
      <style:text-properties fo:font-variant="normal" fo:text-transform="none" style:use-window-font-color="true" loext:opacity="0%" style:text-position="0% 100%" fo:letter-spacing="normal" officeooo:rsid="01e0f486"/>
    </style:style>
    <style:style style:name="T41" style:family="text">
      <style:text-properties fo:font-variant="normal" fo:text-transform="none" style:use-window-font-color="true" loext:opacity="0%" style:text-position="0% 100%" fo:letter-spacing="normal" fo:font-weight="normal" officeooo:rsid="01e0f486" style:font-weight-asian="normal" style:font-weight-complex="normal"/>
    </style:style>
    <style:style style:name="T42" style:family="text">
      <style:text-properties fo:font-variant="normal" fo:text-transform="none" style:use-window-font-color="true" loext:opacity="0%" style:text-position="0% 100%" fo:letter-spacing="-0.004cm" fo:font-weight="normal" officeooo:rsid="01dfc8de" style:font-weight-asian="normal" style:font-weight-complex="normal"/>
    </style:style>
    <style:style style:name="T43" style:family="text">
      <style:text-properties fo:font-variant="normal" fo:text-transform="none" style:use-window-font-color="true" loext:opacity="0%" fo:letter-spacing="normal" officeooo:rsid="01dfc8de"/>
    </style:style>
    <style:style style:name="T44" style:family="text">
      <style:text-properties fo:font-size="14pt" style:font-size-asian="14pt"/>
    </style:style>
    <style:style style:name="T45" style:family="text">
      <style:text-properties fo:font-size="14pt" fo:letter-spacing="-0.012cm" style:font-size-asian="14pt"/>
    </style:style>
    <style:style style:name="T46" style:family="text">
      <style:text-properties fo:font-size="14pt" fo:letter-spacing="-0.016cm" style:font-size-asian="14pt"/>
    </style:style>
    <style:style style:name="T47" style:family="text">
      <style:text-properties fo:font-size="14pt" fo:letter-spacing="-0.014cm" style:font-size-asian="14pt"/>
    </style:style>
    <style:style style:name="T48" style:family="text">
      <style:text-properties fo:font-size="14pt" fo:letter-spacing="-0.014cm" officeooo:rsid="030c6de9" style:font-size-asian="14pt"/>
    </style:style>
    <style:style style:name="T49" style:family="text">
      <style:text-properties fo:font-size="14pt" fo:letter-spacing="-0.004cm" style:font-size-asian="14pt"/>
    </style:style>
    <style:style style:name="T50" style:family="text">
      <style:text-properties style:font-name="PT Astra Serif"/>
    </style:style>
    <style:style style:name="T51" style:family="text">
      <style:text-properties style:text-position="sub 58%" style:font-name="PT Astra Serif"/>
    </style:style>
    <style:style style:name="T52" style:family="text">
      <style:text-properties style:text-position="0% 100%" style:font-name="PT Astra Serif"/>
    </style:style>
    <style:style style:name="T53" style:family="text">
      <style:text-properties officeooo:rsid="01e55350"/>
    </style:style>
    <style:style style:name="T54" style:family="text">
      <style:text-properties officeooo:rsid="01e46f4a"/>
    </style:style>
    <style:style style:name="T55" style:family="text">
      <style:text-properties style:font-name="PT Astra Serif" fo:letter-spacing="-0.004cm" officeooo:rsid="01e3c667"/>
    </style:style>
    <style:style style:name="T56" style:family="text">
      <style:text-properties style:font-name="PT Astra Serif" fo:letter-spacing="-0.004cm"/>
    </style:style>
    <style:style style:name="T57" style:family="text">
      <style:text-properties style:font-name="PT Astra Serif" fo:letter-spacing="-0.004cm" officeooo:rsid="01e6c657"/>
    </style:style>
    <style:style style:name="T58" style:family="text">
      <style:text-properties style:text-position="0% 100%" style:font-name="PT Astra Serif" officeooo:rsid="01e46f4a"/>
    </style:style>
    <style:style style:name="T59" style:family="text">
      <style:text-properties fo:letter-spacing="-0.025cm"/>
    </style:style>
    <style:style style:name="T60" style:family="text">
      <style:text-properties fo:letter-spacing="-0.026cm"/>
    </style:style>
    <style:style style:name="T61" style:family="text">
      <style:text-properties style:text-position="sub 58%" officeooo:rsid="01e46f4a"/>
    </style:style>
    <style:style style:name="T62" style:family="text">
      <style:text-properties style:text-position="0% 100%" officeooo:rsid="01e46f4a"/>
    </style:style>
    <style:style style:name="T63" style:family="text">
      <style:text-properties style:text-position="0% 100%"/>
    </style:style>
    <style:style style:name="T64" style:family="text">
      <style:text-properties style:text-position="0% 100%" officeooo:rsid="01e76a95"/>
    </style:style>
    <style:style style:name="T65" style:family="text">
      <style:text-properties style:text-position="0% 100%" style:font-name="PT Astra Serif" fo:letter-spacing="-0.004cm" officeooo:rsid="01e3c667"/>
    </style:style>
    <style:style style:name="T66" style:family="text">
      <style:text-properties style:text-position="0% 100%" style:font-name="PT Astra Serif" officeooo:rsid="01e3c667"/>
    </style:style>
    <style:style style:name="T67" style:family="text">
      <style:text-properties style:text-position="sub 58%" officeooo:rsid="01e76a95"/>
    </style:style>
    <style:style style:name="T68" style:family="text">
      <style:text-properties style:text-position="0% 100%" fo:letter-spacing="-0.004cm" officeooo:rsid="01e46f4a"/>
    </style:style>
    <style:style style:name="T69" style:family="text">
      <style:text-properties style:text-position="0% 100%" fo:letter-spacing="-0.004cm" officeooo:rsid="01e76a95"/>
    </style:style>
    <style:style style:name="T70" style:family="text">
      <style:text-properties style:text-position="0% 100%" fo:letter-spacing="-0.004cm" officeooo:rsid="01dfc8de"/>
    </style:style>
    <style:style style:name="T71" style:family="text">
      <style:text-properties style:text-position="sub 58%" fo:letter-spacing="-0.004cm" officeooo:rsid="01dfc8de"/>
    </style:style>
    <style:style style:name="T72" style:family="text">
      <style:text-properties style:text-position="super 58%" fo:letter-spacing="-0.004cm" officeooo:rsid="01dfc8de"/>
    </style:style>
    <style:style style:name="T73" style:family="text">
      <style:text-properties style:text-position="0% 100%" officeooo:rsid="01ea42e7"/>
    </style:style>
    <style:style style:name="T74" style:family="text">
      <style:text-properties officeooo:rsid="01ea6119"/>
    </style:style>
    <style:style style:name="T75" style:family="text">
      <style:text-properties officeooo:rsid="01ee5f0b"/>
    </style:style>
    <style:style style:name="T76" style:family="text">
      <style:text-properties officeooo:rsid="01ed5eca"/>
    </style:style>
    <style:style style:name="T77" style:family="text">
      <style:text-properties style:text-position="0% 100%" officeooo:rsid="01ee5f0b"/>
    </style:style>
    <style:style style:name="T78" style:family="text">
      <style:text-properties style:text-position="sub 58%" officeooo:rsid="01ecebce"/>
    </style:style>
    <style:style style:name="T79" style:family="text">
      <style:text-properties style:text-position="0% 100%" officeooo:rsid="01ecebce"/>
    </style:style>
    <style:style style:name="T80" style:family="text">
      <style:text-properties style:text-position="0% 100%" officeooo:rsid="01ed5eca"/>
    </style:style>
    <style:style style:name="T81" style:family="text">
      <style:text-properties officeooo:rsid="01f2f670"/>
    </style:style>
    <style:style style:name="T82" style:family="text">
      <style:text-properties fo:font-variant="normal" fo:text-transform="none" style:use-window-font-color="true" loext:opacity="0%" fo:font-size="12pt" fo:letter-spacing="normal" officeooo:rsid="01dfc8de" style:font-size-asian="12pt" style:font-size-complex="12pt"/>
    </style:style>
    <style:style style:name="T83" style:family="text">
      <style:text-properties fo:font-variant="normal" fo:text-transform="none" style:use-window-font-color="true" loext:opacity="0%" fo:font-size="14pt" fo:letter-spacing="normal" fo:font-weight="normal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style:use-window-font-color="true" loext:opacity="0%" style:text-position="sub 58%" fo:font-size="14pt" fo:letter-spacing="normal" fo:font-weight="normal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style:use-window-font-color="true" loext:opacity="0%" style:text-position="0% 100%" fo:font-size="14pt" fo:letter-spacing="normal" fo:font-weight="normal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style:use-window-font-color="true" loext:opacity="0%" style:text-position="0% 100%" fo:font-size="12pt" fo:letter-spacing="normal" officeooo:rsid="01dfc8de" style:font-size-asian="12pt" style:font-size-complex="12pt"/>
    </style:style>
    <style:style style:name="T87" style:family="text">
      <style:text-properties fo:font-weight="normal" officeooo:rsid="01ee5f0b" style:font-weight-asian="normal" style:font-weight-complex="normal"/>
    </style:style>
    <style:style style:name="T88" style:family="text">
      <style:text-properties fo:font-weight="normal" officeooo:rsid="01f492d6" style:font-weight-asian="normal" style:font-weight-complex="normal"/>
    </style:style>
    <style:style style:name="T89" style:family="text">
      <style:text-properties style:text-position="sub 58%" officeooo:rsid="01ee5f0b"/>
    </style:style>
    <style:style style:name="T90" style:family="text">
      <style:text-properties officeooo:rsid="01dc7fb1"/>
    </style:style>
    <style:style style:name="T91" style:family="text">
      <style:text-properties officeooo:rsid="01f95a5c"/>
    </style:style>
    <style:style style:name="T92" style:family="text">
      <style:text-properties officeooo:rsid="032df775"/>
    </style:style>
    <style:style style:name="T93" style:family="text">
      <style:text-properties officeooo:rsid="030b658a"/>
    </style:style>
    <style:style style:name="T94" style:family="text">
      <style:text-properties officeooo:rsid="030ecb74"/>
    </style:style>
    <style:style style:name="T95" style:family="text">
      <style:text-properties officeooo:rsid="030f20f2"/>
    </style:style>
    <style:style style:name="T96" style:family="text">
      <style:text-properties fo:font-size="14pt" fo:letter-spacing="-0.004cm" officeooo:rsid="03183bcf" style:font-size-asian="14pt"/>
    </style:style>
    <style:style style:name="T97" style:family="text">
      <style:text-properties officeooo:rsid="031a7602"/>
    </style:style>
    <style:style style:name="T98" style:family="text">
      <style:text-properties officeooo:rsid="031c71a4"/>
    </style:style>
    <style:style style:name="T99" style:family="text">
      <style:text-properties officeooo:rsid="031eba94"/>
    </style:style>
    <style:style style:name="T100" style:family="text">
      <style:text-properties officeooo:rsid="03221408"/>
    </style:style>
    <style:style style:name="T101" style:family="text">
      <style:text-properties officeooo:rsid="03264420"/>
    </style:style>
    <style:style style:name="T102" style:family="text">
      <style:text-properties officeooo:rsid="0316cf8e"/>
    </style:style>
    <style:style style:name="T103" style:family="text">
      <style:text-properties officeooo:rsid="032198f1"/>
    </style:style>
    <style:style style:name="T104" style:family="text">
      <style:text-properties officeooo:rsid="0324024f"/>
    </style:style>
    <style:style style:name="T105" style:family="text">
      <style:text-properties officeooo:rsid="01fc38ba"/>
    </style:style>
    <style:style style:name="T106" style:family="text">
      <style:text-properties officeooo:rsid="01ff4ae4"/>
    </style:style>
    <style:style style:name="T107" style:family="text">
      <style:text-properties officeooo:rsid="02043720"/>
    </style:style>
    <style:style style:name="T108" style:family="text">
      <style:text-properties officeooo:rsid="02065111"/>
    </style:style>
    <style:style style:name="T109" style:family="text">
      <style:text-properties officeooo:rsid="01ff4e74"/>
    </style:style>
    <style:style style:name="T110" style:family="text">
      <style:text-properties officeooo:rsid="0201b593"/>
    </style:style>
    <style:style style:name="T111" style:family="text">
      <style:text-properties style:text-position="0% 100%" officeooo:rsid="0202bda4"/>
    </style:style>
    <style:style style:name="T112" style:family="text">
      <style:text-properties style:text-position="0% 100%" fo:font-size="14pt" fo:letter-spacing="-0.004cm" officeooo:rsid="0202bda4" style:font-size-asian="14pt"/>
    </style:style>
    <style:style style:name="T113" style:family="text">
      <style:text-properties officeooo:rsid="020d70ed"/>
    </style:style>
    <style:style style:name="T114" style:family="text">
      <style:text-properties fo:language="ru" fo:country="RU" officeooo:rsid="020a2eaf"/>
    </style:style>
    <style:style style:name="T115" style:family="text">
      <style:text-properties fo:language="ru" fo:country="RU" officeooo:rsid="020d70ed"/>
    </style:style>
    <style:style style:name="T116" style:family="text">
      <style:text-properties fo:language="ru" fo:country="RU" officeooo:rsid="020c061c"/>
    </style:style>
    <style:style style:name="T117" style:family="text">
      <style:text-properties fo:language="ru" fo:country="RU" officeooo:rsid="020e76f4"/>
    </style:style>
    <style:style style:name="T118" style:family="text">
      <style:text-properties officeooo:rsid="02ff5d15"/>
    </style:style>
    <style:style style:name="T119" style:family="text">
      <style:text-properties fo:font-size="14pt" fo:letter-spacing="-0.021cm" style:font-size-asian="14pt"/>
    </style:style>
    <style:style style:name="T120" style:family="text">
      <style:text-properties fo:font-size="14pt" fo:letter-spacing="-0.018cm" style:font-size-asian="14pt"/>
    </style:style>
    <style:style style:name="T121" style:family="text">
      <style:text-properties fo:font-size="14pt" fo:letter-spacing="-0.009cm" style:font-size-asian="14pt"/>
    </style:style>
    <style:style style:name="T122" style:family="text">
      <style:text-properties fo:font-size="14pt" fo:letter-spacing="-0.03cm" style:font-size-asian="14pt"/>
    </style:style>
    <style:style style:name="T123" style:family="text">
      <style:text-properties fo:font-size="14pt" fo:letter-spacing="-0.023cm" style:font-size-asian="14pt"/>
    </style:style>
    <style:style style:name="T124" style:family="text">
      <style:text-properties fo:font-size="14pt" fo:letter-spacing="-0.026cm" style:font-size-asian="14pt"/>
    </style:style>
    <style:style style:name="T125" style:family="text">
      <style:text-properties fo:font-size="14pt" fo:letter-spacing="-0.028cm" style:font-size-asian="14pt"/>
    </style:style>
    <style:style style:name="T126" style:family="text">
      <style:text-properties fo:font-size="14pt" fo:letter-spacing="-0.007cm" style:font-size-asian="14pt"/>
    </style:style>
    <style:style style:name="T127" style:family="text">
      <style:text-properties fo:font-size="14pt" fo:letter-spacing="-0.011cm" style:font-size-asian="14pt"/>
    </style:style>
    <style:style style:name="T128" style:family="text">
      <style:text-properties fo:font-size="14pt" fo:letter-spacing="-0.005cm" style:font-size-asian="14pt"/>
    </style:style>
    <style:style style:name="T129" style:family="text">
      <style:text-properties fo:font-size="14pt" fo:letter-spacing="0.002cm" style:font-size-asian="14pt"/>
    </style:style>
    <style:style style:name="T130" style:family="text">
      <style:text-properties fo:font-size="14pt" fo:letter-spacing="-0.019cm" style:font-size-asian="14pt"/>
    </style:style>
    <style:style style:name="T131" style:family="text">
      <style:text-properties fo:font-size="14pt" fo:letter-spacing="-0.007cm" officeooo:rsid="020def9a" style:font-size-asian="14pt"/>
    </style:style>
    <style:style style:name="T132" style:family="text">
      <style:text-properties fo:font-size="10pt" style:font-size-asian="10pt"/>
    </style:style>
    <style:style style:name="T133" style:family="text">
      <style:text-properties fo:font-size="10pt" fo:letter-spacing="-0.009cm" style:font-size-asian="10pt"/>
    </style:style>
    <style:style style:name="T134" style:family="text">
      <style:text-properties fo:letter-spacing="-0.009cm"/>
    </style:style>
    <style:style style:name="fr1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ОПРОВОЖДЕНИЕ И ОБСЛУЖИВАНИЕ ПРОГРАММНОГО ОБЕСПЕЧЕНИЯ КОМПЬЮТЕРНЫХ СИСТЕМ</text:p>
      <text:p text:style-name="P8"/>
      <text:p text:style-name="P9"/>
      <text:p text:style-name="P9">ЛАБОРАТОРНАЯ РАБОТА №<text:span text:style-name="T2">3</text:span></text:p>
      <text:p text:style-name="P10">по теме:</text:p>
      <text:h text:style-name="P11" text:outline-level="1">Показатели экономической эффективности</text:h>
      <text:p text:style-name="Заголовок_20_2_20_титул"/>
      <text:p text:style-name="Заголовок_20_2_20_титул"/>
      <text:p text:style-name="P12"><text:span text:style-name="T3">Выполн</text:span><text:span text:style-name="T4">ил:</text:span><text:span text:style-name="T5"> </text:span></text:p>
      <text:p text:style-name="P12"><text:span text:style-name="T6">студент ЕПК,</text:span> <text:span text:style-name="T7">И-42 группы</text:span></text:p>
      <text:p text:style-name="P13">Самсыка Р. М.</text:p>
      <text:p text:style-name="P14"/>
      <text:p text:style-name="P15"><text:span text:style-name="T6">Проверил</text:span>:</text:p>
      <text:p text:style-name="P16"><text:span text:style-name="T6">преподаватель</text:span><text:span text:style-name="T8"> </text:span><text:span text:style-name="T9">спец</text:span><text:span text:style-name="T10">дисциплин</text:span></text:p>
      <text:p text:style-name="P17">Фомин А. Т.</text:p>
      <text:p text:style-name="P18"/>
      <text:p text:style-name="P18"/>
      <text:p text:style-name="P18"/>
      <text:p text:style-name="P18"/>
      <text:p text:style-name="P18"/>
      <text:p text:style-name="P4"/>
      <text:p text:style-name="P4"/>
      <text:p text:style-name="P4"/>
      <text:p text:style-name="P4"/>
      <text:p text:style-name="P19"><text:span text:style-name="Emphasis"/></text:p>
      <text:p text:style-name="P4">Ейск <text:span text:style-name="Emphasis"><text:span text:style-name="T11">20</text:span></text:span><text:span text:style-name="Emphasis"><text:span text:style-name="T12">2</text:span></text:span><text:span text:style-name="Emphasis"><text:span text:style-name="T13">5</text:span></text:span></text:p>
      <text:h text:style-name="P20" text:outline-level="3" text:is-list-header="true">Цель<text:span text:style-name="T14"> </text:span><text:span text:style-name="T15">работы</text:span></text:h>
      <text:p text:style-name="Text_20_body"><text:tab/><text:span text:style-name="T2">Научиться рассчитывать показатели экономической эффективности информационной системы, исходя из текущего размера оплаты труда, стоимости товаров и услуг.</text:span></text:p>
      <text:h text:style-name="P21" text:outline-level="2">Вопросы учебника</text:h>
      <text:list xml:id="list1242431584" text:style-name="L1">
        <text:list-item>
          <text:p text:style-name="P22"><text:span text:style-name="T16">Ф</text:span>акторы, влияющие на стоимость внедрения ИС:</text:p>
        </text:list-item>
      </text:list>
      <text:list text:style-name="L2">
        <text:list-item>
          <text:p text:style-name="P23">непредвиденные расходы</text:p>
        </text:list-item>
        <text:list-item>
          <text:p text:style-name="P23">условия контракта</text:p>
        </text:list-item>
        <text:list-item>
          <text:p text:style-name="P23">изменение требований</text:p>
        </text:list-item>
        <text:list-item>
          <text:p text:style-name="P23">финансовая нестабильность</text:p>
          <text:p text:style-name="P23"/>
        </text:list-item>
      </text:list>
      <text:list xml:id="list201508692111063" text:continue-list="list1242431584" text:style-name="L1">
        <text:list-item>
          <text:p text:style-name="P22"><text:span text:style-name="T17">Н</text:span>аиболее часто используемые <text:s/>показатели экономической эффективности ИС:</text:p>
        </text:list-item>
      </text:list>
      <text:list text:style-name="L3">
        <text:list-item>
          <text:p text:style-name="P24">совокупная стоимость владения</text:p>
        </text:list-item>
        <text:list-item>
          <text:p text:style-name="P25">чистая приведённая стоимость</text:p>
        </text:list-item>
        <text:list-item>
          <text:p text:style-name="P25">норма возврата инвестиий</text:p>
        </text:list-item>
        <text:list-item>
          <text:p text:style-name="P25">срок окупаемости</text:p>
          <text:p text:style-name="P25"/>
        </text:list-item>
      </text:list>
      <text:list xml:id="list201506975328709" text:continue-list="list201508692111063" text:style-name="L1">
        <text:list-item>
          <text:p text:style-name="P26"><text:span text:style-name="T18">В</text:span> расчете ТСО учитываются показатели:</text:p>
        </text:list-item>
      </text:list>
      <text:list text:style-name="L4">
        <text:list-item>
          <text:p text:style-name="P27">стоимость приобретения и поддержки оборудования необходимого для работы </text:p>
        </text:list-item>
        <text:list-item>
          <text:p text:style-name="P27">стоимость программного обеспечения и его поддержка поставщиком</text:p>
        </text:list-item>
        <text:list-item>
          <text:p text:style-name="P27">стоимость внедрения программного обеспечения</text:p>
        </text:list-item>
        <text:list-item>
          <text:p text:style-name="P27">стоимость поддержки продукта</text:p>
        </text:list-item>
        <text:list-item>
          <text:p text:style-name="P27">стоимость обучения персонала</text:p>
        </text:list-item>
      </text:list>
      <text:p text:style-name="P28"/>
      <text:list text:continue-list="list201506975328709" text:style-name="L1">
        <text:list-item>
          <text:p text:style-name="P22"><text:span text:style-name="T19">К</text:span>апитальные и эксплуатационные затраты на внедрение ИС <text:span text:style-name="T19">различаются </text:span><text:span text:style-name="T20">тем, что капитальные требуются только при внедрении системы, а эксплуатационные требуются постоянно для работы системы.</text:span></text:p>
          <text:p text:style-name="P22"/>
        </text:list-item>
        <text:list-item>
          <text:p text:style-name="P22"><text:span text:style-name="T21">Ч</text:span>истая <text:s/>приведенная стоимость (NPV) <text:span text:style-name="T21">это </text:span><text:span text:style-name="T22">накопленные деньги из</text:span><text:span text:style-name="T21"> денежн</text:span><text:span text:style-name="T22">ого</text:span><text:span text:style-name="T21"> поток</text:span><text:span text:style-name="T22">а</text:span><text:span text:style-name="T21"> образованн</text:span><text:span text:style-name="T22">ого</text:span><text:span text:style-name="T21"> работой системы. </text:span><text:span text:style-name="T22">Расчитывается как сумма внутреннего и внешнего потоков.</text:span></text:p>
          <text:p text:style-name="P22"/>
        </text:list-item>
        <text:list-item>
          <text:p text:style-name="P22"><text:soft-page-break/><text:span text:style-name="T23">Формула</text:span> расч<text:span text:style-name="T23">ёта</text:span> норм<text:span text:style-name="T23">ы</text:span> возврата инвестиций (ROI): <text:span text:style-name="T24">ROI = </text:span><text:span text:style-name="T25">Эф/И</text:span><text:span text:style-name="T26">1</text:span></text:p>
          <text:p text:style-name="P29">Где Эф — эффект от внедрения в денежных единицах,</text:p>
          <text:p text:style-name="P30">И — инвестиции в информационные единицы.</text:p>
        </text:list-item>
      </text:list>
      <text:h text:style-name="Heading_20_2" text:outline-level="2"><text:span text:style-name="T27">1 </text:span>Теоретические с<text:span text:style-name="T28">в</text:span>едения</text:h>
      <text:h text:style-name="Heading_20_3" text:outline-level="3">1.1 Расчет себестоимости программного продукта</text:h>
      <text:p text:style-name="P31"><text:span text:style-name="T29">О</text:span>сновной задачей технико-экономического обоснования является определение технического и экономического эффекта от его <text:span text:style-name="T15">использования.</text:span></text:p>
      <text:p text:style-name="P32">Выполним расчет себестоимости программного продукта по формуле:</text:p>
      <text:p text:style-name="P33">С =М<text:span text:style-name="T30">вс</text:span> + Э + З<text:span text:style-name="T30">зп</text:span><text:span text:style-name="T31">о</text:span> + З<text:span text:style-name="T30">зп</text:span><text:span text:style-name="T31">д</text:span> + З<text:span text:style-name="T30">сн</text:span> + Н,</text:p>
      <text:p text:style-name="P34"><text:span text:style-name="T32">где Мвс — затраты на вспомогательные материалы, </text:span><text:span text:style-name="Strong_20_Emphasis"><text:span text:style-name="T33">₽</text:span></text:span><text:span text:style-name="T32">.</text:span></text:p>
      <text:p text:style-name="P35">Э — затраты на электроэнергию и технологические цели, <text:span text:style-name="Strong_20_Emphasis"><text:span text:style-name="T33">₽</text:span></text:span></text:p>
      <text:p text:style-name="P36"><text:span text:style-name="Strong_20_Emphasis"><text:span text:style-name="T34">З</text:span></text:span><text:span text:style-name="Strong_20_Emphasis"><text:span text:style-name="T35">зп</text:span></text:span><text:span text:style-name="Strong_20_Emphasis"><text:span text:style-name="T36">о</text:span></text:span><text:span text:style-name="Strong_20_Emphasis"><text:span text:style-name="T37"> — основная зарплата работника, </text:span></text:span><text:span text:style-name="Strong_20_Emphasis"><text:span text:style-name="T38">₽</text:span></text:span></text:p>
      <text:p text:style-name="P36"><text:span text:style-name="Strong_20_Emphasis"><text:span text:style-name="T37">З</text:span></text:span><text:span text:style-name="Strong_20_Emphasis"><text:span text:style-name="T35">зп</text:span></text:span><text:span text:style-name="Strong_20_Emphasis"><text:span text:style-name="T36">д</text:span></text:span><text:span text:style-name="Strong_20_Emphasis"><text:span text:style-name="T37"> — </text:span></text:span><text:span text:style-name="Strong_20_Emphasis"><text:span text:style-name="T39">дополнительная зарплата разработчика,</text:span></text:span><text:span text:style-name="Strong_20_Emphasis"><text:span text:style-name="T37"> </text:span></text:span><text:span text:style-name="Strong_20_Emphasis"><text:span text:style-name="T40">₽</text:span></text:span></text:p>
      <text:p text:style-name="P36"><text:span text:style-name="Strong_20_Emphasis"><text:span text:style-name="T37">З</text:span></text:span><text:span text:style-name="Strong_20_Emphasis"><text:span text:style-name="T35">сн —</text:span></text:span><text:span text:style-name="Strong_20_Emphasis"><text:span text:style-name="T37"> </text:span></text:span><text:span text:style-name="Strong_20_Emphasis"><text:span text:style-name="T39">отчисления на соц. нужды,</text:span></text:span><text:span text:style-name="Strong_20_Emphasis"><text:span text:style-name="T37"> </text:span></text:span><text:span text:style-name="Strong_20_Emphasis"><text:span text:style-name="T40">₽</text:span></text:span></text:p>
      <text:p text:style-name="P36"><text:span text:style-name="Strong_20_Emphasis"><text:span text:style-name="T41">Н — накладные расходы,</text:span></text:span><text:span text:style-name="Strong_20_Emphasis"><text:span text:style-name="T37"> </text:span></text:span><text:span text:style-name="Strong_20_Emphasis"><text:span text:style-name="T40">₽</text:span></text:span></text:p>
      <text:p text:style-name="P36"><text:span text:style-name="Strong_20_Emphasis"><text:span text:style-name="T41">Затраты на вспомогательные материалы</text:span></text:span></text:p>
      <text:p text:style-name="P37">Таблица <text:sequence text:ref-name="refTable0" text:name="Table" text:formula="ooow:Table+1" style:num-format="1">1</text:sequence><text:s/><text:span text:style-name="Strong_20_Emphasis"><text:span text:style-name="T42">—</text:span></text:span> Затраты на вспомогательные материал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>Наименование затрат</text:p>
          </table:table-cell>
          <table:table-cell table:style-name="Таблица1.A1" office:value-type="string">
            <text:p text:style-name="P38">Кол-во, шт.</text:p>
          </table:table-cell>
          <table:table-cell table:style-name="Таблица1.D1" office:value-type="string">
            <text:p text:style-name="P39">Сумма<text:span text:style-name="T32">, </text:span><text:span text:style-name="Strong_20_Emphasis"><text:span text:style-name="T43">₽</text:span></text:span>.</text:p>
          </table:table-cell>
        </table:table-row>
        <table:table-row>
          <table:table-cell table:style-name="Таблица1.A2" office:value-type="string">
            <text:list text:style-name="L5">
              <text:list-item>
                <text:p text:style-name="P40"/>
              </text:list-item>
            </text:list>
          </table:table-cell>
          <table:table-cell table:style-name="Таблица1.A2" office:value-type="string">
            <text:p text:style-name="P41"><text:span text:style-name="T44">Память</text:span><text:span text:style-name="T45"> </text:span><text:span text:style-name="T44">USB</text:span><text:span text:style-name="T46"> </text:span><text:span text:style-name="T44">FLASH</text:span><text:span text:style-name="T47"> </text:span><text:span text:style-name="T44">DRIVE</text:span><text:span text:style-name="T47"> </text:span><text:span text:style-name="T48">2G</text:span><text:span text:style-name="T49">b</text:span></text:p>
          </table:table-cell>
          <table:table-cell table:style-name="Таблица1.A2" office:value-type="string">
            <text:p text:style-name="P42">1</text:p>
          </table:table-cell>
          <table:table-cell table:style-name="Таблица1.D2" office:value-type="string">
            <text:p text:style-name="P43">200</text:p>
          </table:table-cell>
        </table:table-row>
        <table:table-row>
          <table:table-cell table:style-name="Таблица1.A2" office:value-type="string">
            <text:list text:continue-numbering="true" text:style-name="L5">
              <text:list-item>
                <text:p text:style-name="P40"/>
              </text:list-item>
            </text:list>
          </table:table-cell>
          <table:table-cell table:style-name="Таблица1.A2" office:value-type="string">
            <text:p text:style-name="P44">Переходник USB-A USB-C</text:p>
          </table:table-cell>
          <table:table-cell table:style-name="Таблица1.A2" office:value-type="string">
            <text:p text:style-name="P45">1</text:p>
          </table:table-cell>
          <table:table-cell table:style-name="Таблица1.D2" office:value-type="string">
            <text:p text:style-name="P43">100</text:p>
          </table:table-cell>
        </table:table-row>
        <table:table-row>
          <table:table-cell table:style-name="Таблица1.A2" office:value-type="string">
            <text:p text:style-name="P46"/>
          </table:table-cell>
          <table:table-cell table:style-name="Таблица1.A2" office:value-type="string">
            <text:p text:style-name="P46">Итого</text:p>
          </table:table-cell>
          <table:table-cell table:style-name="Таблица1.A2" office:value-type="string">
            <text:p text:style-name="P47"/>
          </table:table-cell>
          <table:table-cell table:style-name="Таблица1.D4" office:value-type="float" office:value="300">
            <text:p text:style-name="P48">300</text:p>
          </table:table-cell>
        </table:table-row>
      </table:table>
      <text:p text:style-name="P49"/>
      <text:p text:style-name="P50">Затраты на электроэнергию рассчитываются по формуле:</text:p>
      <text:p text:style-name="P51">Э = Р <text:span text:style-name="T50">· С</text:span><text:span text:style-name="T51">э</text:span><text:span text:style-name="T50"> · T</text:span><text:span text:style-name="T51">общ</text:span><text:span text:style-name="T50"> · R</text:span><text:span text:style-name="T51">заг </text:span><text:span text:style-name="T52">,</text:span></text:p>
      <text:p text:style-name="P52">где </text:p>
      <text:p text:style-name="P52">Р — мощность потребляемой энергии, кВт</text:p>
      <text:p text:style-name="Примечание">Справка</text:p>
      <text:p text:style-name="Примечание"><text:span text:style-name="Strong_20_Emphasis">Компьютер средней мощности</text:span> для работы с текстовыми редакторами потребляет <text:span text:style-name="Strong_20_Emphasis">200–250 Вт/ч</text:span>. При этом системный блок поглощает <text:span text:style-name="Strong_20_Emphasis">150–200 Вт/ч</text:span>, современный 19-дюймовый монитор —  <text:span text:style-name="Strong_20_Emphasis">50 Вт/ч</text:span>.</text:p>
      <text:p text:style-name="Примечание"><text:span text:style-name="Strong_20_Emphasis">Более мощный компьютер</text:span> со встроенной качественной видеокартой, предназначенный для игр, расходует <text:span text:style-name="Strong_20_Emphasis">450 Вт/ч</text:span>.</text:p>
      <text:p text:style-name="Примечание">На потребление электроэнергии также влияет режим работы компьютера:</text:p>
      <text:p text:style-name="Примечание"><text:span text:style-name="Strong_20_Emphasis">85 Вт/ч</text:span> — потребление электричества компьютером мощности 250 Вт/ч в режиме ожидания, длительность работы — до 2 часов.</text:p>
      <text:p text:style-name="Примечание"><text:soft-page-break/><text:span text:style-name="Strong_20_Emphasis">105 Вт/ч</text:span> — расход электроэнергии компьютером мощностью 450 Вт и выше в пассивном режиме.</text:p>
      <text:p text:style-name="Примечание"><text:span text:style-name="Strong_20_Emphasis">10 Вт/ч</text:span> — потребление электричества в спящем режиме для дополнительных печатных устройств, продолжительность работы — до 6 часов.</text:p>
      <text:p text:style-name="P53">Сэ — стоимость одного киловатт-часа электроэнергии, р./кВт-ч</text:p>
      <text:p text:style-name="Примечание">Справка</text:p>
      <text:p text:style-name="P54">На сентябрь 2025 в КК <text:span text:style-name="T53">для юрлиц цена - </text:span><text:s/>10,9 <text:span text:style-name="T54">р./</text:span>кВт<text:span text:style-name="T55">·</text:span><text:span text:style-name="T56">ч </text:span><text:span text:style-name="T57">(без НДС)</text:span></text:p>
      <text:p text:style-name="P53">Т<text:span text:style-name="T30">общ</text:span> — общие затраты труда на разработку ПО (кол-во дней <text:span text:style-name="T55">·</text:span> 8)</text:p>
      <text:p text:style-name="P55"><text:span text:style-name="T50">R</text:span><text:span text:style-name="T51">заг</text:span><text:span text:style-name="T52"> — </text:span><text:span text:style-name="T58">коэффициент загрузки компьютера (брать — 0,6)</text:span></text:p>
      <text:p text:style-name="P56"><text:line-break/>Основная<text:span text:style-name="T59"> </text:span>заработная<text:span text:style-name="T59"> </text:span>плата<text:span text:style-name="T60"> </text:span>разработчика<text:span text:style-name="T60"> </text:span>рассчитывается<text:span text:style-name="T60"> </text:span>по<text:span text:style-name="T60"> </text:span>формуле:</text:p>
      <text:p text:style-name="P57">З<text:span text:style-name="T30">зп</text:span><text:span text:style-name="T31">о</text:span> = С<text:span text:style-name="T30">чтс</text:span><text:span text:style-name="T54"> </text:span><text:span text:style-name="T55">·</text:span><text:span text:style-name="T54"> Т</text:span><text:span text:style-name="T61">общ </text:span><text:span text:style-name="T62">,</text:span></text:p>
      <text:p text:style-name="P58">где </text:p>
      <text:p text:style-name="P59">С<text:span text:style-name="T30">чтс</text:span><text:span text:style-name="T63"> — часовая тарифная ставка разработчика, р./час</text:span><text:span text:style-name="T64">;</text:span></text:p>
      <text:p text:style-name="P60">Справка</text:p>
      <text:p text:style-name="P60">По данным сайта klerk.ru, в 2025 году средняя стоимость часа разработчика в зависимости от квалификации и вида занятости (в штате, фриланс или аутсорс):</text:p>
      <text:list text:style-name="L6">
        <text:list-item>
          <text:p text:style-name="P61">Junior (до 1–1,5 лет опыта) — в штате от 1300–2700 рублей в час, фриланс — от 700–1600 рублей в час, аутсорс — от 1500–3200 рублей в час.</text:p>
        </text:list-item>
        <text:list-item>
          <text:p text:style-name="P61">Middle (1–3 года опыта) — в штате от 3100–5600 рублей в час, фриланс — от 1800–3300 рублей в час, аутсорс — от 3700–6600 рублей в час.</text:p>
        </text:list-item>
        <text:list-item>
          <text:p text:style-name="P61">Senior (от 4–6 лет и выше опыта) — в штате от 5700 рублей в час, фриланс — от 3300 рублей в час, аутсорс — от 6700 рублей в час.</text:p>
        </text:list-item>
      </text:list>
      <text:p text:style-name="P62"><text:span text:style-name="T54">Т</text:span><text:span text:style-name="T61">общ</text:span><text:span text:style-name="T62"> — общие затраты труда на разработку ПО (кол-во дней </text:span><text:span text:style-name="T65">·</text:span><text:span text:style-name="T62"> 8)</text:span></text:p>
      <text:p text:style-name="P63">Дополнительная <text:s/>з/плата разработчика составляет 10% от основной заработной платы и рассчитывается по формуле:</text:p>
      <text:p text:style-name="P64">З<text:span text:style-name="T30">зп</text:span><text:span text:style-name="T31">д </text:span><text:span text:style-name="T64">= 0.1</text:span><text:span text:style-name="T62"> </text:span><text:span text:style-name="T66">·</text:span><text:span text:style-name="T62"> </text:span><text:span text:style-name="T63">З</text:span><text:span text:style-name="T30">зп</text:span><text:span text:style-name="T31">о</text:span><text:span text:style-name="T63"> </text:span></text:p>
      <text:p text:style-name="P65">Отчисления на соц. нужды определяются по формуле:</text:p>
      <text:p text:style-name="P64">З<text:span text:style-name="T30">сн </text:span><text:span text:style-name="T64">= (</text:span><text:span text:style-name="T63">З</text:span><text:span text:style-name="T30">зп</text:span><text:span text:style-name="T31">д </text:span><text:span text:style-name="T64">+ </text:span><text:span text:style-name="T63">З</text:span><text:span text:style-name="T30">зп</text:span><text:span text:style-name="T31">о</text:span><text:span text:style-name="T63"> </text:span><text:span text:style-name="T64">)</text:span><text:span text:style-name="T62"> </text:span><text:span text:style-name="T66">·</text:span><text:span text:style-name="T62"> </text:span><text:span text:style-name="T64">R</text:span><text:span text:style-name="T67">сн</text:span></text:p>
      <text:p text:style-name="Примечание">Справка </text:p>
      <text:p text:style-name="Примечание">В 2025 году пенсионные, медицинские, социальные взносы считают по единому тарифу. Размер общего тарифа — 30 процентов с выплат сотруднику до 2 759 000 руб., свыше этой суммы — 15,1 процента.</text:p>
      <text:p text:style-name="P66">Накладные расходы рассчитываются по формуле:</text:p>
      <text:p text:style-name="P67">Н = 0,1<text:span text:style-name="T68"> </text:span><text:span text:style-name="T65">·</text:span><text:span text:style-name="T68"> </text:span><text:span text:style-name="T69">(</text:span><text:span text:style-name="T70">З</text:span><text:span text:style-name="T71">зп</text:span><text:span text:style-name="T72">д </text:span><text:span text:style-name="T69">+ </text:span><text:span text:style-name="T70">З</text:span><text:span text:style-name="T71">зп</text:span><text:span text:style-name="T72">о</text:span><text:span text:style-name="T70"> </text:span><text:span text:style-name="T69">)</text:span></text:p>
      <text:p text:style-name="P68">Зная все числовые значения, можно рассчитать полную себестоимость разрабатываемого программного продукта.</text:p>
      <text:p text:style-name="P69"><text:span text:style-name="T54">Т</text:span><text:span text:style-name="T61">общ <text:s/></text:span><text:span text:style-name="T73">взять = усл. 100 дней.</text:span></text:p>
      <text:h text:style-name="Heading_20_3" text:outline-level="3"><text:soft-page-break/><text:span text:style-name="T74">1.2 </text:span>Расчет экономического эффекта программного продукта</text:h>
      <text:p text:style-name="P70">Экономический эффект от внедрения ПО рассчитывается по формуле</text:p>
      <text:p text:style-name="P71">Э<text:span text:style-name="T30">эф</text:span> = N<text:span text:style-name="T68"> </text:span><text:span text:style-name="T65">·</text:span><text:span text:style-name="T68"> </text:span>(t<text:span text:style-name="T30">1</text:span> — t<text:span text:style-name="T30">2</text:span>)<text:span text:style-name="T68"> </text:span><text:span text:style-name="T65">·</text:span><text:span text:style-name="T68"> </text:span>C<text:span text:style-name="T30">чтс</text:span><text:span text:style-name="T68"> </text:span><text:span text:style-name="T65">·</text:span><text:span text:style-name="T68"> </text:span>К<text:span text:style-name="T30">доп</text:span><text:span text:style-name="T68"> </text:span><text:span text:style-name="T65">·</text:span><text:span text:style-name="T68"> </text:span>К<text:span text:style-name="T30">сн</text:span> — Е<text:span text:style-name="T30">н</text:span><text:span text:style-name="T68"> </text:span><text:span text:style-name="T65">·</text:span><text:span text:style-name="T68"> </text:span>К,</text:p>
      <text:p text:style-name="P72">где</text:p>
      <text:p text:style-name="P72">N — количество обрабатываемых документов <text:span text:style-name="T75">(взять N = 6000)</text:span>;</text:p>
      <text:p text:style-name="P72">t<text:span text:style-name="T30">1</text:span>, t<text:span text:style-name="T30">2</text:span> — трудоемкость обработки документов до и после внедрения <text:span text:style-name="T76">программы:</text:span></text:p>
      <text:p text:style-name="P73">t<text:span text:style-name="T30">1</text:span><text:span text:style-name="T63"> </text:span><text:span text:style-name="T77">= 15, </text:span><text:span text:style-name="T63"><text:s/>t</text:span><text:span text:style-name="T30">2</text:span><text:span text:style-name="T63"> </text:span><text:span text:style-name="T77">= 7</text:span></text:p>
      <text:p text:style-name="P74">С<text:span text:style-name="T78">чтс </text:span><text:span text:style-name="T79">— </text:span><text:span text:style-name="T63">часовая тарифная тавка пользователя, р./час;</text:span></text:p>
      <text:p text:style-name="P74">К<text:span text:style-name="T30">доп</text:span> — коэффициент отчислений на дополнительную заработную плату, К<text:span text:style-name="T30">доп</text:span> = 0,1;</text:p>
      <text:p text:style-name="P75">К<text:span text:style-name="T30">сн</text:span><text:span text:style-name="T63"> — </text:span><text:span text:style-name="T80">коэффициент отчислений на соц. нужды, <text:s/></text:span><text:span text:style-name="T63">К</text:span><text:span text:style-name="T30">сн </text:span><text:span text:style-name="T80">= 0,3;</text:span></text:p>
      <text:p text:style-name="P75">Е<text:span text:style-name="T30">н</text:span><text:span text:style-name="T63"> — </text:span><text:span text:style-name="T80">нормативный коэффициенткупаемости капитальных вложений, <text:s/></text:span><text:span text:style-name="T63">Е</text:span><text:span text:style-name="T30">н </text:span><text:span text:style-name="T80">= 0,39;</text:span></text:p>
      <text:p text:style-name="P76">К — доп. капиталовложения, связанные с разработкой программного продукта <text:span text:style-name="T81">(здесь полная себестоимость рассчитанная выше)</text:span>.</text:p>
      <text:p text:style-name="P76">Используя ранее рассчитанные значения и подставляя в формулу выше, получаем значение экономического эффекта.</text:p>
      <text:p text:style-name="P76"><draw:frame draw:style-name="fr1" draw:name="Объект1" text:anchor-type="paragraph" svg:x="6.064cm" svg:y="0.97cm" svg:width="2.595cm" svg:height="1.318cm" draw:z-index="15"><draw:object xlink:href="./Object 1" xlink:type="simple" xlink:show="embed" xlink:actuate="onLoad"/><draw:image xlink:href="./ObjectReplacements/Object 1" xlink:type="simple" xlink:show="embed" xlink:actuate="onLoad"/></draw:frame>Срок окупаемости программного продукта рассчитывается по формуле:</text:p>
      <text:p text:style-name="P77"/>
      <text:p text:style-name="P70"/>
      <text:p text:style-name="P70"/>
      <text:p text:style-name="P78">где C<text:span text:style-name="T30">пр</text:span> — себестоимость программного продукта, <text:span text:style-name="Strong_20_Emphasis"><text:span text:style-name="T82">₽</text:span></text:span></text:p>
      <text:p text:style-name="P78"><text:span text:style-name="Strong_20_Emphasis"><text:span text:style-name="T83">С</text:span></text:span><text:span text:style-name="Strong_20_Emphasis"><text:span text:style-name="T84">1</text:span></text:span><text:span text:style-name="Strong_20_Emphasis"><text:span text:style-name="T85"> — стоимостные затраты при использовании ручного труда, </text:span></text:span><text:span text:style-name="Strong_20_Emphasis"><text:span text:style-name="T86">₽</text:span></text:span></text:p>
      <text:p text:style-name="P78"><text:span text:style-name="Strong_20_Emphasis"><text:span text:style-name="T85">С</text:span></text:span><text:span text:style-name="Strong_20_Emphasis"><text:span text:style-name="T84">2 —</text:span></text:span><text:span text:style-name="Strong_20_Emphasis"><text:span text:style-name="T85"> стоимостные затраты при использовании программы, </text:span></text:span><text:span text:style-name="Strong_20_Emphasis"><text:span text:style-name="T86">₽</text:span></text:span></text:p>
      <text:p text:style-name="P79"><text:span text:style-name="Strong_20_Emphasis"><text:span text:style-name="T87">Для расчета стоимостных затрат нужно взять эт</text:span></text:span><text:span text:style-name="Strong_20_Emphasis"><text:span text:style-name="T88">и</text:span></text:span><text:span text:style-name="Strong_20_Emphasis"><text:span text:style-name="T87"> формул</text:span></text:span><text:span text:style-name="Strong_20_Emphasis"><text:span text:style-name="T88">ы</text:span></text:span><text:span text:style-name="Strong_20_Emphasis"><text:span text:style-name="T87">:</text:span></text:span></text:p>
      <text:p text:style-name="P80">Э<text:span text:style-name="T89">1</text:span> = N<text:span text:style-name="T68"> </text:span><text:span text:style-name="T65">·</text:span><text:span text:style-name="T68"> </text:span>t<text:span text:style-name="T30">1</text:span><text:span text:style-name="T68"> </text:span><text:span text:style-name="T65">·</text:span><text:span text:style-name="T68"> </text:span>C<text:span text:style-name="T30">чтс</text:span><text:span text:style-name="T68"> </text:span><text:span text:style-name="T65">·</text:span><text:span text:style-name="T68"> </text:span>К<text:span text:style-name="T30">доп</text:span><text:span text:style-name="T68"> </text:span><text:span text:style-name="T65">·</text:span><text:span text:style-name="T68"> </text:span>К<text:span text:style-name="T30">сн</text:span> — Е<text:span text:style-name="T30">н</text:span><text:span text:style-name="T68"> </text:span><text:span text:style-name="T65">·</text:span><text:span text:style-name="T68"> </text:span>К</text:p>
      <text:p text:style-name="P80">Э<text:span text:style-name="T89">2</text:span> = N<text:span text:style-name="T68"> </text:span><text:span text:style-name="T65">·</text:span><text:span text:style-name="T68"> </text:span>t<text:span text:style-name="T30">2</text:span><text:span text:style-name="T68"> </text:span><text:span text:style-name="T65">·</text:span><text:span text:style-name="T68"> </text:span>C<text:span text:style-name="T30">чтс</text:span><text:span text:style-name="T68"> </text:span><text:span text:style-name="T65">·</text:span><text:span text:style-name="T68"> </text:span>К<text:span text:style-name="T30">доп</text:span><text:span text:style-name="T68"> </text:span><text:span text:style-name="T65">·</text:span><text:span text:style-name="T68"> </text:span>К<text:span text:style-name="T30">сн</text:span> — Е<text:span text:style-name="T30">н</text:span><text:span text:style-name="T68"> </text:span><text:span text:style-name="T65">·</text:span><text:span text:style-name="T68"> </text:span>К</text:p>
      <text:p text:style-name="P81"/>
      <text:h text:style-name="P82" text:outline-level="2"><text:span text:style-name="T90">3</text:span> Постановка задачи</text:h>
      <text:list text:style-name="L7">
        <text:list-item>
          <text:p text:style-name="P83">Ответить на вопросы учебника;</text:p>
        </text:list-item>
        <text:list-item>
          <text:p text:style-name="P84">Произвести расчет экономической эффективности информационной системы;</text:p>
        </text:list-item>
        <text:list-item>
          <text:p text:style-name="P84">Сделать выводы по работе.</text:p>
        </text:list-item>
      </text:list>
      <text:h text:style-name="Heading_20_2" text:outline-level="2"><text:soft-page-break/><text:span text:style-name="T90">4</text:span><text:span text:style-name="T27"> </text:span><text:span text:style-name="T91">Выполнение задания</text:span></text:h>
      <text:h text:style-name="P85" text:outline-level="3">Себ<text:span text:style-name="T92">е</text:span>стоимость программного продукта</text:h>
      <text:p text:style-name="P86"><text:span text:style-name="T93">C</text:span> = <text:span text:style-name="T94">300 </text:span><text:span text:style-name="T95">+ </text:span><text:span text:style-name="T96">3 240</text:span><text:span text:style-name="T97"> </text:span><text:span text:style-name="T98">+ 270000 </text:span><text:span text:style-name="T99">+ </text:span><text:span text:style-name="T98">27000 </text:span><text:span text:style-name="T100">+ <text:s/>89 100 </text:span><text:span text:style-name="T101">+ <text:s/></text:span><text:span text:style-name="T100">29 700</text:span></text:p>
      <text:p text:style-name="P87">С = 419 340 р.</text:p>
      <text:p text:style-name="P88">Вспомогательные материалы:</text:p>
      <text:p text:style-name="P89">300 р.</text:p>
      <text:p text:style-name="P90" loext:marker-style-name="T44"/>
      <text:p text:style-name="P91" loext:marker-style-name="T44">Затраты на электроэнергию:</text:p>
      <text:p text:style-name="P92" loext:marker-style-name="T44">180 дней по 8 часов.</text:p>
      <text:p text:style-name="P93" loext:marker-style-name="T44">Э = 0.5 * 7.5 * 1 440 * <text:span text:style-name="T102">0.6</text:span></text:p>
      <text:p text:style-name="P94" loext:marker-style-name="T44">Э = 3 240</text:p>
      <text:p text:style-name="P94" loext:marker-style-name="T44"/>
      <text:p text:style-name="P95" loext:marker-style-name="T44">Общая зарплата:</text:p>
      <text:p text:style-name="P95" loext:marker-style-name="T44">270 000 р.</text:p>
      <text:p text:style-name="P95" loext:marker-style-name="T44"/>
      <text:p text:style-name="P96" loext:marker-style-name="T44">Дополнительная зарплата:</text:p>
      <text:p text:style-name="P86"><text:span text:style-name="T98">27 000 </text:span><text:span text:style-name="T103">р.</text:span></text:p>
      <text:p text:style-name="P86"/>
      <text:p text:style-name="P97">Отчисления на социальные нужды:</text:p>
      <text:p text:style-name="P97">(270000 + 27000) * 0.3 = 89 100 р.</text:p>
      <text:p text:style-name="P97"/>
      <text:p text:style-name="P98">Накладные расходы:</text:p>
      <text:p text:style-name="P97">(270000 + 27000) * 0.<text:span text:style-name="T104">1</text:span> = 29 700 р.</text:p>
      <text:p text:style-name="P99"/>
      <text:h text:style-name="P100" text:outline-level="3">Расчет экономического эффекта программного продукта</text:h>
      <text:p text:style-name="P101">Э = <text:span text:style-name="T105">6000</text:span> * (<text:span text:style-name="T106">15</text:span> - <text:span text:style-name="T106">7</text:span>) * <text:span text:style-name="T107">16</text:span><text:span text:style-name="T108">5</text:span> * <text:span text:style-name="T109">0.1</text:span> * <text:span text:style-name="T80">0.3</text:span> - <text:span text:style-name="T110">0.39</text:span> *<text:span text:style-name="T80"> </text:span><text:span text:style-name="T111">4</text:span><text:span text:style-name="T112">19 340</text:span></text:p>
      <text:p text:style-name="P102"/>
      <text:p text:style-name="P103">Срок окупаемости программного продукта:</text:p>
      <text:p text:style-name="P104">419340/<text:span text:style-name="T113">(</text:span><text:span text:style-name="T114">281 957,4 -</text:span><text:span text:style-name="T115"> </text:span><text:span text:style-name="T116">44 357,4</text:span><text:span text:style-name="T115">) = </text:span><text:span text:style-name="T117">1.8 лет</text:span></text:p>
      <text:p text:style-name="P105"/>
      <text:p text:style-name="P106">Ручной труд:</text:p>
      <text:p text:style-name="P106">281 957,4</text:p>
      <text:p text:style-name="P106"/>
      <text:p text:style-name="P107">Использование программы:</text:p>
      <text:p text:style-name="P107">44 357,4</text:p>
      <text:p text:style-name="P108"><text:soft-pag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09">Наименование показателя</text:p>
          </table:table-cell>
          <table:table-cell table:style-name="Таблица2.A1" office:value-type="string">
            <text:p text:style-name="P110"><text:s/><text:span text:style-name="T118">Ед. Изм.</text:span></text:p>
          </table:table-cell>
          <table:table-cell table:style-name="Таблица2.C1" office:value-type="string">
            <text:p text:style-name="P109">Затраты, р.</text:p>
          </table:table-cell>
        </table:table-row>
        <table:table-row>
          <table:table-cell table:style-name="Таблица2.A2" office:value-type="string">
            <text:p text:style-name="P111" loext:marker-style-name="T44"><text:span text:style-name="T44">1.</text:span><text:span text:style-name="T119"> </text:span><text:span text:style-name="T44">Основная</text:span><text:span text:style-name="T120"> </text:span><text:span text:style-name="T44">заработная</text:span><text:span text:style-name="T46"> </text:span><text:span text:style-name="T44">плата</text:span><text:span text:style-name="T46"> </text:span><text:span text:style-name="T49">разработчика</text:span></text:p>
          </table:table-cell>
          <table:table-cell table:style-name="Таблица2.A2" office:value-type="string">
            <text:p text:style-name="P112" loext:marker-style-name="T44"><text:span text:style-name="T121">р.</text:span></text:p>
          </table:table-cell>
          <table:table-cell table:style-name="Таблица2.C2" office:value-type="string">
            <text:p text:style-name="P113" loext:marker-style-name="T44"><text:span text:style-name="T49">270 000</text:span></text:p>
          </table:table-cell>
        </table:table-row>
        <table:table-row>
          <table:table-cell table:style-name="Таблица2.A2" office:value-type="string">
            <text:p text:style-name="P111" loext:marker-style-name="T44"><text:span text:style-name="T44">2.</text:span><text:span text:style-name="T122"> </text:span><text:span text:style-name="T44">Дополнительная</text:span><text:span text:style-name="T123"> </text:span><text:span text:style-name="T44">заработная</text:span><text:span text:style-name="T124"> </text:span><text:span text:style-name="T44">плата</text:span><text:span text:style-name="T125"> </text:span><text:span text:style-name="T49">разработчика</text:span></text:p>
          </table:table-cell>
          <table:table-cell table:style-name="Таблица2.A2" office:value-type="string">
            <text:p text:style-name="P112" loext:marker-style-name="T44"><text:span text:style-name="T121">р.</text:span></text:p>
          </table:table-cell>
          <table:table-cell table:style-name="Таблица2.C2" office:value-type="string">
            <text:p text:style-name="P113" loext:marker-style-name="T44"><text:span text:style-name="T126">27 000</text:span></text:p>
          </table:table-cell>
        </table:table-row>
        <table:table-row>
          <table:table-cell table:style-name="Таблица2.A2" office:value-type="string">
            <text:p text:style-name="P111" loext:marker-style-name="T44"><text:span text:style-name="T126">3.</text:span><text:span text:style-name="T47"> </text:span><text:span text:style-name="T126">Отчисления</text:span><text:span text:style-name="T45"> </text:span><text:span text:style-name="T126">на</text:span><text:span text:style-name="T45"> </text:span><text:span text:style-name="T126">социальные</text:span><text:span text:style-name="T127"> </text:span><text:span text:style-name="T126">нужды</text:span></text:p>
          </table:table-cell>
          <table:table-cell table:style-name="Таблица2.A2" office:value-type="string">
            <text:p text:style-name="P112" loext:marker-style-name="T44"><text:span text:style-name="T121">р.</text:span></text:p>
          </table:table-cell>
          <table:table-cell table:style-name="Таблица2.C2" office:value-type="string">
            <text:p text:style-name="P114" loext:marker-style-name="T44"><text:span text:style-name="T49">89 100</text:span></text:p>
          </table:table-cell>
        </table:table-row>
        <table:table-row>
          <table:table-cell table:style-name="Таблица2.A2" office:value-type="string">
            <text:p text:style-name="P111" loext:marker-style-name="T44"><text:span text:style-name="T44">4.</text:span><text:span text:style-name="T46"> </text:span><text:span text:style-name="T44">Накладные</text:span><text:span text:style-name="T47"> </text:span><text:span text:style-name="T49">расходы</text:span></text:p>
          </table:table-cell>
          <table:table-cell table:style-name="Таблица2.A2" office:value-type="string">
            <text:p text:style-name="P112" loext:marker-style-name="T44"><text:span text:style-name="T121">р.</text:span></text:p>
          </table:table-cell>
          <table:table-cell table:style-name="Таблица2.C2" office:value-type="string">
            <text:p text:style-name="P113" loext:marker-style-name="T44"><text:span text:style-name="T126">29 700</text:span></text:p>
          </table:table-cell>
        </table:table-row>
        <table:table-row>
          <table:table-cell table:style-name="Таблица2.A2" office:value-type="string">
            <text:p text:style-name="P111" loext:marker-style-name="T44"><text:span text:style-name="T44">5.</text:span><text:span text:style-name="T127"> </text:span><text:span text:style-name="T44">Затраты</text:span><text:span text:style-name="T126"> </text:span><text:span text:style-name="T44">на</text:span><text:span text:style-name="T127"> </text:span><text:span text:style-name="T49">электроэнергию</text:span></text:p>
          </table:table-cell>
          <table:table-cell table:style-name="Таблица2.A2" office:value-type="string">
            <text:p text:style-name="P112" loext:marker-style-name="T44"><text:span text:style-name="T121">р.</text:span></text:p>
          </table:table-cell>
          <table:table-cell table:style-name="Таблица2.C2" office:value-type="string">
            <text:p text:style-name="P114" loext:marker-style-name="T44"><text:span text:style-name="T49">3 240</text:span></text:p>
          </table:table-cell>
        </table:table-row>
        <table:table-row>
          <table:table-cell table:style-name="Таблица2.A2" office:value-type="string">
            <text:p text:style-name="P111" loext:marker-style-name="T44"><text:span text:style-name="T49">6.</text:span><text:span text:style-name="T128"> </text:span><text:span text:style-name="T49">Вспомогательные</text:span><text:span text:style-name="T129"> </text:span><text:span text:style-name="T49">материалы</text:span></text:p>
          </table:table-cell>
          <table:table-cell table:style-name="Таблица2.A2" office:value-type="string">
            <text:p text:style-name="P112" loext:marker-style-name="T44"><text:span text:style-name="T121">р.</text:span></text:p>
          </table:table-cell>
          <table:table-cell table:style-name="Таблица2.C2" office:value-type="string">
            <text:p text:style-name="P114" loext:marker-style-name="T44"><text:span text:style-name="T121">300</text:span></text:p>
          </table:table-cell>
        </table:table-row>
        <table:table-row>
          <table:table-cell table:style-name="Таблица2.A2" office:value-type="string">
            <text:p text:style-name="P111" loext:marker-style-name="T44"><text:span text:style-name="T44">7.</text:span><text:span text:style-name="T124"> </text:span><text:span text:style-name="T44">Полная</text:span><text:span text:style-name="T119"> </text:span><text:span text:style-name="T44">себестоимость</text:span><text:span text:style-name="T123"> </text:span><text:span text:style-name="T44">программного</text:span><text:span text:style-name="T123"> </text:span><text:span text:style-name="T49">продукта</text:span></text:p>
          </table:table-cell>
          <table:table-cell table:style-name="Таблица2.A2" office:value-type="string">
            <text:p text:style-name="P112" loext:marker-style-name="T44"><text:span text:style-name="T121">р.</text:span></text:p>
          </table:table-cell>
          <table:table-cell table:style-name="Таблица2.C2" office:value-type="string">
            <text:p text:style-name="P115" loext:marker-style-name="T44"><text:span text:style-name="T49">419 340</text:span></text:p>
          </table:table-cell>
        </table:table-row>
        <table:table-row>
          <table:table-cell table:style-name="Таблица2.A2" office:value-type="string">
            <text:p text:style-name="P111" loext:marker-style-name="T44"><text:span text:style-name="T44">8.</text:span><text:span text:style-name="T119"> </text:span><text:span text:style-name="T44">Экономический</text:span><text:span text:style-name="T130"> </text:span><text:span text:style-name="T49">эффект</text:span></text:p>
          </table:table-cell>
          <table:table-cell table:style-name="Таблица2.A2" office:value-type="string">
            <text:p text:style-name="P112" loext:marker-style-name="T44"><text:span text:style-name="T121">р.</text:span></text:p>
          </table:table-cell>
          <table:table-cell table:style-name="Таблица2.C2" office:value-type="string">
            <text:p text:style-name="P116" loext:marker-style-name="T44"><text:span text:style-name="T49">74 057.4</text:span></text:p>
          </table:table-cell>
        </table:table-row>
        <table:table-row>
          <table:table-cell table:style-name="Таблица2.A2" office:value-type="string">
            <text:p text:style-name="P111" loext:marker-style-name="T44"><text:span text:style-name="T44">9.</text:span><text:span text:style-name="T119"> </text:span><text:span text:style-name="T44">Срок</text:span><text:span text:style-name="T119"> </text:span><text:span text:style-name="T44">окупаемости</text:span><text:span text:style-name="T120"> </text:span><text:span text:style-name="T44">программного</text:span><text:span text:style-name="T120"> </text:span><text:span text:style-name="T49">продукта</text:span></text:p>
          </table:table-cell>
          <table:table-cell table:style-name="Таблица2.A2" office:value-type="string">
            <text:p text:style-name="P112" loext:marker-style-name="T44"><text:span text:style-name="T121">лет</text:span></text:p>
          </table:table-cell>
          <table:table-cell table:style-name="Таблица2.C2" office:value-type="string">
            <text:p text:style-name="P116" loext:marker-style-name="T44"><text:span text:style-name="T126">1,</text:span><text:span text:style-name="T131">8</text:span></text:p>
          </table:table-cell>
        </table:table-row>
      </table:table>
      <text:p text:style-name="P117"/>
      <text:p text:style-name="P118"/>
      <text:h text:style-name="Heading_20_2" text:outline-level="2">Список используемых источников</text:h>
      <text:list text:style-name="L8">
        <text:list-item>
          <text:p text:style-name="P119">Рахматуллин Р. Р. Расчет технико-экономических показателей и определение экономического эффекта программного продукта: методические указания к расчетно-графическому заданию, курсовому и дипломному проектированию / Р.Р. Рахматуллин, Л.Ф. Давлетбаева. – Оренбург: ООО «Агентство «Пресса», 2008.</text:p>
        </text:list-item>
        <text:list-item>
          <text:p text:style-name="P120">Федорова Г. Н. Сопровождение <text:s/>информационных систем: учебник для студ. Учреждений сред. Проф. Образования / Г. Н. Федорова. — М.: Изд. центр «Академия», 2018</text:p>
        </text:list-item>
      </text:list>
      <text:p text:style-name="P121"/>
      <text:h text:style-name="P122" text:outline-level="2">Вывод</text:h>
      <text:p text:style-name="P123">В ходе выполнения работы были рассчитаны экономические показатели для разрабатываемой программы. Рассчитана себестоимость, экономический эффект и срок окупаемости. Получены навыки расчёта показателей для разрабатываемых программ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 style:master-page-name="">
      <loext:graphic-properties draw:fill="none" draw:fill-color="#729fcf"/>
      <style:paragraph-properties fo:margin-left="0cm" fo:margin-right="0cm" fo:margin-top="0cm" fo:margin-bottom="0.499cm" style:contextual-spacing="true" fo:text-indent="0cm" style:auto-text-indent="false" style:page-number="auto" fo:background-color="transparent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1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0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2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3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4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5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6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7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8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9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10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11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12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3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4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1DT3H17M33S</meta:editing-duration>
    <meta:editing-cycles>268</meta:editing-cycles>
    <meta:generator>LibreOffice/25.8.2.1$Windows_X86_64 LibreOffice_project/345526217a4027cb1b9ab39bd7153c8c141a1d64</meta:generator>
    <dc:title>Реферат ГОСТ</dc:title>
    <dc:date>2025-10-27T20:15:04.281186100</dc:date>
    <meta:print-date>2025-10-24T13:03:18.996408373</meta:print-date>
    <meta:printed-by>Файлы PDF</meta:printed-by>
    <meta:document-statistic meta:table-count="2" meta:image-count="0" meta:object-count="1" meta:page-count="7" meta:paragraph-count="382" meta:word-count="1384" meta:character-count="8156" meta:non-whitespace-character-count="7121"/>
  </office:meta>
</office:document-meta>
</file>

<file path=Object 1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sub>
          <mi>С</mi>
          <mi mathvariant="italic">пр</mi>
        </msub>
        <mrow>
          <msub>
            <mi>С</mi>
            <mn>1</mn>
          </msub>
          <mo stretchy="false">−</mo>
          <msub>
            <mi>С</mi>
            <mn>2</mn>
          </msub>
        </mrow>
      </mfrac>
    </mrow>
    <annotation encoding="StarMath 5.0">Т_ок = frac {С_пр} {С_1 - С_2} </annotation>
  </semantics>
</math>
</file>