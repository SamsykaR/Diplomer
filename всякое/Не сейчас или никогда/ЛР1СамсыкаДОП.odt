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content.xml" manifest:media-type="text/xml"/>
  <manifest:file-entry manifest:full-path="Pictures/1000000000000500000003D2BC888963.jpg" manifest:media-type="image/jpeg"/>
  <manifest:file-entry manifest:full-path="Pictures/1000AADE00007D2900003D15809160B2.svg" manifest:media-type="image/svg+xml"/>
  <manifest:file-entry manifest:full-path="Pictures/10000001000003F4000001EE065A285A.png" manifest:media-type="image/png"/>
  <manifest:file-entry manifest:full-path="Pictures/100000000000025800000187062973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93909b" officeooo:paragraph-rsid="0193909b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ca7dee" officeooo:paragraph-rsid="01ca7dee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>
      <style:paragraph-properties fo:margin-left="0.004cm" fo:margin-right="0.247cm" fo:margin-top="0.42cm" fo:margin-bottom="0cm" style:contextual-spacing="false" fo:text-align="justify" style:justify-single-word="false" fo:text-indent="0cm" style:auto-text-indent="false"/>
      <style:text-properties officeooo:paragraph-rsid="019b08ae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1cead8b" officeooo:paragraph-rsid="01cead8b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paragraph-rsid="01d0cd21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1d0cd21" officeooo:paragraph-rsid="01d0cd21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rsid="01d28548" officeooo:paragraph-rsid="01d28548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paragraph-rsid="01d28548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rsid="01d28548" officeooo:paragraph-rsid="01d28548"/>
    </style:style>
    <style:style style:name="P28" style:family="paragraph" style:parent-style-name="Text_20_body" style:list-style-name="L3">
      <style:paragraph-properties fo:text-align="justify" style:justify-single-word="false"/>
      <style:text-properties officeooo:rsid="01d45619" officeooo:paragraph-rsid="01d45619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4">
      <style:paragraph-properties fo:text-align="justify" style:justify-single-word="false"/>
    </style:style>
    <style:style style:name="P31" style:family="paragraph" style:parent-style-name="Text_20_body" style:list-style-name="L4">
      <style:paragraph-properties fo:text-align="justify" style:justify-single-word="false"/>
      <style:text-properties officeooo:paragraph-rsid="01d54a07"/>
    </style:style>
    <style:style style:name="P32" style:family="paragraph" style:parent-style-name="Standard" style:list-style-name="L1">
      <style:text-properties officeooo:rsid="01d32893" officeooo:paragraph-rsid="01f9a681"/>
    </style:style>
    <style:style style:name="P33" style:family="paragraph" style:parent-style-name="Text_20_body" style:list-style-name="L1">
      <style:text-properties officeooo:rsid="01d49781" officeooo:paragraph-rsid="01f9a681"/>
    </style:style>
    <style:style style:name="P34" style:family="paragraph" style:parent-style-name="Text_20_body" style:list-style-name="L5">
      <style:text-properties officeooo:rsid="01d49781" officeooo:paragraph-rsid="01f9a681"/>
    </style:style>
    <style:style style:name="P35" style:family="paragraph" style:parent-style-name="Text_20_body" style:list-style-name="L6">
      <style:text-properties officeooo:rsid="01d5330d" officeooo:paragraph-rsid="01f9a681"/>
    </style:style>
    <style:style style:name="P36" style:family="paragraph" style:parent-style-name="Text_20_body" style:list-style-name="L1">
      <style:text-properties officeooo:rsid="01d693e3" officeooo:paragraph-rsid="01f9a681"/>
    </style:style>
    <style:style style:name="P37" style:family="paragraph" style:parent-style-name="Text_20_body" style:list-style-name="L7">
      <style:text-properties officeooo:rsid="01d693e3" officeooo:paragraph-rsid="01f9a681"/>
    </style:style>
    <style:style style:name="P38" style:family="paragraph" style:parent-style-name="Text_20_body" style:list-style-name="L1"/>
    <style:style style:name="P39" style:family="paragraph" style:parent-style-name="Text_20_body" style:list-style-name="L8">
      <style:text-properties officeooo:paragraph-rsid="01fbc517"/>
    </style:style>
    <style:style style:name="P40" style:family="paragraph" style:parent-style-name="Text_20_body" style:list-style-name="L9"/>
    <style:style style:name="P41" style:family="paragraph" style:parent-style-name="Heading_20_2">
      <style:text-properties officeooo:paragraph-rsid="027405ea"/>
    </style:style>
    <style:style style:name="P42" style:family="paragraph" style:parent-style-name="Text_20_body">
      <style:text-properties officeooo:paragraph-rsid="02e5c4c2"/>
    </style:style>
    <style:style style:name="P43" style:family="paragraph" style:parent-style-name="Text_20_body">
      <style:text-properties fo:language="en" fo:country="US" officeooo:rsid="02e3f592" officeooo:paragraph-rsid="02e5c4c2"/>
    </style:style>
    <style:style style:name="P44" style:family="paragraph" style:parent-style-name="Рис.">
      <style:text-properties officeooo:paragraph-rsid="02e66586"/>
    </style:style>
    <style:style style:name="P45" style:family="paragraph" style:parent-style-name="Heading_20_2">
      <style:text-properties officeooo:paragraph-rsid="01d88847"/>
    </style:style>
    <style:style style:name="P46" style:family="paragraph" style:parent-style-name="Text_20_body">
      <style:text-properties officeooo:paragraph-rsid="02e68d6c"/>
    </style:style>
    <style:style style:name="P47" style:family="paragraph" style:parent-style-name="Text_20_body" style:master-page-name="Landscape">
      <style:paragraph-properties style:page-number="auto"/>
    </style:style>
    <style:style style:name="P48" style:family="paragraph" style:parent-style-name="Рис.">
      <style:text-properties officeooo:paragraph-rsid="02e6bd3c"/>
    </style:style>
    <style:style style:name="P49" style:family="paragraph" style:parent-style-name="Heading_20_3" style:master-page-name="Standard">
      <style:paragraph-properties style:page-number="auto"/>
      <style:text-properties officeooo:paragraph-rsid="023fb1e6"/>
    </style:style>
    <style:style style:name="P50" style:family="paragraph" style:parent-style-name="Heading_20_3">
      <style:text-properties officeooo:paragraph-rsid="023fb1e6"/>
    </style:style>
    <style:style style:name="P51" style:family="paragraph" style:parent-style-name="Heading_20_3">
      <style:text-properties officeooo:paragraph-rsid="0241e581"/>
    </style:style>
    <style:style style:name="P52" style:family="paragraph" style:parent-style-name="Text_20_body">
      <style:text-properties officeooo:paragraph-rsid="0241e581"/>
    </style:style>
    <style:style style:name="P53" style:family="paragraph" style:parent-style-name="Heading_20_2">
      <style:text-properties officeooo:paragraph-rsid="0244dbe6"/>
    </style:style>
    <style:style style:name="P54" style:family="paragraph" style:parent-style-name="Heading_20_3">
      <style:text-properties officeooo:rsid="0290247e" officeooo:paragraph-rsid="0290247e"/>
    </style:style>
    <style:style style:name="P55" style:family="paragraph" style:parent-style-name="Text_20_body">
      <style:text-properties officeooo:rsid="02ef8be9" officeooo:paragraph-rsid="02ef8be9"/>
    </style:style>
    <style:style style:name="P56" style:family="paragraph" style:parent-style-name="Text_20_body" style:list-style-name="L10">
      <style:text-properties officeooo:rsid="02ef8be9" officeooo:paragraph-rsid="02ef8be9"/>
    </style:style>
    <style:style style:name="P57" style:family="paragraph" style:parent-style-name="Text_20_body" style:list-style-name="L10">
      <style:text-properties officeooo:rsid="02f02dfa" officeooo:paragraph-rsid="02f02dfa"/>
    </style:style>
    <style:style style:name="P58" style:family="paragraph" style:parent-style-name="Text_20_body" style:list-style-name="L10">
      <style:text-properties officeooo:rsid="02f37159" officeooo:paragraph-rsid="02f37159"/>
    </style:style>
    <style:style style:name="P59" style:family="paragraph" style:parent-style-name="Text_20_body" style:list-style-name="L10">
      <style:text-properties officeooo:rsid="02f677de" officeooo:paragraph-rsid="02f677de"/>
    </style:style>
    <style:style style:name="P60" style:family="paragraph" style:parent-style-name="Text_20_body">
      <style:text-properties officeooo:rsid="02d80c27" officeooo:paragraph-rsid="02d80c27"/>
    </style:style>
    <style:style style:name="P61" style:family="paragraph" style:parent-style-name="Text_20_body">
      <style:text-properties officeooo:paragraph-rsid="0290247e"/>
    </style:style>
    <style:style style:name="P62" style:family="paragraph" style:parent-style-name="Heading_20_3">
      <style:text-properties officeooo:paragraph-rsid="02487156"/>
    </style:style>
    <style:style style:name="P63" style:family="paragraph" style:parent-style-name="Standard">
      <style:text-properties officeooo:paragraph-rsid="02948c1c"/>
    </style:style>
    <style:style style:name="P64" style:family="paragraph" style:parent-style-name="Text_20_body" style:list-style-name="L11"/>
    <style:style style:name="P65" style:family="paragraph" style:parent-style-name="Text_20_body">
      <style:text-properties officeooo:rsid="029c9deb" officeooo:paragraph-rsid="029c9deb"/>
    </style:style>
    <style:style style:name="P66" style:family="paragraph" style:parent-style-name="Text_20_body" style:list-style-name="L12">
      <style:text-properties officeooo:rsid="029c9deb"/>
    </style:style>
    <style:style style:name="P67" style:family="paragraph" style:parent-style-name="Heading_20_3">
      <style:text-properties officeooo:paragraph-rsid="024d4fa3"/>
    </style:style>
    <style:style style:name="P68" style:family="paragraph" style:parent-style-name="Text_20_body">
      <style:text-properties officeooo:paragraph-rsid="024d4fa3"/>
    </style:style>
    <style:style style:name="P69" style:family="paragraph" style:parent-style-name="Heading_20_3">
      <style:text-properties officeooo:paragraph-rsid="0252777b"/>
    </style:style>
    <style:style style:name="P70" style:family="paragraph" style:parent-style-name="Text_20_body">
      <style:text-properties officeooo:paragraph-rsid="0252777b"/>
    </style:style>
    <style:style style:name="P71" style:family="paragraph" style:parent-style-name="Text_20_body">
      <style:text-properties officeooo:paragraph-rsid="021ef166"/>
    </style:style>
    <style:style style:name="P72" style:family="paragraph" style:parent-style-name="Heading_20_3" style:master-page-name="Standard">
      <style:paragraph-properties style:page-number="auto"/>
      <style:text-properties officeooo:rsid="020936f1" officeooo:paragraph-rsid="020936f1"/>
    </style:style>
    <style:style style:name="P73" style:family="paragraph" style:parent-style-name="Text_20_body" style:list-style-name="L13"/>
    <style:style style:name="P74" style:family="paragraph" style:parent-style-name="Standard">
      <style:text-properties officeooo:paragraph-rsid="020936f1"/>
    </style:style>
    <style:style style:name="P75" style:family="paragraph" style:parent-style-name="Heading_20_2">
      <style:text-properties officeooo:rsid="020748da" officeooo:paragraph-rsid="020748da"/>
    </style:style>
    <style:style style:name="P76" style:family="paragraph" style:parent-style-name="Text_20_body">
      <style:text-properties officeooo:rsid="020c2e80" officeooo:paragraph-rsid="020c2e80"/>
    </style:style>
    <style:style style:name="P77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78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79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80" style:family="paragraph" style:parent-style-name="Text_20_body">
      <style:paragraph-properties fo:margin-left="0.035cm" fo:margin-right="0cm" fo:margin-top="0.016cm" fo:margin-bottom="0cm" style:contextual-spacing="false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 style:parent-style-name="Text_20_body">
      <style:paragraph-properties fo:margin-left="0.035cm" fo:margin-right="0cm" fo:margin-top="0.018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language="en" fo:country="US" fo:font-weight="bold" officeooo:rsid="01c1459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ca7dee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fo:letter-spacing="-0.002cm"/>
    </style:style>
    <style:style style:name="T17" style:family="text">
      <style:text-properties fo:letter-spacing="-0.004cm"/>
    </style:style>
    <style:style style:name="T18" style:family="text">
      <style:text-properties officeooo:rsid="01c285a9"/>
    </style:style>
    <style:style style:name="T19" style:family="text">
      <style:text-properties officeooo:rsid="01a77d50"/>
    </style:style>
    <style:style style:name="T20" style:family="text">
      <style:text-properties officeooo:rsid="021cb759"/>
    </style:style>
    <style:style style:name="T21" style:family="text">
      <style:text-properties officeooo:rsid="01d0cd21"/>
    </style:style>
    <style:style style:name="T22" style:family="text">
      <style:text-properties officeooo:rsid="01d28548"/>
    </style:style>
    <style:style style:name="T23" style:family="text">
      <style:text-properties officeooo:rsid="021d48ad"/>
    </style:style>
    <style:style style:name="T24" style:family="text">
      <style:text-properties officeooo:rsid="01d45619"/>
    </style:style>
    <style:style style:name="T25" style:family="text">
      <style:text-properties officeooo:rsid="01d49faf"/>
    </style:style>
    <style:style style:name="T26" style:family="text">
      <style:text-properties officeooo:rsid="01d49781"/>
    </style:style>
    <style:style style:name="T27" style:family="text">
      <style:text-properties officeooo:rsid="01f9a681"/>
    </style:style>
    <style:style style:name="T28" style:family="text">
      <style:text-properties officeooo:rsid="01d693e3"/>
    </style:style>
    <style:style style:name="T29" style:family="text">
      <style:text-properties officeooo:rsid="01fbc51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27405ea"/>
    </style:style>
    <style:style style:name="T32" style:family="text">
      <style:text-properties officeooo:rsid="01d88847"/>
    </style:style>
    <style:style style:name="T33" style:family="text">
      <style:text-properties fo:language="en" fo:country="US" officeooo:rsid="02e3f592"/>
    </style:style>
    <style:style style:name="T34" style:family="text">
      <style:text-properties officeooo:rsid="02e9fb89"/>
    </style:style>
    <style:style style:name="T35" style:family="text">
      <style:text-properties officeooo:rsid="02ea7725"/>
    </style:style>
    <style:style style:name="T36" style:family="text">
      <style:text-properties officeooo:rsid="02eb3bbc"/>
    </style:style>
    <style:style style:name="T37" style:family="text">
      <style:text-properties officeooo:rsid="029de65b"/>
    </style:style>
    <style:style style:name="T38" style:family="text">
      <style:text-properties officeooo:rsid="029e8940"/>
    </style:style>
    <style:style style:name="T39" style:family="text">
      <style:text-properties officeooo:rsid="02a14431"/>
    </style:style>
    <style:style style:name="T40" style:family="text">
      <style:text-properties fo:language="ru" fo:country="RU"/>
    </style:style>
    <style:style style:name="T41" style:family="text">
      <style:text-properties officeooo:rsid="02a09257"/>
    </style:style>
    <style:style style:name="T42" style:family="text">
      <style:text-properties fo:language="en" fo:country="US" officeooo:rsid="023ca75c"/>
    </style:style>
    <style:style style:name="T43" style:family="text">
      <style:text-properties officeooo:rsid="023fb1e6"/>
    </style:style>
    <style:style style:name="T44" style:family="text">
      <style:text-properties officeooo:rsid="02a52996"/>
    </style:style>
    <style:style style:name="T45" style:family="text">
      <style:text-properties officeooo:rsid="02a2bc36"/>
    </style:style>
    <style:style style:name="T46" style:family="text">
      <style:text-properties officeooo:rsid="02400d9b"/>
    </style:style>
    <style:style style:name="T47" style:family="text">
      <style:text-properties officeooo:rsid="025fb159"/>
    </style:style>
    <style:style style:name="T48" style:family="text">
      <style:text-properties officeooo:rsid="0241e581"/>
    </style:style>
    <style:style style:name="T49" style:family="text">
      <style:text-properties officeooo:rsid="02432bbe"/>
    </style:style>
    <style:style style:name="T50" style:family="text">
      <style:text-properties officeooo:rsid="0244dbe6"/>
    </style:style>
    <style:style style:name="T51" style:family="text">
      <style:text-properties officeooo:rsid="02ef8be9"/>
    </style:style>
    <style:style style:name="T52" style:family="text">
      <style:text-properties officeooo:rsid="02f187c1"/>
    </style:style>
    <style:style style:name="T53" style:family="text">
      <style:text-properties officeooo:rsid="02f4e288"/>
    </style:style>
    <style:style style:name="T54" style:family="text">
      <style:text-properties officeooo:rsid="02f37159"/>
    </style:style>
    <style:style style:name="T55" style:family="text">
      <style:text-properties fo:language="en" fo:country="US" officeooo:rsid="02dec50f"/>
    </style:style>
    <style:style style:name="T56" style:family="text">
      <style:text-properties officeooo:rsid="02487156"/>
    </style:style>
    <style:style style:name="T57" style:family="text">
      <style:text-properties officeooo:rsid="0290247e"/>
    </style:style>
    <style:style style:name="T58" style:family="text">
      <style:text-properties officeooo:rsid="02cae8e1"/>
    </style:style>
    <style:style style:name="T59" style:family="text">
      <style:text-properties fo:language="en" fo:country="US" officeooo:rsid="02e1ffc4"/>
    </style:style>
    <style:style style:name="T60" style:family="text">
      <style:text-properties officeooo:rsid="0246b1bb"/>
    </style:style>
    <style:style style:name="T61" style:family="text">
      <style:text-properties officeooo:rsid="024d4fa3"/>
    </style:style>
    <style:style style:name="T62" style:family="text">
      <style:text-properties officeooo:rsid="024fb74d"/>
    </style:style>
    <style:style style:name="T63" style:family="text">
      <style:text-properties officeooo:rsid="025118fc"/>
    </style:style>
    <style:style style:name="T64" style:family="text">
      <style:text-properties officeooo:rsid="0252777b"/>
    </style:style>
    <style:style style:name="T65" style:family="text">
      <style:text-properties officeooo:rsid="02a08bf1"/>
    </style:style>
    <style:style style:name="T66" style:family="text">
      <style:text-properties fo:font-size="10pt" style:font-size-asian="10pt"/>
    </style:style>
    <style:style style:name="T67" style:family="text">
      <style:text-properties fo:font-size="10pt" fo:letter-spacing="-0.009cm" style:font-size-asian="10pt"/>
    </style:style>
    <style:style style:name="T68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А</text:span><text:span text:style-name="T4">нализ предметной области и формирование требований</text:span></text:h>
      <text:p text:style-name="Заголовок_20_2_20_титул"/>
      <text:p text:style-name="Заголовок_20_2_20_титул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9">И-42 группы</text:span></text:p>
      <text:p text:style-name="P13">Самсыка Р. М.</text:p>
      <text:p text:style-name="P14"/>
      <text:p text:style-name="P15"><text:span text:style-name="T8">Проверил</text:span>:</text:p>
      <text:p text:style-name="P16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3" text:is-list-header="true">Цель<text:span text:style-name="T16"> </text:span><text:span text:style-name="T17">работы</text:span></text:h>
      <text:p text:style-name="P21"><text:tab/>Составить и проанализировать требования к информационной системе, оформить техническое задание на разработку программного обеспечения.</text:p>
      <text:h text:style-name="Heading_20_2" text:outline-level="2"><text:span text:style-name="T18">1 </text:span>Теоретические с<text:span text:style-name="T19">в</text:span>едения</text:h>
      <text:list xml:id="list74865266" text:style-name="L1">
        <text:list-item>
          <text:p text:style-name="P22">Необходимость обследований <text:s/>предметной области обусловлена сложностью процесса внедрения, большим разнообразием включаемых в него задач, нео<text:span text:style-name="T20">д</text:span>нозначностью применяемых решений.</text:p>
        </text:list-item>
        <text:list-item>
          <text:p text:style-name="P23"><text:span text:style-name="T21">К </text:span>модели предметной области <text:span text:style-name="T21">предъявляют требования:</text:span></text:p>
        </text:list-item>
      </text:list>
      <text:list text:style-name="L2">
        <text:list-item>
          <text:p text:style-name="P24">формализация, обеспечивающая однозначное описание структуры предметной области;</text:p>
        </text:list-item>
        <text:list-item>
          <text:p text:style-name="P25">понятность для заказчиков и разработчиков на основе применения графических средств;</text:p>
        </text:list-item>
        <text:list-item>
          <text:p text:style-name="P25">реализуемость, подразумевающая наличие средств физической реализации модели предметной области в информационной системе;</text:p>
        </text:list-item>
        <text:list-item>
          <text:p text:style-name="P25">обеспечение возможности оценки эффективности реализации модели предметной области на основе определённых методов и вычисляемых показателей.</text:p>
        </text:list-item>
      </text:list>
      <text:list xml:id="list112147324983136" text:continue-list="list74865266" text:style-name="L1">
        <text:list-item>
          <text:p text:style-name="P26"><text:span text:style-name="T22">П</text:span>ри исследовании предметной области следует построить <text:span text:style-name="T22">следующие модели:</text:span></text:p>
        </text:list-item>
      </text:list>
      <text:list text:style-name="L3">
        <text:list-item>
          <text:p text:style-name="P27">объ<text:span text:style-name="T23">е</text:span>ктная модель, отражающая состав взаимодействующих <text:s/>в процессах материальных и информационных объ<text:span text:style-name="T23">е</text:span>ктов предметной области;</text:p>
        </text:list-item>
        <text:list-item>
          <text:p text:style-name="P27">функциональная модель, отражающая взаимосвязь функций по преобразованию объ<text:span text:style-name="T23">е</text:span>ктов в процессах;</text:p>
        </text:list-item>
        <text:list-item>
          <text:p text:style-name="P27">модель управления, отражающая события и бизнес-правила, которые воздействуют на выполнение процессов;</text:p>
        </text:list-item>
        <text:list-item>
          <text:p text:style-name="P28">организационная модель, отражающая взаимодействие организационных единиц предприятия и персонала в процессах;</text:p>
        </text:list-item>
        <text:list-item>
          <text:p text:style-name="P28">техническая модель, описывающая топологию расположения и способы коммуникации комплекса технических средств.</text:p>
        </text:list-item>
      </text:list>
      <text:list xml:id="list112147787903859" text:continue-list="list112147324983136" text:style-name="L1">
        <text:list-item>
          <text:p text:style-name="P29"><text:span text:style-name="T24">Под бизнес-процессом принято понимать цепь логически связанных повторяющихся действий, которые совместно реализуют некую бизнес-задачу или цепь. </text:span><text:span text:style-name="T25">Основными бизнес-процессами являются процессы, непосредственно связанные с созданием продукции или оказанием услуг, </text:span><text:soft-page-break/><text:span text:style-name="T25">составляющих основную деятельность организации и обеспечивающих получение дохода.</text:span></text:p>
        </text:list-item>
        <text:list-item>
          <text:p text:style-name="P29">Обследование предметной области включает в себя следующие шаги: </text:p>
        </text:list-item>
      </text:list>
      <text:list text:style-name="L4">
        <text:list-item>
          <text:p text:style-name="P30">определение структуры организации;</text:p>
        </text:list-item>
        <text:list-item>
          <text:p text:style-name="P30">определение целевых функций организации;</text:p>
        </text:list-item>
        <text:list-item>
          <text:p text:style-name="P30">анализ распределения функций по подразделениям и сотрудникам;</text:p>
        </text:list-item>
        <text:list-item>
          <text:p text:style-name="P31">выявление функциональных взаимодействий между подразделениями; </text:p>
        </text:list-item>
        <text:list-item>
          <text:p text:style-name="P31">анализ информационных потоков внутри подразделений и между ними; <text:s/></text:p>
        </text:list-item>
        <text:list-item>
          <text:p text:style-name="P31">анализ информации, поступающей из внешних источников; </text:p>
        </text:list-item>
        <text:list-item>
          <text:p text:style-name="P31">анализ существующих средств автоматизации деятельности организации; </text:p>
        </text:list-item>
        <text:list-item>
          <text:p text:style-name="P31">предварительное определение требований к будущей системе.</text:p>
        </text:list-item>
      </text:list>
      <text:list xml:id="list112146680890835" text:continue-list="list112147787903859" text:style-name="L1">
        <text:list-item>
          <text:p text:style-name="P29">Реинжиниринг бизнес-процессов — радикальное перепроектирование бизнес-процессов и технологий их обработки.</text:p>
        </text:list-item>
        <text:list-item>
          <text:p text:style-name="P32"><text:span text:style-name="T26">Все методы объед</text:span><text:span text:style-name="T27">и</text:span><text:span text:style-name="T26">няют в группы по различным признакам.</text:span></text:p>
          <text:p text:style-name="P33">По цели обследования выделяют:</text:p>
        </text:list-item>
      </text:list>
      <text:list text:style-name="L5">
        <text:list-item>
          <text:p text:style-name="P34">метод организации локального проведения обследования, используемый для разработки проекта отдельной задачи или для комплекса задач;</text:p>
        </text:list-item>
        <text:list-item>
          <text:p text:style-name="P34">метод системного обследования объекта, применяемый для изучения всего объекта в целях разработки для него проекта программного обеспечения в целом.</text:p>
        </text:list-item>
      </text:list>
      <text:list xml:id="list112147128156079" text:continue-list="list112146680890835" text:style-name="L1">
        <text:list-header>
          <text:p text:style-name="P33">По числу исполнителей, проводящих обследование:</text:p>
        </text:list-header>
      </text:list>
      <text:list text:style-name="L6">
        <text:list-item>
          <text:p text:style-name="P35">индивидуальное обследование, осуществляемое одним проектировщиком;</text:p>
        </text:list-item>
        <text:list-item>
          <text:p text:style-name="P35">бригадное <text:span text:style-name="T28">обследование, осуществляемое одним проектировщиком.</text:span></text:p>
        </text:list-item>
      </text:list>
      <text:list xml:id="list112147519380883" text:continue-list="list112147128156079" text:style-name="L1">
        <text:list-header>
          <text:p text:style-name="P36">По степени охвата предметной области:</text:p>
        </text:list-header>
      </text:list>
      <text:list text:style-name="L7">
        <text:list-item>
          <text:p text:style-name="P37">метод сплошного обследования, охватывающий все подразделения производственной или экономической системы;</text:p>
        </text:list-item>
        <text:list-item>
          <text:p text:style-name="P37">метод выборочного обследования, применяемого при наличии типовых по структуре объектов.</text:p>
        </text:list-item>
      </text:list>
      <text:list text:continue-list="list112147519380883" text:style-name="L1">
        <text:list-item>
          <text:p text:style-name="P38"><text:span text:style-name="T29">О</text:span>сновные разделы технического задания согласно стандартам:</text:p>
        </text:list-item>
      </text:list>
      <text:list text:style-name="L8">
        <text:list-item>
          <text:p text:style-name="P39"><text:span text:style-name="Strong_20_Emphasis"><text:span text:style-name="T30">Общие сведения</text:span></text:span></text:p>
        </text:list-item>
        <text:list-item>
          <text:p text:style-name="P39"><text:span text:style-name="Strong_20_Emphasis"><text:span text:style-name="T30">Назначение и цели создания (развития) системы</text:span></text:span></text:p>
        </text:list-item>
        <text:list-item>
          <text:p text:style-name="P39"><text:span text:style-name="Strong_20_Emphasis"><text:span text:style-name="T30">Характеристика объектов автоматизации</text:span></text:span></text:p>
        </text:list-item>
        <text:list-item>
          <text:p text:style-name="P39"><text:span text:style-name="Strong_20_Emphasis"><text:span text:style-name="T30">Требования к системе</text:span></text:span><text:span text:style-name="T30"> </text:span></text:p>
        </text:list-item>
        <text:list-item>
          <text:p text:style-name="P39"><text:span text:style-name="Strong_20_Emphasis"><text:span text:style-name="T30">Состав и содержание работ по созданию системы</text:span></text:span><text:span text:style-name="T30"> </text:span></text:p>
        </text:list-item>
        <text:list-item>
          <text:p text:style-name="P39"><text:span text:style-name="Strong_20_Emphasis"><text:span text:style-name="T30">Порядок контроля и приемки системы</text:span></text:span><text:span text:style-name="T30"> </text:span></text:p>
        </text:list-item>
        <text:list-item>
          <text:p text:style-name="P39"><text:soft-page-break/><text:span text:style-name="Strong_20_Emphasis"><text:span text:style-name="T30">Требования к составу и содержанию работ по подготовке объекта автоматизации к вводу системы в действие</text:span></text:span><text:span text:style-name="T30"> </text:span></text:p>
        </text:list-item>
        <text:list-item>
          <text:p text:style-name="P39"><text:span text:style-name="Strong_20_Emphasis"><text:span text:style-name="T30">Требования к документированию</text:span></text:span><text:span text:style-name="T30"> </text:span></text:p>
        </text:list-item>
        <text:list-item>
          <text:p text:style-name="P39"><text:span text:style-name="Strong_20_Emphasis"><text:span text:style-name="T30">Источники разработки</text:span></text:span><text:span text:style-name="T30"> </text:span></text:p>
        </text:list-item>
      </text:list>
      <text:h text:style-name="Heading_20_2" text:outline-level="2">Постановка задачи</text:h>
      <text:list text:style-name="L9">
        <text:list-item>
          <text:p text:style-name="P40">Произвести предварительное исследование предметной области и анализ бизнес-процессов;</text:p>
        </text:list-item>
        <text:list-item>
          <text:p text:style-name="P40">Выполнить графическое и текстовое описание предметной области (построить модель предметной области);</text:p>
        </text:list-item>
        <text:list-item>
          <text:p text:style-name="P40">Сформировать предварительное определение требований к будущей системе.</text:p>
        </text:list-item>
      </text:list>
      <text:h text:style-name="P41" text:outline-level="2"><text:span text:style-name="T31">1</text:span><text:span text:style-name="T32"> </text:span>Анализ бизнес-процессов</text:h>
      <text:p text:style-name="Text_20_body"><text:tab/>Ресторан — это предприятие общественного питания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. <text:span text:style-name="T33">[</text:span><text:span text:style-name="T33"><text:bookmark-ref text:reference-format="number-no-superior" text:ref-name="__RefNumPara__15747_3416459804">1</text:bookmark-ref></text:span><text:span text:style-name="T33">]</text:span></text:p>
      <text:p text:style-name="Text_20_body"><text:tab/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Text_20_body"><text:tab/><text:span text:style-name="T34">Предварительное моделирование предметной области позволяет выявить основные бизнес-процессы</text:span>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<text:span text:style-name="T35">Иногда</text:span>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<text:soft-page-break/>контроля за их наличием на складе, проведения инвентаризации и своевременного формирования заявок <text:span text:style-name="T36">для поставщиков</text:span>. Отсутствие единой автоматизированной системы для управления этими процессами приводит к риску человеческих ошибок, замедлению обслуживания и сложностям в оперативном управлении ресурсами. <text:span text:style-name="T33">[</text:span><text:span text:style-name="T33"><text:bookmark-ref text:reference-format="number-no-superior" text:ref-name="__RefNumPara__15749_3416459804">2</text:bookmark-ref></text:span><text:span text:style-name="T33">]</text:span></text:p>
      <text:p text:style-name="P42"><text:tab/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<text:span text:style-name="T37">на бумажный </text:span><text:span text:style-name="T38">бланк заказа</text:span>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<text:span text:style-name="T39">На рисунке 1 изображена схема процесса приёма заказа.</text:span></text:p>
      <text:p text:style-name="P43"><text:tab/>Процесс управления складом в <text:span text:style-name="T40">ресторане</text:span> <text:span text:style-name="T40">представляет</text:span>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<text:soft-page-break/>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 </text:p>
      <text:p text:style-name="Standard"/>
      <text:p text:style-name="Standard"><draw:frame draw:style-name="fr1" draw:name="Врезка25" text:anchor-type="char" svg:width="17cm" draw:z-index="16"><draw:text-box fo:min-height="12.989cm"><text:p text:style-name="P44"><draw:frame draw:style-name="fr2" draw:name="Image1" text:anchor-type="paragraph" svg:width="17cm" style:rel-width="100%" svg:height="12.989cm" style:rel-height="scale" draw:z-index="17"><draw:image xlink:href="Pictures/1000000000000500000003D2BC888963.jpg" xlink:type="simple" xlink:show="embed" xlink:actuate="onLoad" draw:mime-type="image/jpeg"/></draw:frame>Рис. <text:sequence text:ref-name="refРис.0" text:name="Рис." text:formula="ooow:Рис.+1" style:num-format="1">1</text:sequence>— <text:span text:style-name="T41">Схема процесса оформления заказа</text:span></text:p></draw:text-box></draw:frame></text:p>
      <text:p text:style-name="Standard"><text:tab/></text:p>
      <text:h text:style-name="P45" text:outline-level="2"><text:span text:style-name="T42">2</text:span><text:span text:style-name="T32"> </text:span>Предварительное определение требований</text:h>
      <text:h text:style-name="Heading_20_2" text:outline-level="2">2.1 Общее описание </text:h>
      <text:p text:style-name="Text_20_body"><text:tab/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, <text:soft-page-break/>формирование финансовых отчётов и автоматизированное генерирование чеков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h text:style-name="Heading_20_3" text:outline-level="3"><text:span text:style-name="T43">2.1.1 </text:span>Общий взгляд на продукт</text:h>
      <text:p text:style-name="P46"><text:tab/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<text:span text:style-name="T44">На рисунке 2 изображена схема работы с заказом используя приложение.</text:span></text:p>
      <text:p text:style-name="Text_20_body"/>
      <text:p text:style-name="Text_20_body"/>
      <text:p text:style-name="P47"/>
      <text:p text:style-name="Text_20_body"><draw:frame draw:style-name="fr1" draw:name="Врезка26" text:anchor-type="char" svg:width="26.573cm" draw:z-index="15"><draw:text-box fo:min-height="14.351cm"><text:p text:style-name="P48"><draw:frame draw:style-name="fr2" draw:name="Изображение1" text:anchor-type="paragraph" svg:width="25.7cm" style:rel-width="100%" svg:height="12.539cm" style:rel-height="scale" draw:z-index="20"><draw:image xlink:href="Pictures/1000AADE00007D2900003D15809160B2.svg" xlink:type="simple" xlink:show="embed" xlink:actuate="onLoad" draw:mime-type="image/svg+xml"/><draw:image xlink:href="Pictures/10000001000003F4000001EE065A285A.png" xlink:type="simple" xlink:show="embed" xlink:actuate="onLoad" draw:mime-type="image/png"/></draw:frame>Рис. <text:sequence text:ref-name="refРис.1" text:name="Рис." text:formula="ooow:Рис.+1" style:num-format="1">2</text:sequence>— <text:span text:style-name="T45">Схема работы с заказом</text:span></text:p></draw:text-box></draw:frame></text:p>
      <text:h text:style-name="P49" text:outline-level="3" text:is-list-header="true"><text:span text:style-name="T43">2.1.</text:span><text:span text:style-name="T46">2</text:span><text:span text:style-name="T43"> Классы и характеристики пользователей</text:span></text:h>
      <text:p text:style-name="Text_20_body"><text:span text:style-name="T47"><text:tab/></text:span>Приложением пользуются официанты, администрация, аналитики, кладовщики. Официанты оформляют заказы; кладовщики обновляют информацию о продукте на складе; аналитики анализируют продажи; администрация проверяет приложение на соответствие данных, работоспособность.</text:p>
      <text:h text:style-name="P50" text:outline-level="3"><text:span text:style-name="T43">2.1.</text:span><text:span text:style-name="T46">3</text:span><text:span text:style-name="T43"> Ограничение дизайна и реализации</text:span></text:h>
      <text:p text:style-name="Text_20_body"><text:tab/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h text:style-name="P51" text:outline-level="3"><text:span text:style-name="T43">2.1.</text:span><text:span text:style-name="T48">4</text:span><text:span text:style-name="T43"> Предположения и зависимости</text:span></text:h>
      <text:p text:style-name="P52"><text:tab/>Для функционирования системы требуется корректно работающая локальная сеть. Установка дополнительных программ или приложений не требуется. </text:p>
      <text:h text:style-name="Heading_20_2" text:outline-level="2"><text:span text:style-name="T49">2.2 </text:span>Функциональные требования</text:h>
      <text:p text:style-name="Text_20_body"><text:span text:style-name="Strong_20_Emphasis"><text:tab/></text:span><text:span text:style-name="Strong_20_Emphasis"><text:span text:style-name="T30">Хранение актуального меню: Приложение должно обеспечивать централизованное хранение и управление меню. Данные включают наименования блюд, категории, цены, состав ингредиентов. Все изменения должны мгновенно синхронизироваться между устройствами. Для управления должна быть предусмотрена административная панель.</text:span></text:span></text:p>
      <text:p text:style-name="Text_20_body"><text:span text:style-name="Strong_20_Emphasis"><text:span text:style-name="T30"><text:tab/>Подключение к общему складу</text:span></text:span><text:span text:style-name="T30">: Система обязана иметь модуль складского учёта, который автоматически отслеживает остатки ингредиентов в реальном времени. Это включает автоматическое списание продуктов при оформлении заказа, контроль минимальных остатков с генерацией уведомлений о необходимости пополнения запасов.</text:span></text:p>
      <text:p text:style-name="Text_20_body"><text:span text:style-name="Strong_20_Emphasis"><text:span text:style-name="T30"><text:tab/>Оформление заказов</text:span></text:span><text:span text:style-name="T30">: Функционал должен позволять создавать новые заказы, привязывая их к конкретному столику и официанту. Должна быть возможность добавлять в заказ блюда из актуального меню.</text:span></text:p>
      <text:p text:style-name="Text_20_body"><text:span text:style-name="Strong_20_Emphasis"><text:span text:style-name="T30"><text:tab/>Сохранение чеков</text:span></text:span><text:span text:style-name="T30">: Приложение должно сохранять электронные копии фискальных чеков по каждому закрытому заказу. Данные чеков должны содержать все обязательные реквизиты в соответствии с законодательством</text:span></text:p>
      <text:p text:style-name="Text_20_body"><text:soft-page-break/>и быть доступными для последующего поиска, просмотра и формирования отчётов.</text:p>
      <text:p text:style-name="Text_20_body"><text:span text:style-name="Strong_20_Emphasis"><text:span text:style-name="T30"><text:tab/>Формирование списка продуктов на складе, которых осталось немного</text:span></text:span><text:span text:style-name="T30">: На основе данных складского учёта приложение должно автоматически генерировать отчёт или список товаров, остаток которых достиг установленного минимального порога. Это позволяет своевременно инициировать процедуру закупки и предотвращать ситуации отсутствия необходимых ингредиентов.</text:span></text:p>
      <text:h text:style-name="P53" text:outline-level="2"><text:span text:style-name="T49">2.</text:span><text:span text:style-name="T50">3</text:span><text:span text:style-name="T49"> Требования к данным</text:span></text:h>
      <text:h text:style-name="P54" text:outline-level="3">2.3.1 Логическая модель данных</text:h>
      <text:p text:style-name="P55">Основные сущности которые отразятся в базе данных:</text:p>
      <text:list text:style-name="L10">
        <text:list-item>
          <text:p text:style-name="P56">Официант — тот, кто составляет заказ;</text:p>
        </text:list-item>
        <text:list-item>
          <text:p text:style-name="P56">Заказ — то, что записывается в базу данных. Хранит информацию о заказанных блюдах;</text:p>
        </text:list-item>
        <text:list-item>
          <text:p text:style-name="P56">Заказанное блюдо — блюдо которое запишется в заказ, его количество и просьба от клиента;</text:p>
        </text:list-item>
        <text:list-item>
          <text:p text:style-name="P57">Блюдо — экземпляр блюда который указан в меню, ссылается на состав<text:span text:style-name="T51">;</text:span></text:p>
        </text:list-item>
        <text:list-item>
          <text:p text:style-name="P57">Состав <text:span text:style-name="T52">— список продуктов для приготовления блюда;</text:span></text:p>
        </text:list-item>
        <text:list-item>
          <text:p text:style-name="P58">Продукт в составе — <text:span text:style-name="T53">продукт который входит в состав блюда;</text:span></text:p>
        </text:list-item>
        <text:list-item>
          <text:p text:style-name="P59">Продукт <text:span text:style-name="T54"><text:s/>— </text:span>продукт для приготовления блюда.</text:p>
        </text:list-item>
      </text:list>
      <text:p text:style-name="P60">На рисунке 3 представлена логическая модель данных, описывающая основные сущности в выбранном бизнес процессе. <text:span text:style-name="T55">[</text:span><text:span text:style-name="T55"><text:bookmark-ref text:reference-format="number-no-superior" text:ref-name="__RefNumPara__12770_3416459804">4</text:bookmark-ref></text:span><text:span text:style-name="T55">]</text:span></text:p>
      <text:p text:style-name="P60"/>
      <text:p text:style-name="P61"><draw:frame draw:style-name="fr3" draw:name="Врезка27" text:anchor-type="char" svg:width="15.877cm" draw:z-index="18"><draw:text-box fo:min-height="10.082cm"><text:p text:style-name="Рис."><draw:frame draw:style-name="fr2" draw:name="Изображение2" text:anchor-type="paragraph" svg:width="15.877cm" style:rel-width="100%" svg:height="10.082cm" style:rel-height="scale" draw:z-index="19"><draw:image xlink:href="Pictures/100000000000025800000187062973CC.png" xlink:type="simple" xlink:show="embed" xlink:actuate="onLoad" draw:mime-type="image/png"/></draw:frame>Рис. <text:sequence text:ref-name="refРис.2" text:name="Рис." text:formula="ooow:Рис.+1" style:num-format="1">3</text:sequence><text:s/>— Модель данных</text:p></draw:text-box></draw:frame><text:soft-page-break/></text:p>
      <text:h text:style-name="P62" text:outline-level="3"><text:span text:style-name="T56">2.3.</text:span><text:span text:style-name="T57">2</text:span><text:span text:style-name="T56"> Отчёты</text:span></text:h>
      <text:p text:style-name="Text_20_body"><text:tab/>Система должна формировать комплекс отчётных документов, обеспечивающих оперативный контроль и стратегическое управление рестораном. Формирование фискальных чеков является базовой функцией. Все чеки должны содержать все обязательные реквизиты в соответствии с законодательством.</text:p>
      <text:p text:style-name="Text_20_body"><text:tab/>Для анализа эффективности работы система должна предоставлять отчёт о выручке за период с детализацией по продукту, столику, официанту и временным промежуткам, позволяя отслеживать такие ключевые показатели, как общая выручка, количество гостей и динамика среднего чека.</text:p>
      <text:p text:style-name="Text_20_body"><text:tab/>На основе данных складского учёта должен автоматически формироваться отчёт о продуктах с низкими остатками, в котором отображаются продукты, количество которых достигло установленного минимального порога, для своевременного пополнения запасов.</text:p>
      <text:p text:style-name="P63"/>
      <text:h text:style-name="Heading_20_3" text:outline-level="3"><text:span text:style-name="T56">2.3.</text:span><text:span text:style-name="T57">3</text:span><text:span text:style-name="T56"> Получение, целостность, хранение и утилизация данных</text:span></text:h>
      <text:p text:style-name="Text_20_body"><text:tab/>Данные поступают из следующих источников:</text:p>
      <text:list text:style-name="L11">
        <text:list-item>
          <text:p text:style-name="P64"><text:soft-page-break/>Административная панель: внесение и корректировка данных о меню.</text:p>
        </text:list-item>
        <text:list-item>
          <text:p text:style-name="P64">Планшеты официантов: данные о заказах в реальном времени.</text:p>
        </text:list-item>
        <text:list-item>
          <text:p text:style-name="P64">Планшеты <text:span text:style-name="T58">кладовщиков</text:span>: данные об остатках и операциях с ингредиентами.</text:p>
        </text:list-item>
      </text:list>
      <text:p text:style-name="Text_20_body">Все данные хранятся централизованно, обеспечивая мгновенную синхронизацию между устройствами в локальной сети. Срок хранения фискальных чеков составляет не менее 3 лет, по истечении которого данные подлежат утилизации. <text:span text:style-name="T59">[</text:span><text:span text:style-name="T59"><text:bookmark-ref text:reference-format="number-no-superior" text:ref-name="__RefNumPara__11282_3416459804">5</text:bookmark-ref></text:span><text:span text:style-name="T59">]</text:span></text:p>
      <text:p text:style-name="Standard"/>
      <text:h text:style-name="Heading_20_2" text:outline-level="2"><text:span text:style-name="T60">2.4 </text:span>Требования к внешним интерфейсам</text:h>
      <text:h text:style-name="Heading_20_3" text:outline-level="3"><text:span text:style-name="T61">2.4.1</text:span> Пользовательские интерфе<text:span text:style-name="T62">й</text:span>сы</text:h>
      <text:p text:style-name="P65"><text:tab/>Интерфейс системы должен быть интуитивно понятным и удобным для пользователей. Основные требования:</text:p>
      <text:list text:style-name="L12">
        <text:list-item>
          <text:p text:style-name="P66">Отсутствие отвлекающих элементов.</text:p>
        </text:list-item>
        <text:list-item>
          <text:p text:style-name="P66">Использование крупного шрифта и четкой цветовой гаммы.</text:p>
        </text:list-item>
        <text:list-item>
          <text:p text:style-name="P66">Минимизация текста для быстрого восприятия информации.</text:p>
        </text:list-item>
      </text:list>
      <text:h text:style-name="P67" text:outline-level="3"><text:span text:style-name="T61">2.4.2</text:span> Интерфейсы ПО</text:h>
      <text:p text:style-name="P68"><text:tab/>Система работает на базе операционной системы Android версии не ниже 9. Для взаимодействия с базой данных используется SQLite с использованием языка SQL. </text:p>
      <text:h text:style-name="P67" text:outline-level="3"><text:span text:style-name="T61">2.4.3</text:span> Интерфейсы оборудования</text:h>
      <text:p text:style-name="P68"><text:tab/>Планшеты связываются между собой по беспроводной сети интернет, обеспечивая обмен данными в реальном времени. </text:p>
      <text:h text:style-name="Heading_20_2" text:outline-level="2"><text:span text:style-name="T63">2.5 </text:span>Атрибуты качества</text:h>
      <text:h text:style-name="P69" text:outline-level="3"><text:span text:style-name="T61">2.</text:span><text:span text:style-name="T64">5</text:span><text:span text:style-name="T61">.1</text:span> Удобство использования</text:h>
      <text:p text:style-name="P70"><text:tab/>Самое главное, чтобы было удобно использовать приложение. Обучение использованию должно быть простым, чтобы изучить работу можно было в одиночку не более 15 минут. </text:p>
      <text:h text:style-name="P69" text:outline-level="3"><text:soft-page-break/><text:span text:style-name="T61">2.</text:span><text:span text:style-name="T64">5</text:span><text:span text:style-name="T61">.2</text:span> Производительность</text:h>
      <text:p text:style-name="P70"><text:tab/>Производительность системы должна обеспечивать стабильную работу при высокой нагрузке. Время обновления данных должно быть минимальным. </text:p>
      <text:h text:style-name="P69" text:outline-level="3"><text:span text:style-name="T61">2.</text:span><text:span text:style-name="T64">5</text:span><text:span text:style-name="T61">.3</text:span> Безопасность</text:h>
      <text:p text:style-name="P70"><text:tab/><text:span text:style-name="T65">Приложение не требует персональных данных кроме фамилии и имени. Поэтому защита конфиденциальности гарантируется. Физическая безопасность зависит только от используемого устройства.</text:span></text:p>
      <text:h text:style-name="P69" text:outline-level="3"><text:span text:style-name="T61">2.</text:span><text:span text:style-name="T64">5</text:span><text:span text:style-name="T61">.4</text:span> Техника безопасности</text:h>
      <text:p text:style-name="P70"><text:tab/>Для предотвращения потери данных рекомендуется периодическое резервное копирование информации на внешние устройства. </text:p>
      <text:p text:style-name="P71"/>
      <text:h text:style-name="P72" text:outline-level="3" text:is-list-header="true">Список использованных источников</text:h>
      <text:list text:style-name="L13">
        <text:list-item>
          <text:p text:style-name="P73"><text:bookmark-start text:name="__RefNumPara__15747_3416459804"/>ГОСТ 30389-2013 «Услуги общественного питания. Классификация и общие требования»<text:bookmark-end text:name="__RefNumPara__15747_3416459804"/></text:p>
        </text:list-item>
        <text:list-item>
          <text:p text:style-name="P73"><text:bookmark-start text:name="__RefNumPara__15749_3416459804"/>ГОСТ 31985-2013 «Услуги общественного питания. Термины и определения»<text:bookmark-end text:name="__RefNumPara__15749_3416459804"/></text:p>
        </text:list-item>
        <text:list-item>
          <text:p text:style-name="P73"><text:bookmark-start text:name="__RefNumPara__15751_3416459804"/>СанПиН 2.3/2.4.3590-20 «Санитарно-эпидемиологические требования к организации общественного питания». – М.: Роспотребнадзор, 2021. – 60 с.<text:bookmark-end text:name="__RefNumPara__15751_3416459804"/></text:p>
        </text:list-item>
        <text:list-item>
          <text:p text:style-name="P73"><text:bookmark-start text:name="__RefNumPara__12770_3416459804"/>Соловьев А.И. Базы данных: учебник для вузов. – СПб.: БХВ-Петербург, 2022. – 332 с.<text:bookmark-end text:name="__RefNumPara__12770_3416459804"/></text:p>
        </text:list-item>
        <text:list-item>
          <text:p text:style-name="P73"><text:bookmark-start text:name="__RefNumPara__11282_3416459804"/>Тарасов И.А. Хранение данных и бизнес-аналитика. – М.: ДМК Пресс, 2021. – 215 с.<text:bookmark-end text:name="__RefNumPara__11282_3416459804"/></text:p>
        </text:list-item>
      </text:list>
      <text:p text:style-name="P74"/>
      <text:h text:style-name="P75" text:outline-level="2">Вывод</text:h>
      <text:p text:style-name="P76">В ходе выполнения лабораторной работы был проведён анализ предметной области предприятия общественного питания. Выявлены основные бизнес-процессы, а так же процессы, которые будут автоматизирова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0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2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2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3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3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4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5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Frame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5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6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7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8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9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10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1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3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3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3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3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Frame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2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4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3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3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5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5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5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5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4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6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6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6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6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Frame15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3H45M56S</meta:editing-duration>
    <meta:editing-cycles>458</meta:editing-cycles>
    <meta:generator>LibreOffice/25.8.2.2$Windows_X86_64 LibreOffice_project/d401f2107ccab8f924a8e2df40f573aab7605b6f</meta:generator>
    <dc:title>Реферат ГОСТ</dc:title>
    <dc:date>2025-10-14T11:21:43.056395900</dc:date>
    <meta:print-date>2025-10-10T13:32:30.458860190</meta:print-date>
    <meta:printed-by>Файлы PDF</meta:printed-by>
    <meta:document-statistic meta:table-count="0" meta:image-count="3" meta:object-count="0" meta:page-count="14" meta:paragraph-count="485" meta:word-count="2249" meta:character-count="16004" meta:non-whitespace-character-count="14229"/>
  </office:meta>
</office:document-meta>
</file>