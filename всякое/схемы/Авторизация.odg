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7.75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878cm" fo:min-width="6.378cm" fo:wrap-option="wrap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cm" fo:min-width="17cm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878cm" fo:min-width="3.128cm" fo:wrap-option="wrap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eeeeee" loext:fill-use-slide-background="false" draw:opacity="100%" draw:opacity-name="" draw:textarea-horizontal-align="justify" draw:textarea-vertical-align="middle" draw:auto-grow-height="false" fo:min-height="13cm" fo:min-width="5.5cm" loext:decorative="false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3.5cm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878cm" fo:min-width="3.878cm" fo:wrap-option="wrap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1.556cm" fo:min-width="6.306cm" fo:wrap-option="wrap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654cm" fo:min-width="15.654cm" fo:wrap-option="wrap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2.75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b2b2b2" loext:fill-use-slide-background="false" draw:textarea-horizontal-align="justify" draw:textarea-vertical-align="middle" draw:auto-grow-height="false" fo:min-height="0.654cm" fo:min-width="4.904cm" fo:wrap-option="wrap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5cm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25cm" fo:min-width="16.5cm" loext:decorative="false"/>
      <style:paragraph-properties style:writing-mode="lr-tb"/>
    </style:style>
    <style:style style:name="co1" style:family="table-column">
      <style:table-column-properties style:column-width="4.749cm" style:use-optimal-column-width="false"/>
    </style:style>
    <style:style style:name="co2" style:family="table-column">
      <style:table-column-properties style:column-width="7cm" style:use-optimal-column-width="false"/>
    </style:style>
    <style:style style:name="co3" style:family="table-column">
      <style:table-column-properties style:column-width="16cm" style:use-optimal-column-width="false"/>
    </style:style>
    <style:style style:name="ro1" style:family="table-row">
      <style:table-row-properties style:row-height="2.043cm" style:use-optimal-row-height="false"/>
    </style:style>
    <style:style style:name="ro2" style:family="table-row">
      <style:table-row-properties style:row-height="2.042cm" style:use-optimal-row-height="false"/>
    </style:style>
    <style:style style:name="ro3" style:family="table-row">
      <style:table-row-properties style:row-height="1.6cm" style:use-optimal-row-height="false"/>
    </style:style>
    <style:style style:name="ro4" style:family="table-row">
      <style:table-row-properties style:row-height="1.033cm" style:use-optimal-row-height="false"/>
    </style:style>
    <style:style style:name="ro5" style:family="table-row">
      <style:table-row-properties style:row-height="1.321cm" style:use-optimal-row-height="false"/>
    </style:style>
    <style:style style:name="ro6" style:family="table-row">
      <style:table-row-properties style:row-height="1.316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solid" draw:fill-color="#eeeee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Авторизация" draw:style-name="dp1" draw:master-page-name="Обычный">
        <draw:custom-shape draw:style-name="gr1" draw:text-style-name="P2" draw:layer="layout" svg:width="8.25cm" svg:height="1.25cm" svg:x="6.75cm" svg:y="11.25cm">
          <text:p text:style-name="P1">Логин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cm" svg:height="1.25cm" svg:x="6.75cm" svg:y="12.75cm">
          <text:p text:style-name="P1">Пароль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1.25cm" svg:x="7.25cm" svg:y="14.95cm">
          <text:p text:style-name="P1">Войт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draw:layer="layout" svg:width="7cm" svg:height="1.25cm" svg:x="7.25cm" svg:y="16.45cm">
          <text:p text:style-name="P1">Настройк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2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</draw:page>
      <draw:page draw:name="Настройки" draw:style-name="dp1" draw:master-page-name="Обычный">
        <draw:custom-shape draw:style-name="gr3" draw:text-style-name="P2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48cm" svg:height="10.213cm" svg:x="2.5cm" svg:y="8.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Настройки базы данных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748cm" svg:height="10.213cm" svg:x="8.154cm" svg:y="8.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Настройки сети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4.748cm" svg:height="10.213cm" svg:x="13.659cm" svg:y="8.2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Прочие настройки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custom-shape draw:style-name="gr5" draw:text-style-name="P3" draw:layer="layout" svg:width="3.75cm" svg:height="1.25cm" svg:x="15cm" svg:y="18.75cm">
          <text:p text:style-name="P1">О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3" draw:layer="layout" svg:width="3.75cm" svg:height="1.25cm" svg:x="11cm" svg:y="18.75cm">
          <text:p text:style-name="P1">Отме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Главное окно" draw:style-name="dp1" draw:master-page-name="Обычный">
        <draw:custom-shape draw:style-name="gr3" draw:text-style-name="P2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.25cm" svg:x="2.75cm" svg:y="7.25cm">
          <text:p text:style-name="P1">ФИО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25cm" svg:x="2.5cm" svg:y="9.25cm">
          <text:p text:style-name="P1">Страница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" draw:layer="layout" svg:width="4.5cm" svg:height="1.25cm" svg:x="2.5cm" svg:y="10.75cm">
          <text:p text:style-name="P1">Страница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" draw:layer="layout" svg:width="4.5cm" svg:height="1.25cm" svg:x="2.5cm" svg:y="12.25cm">
          <text:p text:style-name="P1">Страница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" draw:layer="layout" svg:width="4.5cm" svg:height="1.25cm" svg:x="2.5cm" svg:y="18.5cm">
          <text:p text:style-name="P1">Проче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Оформление заказа" draw:style-name="dp1" draw:master-page-name="Обычный">
        <draw:custom-shape draw:style-name="gr3" draw:text-style-name="P2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999cm" svg:height="10.213cm" svg:x="2.5cm" svg:y="8.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Список блюд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  <table:table-row table:style-name="ro2">
              <table:table-cell table:style-name="bg-none"/>
            </table:table-row>
          </table:table>
          <draw:image xlink:href="Pictures/TablePreview4.svm" xlink:type="simple" xlink:show="embed" xlink:actuate="onLoad"/>
        </draw:frame>
        <draw:frame draw:style-name="gr4" draw:layer="layout" svg:width="6.999cm" svg:height="7.432cm" svg:x="11.424cm" svg:y="7.2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Текущий заказ</text:p>
              </table:table-cell>
            </table:table-row>
            <table:table-row table:style-name="ro3">
              <table:table-cell table:style-name="bg-none"/>
            </table:table-row>
            <table:table-row table:style-name="ro3">
              <table:table-cell table:style-name="bg-none"/>
            </table:table-row>
            <table:table-row table:style-name="ro3">
              <table:table-cell table:style-name="bg-none"/>
            </table:table-row>
            <table:table-row table:style-name="ro4">
              <table:table-cell table:style-name="bg-none"/>
            </table:table-row>
          </table:table>
          <draw:image xlink:href="Pictures/TablePreview5.svm" xlink:type="simple" xlink:show="embed" xlink:actuate="onLoad"/>
        </draw:frame>
        <draw:custom-shape draw:style-name="gr9" draw:text-style-name="P3" draw:layer="layout" svg:width="7cm" svg:height="2cm" svg:x="11.5cm" svg:y="17.5cm">
          <text:p text:style-name="P1">Добавить/удалить/оформ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2" draw:layer="layout" svg:width="7cm" svg:height="1.25cm" svg:x="11.5cm" svg:y="15.75cm">
          <text:p text:style-name="P1">Текстовые поля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25cm" svg:x="2.5cm" svg:y="7.25cm">
          <text:p text:style-name="P1">Выбор фильтра 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3" draw:text-style-name="P2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5.999cm" svg:height="6.599cm" svg:x="2.5cm" svg:y="8.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Список продуктов</text:p>
              </table:table-cell>
            </table:table-row>
            <table:table-row table:style-name="ro5">
              <table:table-cell table:style-name="bg-none"/>
            </table:table-row>
            <table:table-row table:style-name="ro5">
              <table:table-cell table:style-name="bg-none"/>
            </table:table-row>
            <table:table-row table:style-name="ro5">
              <table:table-cell table:style-name="bg-none"/>
            </table:table-row>
            <table:table-row table:style-name="ro6">
              <table:table-cell table:style-name="bg-none"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3" draw:layer="layout" svg:width="16.25cm" svg:height="1cm" svg:x="2.25cm" svg:y="18.5cm">
          <text:p text:style-name="P1">Добавить/убавить/установ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2" draw:layer="layout" svg:width="3.25cm" svg:height="1.25cm" svg:x="2.25cm" svg:y="17cm">
          <text:p text:style-name="P1">Продукт 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.25cm" svg:x="6cm" svg:y="17cm">
          <text:p text:style-name="P1">Количество 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custom-shape draw:style-name="gr3" draw:text-style-name="P2" draw:layer="layout" svg:width="17.5cm" svg:height="13.25cm" svg:x="1.75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5cm" svg:height="1cm" svg:x="7.75cm" svg:y="10.5cm">
          <text:p text:style-name="P1">Сформирова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" draw:layer="layout" svg:width="17cm" svg:height="1.25cm" svg:x="2cm" svg:y="9cm">
          <text:p text:style-name="P1">Поля для дополнительных данных 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cm" svg:height="1.25cm" svg:x="2cm" svg:y="7.5cm">
          <text:p text:style-name="P1">Выбор отчёта 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7cm" svg:height="7.5cm" svg:x="2cm" svg:y="12.25cm">
          <text:p text:style-name="P1">Данные отчёта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9T21:26:57.924060500</meta:creation-date>
    <dc:date>2026-04-29T22:01:44.228087300</dc:date>
    <meta:editing-duration>PT33M35S</meta:editing-duration>
    <meta:editing-cycles>32</meta:editing-cycles>
    <meta:generator>LibreOffice/25.8.5.2$Windows_X86_64 LibreOffice_project/9c8b85f387cc00a89945a79c9e6239f32e450ac2</meta:generator>
    <meta:document-statistic meta:object-count="34"/>
  </office:meta>
</office:document-meta>
</file>